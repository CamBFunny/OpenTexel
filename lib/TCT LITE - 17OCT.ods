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20.15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17.4pt"/>
    </style:style>
    <style:style style:name="co9" style:family="table-column">
      <style:table-column-properties fo:break-before="auto" style:column-width="37.5pt"/>
    </style:style>
    <style:style style:name="co10" style:family="table-column">
      <style:table-column-properties fo:break-before="auto" style:column-width="40.99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1.54pt"/>
    </style:style>
    <style:style style:name="co13" style:family="table-column">
      <style:table-column-properties fo:break-before="auto" style:column-width="22.96pt"/>
    </style:style>
    <style:style style:name="co14" style:family="table-column">
      <style:table-column-properties fo:break-before="auto" style:column-width="34.04pt"/>
    </style:style>
    <style:style style:name="co15" style:family="table-column">
      <style:table-column-properties fo:break-before="auto" style:column-width="36.79pt"/>
    </style:style>
    <style:style style:name="ro1" style:family="table-row">
      <style:table-row-properties style:row-height="1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fo:background-color="#ff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ff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f9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4" table:default-cell-style-name="Default"/>
        <table:table-row table:style-name="ro1" table:number-rows-repeated="6">
          <table:table-cell table:style-name="ce1" table:number-columns-repeated="2"/>
          <table:table-cell table:style-name="ce16"/>
          <table:table-cell table:style-name="ce1" table:number-columns-repeated="17"/>
          <table:table-cell table:number-columns-repeated="1004"/>
        </table:table-row>
        <table:table-row table:style-name="ro1">
          <table:table-cell table:style-name="ce2"/>
          <table:table-cell table:style-name="ce1"/>
          <table:table-cell table:style-name="ce16"/>
          <table:table-cell table:style-name="ce1" table:number-columns-repeated="17"/>
          <table:table-cell table:number-columns-repeated="1004"/>
        </table:table-row>
        <table:table-row table:style-name="ro2">
          <table:table-cell table:style-name="ce3" office:value-type="string" calcext:value-type="string">
            <text:p>Icon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Tier</text:p>
          </table:table-cell>
          <table:table-cell table:style-name="ce26" office:value-type="string" calcext:value-type="string">
            <text:p>HP</text:p>
          </table:table-cell>
          <table:table-cell table:style-name="ce31" office:value-type="string" calcext:value-type="string">
            <text:p>ATK</text:p>
          </table:table-cell>
          <table:table-cell table:style-name="ce35" office:value-type="string" calcext:value-type="string">
            <text:p>DEF</text:p>
          </table:table-cell>
          <table:table-cell table:style-name="ce39" office:value-type="string" calcext:value-type="string">
            <text:p>WIS</text:p>
          </table:table-cell>
          <table:table-cell table:style-name="ce43" office:value-type="string" calcext:value-type="string">
            <text:p>AGI</text:p>
          </table:table-cell>
          <table:table-cell table:style-name="ce51" office:value-type="string" calcext:value-type="string">
            <text:p>Total</text:p>
          </table:table-cell>
          <table:table-cell table:style-name="ce58" office:value-type="string" calcext:value-type="string">
            <text:p>Skill</text:p>
          </table:table-cell>
          <table:table-cell table:style-name="ce58" office:value-type="string" calcext:value-type="string">
            <text:p>Skill Target</text:p>
          </table:table-cell>
          <table:table-cell table:style-name="ce58" office:value-type="string" calcext:value-type="string">
            <text:p>Skill Rank</text:p>
          </table:table-cell>
          <table:table-cell table:style-name="ce10" office:value-type="string" calcext:value-type="string">
            <text:p>C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Element</text:p>
          </table:table-cell>
          <table:table-cell table:style-name="ce10" office:value-type="string" calcext:value-type="string">
            <text:p>Tribe</text:p>
          </table:table-cell>
          <table:table-cell table:style-name="ce10" office:value-type="string" calcext:value-type="string">
            <text:p>Tier</text:p>
          </table:table-cell>
          <table:table-cell table:style-name="ce10" office:value-type="string" calcext:value-type="string">
            <text:p>SEF</text:p>
          </table:table-cell>
          <table:table-cell table:style-name="ce73" office:value-type="string" calcext:value-type="string">
            <text:p>Min Lvl</text:p>
          </table:table-cell>
          <table:table-cell table:style-name="ce73" office:value-type="string" calcext:value-type="string">
            <text:p>Max Lvl</text:p>
          </table:table-cell>
          <table:table-cell table:style-name="ce74" office:value-type="string" calcext:value-type="string">
            <text:p>In Game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b/b0/Ashtad_Icon.png/revision/latest?cb=201304262137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shtad_-_Babak_-_Artachsharta&quot;;&quot;Ashtad&quot;)" office:value-type="string" office:string-value="Ashtad" calcext:value-type="string">
            <text:p>Ashtad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220" calcext:value-type="float">
            <text:p>220</text:p>
          </table:table-cell>
          <table:table-cell table:style-name="ce36" office:value-type="float" office:value="108" calcext:value-type="float">
            <text:p>108</text:p>
          </table:table-cell>
          <table:table-cell table:style-name="ce40" office:value-type="float" office:value="180" calcext:value-type="float">
            <text:p>180</text:p>
          </table:table-cell>
          <table:table-cell table:style-name="ce44" office:value-type="float" office:value="168" calcext:value-type="float">
            <text:p>168</text:p>
          </table:table-cell>
          <table:table-cell table:style-name="ce52" table:formula="of:=SUM([.D9:.H9])" office:value-type="float" office:value="884" calcext:value-type="float">
            <text:p>884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]=126;70;IF([.T9]=112;70;IF([.T9]=98;70;IF([.T9]=96;60;IF([.T9]=84;60;IF([.T9]=108;60;IF([.T9]=90;50;IF([.T9]=72;40;IF([.T9]=80;40;IF([.T9]=100;50;IF([.T9]=54;30;IF([.T9]=36;20;IF([.T9]=18;10;IF([.T9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b/b9/Babak_Icon.png/revision/latest?cb=20131002183300&quot;)" office:value-type="string" office:string-value="" calcext:value-type="error">
            <text:p>#NAME?</text:p>
          </table:table-cell>
          <table:table-cell table:style-name="ce11" table:formula="of:=HYPERLINK(&quot;http://defenderoftexel.wikia.com/wiki/Ashtad_-_Babak_-_Artachsharta&quot;;&quot;Babak&quot;)" office:value-type="string" office:string-value="Babak" calcext:value-type="string">
            <text:p>Babak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60" calcext:value-type="float">
            <text:p>360</text:p>
          </table:table-cell>
          <table:table-cell table:style-name="ce32" office:value-type="float" office:value="394" calcext:value-type="float">
            <text:p>394</text:p>
          </table:table-cell>
          <table:table-cell table:style-name="ce36" office:value-type="float" office:value="167" calcext:value-type="float">
            <text:p>167</text:p>
          </table:table-cell>
          <table:table-cell table:style-name="ce40" office:value-type="float" office:value="305" calcext:value-type="float">
            <text:p>305</text:p>
          </table:table-cell>
          <table:table-cell table:style-name="ce44" office:value-type="float" office:value="279" calcext:value-type="float">
            <text:p>279</text:p>
          </table:table-cell>
          <table:table-cell table:style-name="ce52" table:formula="of:=SUM([.D10:.H10])" office:value-type="float" office:value="1505" calcext:value-type="float">
            <text:p>1505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]=126;70;IF([.T10]=112;70;IF([.T10]=98;70;IF([.T10]=96;60;IF([.T10]=84;60;IF([.T10]=108;60;IF([.T10]=90;50;IF([.T10]=72;40;IF([.T10]=80;40;IF([.T10]=100;50;IF([.T10]=54;30;IF([.T10]=36;20;IF([.T10]=18;10;IF([.T1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f/f8/Artachsharta_Icon.png/revision/latest?cb=2013042621413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shtad_-_Babak_-_Artachsharta&quot;;&quot;Artachsharta&quot;)" office:value-type="string" office:string-value="Artachsharta" calcext:value-type="string">
            <text:p>Artachshart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932" calcext:value-type="float">
            <text:p>932</text:p>
          </table:table-cell>
          <table:table-cell table:style-name="ce32" office:value-type="float" office:value="995" calcext:value-type="float">
            <text:p>995</text:p>
          </table:table-cell>
          <table:table-cell table:style-name="ce36" office:value-type="float" office:value="469" calcext:value-type="float">
            <text:p>469</text:p>
          </table:table-cell>
          <table:table-cell table:style-name="ce40" office:value-type="float" office:value="803" calcext:value-type="float">
            <text:p>803</text:p>
          </table:table-cell>
          <table:table-cell table:style-name="ce44" office:value-type="float" office:value="738" calcext:value-type="float">
            <text:p>738</text:p>
          </table:table-cell>
          <table:table-cell table:style-name="ce52" table:formula="of:=SUM([.D11:.H11])" office:value-type="float" office:value="3937" calcext:value-type="float">
            <text:p>3937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]=126;70;IF([.T11]=112;70;IF([.T11]=98;70;IF([.T11]=96;60;IF([.T11]=84;60;IF([.T11]=108;60;IF([.T11]=90;50;IF([.T11]=72;40;IF([.T11]=80;40;IF([.T11]=100;50;IF([.T11]=54;30;IF([.T11]=36;20;IF([.T11]=18;10;IF([.T11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f/f4/Ehsan_Icon.png/revision/latest?cb=20130428022943&quot;)" office:value-type="string" office:string-value="" calcext:value-type="error">
            <text:p>#NAME?</text:p>
          </table:table-cell>
          <table:table-cell table:style-name="ce11" table:formula="of:=HYPERLINK(&quot;http://defenderoftexel.wikia.com/wiki/Ehsan_-_Elburz_-_Faridoon&quot;;&quot;Ehsan&quot;)" office:value-type="string" office:string-value="Ehsan" calcext:value-type="string">
            <text:p>Ehsa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28" calcext:value-type="float">
            <text:p>228</text:p>
          </table:table-cell>
          <table:table-cell table:style-name="ce32" office:value-type="float" office:value="245" calcext:value-type="float">
            <text:p>245</text:p>
          </table:table-cell>
          <table:table-cell table:style-name="ce36" office:value-type="float" office:value="122" calcext:value-type="float">
            <text:p>122</text:p>
          </table:table-cell>
          <table:table-cell table:style-name="ce40" office:value-type="float" office:value="201" calcext:value-type="float">
            <text:p>201</text:p>
          </table:table-cell>
          <table:table-cell table:style-name="ce44" office:value-type="float" office:value="185" calcext:value-type="float">
            <text:p>185</text:p>
          </table:table-cell>
          <table:table-cell table:style-name="ce52" table:formula="of:=SUM([.D12:.H12])" office:value-type="float" office:value="981" calcext:value-type="float">
            <text:p>981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]=126;70;IF([.T12]=112;70;IF([.T12]=98;70;IF([.T12]=96;60;IF([.T12]=84;60;IF([.T12]=108;60;IF([.T12]=90;50;IF([.T12]=72;40;IF([.T12]=80;40;IF([.T12]=100;50;IF([.T12]=54;30;IF([.T12]=36;20;IF([.T12]=18;10;IF([.T12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0/04/Elburz_Icon.png/revision/latest?cb=201304280229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Ehsan_-_Elburz_-_Faridoon&quot;;&quot;Elburz&quot;)" office:value-type="string" office:string-value="Elburz" calcext:value-type="string">
            <text:p>Elburz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3:.H13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]=126;70;IF([.T13]=112;70;IF([.T13]=98;70;IF([.T13]=96;60;IF([.T13]=84;60;IF([.T13]=108;60;IF([.T13]=90;50;IF([.T13]=72;40;IF([.T13]=80;40;IF([.T13]=100;50;IF([.T13]=54;30;IF([.T13]=36;20;IF([.T13]=18;10;IF([.T1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7/7b/Faridoon_Icon.png/revision/latest?cb=201304280229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Ehsan_-_Elburz_-_Faridoon&quot;;&quot;Faridoon&quot;)" office:value-type="string" office:string-value="Faridoon" calcext:value-type="string">
            <text:p>Faridoo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083" calcext:value-type="float">
            <text:p>1083</text:p>
          </table:table-cell>
          <table:table-cell table:style-name="ce32" office:value-type="float" office:value="1159" calcext:value-type="float">
            <text:p>1159</text:p>
          </table:table-cell>
          <table:table-cell table:style-name="ce36" office:value-type="float" office:value="546" calcext:value-type="float">
            <text:p>546</text:p>
          </table:table-cell>
          <table:table-cell table:style-name="ce40" office:value-type="float" office:value="931" calcext:value-type="float">
            <text:p>931</text:p>
          </table:table-cell>
          <table:table-cell table:style-name="ce44" office:value-type="float" office:value="859" calcext:value-type="float">
            <text:p>859</text:p>
          </table:table-cell>
          <table:table-cell table:style-name="ce52" table:formula="of:=SUM([.D14:.H14])" office:value-type="float" office:value="4578" calcext:value-type="float">
            <text:p>4578</text:p>
          </table:table-cell>
          <table:table-cell table:style-name="ce59" office:value-type="string" calcext:value-type="string">
            <text:p>Illu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]=126;70;IF([.T14]=112;70;IF([.T14]=98;70;IF([.T14]=96;60;IF([.T14]=84;60;IF([.T14]=108;60;IF([.T14]=90;50;IF([.T14]=72;40;IF([.T14]=80;40;IF([.T14]=100;50;IF([.T14]=54;30;IF([.T14]=36;20;IF([.T14]=18;10;IF([.T1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4/4f/Etty_Icon.png/revision/latest?cb=201304280229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Etty_-_Farideh_-_Gatha&quot;;&quot;Etty&quot;)" office:value-type="string" office:string-value="Etty" calcext:value-type="string">
            <text:p>Etty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24" calcext:value-type="float">
            <text:p>224</text:p>
          </table:table-cell>
          <table:table-cell table:style-name="ce32" office:value-type="float" office:value="241" calcext:value-type="float">
            <text:p>241</text:p>
          </table:table-cell>
          <table:table-cell table:style-name="ce36" office:value-type="float" office:value="118" calcext:value-type="float">
            <text:p>118</text:p>
          </table:table-cell>
          <table:table-cell table:style-name="ce40" office:value-type="float" office:value="198" calcext:value-type="float">
            <text:p>198</text:p>
          </table:table-cell>
          <table:table-cell table:style-name="ce44" office:value-type="float" office:value="182" calcext:value-type="float">
            <text:p>182</text:p>
          </table:table-cell>
          <table:table-cell table:style-name="ce52" table:formula="of:=SUM([.D15:.H15])" office:value-type="float" office:value="963" calcext:value-type="float">
            <text:p>963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]=126;70;IF([.T15]=112;70;IF([.T15]=98;70;IF([.T15]=96;60;IF([.T15]=84;60;IF([.T15]=108;60;IF([.T15]=90;50;IF([.T15]=72;40;IF([.T15]=80;40;IF([.T15]=100;50;IF([.T15]=54;30;IF([.T15]=36;20;IF([.T15]=18;10;IF([.T1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6/69/Farideh_Icon.png/revision/latest?cb=201304280229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Etty_-_Farideh_-_Gatha&quot;;&quot;Farideh&quot;)" office:value-type="string" office:string-value="Farideh" calcext:value-type="string">
            <text:p>Farideh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380" calcext:value-type="float">
            <text:p>380</text:p>
          </table:table-cell>
          <table:table-cell table:style-name="ce32" office:value-type="float" office:value="415" calcext:value-type="float">
            <text:p>415</text:p>
          </table:table-cell>
          <table:table-cell table:style-name="ce36" office:value-type="float" office:value="177" calcext:value-type="float">
            <text:p>177</text:p>
          </table:table-cell>
          <table:table-cell table:style-name="ce40" office:value-type="float" office:value="321" calcext:value-type="float">
            <text:p>321</text:p>
          </table:table-cell>
          <table:table-cell table:style-name="ce44" office:value-type="float" office:value="292" calcext:value-type="float">
            <text:p>292</text:p>
          </table:table-cell>
          <table:table-cell table:style-name="ce52" table:formula="of:=SUM([.D16:.H16])" office:value-type="float" office:value="1585" calcext:value-type="float">
            <text:p>1585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]=126;70;IF([.T16]=112;70;IF([.T16]=98;70;IF([.T16]=96;60;IF([.T16]=84;60;IF([.T16]=108;60;IF([.T16]=90;50;IF([.T16]=72;40;IF([.T16]=80;40;IF([.T16]=100;50;IF([.T16]=54;30;IF([.T16]=36;20;IF([.T16]=18;10;IF([.T1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f/f7/Gatha_Icon.png/revision/latest?cb=201304280229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Etty_-_Farideh_-_Gatha&quot;;&quot;Gatha&quot;)" office:value-type="string" office:string-value="Gatha" calcext:value-type="string">
            <text:p>Gath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974" calcext:value-type="float">
            <text:p>974</text:p>
          </table:table-cell>
          <table:table-cell table:style-name="ce32" office:value-type="float" office:value="1045" calcext:value-type="float">
            <text:p>1045</text:p>
          </table:table-cell>
          <table:table-cell table:style-name="ce36" office:value-type="float" office:value="492" calcext:value-type="float">
            <text:p>492</text:p>
          </table:table-cell>
          <table:table-cell table:style-name="ce40" office:value-type="float" office:value="837" calcext:value-type="float">
            <text:p>837</text:p>
          </table:table-cell>
          <table:table-cell table:style-name="ce44" office:value-type="float" office:value="773" calcext:value-type="float">
            <text:p>773</text:p>
          </table:table-cell>
          <table:table-cell table:style-name="ce52" table:formula="of:=SUM([.D17:.H17])" office:value-type="float" office:value="4121" calcext:value-type="float">
            <text:p>4121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]=126;70;IF([.T17]=112;70;IF([.T17]=98;70;IF([.T17]=96;60;IF([.T17]=84;60;IF([.T17]=108;60;IF([.T17]=90;50;IF([.T17]=72;40;IF([.T17]=80;40;IF([.T17]=100;50;IF([.T17]=54;30;IF([.T17]=36;20;IF([.T17]=18;10;IF([.T1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d/d0/Laleh_Icon.png/revision/latest?cb=201304280229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leh_-_Leila_-_Lila&quot;;&quot;Laleh&quot;)" office:value-type="string" office:string-value="Laleh" calcext:value-type="string">
            <text:p>Laleh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22" calcext:value-type="float">
            <text:p>222</text:p>
          </table:table-cell>
          <table:table-cell table:style-name="ce32" office:value-type="float" office:value="234" calcext:value-type="float">
            <text:p>234</text:p>
          </table:table-cell>
          <table:table-cell table:style-name="ce36" office:value-type="float" office:value="115" calcext:value-type="float">
            <text:p>115</text:p>
          </table:table-cell>
          <table:table-cell table:style-name="ce40" office:value-type="float" office:value="190" calcext:value-type="float">
            <text:p>190</text:p>
          </table:table-cell>
          <table:table-cell table:style-name="ce44" office:value-type="float" office:value="178" calcext:value-type="float">
            <text:p>178</text:p>
          </table:table-cell>
          <table:table-cell table:style-name="ce52" table:formula="of:=SUM([.D18:.H18])" office:value-type="float" office:value="939" calcext:value-type="float">
            <text:p>939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]=126;70;IF([.T18]=112;70;IF([.T18]=98;70;IF([.T18]=96;60;IF([.T18]=84;60;IF([.T18]=108;60;IF([.T18]=90;50;IF([.T18]=72;40;IF([.T18]=80;40;IF([.T18]=100;50;IF([.T18]=54;30;IF([.T18]=36;20;IF([.T18]=18;10;IF([.T18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b/bf/Leila_Icon.png/revision/latest?cb=201304280229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leh_-_Leila_-_Lila&quot;;&quot;Leila&quot;)" office:value-type="string" office:string-value="Leila" calcext:value-type="string">
            <text:p>Leil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370" calcext:value-type="float">
            <text:p>370</text:p>
          </table:table-cell>
          <table:table-cell table:style-name="ce32" office:value-type="float" office:value="404" calcext:value-type="float">
            <text:p>404</text:p>
          </table:table-cell>
          <table:table-cell table:style-name="ce36" office:value-type="float" office:value="174" calcext:value-type="float">
            <text:p>174</text:p>
          </table:table-cell>
          <table:table-cell table:style-name="ce40" office:value-type="float" office:value="315" calcext:value-type="float">
            <text:p>315</text:p>
          </table:table-cell>
          <table:table-cell table:style-name="ce44" office:value-type="float" office:value="287" calcext:value-type="float">
            <text:p>287</text:p>
          </table:table-cell>
          <table:table-cell table:style-name="ce52" table:formula="of:=SUM([.D19:.H19])" office:value-type="float" office:value="1550" calcext:value-type="float">
            <text:p>1550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]=126;70;IF([.T19]=112;70;IF([.T19]=98;70;IF([.T19]=96;60;IF([.T19]=84;60;IF([.T19]=108;60;IF([.T19]=90;50;IF([.T19]=72;40;IF([.T19]=80;40;IF([.T19]=100;50;IF([.T19]=54;30;IF([.T19]=36;20;IF([.T19]=18;10;IF([.T1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0/0a/Lila_Icon.png/revision/latest?cb=201304280229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leh_-_Leila_-_Lila&quot;;&quot;Lila&quot;)" office:value-type="string" office:string-value="Lila" calcext:value-type="string">
            <text:p>Lil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963" calcext:value-type="float">
            <text:p>963</text:p>
          </table:table-cell>
          <table:table-cell table:style-name="ce32" office:value-type="float" office:value="1031" calcext:value-type="float">
            <text:p>1031</text:p>
          </table:table-cell>
          <table:table-cell table:style-name="ce36" office:value-type="float" office:value="486" calcext:value-type="float">
            <text:p>486</text:p>
          </table:table-cell>
          <table:table-cell table:style-name="ce40" office:value-type="float" office:value="831" calcext:value-type="float">
            <text:p>831</text:p>
          </table:table-cell>
          <table:table-cell table:style-name="ce44" office:value-type="float" office:value="766" calcext:value-type="float">
            <text:p>766</text:p>
          </table:table-cell>
          <table:table-cell table:style-name="ce52" table:formula="of:=SUM([.D20:.H20])" office:value-type="float" office:value="4077" calcext:value-type="float">
            <text:p>4077</text:p>
          </table:table-cell>
          <table:table-cell table:style-name="ce59" office:value-type="string" calcext:value-type="string">
            <text:p>Quicken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0]=126;70;IF([.T20]=112;70;IF([.T20]=98;70;IF([.T20]=96;60;IF([.T20]=84;60;IF([.T20]=108;60;IF([.T20]=90;50;IF([.T20]=72;40;IF([.T20]=80;40;IF([.T20]=100;50;IF([.T20]=54;30;IF([.T20]=36;20;IF([.T20]=18;10;IF([.T20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1/1f/Kaveh_Icon.png/revision/latest?cb=201304280229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Kaveh_-_Manu_-_Ormazd&quot;;&quot;Kaveh&quot;)" office:value-type="string" office:string-value="Kaveh" calcext:value-type="string">
            <text:p>Kaveh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457" calcext:value-type="float">
            <text:p>457</text:p>
          </table:table-cell>
          <table:table-cell table:style-name="ce32" office:value-type="float" office:value="391" calcext:value-type="float">
            <text:p>391</text:p>
          </table:table-cell>
          <table:table-cell table:style-name="ce36" office:value-type="float" office:value="205" calcext:value-type="float">
            <text:p>205</text:p>
          </table:table-cell>
          <table:table-cell table:style-name="ce40" office:value-type="float" office:value="40" calcext:value-type="float">
            <text:p>40</text:p>
          </table:table-cell>
          <table:table-cell table:style-name="ce44" office:value-type="float" office:value="156" calcext:value-type="float">
            <text:p>156</text:p>
          </table:table-cell>
          <table:table-cell table:style-name="ce52" table:formula="of:=SUM([.D21:.H21])" office:value-type="float" office:value="1249" calcext:value-type="float">
            <text:p>1249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1]=126;70;IF([.T21]=112;70;IF([.T21]=98;70;IF([.T21]=96;60;IF([.T21]=84;60;IF([.T21]=108;60;IF([.T21]=90;50;IF([.T21]=72;40;IF([.T21]=80;40;IF([.T21]=100;50;IF([.T21]=54;30;IF([.T21]=36;20;IF([.T21]=18;10;IF([.T21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3/35/Manu_Icon.png/revision/latest?cb=201304280229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aveh_-_Manu_-_Ormazd&quot;;&quot;Manu&quot;)" office:value-type="string" office:string-value="Manu" calcext:value-type="string">
            <text:p>Manu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921" calcext:value-type="float">
            <text:p>921</text:p>
          </table:table-cell>
          <table:table-cell table:style-name="ce32" office:value-type="float" office:value="747" calcext:value-type="float">
            <text:p>747</text:p>
          </table:table-cell>
          <table:table-cell table:style-name="ce36" office:value-type="float" office:value="336" calcext:value-type="float">
            <text:p>336</text:p>
          </table:table-cell>
          <table:table-cell table:style-name="ce40" office:value-type="float" office:value="52" calcext:value-type="float">
            <text:p>52</text:p>
          </table:table-cell>
          <table:table-cell table:style-name="ce44" office:value-type="float" office:value="235" calcext:value-type="float">
            <text:p>235</text:p>
          </table:table-cell>
          <table:table-cell table:style-name="ce52" table:formula="of:=SUM([.D22:.H22])" office:value-type="float" office:value="2291" calcext:value-type="float">
            <text:p>2291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2]=126;70;IF([.T22]=112;70;IF([.T22]=98;70;IF([.T22]=96;60;IF([.T22]=84;60;IF([.T22]=108;60;IF([.T22]=90;50;IF([.T22]=72;40;IF([.T22]=80;40;IF([.T22]=100;50;IF([.T22]=54;30;IF([.T22]=36;20;IF([.T22]=18;10;IF([.T2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d/d0/Ormazd_Icon.png/revision/latest?cb=201304280229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aveh_-_Manu_-_Ormazd&quot;;&quot;Ormazd&quot;)" office:value-type="string" office:string-value="Ormazd" calcext:value-type="string">
            <text:p>Ormazd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204" calcext:value-type="float">
            <text:p>2204</text:p>
          </table:table-cell>
          <table:table-cell table:style-name="ce32" office:value-type="float" office:value="1843" calcext:value-type="float">
            <text:p>1843</text:p>
          </table:table-cell>
          <table:table-cell table:style-name="ce36" office:value-type="float" office:value="911" calcext:value-type="float">
            <text:p>911</text:p>
          </table:table-cell>
          <table:table-cell table:style-name="ce40" office:value-type="float" office:value="171" calcext:value-type="float">
            <text:p>171</text:p>
          </table:table-cell>
          <table:table-cell table:style-name="ce44" office:value-type="float" office:value="673" calcext:value-type="float">
            <text:p>673</text:p>
          </table:table-cell>
          <table:table-cell table:style-name="ce52" table:formula="of:=SUM([.D23:.H23])" office:value-type="float" office:value="5802" calcext:value-type="float">
            <text:p>5802</text:p>
          </table:table-cell>
          <table:table-cell table:style-name="ce59" office:value-type="string" calcext:value-type="string">
            <text:p>Counte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]=126;70;IF([.T23]=112;70;IF([.T23]=98;70;IF([.T23]=96;60;IF([.T23]=84;60;IF([.T23]=108;60;IF([.T23]=90;50;IF([.T23]=72;40;IF([.T23]=80;40;IF([.T23]=100;50;IF([.T23]=54;30;IF([.T23]=36;20;IF([.T23]=18;10;IF([.T2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1/1e/Mihrdat_Icon.png/revision/latest?cb=201304280235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Mihrdat_-_Mirrikh_-_Mirza&quot;;&quot;Mihrdat&quot;)" office:value-type="string" office:string-value="Mihrdat" calcext:value-type="string">
            <text:p>Mihrdat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627" calcext:value-type="float">
            <text:p>627</text:p>
          </table:table-cell>
          <table:table-cell table:style-name="ce32" office:value-type="float" office:value="740" calcext:value-type="float">
            <text:p>740</text:p>
          </table:table-cell>
          <table:table-cell table:style-name="ce36" office:value-type="float" office:value="346" calcext:value-type="float">
            <text:p>346</text:p>
          </table:table-cell>
          <table:table-cell table:style-name="ce40" office:value-type="float" office:value="65" calcext:value-type="float">
            <text:p>65</text:p>
          </table:table-cell>
          <table:table-cell table:style-name="ce44" office:value-type="float" office:value="88" calcext:value-type="float">
            <text:p>88</text:p>
          </table:table-cell>
          <table:table-cell table:style-name="ce52" table:formula="of:=SUM([.D24:.H24])" office:value-type="float" office:value="1866" calcext:value-type="float">
            <text:p>1866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]=126;70;IF([.T24]=112;70;IF([.T24]=98;70;IF([.T24]=96;60;IF([.T24]=84;60;IF([.T24]=108;60;IF([.T24]=90;50;IF([.T24]=72;40;IF([.T24]=80;40;IF([.T24]=100;50;IF([.T24]=54;30;IF([.T24]=36;20;IF([.T24]=18;10;IF([.T2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3/Mirrikh_Icon.png/revision/latest?cb=201304280235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Mihrdat_-_Mirrikh_-_Mirza&quot;;&quot;Mirrikh&quot;)" office:value-type="string" office:string-value="Mirrikh" calcext:value-type="string">
            <text:p>Mirrikh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:.H25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]=126;70;IF([.T25]=112;70;IF([.T25]=98;70;IF([.T25]=96;60;IF([.T25]=84;60;IF([.T25]=108;60;IF([.T25]=90;50;IF([.T25]=72;40;IF([.T25]=80;40;IF([.T25]=100;50;IF([.T25]=54;30;IF([.T25]=36;20;IF([.T25]=18;10;IF([.T2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2/21/Mirza_Icon.png/revision/latest?cb=201304280235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Mihrdat_-_Mirrikh_-_Mirza&quot;;&quot;Mirza&quot;)" office:value-type="string" office:string-value="Mirza" calcext:value-type="string">
            <text:p>Mirz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881" calcext:value-type="float">
            <text:p>2881</text:p>
          </table:table-cell>
          <table:table-cell table:style-name="ce32" office:value-type="float" office:value="3293" calcext:value-type="float">
            <text:p>3293</text:p>
          </table:table-cell>
          <table:table-cell table:style-name="ce36" office:value-type="float" office:value="1886" calcext:value-type="float">
            <text:p>1886</text:p>
          </table:table-cell>
          <table:table-cell table:style-name="ce40" office:value-type="float" office:value="416" calcext:value-type="float">
            <text:p>416</text:p>
          </table:table-cell>
          <table:table-cell table:style-name="ce44" office:value-type="float" office:value="552" calcext:value-type="float">
            <text:p>552</text:p>
          </table:table-cell>
          <table:table-cell table:style-name="ce52" table:formula="of:=SUM([.D26:.H26])" office:value-type="float" office:value="9028" calcext:value-type="float">
            <text:p>9028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6]=126;70;IF([.T26]=112;70;IF([.T26]=98;70;IF([.T26]=96;60;IF([.T26]=84;60;IF([.T26]=108;60;IF([.T26]=90;50;IF([.T26]=72;40;IF([.T26]=80;40;IF([.T26]=100;50;IF([.T26]=54;30;IF([.T26]=36;20;IF([.T26]=18;10;IF([.T2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4/41/Roshan_Icon.png/revision/latest?cb=201304280235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han_-_Saeedh_-_Sarosh&quot;;&quot;Roshan&quot;)" office:value-type="string" office:string-value="Roshan" calcext:value-type="string">
            <text:p>Roshan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661" calcext:value-type="float">
            <text:p>661</text:p>
          </table:table-cell>
          <table:table-cell table:style-name="ce32" office:value-type="float" office:value="783" calcext:value-type="float">
            <text:p>783</text:p>
          </table:table-cell>
          <table:table-cell table:style-name="ce36" office:value-type="float" office:value="362" calcext:value-type="float">
            <text:p>362</text:p>
          </table:table-cell>
          <table:table-cell table:style-name="ce40" office:value-type="float" office:value="38" calcext:value-type="float">
            <text:p>38</text:p>
          </table:table-cell>
          <table:table-cell table:style-name="ce44" office:value-type="float" office:value="94" calcext:value-type="float">
            <text:p>94</text:p>
          </table:table-cell>
          <table:table-cell table:style-name="ce52" table:formula="of:=SUM([.D27:.H27])" office:value-type="float" office:value="1938" calcext:value-type="float">
            <text:p>1938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]=126;70;IF([.T27]=112;70;IF([.T27]=98;70;IF([.T27]=96;60;IF([.T27]=84;60;IF([.T27]=108;60;IF([.T27]=90;50;IF([.T27]=72;40;IF([.T27]=80;40;IF([.T27]=100;50;IF([.T27]=54;30;IF([.T27]=36;20;IF([.T27]=18;10;IF([.T2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c/cf/Saeedh_Icon.png/revision/latest?cb=201304280235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han_-_Saeedh_-_Sarosh&quot;;&quot;Saeedh&quot;)" office:value-type="string" office:string-value="Saeedh" calcext:value-type="string">
            <text:p>Saeedh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:.H28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]=126;70;IF([.T28]=112;70;IF([.T28]=98;70;IF([.T28]=96;60;IF([.T28]=84;60;IF([.T28]=108;60;IF([.T28]=90;50;IF([.T28]=72;40;IF([.T28]=80;40;IF([.T28]=100;50;IF([.T28]=54;30;IF([.T28]=36;20;IF([.T28]=18;10;IF([.T2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e/ed/Sarosh_Icon.png/revision/latest?cb=201304280235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han_-_Saeedh_-_Sarosh&quot;;&quot;Sarosh&quot;)" office:value-type="string" office:string-value="Sarosh" calcext:value-type="string">
            <text:p>Sarosh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871" calcext:value-type="float">
            <text:p>2871</text:p>
          </table:table-cell>
          <table:table-cell table:style-name="ce32" office:value-type="float" office:value="3286" calcext:value-type="float">
            <text:p>3286</text:p>
          </table:table-cell>
          <table:table-cell table:style-name="ce36" office:value-type="float" office:value="1759" calcext:value-type="float">
            <text:p>1759</text:p>
          </table:table-cell>
          <table:table-cell table:style-name="ce40" office:value-type="float" office:value="414" calcext:value-type="float">
            <text:p>414</text:p>
          </table:table-cell>
          <table:table-cell table:style-name="ce44" office:value-type="float" office:value="552" calcext:value-type="float">
            <text:p>552</text:p>
          </table:table-cell>
          <table:table-cell table:style-name="ce52" table:formula="of:=SUM([.D29:.H29])" office:value-type="float" office:value="8882" calcext:value-type="float">
            <text:p>8882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]=126;70;IF([.T29]=112;70;IF([.T29]=98;70;IF([.T29]=96;60;IF([.T29]=84;60;IF([.T29]=108;60;IF([.T29]=90;50;IF([.T29]=72;40;IF([.T29]=80;40;IF([.T29]=100;50;IF([.T29]=54;30;IF([.T29]=36;20;IF([.T29]=18;10;IF([.T2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6/6b/Larce_Icon.png/revision/latest?cb=201304280242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ce_-_Laris_-_Lecne&quot;;&quot;Larce&quot;)" office:value-type="string" office:string-value="Larce" calcext:value-type="string">
            <text:p>Larce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0:.H30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0]=126;70;IF([.T30]=112;70;IF([.T30]=98;70;IF([.T30]=96;60;IF([.T30]=84;60;IF([.T30]=108;60;IF([.T30]=90;50;IF([.T30]=72;40;IF([.T30]=80;40;IF([.T30]=100;50;IF([.T30]=54;30;IF([.T30]=36;20;IF([.T30]=18;10;IF([.T3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7/70/Laris_Icon.png/revision/latest?cb=201304280242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ce_-_Laris_-_Lecne&quot;;&quot;Laris&quot;)" office:value-type="string" office:string-value="Laris" calcext:value-type="string">
            <text:p>Laris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1:.H31])" office:value-type="float" office:value="5" calcext:value-type="float">
            <text:p>5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]=126;70;IF([.T31]=112;70;IF([.T31]=98;70;IF([.T31]=96;60;IF([.T31]=84;60;IF([.T31]=108;60;IF([.T31]=90;50;IF([.T31]=72;40;IF([.T31]=80;40;IF([.T31]=100;50;IF([.T31]=54;30;IF([.T31]=36;20;IF([.T31]=18;10;IF([.T31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2/27/Lecne_Icon.png/revision/latest?cb=201304280242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ce_-_Laris_-_Lecne&quot;;&quot;Lecne&quot;)" office:value-type="string" office:string-value="Lecne" calcext:value-type="string">
            <text:p>Lecne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645" calcext:value-type="float">
            <text:p>1645</text:p>
          </table:table-cell>
          <table:table-cell table:style-name="ce32" office:value-type="float" office:value="1252" calcext:value-type="float">
            <text:p>1252</text:p>
          </table:table-cell>
          <table:table-cell table:style-name="ce36" office:value-type="float" office:value="854" calcext:value-type="float">
            <text:p>854</text:p>
          </table:table-cell>
          <table:table-cell table:style-name="ce40" office:value-type="float" office:value="1215" calcext:value-type="float">
            <text:p>1215</text:p>
          </table:table-cell>
          <table:table-cell table:style-name="ce44" office:value-type="float" office:value="3070" calcext:value-type="float">
            <text:p>3070</text:p>
          </table:table-cell>
          <table:table-cell table:style-name="ce52" table:formula="of:=SUM([.D32:.H32])" office:value-type="float" office:value="8036" calcext:value-type="float">
            <text:p>8036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2]=126;70;IF([.T32]=112;70;IF([.T32]=98;70;IF([.T32]=96;60;IF([.T32]=84;60;IF([.T32]=108;60;IF([.T32]=90;50;IF([.T32]=72;40;IF([.T32]=80;40;IF([.T32]=100;50;IF([.T32]=54;30;IF([.T32]=36;20;IF([.T32]=18;10;IF([.T3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6/6c/Apatrui_Icon.png/revision/latest?cb=201304280242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Apatrui_-_Aranthur_-_Arnza&quot;;&quot;Apatrui&quot;)" office:value-type="string" office:string-value="Apatrui" calcext:value-type="string">
            <text:p>Apatrui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13" calcext:value-type="float">
            <text:p>213</text:p>
          </table:table-cell>
          <table:table-cell table:style-name="ce32" office:value-type="float" office:value="595" calcext:value-type="float">
            <text:p>595</text:p>
          </table:table-cell>
          <table:table-cell table:style-name="ce36" office:value-type="float" office:value="98" calcext:value-type="float">
            <text:p>98</text:p>
          </table:table-cell>
          <table:table-cell table:style-name="ce40" office:value-type="float" office:value="559" calcext:value-type="float">
            <text:p>559</text:p>
          </table:table-cell>
          <table:table-cell table:style-name="ce44" office:value-type="float" office:value="135" calcext:value-type="float">
            <text:p>135</text:p>
          </table:table-cell>
          <table:table-cell table:style-name="ce52" table:formula="of:=SUM([.D33:.H33])" office:value-type="float" office:value="1600" calcext:value-type="float">
            <text:p>1600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3]=126;70;IF([.T33]=112;70;IF([.T33]=98;70;IF([.T33]=96;60;IF([.T33]=84;60;IF([.T33]=108;60;IF([.T33]=90;50;IF([.T33]=72;40;IF([.T33]=80;40;IF([.T33]=100;50;IF([.T33]=54;30;IF([.T33]=36;20;IF([.T33]=18;10;IF([.T3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0/Aranthur_Icon.png/revision/latest?cb=2013042802424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patrui_-_Aranthur_-_Arnza&quot;;&quot;Aranthur&quot;)" office:value-type="string" office:string-value="Aranthur" calcext:value-type="string">
            <text:p>Aranthur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4:.H34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4]=126;70;IF([.T34]=112;70;IF([.T34]=98;70;IF([.T34]=96;60;IF([.T34]=84;60;IF([.T34]=108;60;IF([.T34]=90;50;IF([.T34]=72;40;IF([.T34]=80;40;IF([.T34]=100;50;IF([.T34]=54;30;IF([.T34]=36;20;IF([.T34]=18;10;IF([.T3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c/Arnza_Icon.png/revision/latest?cb=20130428024249&quot;)" office:value-type="string" office:string-value="" calcext:value-type="error">
            <text:p>#NAME?</text:p>
          </table:table-cell>
          <table:table-cell table:style-name="ce11" table:formula="of:=HYPERLINK(&quot;http://defenderoftexel.wikia.com/wiki/Apatrui_-_Aranthur_-_Arnza&quot;;&quot;Arnza&quot;)" office:value-type="string" office:string-value="Arnza" calcext:value-type="string">
            <text:p>Arnz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166" calcext:value-type="float">
            <text:p>1166</text:p>
          </table:table-cell>
          <table:table-cell table:style-name="ce32" office:value-type="float" office:value="2716" calcext:value-type="float">
            <text:p>2716</text:p>
          </table:table-cell>
          <table:table-cell table:style-name="ce36" office:value-type="float" office:value="592" calcext:value-type="float">
            <text:p>592</text:p>
          </table:table-cell>
          <table:table-cell table:style-name="ce40" office:value-type="float" office:value="2576" calcext:value-type="float">
            <text:p>2576</text:p>
          </table:table-cell>
          <table:table-cell table:style-name="ce44" office:value-type="float" office:value="787" calcext:value-type="float">
            <text:p>787</text:p>
          </table:table-cell>
          <table:table-cell table:style-name="ce52" table:formula="of:=SUM([.D35:.H35])" office:value-type="float" office:value="7837" calcext:value-type="float">
            <text:p>7837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5]=126;70;IF([.T35]=112;70;IF([.T35]=98;70;IF([.T35]=96;60;IF([.T35]=84;60;IF([.T35]=108;60;IF([.T35]=90;50;IF([.T35]=72;40;IF([.T35]=80;40;IF([.T35]=100;50;IF([.T35]=54;30;IF([.T35]=36;20;IF([.T35]=18;10;IF([.T3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2/2e/Bastizi_Icon.png/revision/latest?cb=20130428023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stizi_-_Bikili_-_Burebista&quot;;&quot;Bastizi&quot;)" office:value-type="string" office:string-value="Bastizi" calcext:value-type="string">
            <text:p>Bastizi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682" calcext:value-type="float">
            <text:p>682</text:p>
          </table:table-cell>
          <table:table-cell table:style-name="ce32" office:value-type="float" office:value="552" calcext:value-type="float">
            <text:p>552</text:p>
          </table:table-cell>
          <table:table-cell table:style-name="ce36" office:value-type="float" office:value="248" calcext:value-type="float">
            <text:p>248</text:p>
          </table:table-cell>
          <table:table-cell table:style-name="ce40" office:value-type="float" office:value="38" calcext:value-type="float">
            <text:p>38</text:p>
          </table:table-cell>
          <table:table-cell table:style-name="ce44" office:value-type="float" office:value="174" calcext:value-type="float">
            <text:p>174</text:p>
          </table:table-cell>
          <table:table-cell table:style-name="ce52" table:formula="of:=SUM([.D36:.H36])" office:value-type="float" office:value="1694" calcext:value-type="float">
            <text:p>1694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]=126;70;IF([.T36]=112;70;IF([.T36]=98;70;IF([.T36]=96;60;IF([.T36]=84;60;IF([.T36]=108;60;IF([.T36]=90;50;IF([.T36]=72;40;IF([.T36]=80;40;IF([.T36]=100;50;IF([.T36]=54;30;IF([.T36]=36;20;IF([.T36]=18;10;IF([.T3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9/96/Bikili_Icon.png/revision/latest?cb=20130428023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stizi_-_Bikili_-_Burebista&quot;;&quot;Bikili&quot;)" office:value-type="string" office:string-value="Bikili" calcext:value-type="string">
            <text:p>Bikili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487" calcext:value-type="float">
            <text:p>1487</text:p>
          </table:table-cell>
          <table:table-cell table:style-name="ce32" office:value-type="float" office:value="1243" calcext:value-type="float">
            <text:p>1243</text:p>
          </table:table-cell>
          <table:table-cell table:style-name="ce36" office:value-type="float" office:value="615" calcext:value-type="float">
            <text:p>615</text:p>
          </table:table-cell>
          <table:table-cell table:style-name="ce40" office:value-type="float" office:value="113" calcext:value-type="float">
            <text:p>113</text:p>
          </table:table-cell>
          <table:table-cell table:style-name="ce44" office:value-type="float" office:value="454" calcext:value-type="float">
            <text:p>454</text:p>
          </table:table-cell>
          <table:table-cell table:style-name="ce52" table:formula="of:=SUM([.D37:.H37])" office:value-type="float" office:value="3912" calcext:value-type="float">
            <text:p>3912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]=126;70;IF([.T37]=112;70;IF([.T37]=98;70;IF([.T37]=96;60;IF([.T37]=84;60;IF([.T37]=108;60;IF([.T37]=90;50;IF([.T37]=72;40;IF([.T37]=80;40;IF([.T37]=100;50;IF([.T37]=54;30;IF([.T37]=36;20;IF([.T37]=18;10;IF([.T3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3/3b/Burebista_Icon.png/revision/latest?cb=20130428023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stizi_-_Bikili_-_Burebista&quot;;&quot;Burebista&quot;)" office:value-type="string" office:string-value="Burebista" calcext:value-type="string">
            <text:p>Burebist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944" calcext:value-type="float">
            <text:p>2944</text:p>
          </table:table-cell>
          <table:table-cell table:style-name="ce32" office:value-type="float" office:value="2489" calcext:value-type="float">
            <text:p>2489</text:p>
          </table:table-cell>
          <table:table-cell table:style-name="ce36" office:value-type="float" office:value="1277" calcext:value-type="float">
            <text:p>1277</text:p>
          </table:table-cell>
          <table:table-cell table:style-name="ce40" office:value-type="float" office:value="252" calcext:value-type="float">
            <text:p>252</text:p>
          </table:table-cell>
          <table:table-cell table:style-name="ce44" office:value-type="float" office:value="954" calcext:value-type="float">
            <text:p>954</text:p>
          </table:table-cell>
          <table:table-cell table:style-name="ce52" table:formula="of:=SUM([.D38:.H38])" office:value-type="float" office:value="7916" calcext:value-type="float">
            <text:p>7916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8]=126;70;IF([.T38]=112;70;IF([.T38]=98;70;IF([.T38]=96;60;IF([.T38]=84;60;IF([.T38]=108;60;IF([.T38]=90;50;IF([.T38]=72;40;IF([.T38]=80;40;IF([.T38]=100;50;IF([.T38]=54;30;IF([.T38]=36;20;IF([.T38]=18;10;IF([.T3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b/b8/Dromichaeta_Icon.png/revision/latest?cb=201304280235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Dromichaeta_-_Komakiza_-_Komozoi&quot;;&quot;Dromichaeta&quot;)" office:value-type="string" office:string-value="Dromichaeta" calcext:value-type="string">
            <text:p>Dromichaet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9:.H39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9]=126;70;IF([.T39]=112;70;IF([.T39]=98;70;IF([.T39]=96;60;IF([.T39]=84;60;IF([.T39]=108;60;IF([.T39]=90;50;IF([.T39]=72;40;IF([.T39]=80;40;IF([.T39]=100;50;IF([.T39]=54;30;IF([.T39]=36;20;IF([.T39]=18;10;IF([.T3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f/f2/Komakiza_Icon.png/revision/latest?cb=201304280235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Dromichaeta_-_Komakiza_-_Komozoi&quot;;&quot;Komakiza&quot;)" office:value-type="string" office:string-value="Komakiza" calcext:value-type="string">
            <text:p>Komakiz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0:.H40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0]=126;70;IF([.T40]=112;70;IF([.T40]=98;70;IF([.T40]=96;60;IF([.T40]=84;60;IF([.T40]=108;60;IF([.T40]=90;50;IF([.T40]=72;40;IF([.T40]=80;40;IF([.T40]=100;50;IF([.T40]=54;30;IF([.T40]=36;20;IF([.T40]=18;10;IF([.T4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5/50/Komozoi_Icon.png/revision/latest?cb=201304280235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Dromichaeta_-_Komakiza_-_Komozoi&quot;;&quot;Komozoi&quot;)" office:value-type="string" office:string-value="Komozoi" calcext:value-type="string">
            <text:p>Komozoi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3111" calcext:value-type="float">
            <text:p>3111</text:p>
          </table:table-cell>
          <table:table-cell table:style-name="ce32" office:value-type="float" office:value="3055" calcext:value-type="float">
            <text:p>3055</text:p>
          </table:table-cell>
          <table:table-cell table:style-name="ce36" office:value-type="float" office:value="1349" calcext:value-type="float">
            <text:p>1349</text:p>
          </table:table-cell>
          <table:table-cell table:style-name="ce40" office:value-type="float" office:value="266" calcext:value-type="float">
            <text:p>266</text:p>
          </table:table-cell>
          <table:table-cell table:style-name="ce44" office:value-type="float" office:value="1506" calcext:value-type="float">
            <text:p>1506</text:p>
          </table:table-cell>
          <table:table-cell table:style-name="ce52" table:formula="of:=SUM([.D41:.H41])" office:value-type="float" office:value="9287" calcext:value-type="float">
            <text:p>9287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]=126;70;IF([.T41]=112;70;IF([.T41]=98;70;IF([.T41]=96;60;IF([.T41]=84;60;IF([.T41]=108;60;IF([.T41]=90;50;IF([.T41]=72;40;IF([.T41]=80;40;IF([.T41]=100;50;IF([.T41]=54;30;IF([.T41]=36;20;IF([.T41]=18;10;IF([.T4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9/95/Gutha_Icon.png/revision/latest?cb=20130428024929&quot;)" office:value-type="string" office:string-value="" calcext:value-type="error">
            <text:p>#NAME?</text:p>
          </table:table-cell>
          <table:table-cell table:style-name="ce11" table:formula="of:=HYPERLINK(&quot;http://defenderoftexel.wikia.com/wiki/Gutha_-_Ige_-_Ogiva&quot;;&quot;Gutha&quot;)" office:value-type="string" office:string-value="Gutha" calcext:value-type="string">
            <text:p>Guth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2:.H42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]=126;70;IF([.T42]=112;70;IF([.T42]=98;70;IF([.T42]=96;60;IF([.T42]=84;60;IF([.T42]=108;60;IF([.T42]=90;50;IF([.T42]=72;40;IF([.T42]=80;40;IF([.T42]=100;50;IF([.T42]=54;30;IF([.T42]=36;20;IF([.T42]=18;10;IF([.T4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4/45/Ige_Icon.png/revision/latest?cb=20130428024929&quot;)" office:value-type="string" office:string-value="" calcext:value-type="error">
            <text:p>#NAME?</text:p>
          </table:table-cell>
          <table:table-cell table:style-name="ce11" table:formula="of:=HYPERLINK(&quot;http://defenderoftexel.wikia.com/wiki/Gutha_-_Ige_-_Ogiva&quot;;&quot;Ige&quot;)" office:value-type="string" office:string-value="Ige" calcext:value-type="string">
            <text:p>Ige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3:.H43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3]=126;70;IF([.T43]=112;70;IF([.T43]=98;70;IF([.T43]=96;60;IF([.T43]=84;60;IF([.T43]=108;60;IF([.T43]=90;50;IF([.T43]=72;40;IF([.T43]=80;40;IF([.T43]=100;50;IF([.T43]=54;30;IF([.T43]=36;20;IF([.T43]=18;10;IF([.T43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b/b6/Ogiva_Icon.png/revision/latest?cb=20130428024929&quot;)" office:value-type="string" office:string-value="" calcext:value-type="error">
            <text:p>#NAME?</text:p>
          </table:table-cell>
          <table:table-cell table:style-name="ce11" table:formula="of:=HYPERLINK(&quot;http://defenderoftexel.wikia.com/wiki/Gutha_-_Ige_-_Ogiva&quot;;&quot;Ogiva&quot;)" office:value-type="string" office:string-value="Ogiva" calcext:value-type="string">
            <text:p>Ogiv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257" calcext:value-type="float">
            <text:p>1257</text:p>
          </table:table-cell>
          <table:table-cell table:style-name="ce32" office:value-type="float" office:value="883" calcext:value-type="float">
            <text:p>883</text:p>
          </table:table-cell>
          <table:table-cell table:style-name="ce36" office:value-type="float" office:value="568" calcext:value-type="float">
            <text:p>568</text:p>
          </table:table-cell>
          <table:table-cell table:style-name="ce40" office:value-type="float" office:value="3614" calcext:value-type="float">
            <text:p>3614</text:p>
          </table:table-cell>
          <table:table-cell table:style-name="ce44" office:value-type="float" office:value="3443" calcext:value-type="float">
            <text:p>3443</text:p>
          </table:table-cell>
          <table:table-cell table:style-name="ce52" table:formula="of:=SUM([.D44:.H44])" office:value-type="float" office:value="9765" calcext:value-type="float">
            <text:p>976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]=126;70;IF([.T44]=112;70;IF([.T44]=98;70;IF([.T44]=96;60;IF([.T44]=84;60;IF([.T44]=108;60;IF([.T44]=90;50;IF([.T44]=72;40;IF([.T44]=80;40;IF([.T44]=100;50;IF([.T44]=54;30;IF([.T44]=36;20;IF([.T44]=18;10;IF([.T4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1/1a/Tiada_Icon.png/revision/latest?cb=201304280242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ada_-_Ouda_-_Wela&quot;;&quot;Tiada&quot;)" office:value-type="string" office:string-value="Tiada" calcext:value-type="string">
            <text:p>Tiad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94" calcext:value-type="float">
            <text:p>194</text:p>
          </table:table-cell>
          <table:table-cell table:style-name="ce32" office:value-type="float" office:value="127" calcext:value-type="float">
            <text:p>127</text:p>
          </table:table-cell>
          <table:table-cell table:style-name="ce36" office:value-type="float" office:value="78" calcext:value-type="float">
            <text:p>78</text:p>
          </table:table-cell>
          <table:table-cell table:style-name="ce40" office:value-type="float" office:value="704" calcext:value-type="float">
            <text:p>704</text:p>
          </table:table-cell>
          <table:table-cell table:style-name="ce44" office:value-type="float" office:value="662" calcext:value-type="float">
            <text:p>662</text:p>
          </table:table-cell>
          <table:table-cell table:style-name="ce52" table:formula="of:=SUM([.D45:.H45])" office:value-type="float" office:value="1765" calcext:value-type="float">
            <text:p>176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5]=126;70;IF([.T45]=112;70;IF([.T45]=98;70;IF([.T45]=96;60;IF([.T45]=84;60;IF([.T45]=108;60;IF([.T45]=90;50;IF([.T45]=72;40;IF([.T45]=80;40;IF([.T45]=100;50;IF([.T45]=54;30;IF([.T45]=36;20;IF([.T45]=18;10;IF([.T45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f/f6/Ouda_Icon.png/revision/latest?cb=201304280242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ada_-_Ouda_-_Wela&quot;;&quot;Ouda&quot;)" office:value-type="string" office:string-value="Ouda" calcext:value-type="string">
            <text:p>Oud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520" calcext:value-type="float">
            <text:p>520</text:p>
          </table:table-cell>
          <table:table-cell table:style-name="ce32" office:value-type="float" office:value="361" calcext:value-type="float">
            <text:p>361</text:p>
          </table:table-cell>
          <table:table-cell table:style-name="ce36" office:value-type="float" office:value="230" calcext:value-type="float">
            <text:p>230</text:p>
          </table:table-cell>
          <table:table-cell table:style-name="ce40" office:value-type="float" office:value="1590" calcext:value-type="float">
            <text:p>1590</text:p>
          </table:table-cell>
          <table:table-cell table:style-name="ce44" office:value-type="float" office:value="1511" calcext:value-type="float">
            <text:p>1511</text:p>
          </table:table-cell>
          <table:table-cell table:style-name="ce52" table:formula="of:=SUM([.D46:.H46])" office:value-type="float" office:value="4212" calcext:value-type="float">
            <text:p>4212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]=126;70;IF([.T46]=112;70;IF([.T46]=98;70;IF([.T46]=96;60;IF([.T46]=84;60;IF([.T46]=108;60;IF([.T46]=90;50;IF([.T46]=72;40;IF([.T46]=80;40;IF([.T46]=100;50;IF([.T46]=54;30;IF([.T46]=36;20;IF([.T46]=18;10;IF([.T46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7/7f/Wela_Icon.png/revision/latest?cb=20131028020025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ada_-_Ouda_-_Wela&quot;;&quot;Wela&quot;)" office:value-type="string" office:string-value="Wela" calcext:value-type="string">
            <text:p>Wel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096" calcext:value-type="float">
            <text:p>1096</text:p>
          </table:table-cell>
          <table:table-cell table:style-name="ce32" office:value-type="float" office:value="767" calcext:value-type="float">
            <text:p>767</text:p>
          </table:table-cell>
          <table:table-cell table:style-name="ce36" office:value-type="float" office:value="495" calcext:value-type="float">
            <text:p>495</text:p>
          </table:table-cell>
          <table:table-cell table:style-name="ce40" office:value-type="float" office:value="3149" calcext:value-type="float">
            <text:p>3149</text:p>
          </table:table-cell>
          <table:table-cell table:style-name="ce44" office:value-type="float" office:value="3000" calcext:value-type="float">
            <text:p>3000</text:p>
          </table:table-cell>
          <table:table-cell table:style-name="ce52" table:formula="of:=SUM([.D47:.H47])" office:value-type="float" office:value="8507" calcext:value-type="float">
            <text:p>8507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7]=126;70;IF([.T47]=112;70;IF([.T47]=98;70;IF([.T47]=96;60;IF([.T47]=84;60;IF([.T47]=108;60;IF([.T47]=90;50;IF([.T47]=72;40;IF([.T47]=80;40;IF([.T47]=100;50;IF([.T47]=54;30;IF([.T47]=36;20;IF([.T47]=18;10;IF([.T4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0/09/Ama_Icon.png/revision/latest?cb=2013042802492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a_-_Ata_-_Avva&quot;;&quot;Ama&quot;)" office:value-type="string" office:string-value="Ama" calcext:value-type="string">
            <text:p>Am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17" calcext:value-type="float">
            <text:p>217</text:p>
          </table:table-cell>
          <table:table-cell table:style-name="ce32" office:value-type="float" office:value="143" calcext:value-type="float">
            <text:p>143</text:p>
          </table:table-cell>
          <table:table-cell table:style-name="ce36" office:value-type="float" office:value="88" calcext:value-type="float">
            <text:p>88</text:p>
          </table:table-cell>
          <table:table-cell table:style-name="ce40" office:value-type="float" office:value="775" calcext:value-type="float">
            <text:p>775</text:p>
          </table:table-cell>
          <table:table-cell table:style-name="ce44" office:value-type="float" office:value="731" calcext:value-type="float">
            <text:p>731</text:p>
          </table:table-cell>
          <table:table-cell table:style-name="ce52" table:formula="of:=SUM([.D48:.H48])" office:value-type="float" office:value="1954" calcext:value-type="float">
            <text:p>1954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8]=126;70;IF([.T48]=112;70;IF([.T48]=98;70;IF([.T48]=96;60;IF([.T48]=84;60;IF([.T48]=108;60;IF([.T48]=90;50;IF([.T48]=72;40;IF([.T48]=80;40;IF([.T48]=100;50;IF([.T48]=54;30;IF([.T48]=36;20;IF([.T48]=18;10;IF([.T4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5/50/Ata_Icon.png/revision/latest?cb=2013042802492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a_-_Ata_-_Avva&quot;;&quot;Ata&quot;)" office:value-type="string" office:string-value="Ata" calcext:value-type="string">
            <text:p>At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9:.H49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9]=126;70;IF([.T49]=112;70;IF([.T49]=98;70;IF([.T49]=96;60;IF([.T49]=84;60;IF([.T49]=108;60;IF([.T49]=90;50;IF([.T49]=72;40;IF([.T49]=80;40;IF([.T49]=100;50;IF([.T49]=54;30;IF([.T49]=36;20;IF([.T49]=18;10;IF([.T4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8/8e/Avva_Icon.png/revision/latest?cb=20130428024928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a_-_Ata_-_Avva&quot;;&quot;Avva&quot;)" office:value-type="string" office:string-value="Avva" calcext:value-type="string">
            <text:p>Avv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121" calcext:value-type="float">
            <text:p>1121</text:p>
          </table:table-cell>
          <table:table-cell table:style-name="ce32" office:value-type="float" office:value="788" calcext:value-type="float">
            <text:p>788</text:p>
          </table:table-cell>
          <table:table-cell table:style-name="ce36" office:value-type="float" office:value="507" calcext:value-type="float">
            <text:p>507</text:p>
          </table:table-cell>
          <table:table-cell table:style-name="ce40" office:value-type="float" office:value="3227" calcext:value-type="float">
            <text:p>3227</text:p>
          </table:table-cell>
          <table:table-cell table:style-name="ce44" office:value-type="float" office:value="3076" calcext:value-type="float">
            <text:p>3076</text:p>
          </table:table-cell>
          <table:table-cell table:style-name="ce52" table:formula="of:=SUM([.D50:.H50])" office:value-type="float" office:value="8719" calcext:value-type="float">
            <text:p>8719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0]=126;70;IF([.T50]=112;70;IF([.T50]=98;70;IF([.T50]=96;60;IF([.T50]=84;60;IF([.T50]=108;60;IF([.T50]=90;50;IF([.T50]=72;40;IF([.T50]=80;40;IF([.T50]=100;50;IF([.T50]=54;30;IF([.T50]=36;20;IF([.T50]=18;10;IF([.T5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d/d4/Jasper_Icon.png/revision/latest?cb=201304280229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Jasper_-_Javid_-_Kansbar&quot;;&quot;Jasper&quot;)" office:value-type="string" office:string-value="Jasper" calcext:value-type="string">
            <text:p>Jasper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608" calcext:value-type="float">
            <text:p>608</text:p>
          </table:table-cell>
          <table:table-cell table:style-name="ce32" office:value-type="float" office:value="718" calcext:value-type="float">
            <text:p>718</text:p>
          </table:table-cell>
          <table:table-cell table:style-name="ce36" office:value-type="float" office:value="33" calcext:value-type="float">
            <text:p>33</text:p>
          </table:table-cell>
          <table:table-cell table:style-name="ce40" office:value-type="float" office:value="62" calcext:value-type="float">
            <text:p>62</text:p>
          </table:table-cell>
          <table:table-cell table:style-name="ce44" office:value-type="float" office:value="85" calcext:value-type="float">
            <text:p>85</text:p>
          </table:table-cell>
          <table:table-cell table:style-name="ce52" table:formula="of:=SUM([.D51:.H51])" office:value-type="float" office:value="1506" calcext:value-type="float">
            <text:p>1506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1]=126;70;IF([.T51]=112;70;IF([.T51]=98;70;IF([.T51]=96;60;IF([.T51]=84;60;IF([.T51]=108;60;IF([.T51]=90;50;IF([.T51]=72;40;IF([.T51]=80;40;IF([.T51]=100;50;IF([.T51]=54;30;IF([.T51]=36;20;IF([.T51]=18;10;IF([.T5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7/71/Javid_Icon.png/revision/latest?cb=201304280229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Jasper_-_Javid_-_Kansbar&quot;;&quot;Javid&quot;)" office:value-type="string" office:string-value="Javid" calcext:value-type="string">
            <text:p>Javid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52:.H52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2]=126;70;IF([.T52]=112;70;IF([.T52]=98;70;IF([.T52]=96;60;IF([.T52]=84;60;IF([.T52]=108;60;IF([.T52]=90;50;IF([.T52]=72;40;IF([.T52]=80;40;IF([.T52]=100;50;IF([.T52]=54;30;IF([.T52]=36;20;IF([.T52]=18;10;IF([.T52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a/a4/Kansbar_Icon.png/revision/latest?cb=201304280235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Jasper_-_Javid_-_Kansbar&quot;;&quot;Kansbar&quot;)" office:value-type="string" office:string-value="Kansbar" calcext:value-type="string">
            <text:p>Kansbar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3075" calcext:value-type="float">
            <text:p>3075</text:p>
          </table:table-cell>
          <table:table-cell table:style-name="ce32" office:value-type="float" office:value="3494" calcext:value-type="float">
            <text:p>3494</text:p>
          </table:table-cell>
          <table:table-cell table:style-name="ce36" office:value-type="float" office:value="1683" calcext:value-type="float">
            <text:p>1683</text:p>
          </table:table-cell>
          <table:table-cell table:style-name="ce40" office:value-type="float" office:value="396" calcext:value-type="float">
            <text:p>396</text:p>
          </table:table-cell>
          <table:table-cell table:style-name="ce44" office:value-type="float" office:value="526" calcext:value-type="float">
            <text:p>526</text:p>
          </table:table-cell>
          <table:table-cell table:style-name="ce52" table:formula="of:=SUM([.D53:.H53])" office:value-type="float" office:value="9174" calcext:value-type="float">
            <text:p>917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3]=126;70;IF([.T53]=112;70;IF([.T53]=98;70;IF([.T53]=96;60;IF([.T53]=84;60;IF([.T53]=108;60;IF([.T53]=90;50;IF([.T53]=72;40;IF([.T53]=80;40;IF([.T53]=100;50;IF([.T53]=54;30;IF([.T53]=36;20;IF([.T53]=18;10;IF([.T5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e/ee/Ihsan_Icon.png/revision/latest?cb=201304280229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Ihsan_-_Jahangir_-_Jamshad&quot;;&quot;Ihsan&quot;)" office:value-type="string" office:string-value="Ihsan" calcext:value-type="string">
            <text:p>Ihsan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588" calcext:value-type="float">
            <text:p>588</text:p>
          </table:table-cell>
          <table:table-cell table:style-name="ce32" office:value-type="float" office:value="693" calcext:value-type="float">
            <text:p>693</text:p>
          </table:table-cell>
          <table:table-cell table:style-name="ce36" office:value-type="float" office:value="322" calcext:value-type="float">
            <text:p>322</text:p>
          </table:table-cell>
          <table:table-cell table:style-name="ce40" office:value-type="float" office:value="59" calcext:value-type="float">
            <text:p>59</text:p>
          </table:table-cell>
          <table:table-cell table:style-name="ce44" office:value-type="float" office:value="82" calcext:value-type="float">
            <text:p>82</text:p>
          </table:table-cell>
          <table:table-cell table:style-name="ce52" table:formula="of:=SUM([.D54:.H54])" office:value-type="float" office:value="1744" calcext:value-type="float">
            <text:p>1744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4]=126;70;IF([.T54]=112;70;IF([.T54]=98;70;IF([.T54]=96;60;IF([.T54]=84;60;IF([.T54]=108;60;IF([.T54]=90;50;IF([.T54]=72;40;IF([.T54]=80;40;IF([.T54]=100;50;IF([.T54]=54;30;IF([.T54]=36;20;IF([.T54]=18;10;IF([.T5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4/4c/Jahangir_Icon.png/revision/latest?cb=201304280229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Ihsan_-_Jahangir_-_Jamshad&quot;;&quot;Jahangir&quot;)" office:value-type="string" office:string-value="Jahangir" calcext:value-type="string">
            <text:p>Jahangir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252" calcext:value-type="float">
            <text:p>1252</text:p>
          </table:table-cell>
          <table:table-cell table:style-name="ce32" office:value-type="float" office:value="1445" calcext:value-type="float">
            <text:p>1445</text:p>
          </table:table-cell>
          <table:table-cell table:style-name="ce36" office:value-type="float" office:value="746" calcext:value-type="float">
            <text:p>746</text:p>
          </table:table-cell>
          <table:table-cell table:style-name="ce40" office:value-type="float" office:value="165" calcext:value-type="float">
            <text:p>165</text:p>
          </table:table-cell>
          <table:table-cell table:style-name="ce44" office:value-type="float" office:value="222" calcext:value-type="float">
            <text:p>222</text:p>
          </table:table-cell>
          <table:table-cell table:style-name="ce52" table:formula="of:=SUM([.D55:.H55])" office:value-type="float" office:value="3830" calcext:value-type="float">
            <text:p>3830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5]=126;70;IF([.T55]=112;70;IF([.T55]=98;70;IF([.T55]=96;60;IF([.T55]=84;60;IF([.T55]=108;60;IF([.T55]=90;50;IF([.T55]=72;40;IF([.T55]=80;40;IF([.T55]=100;50;IF([.T55]=54;30;IF([.T55]=36;20;IF([.T55]=18;10;IF([.T5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6/69/Jamshad_Icon.png/revision/latest?cb=201304280229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Ihsan_-_Jahangir_-_Jamshad&quot;;&quot;Jamshad&quot;)" office:value-type="string" office:string-value="Jamshad" calcext:value-type="string">
            <text:p>Jamshad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592" calcext:value-type="float">
            <text:p>2592</text:p>
          </table:table-cell>
          <table:table-cell table:style-name="ce32" office:value-type="float" office:value="2965" calcext:value-type="float">
            <text:p>2965</text:p>
          </table:table-cell>
          <table:table-cell table:style-name="ce36" office:value-type="float" office:value="1588" calcext:value-type="float">
            <text:p>1588</text:p>
          </table:table-cell>
          <table:table-cell table:style-name="ce40" office:value-type="float" office:value="373" calcext:value-type="float">
            <text:p>373</text:p>
          </table:table-cell>
          <table:table-cell table:style-name="ce44" office:value-type="float" office:value="497" calcext:value-type="float">
            <text:p>497</text:p>
          </table:table-cell>
          <table:table-cell table:style-name="ce52" table:formula="of:=SUM([.D56:.H56])" office:value-type="float" office:value="8015" calcext:value-type="float">
            <text:p>801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6]=126;70;IF([.T56]=112;70;IF([.T56]=98;70;IF([.T56]=96;60;IF([.T56]=84;60;IF([.T56]=108;60;IF([.T56]=90;50;IF([.T56]=72;40;IF([.T56]=80;40;IF([.T56]=100;50;IF([.T56]=54;30;IF([.T56]=36;20;IF([.T56]=18;10;IF([.T5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3/Laraniia_Icon.png/revision/latest?cb=201304280242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aniia_-_Larthi_-_Messia&quot;;&quot;Laraniia&quot;)" office:value-type="string" office:string-value="Laraniia" calcext:value-type="string">
            <text:p>Laranii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05" calcext:value-type="float">
            <text:p>205</text:p>
          </table:table-cell>
          <table:table-cell table:style-name="ce32" office:value-type="float" office:value="156" calcext:value-type="float">
            <text:p>156</text:p>
          </table:table-cell>
          <table:table-cell table:style-name="ce36" office:value-type="float" office:value="107" calcext:value-type="float">
            <text:p>107</text:p>
          </table:table-cell>
          <table:table-cell table:style-name="ce40" office:value-type="float" office:value="152" calcext:value-type="float">
            <text:p>152</text:p>
          </table:table-cell>
          <table:table-cell table:style-name="ce44" office:value-type="float" office:value="369" calcext:value-type="float">
            <text:p>369</text:p>
          </table:table-cell>
          <table:table-cell table:style-name="ce52" table:formula="of:=SUM([.D57:.H57])" office:value-type="float" office:value="989" calcext:value-type="float">
            <text:p>989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7]=126;70;IF([.T57]=112;70;IF([.T57]=98;70;IF([.T57]=96;60;IF([.T57]=84;60;IF([.T57]=108;60;IF([.T57]=90;50;IF([.T57]=72;40;IF([.T57]=80;40;IF([.T57]=100;50;IF([.T57]=54;30;IF([.T57]=36;20;IF([.T57]=18;10;IF([.T57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6/Larthi_Icon.png/revision/latest?cb=201304280242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aniia_-_Larthi_-_Messia&quot;;&quot;Larthi&quot;)" office:value-type="string" office:string-value="Larthi" calcext:value-type="string">
            <text:p>Larthi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333" calcext:value-type="float">
            <text:p>333</text:p>
          </table:table-cell>
          <table:table-cell table:style-name="ce32" office:value-type="float" office:value="239" calcext:value-type="float">
            <text:p>239</text:p>
          </table:table-cell>
          <table:table-cell table:style-name="ce36" office:value-type="float" office:value="153" calcext:value-type="float">
            <text:p>153</text:p>
          </table:table-cell>
          <table:table-cell table:style-name="ce40" office:value-type="float" office:value="233" calcext:value-type="float">
            <text:p>233</text:p>
          </table:table-cell>
          <table:table-cell table:style-name="ce44" office:value-type="float" office:value="718" calcext:value-type="float">
            <text:p>718</text:p>
          </table:table-cell>
          <table:table-cell table:style-name="ce52" table:formula="of:=SUM([.D58:.H58])" office:value-type="float" office:value="1676" calcext:value-type="float">
            <text:p>1676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8]=126;70;IF([.T58]=112;70;IF([.T58]=98;70;IF([.T58]=96;60;IF([.T58]=84;60;IF([.T58]=108;60;IF([.T58]=90;50;IF([.T58]=72;40;IF([.T58]=80;40;IF([.T58]=100;50;IF([.T58]=54;30;IF([.T58]=36;20;IF([.T58]=18;10;IF([.T5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0/0f/Messia_Icon.png/revision/latest?cb=201304280242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raniia_-_Larthi_-_Messia&quot;;&quot;Messia&quot;)" office:value-type="string" office:string-value="Messia" calcext:value-type="string">
            <text:p>Messi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896" calcext:value-type="float">
            <text:p>896</text:p>
          </table:table-cell>
          <table:table-cell table:style-name="ce32" office:value-type="float" office:value="673" calcext:value-type="float">
            <text:p>673</text:p>
          </table:table-cell>
          <table:table-cell table:style-name="ce36" office:value-type="float" office:value="453" calcext:value-type="float">
            <text:p>453</text:p>
          </table:table-cell>
          <table:table-cell table:style-name="ce40" office:value-type="float" office:value="650" calcext:value-type="float">
            <text:p>650</text:p>
          </table:table-cell>
          <table:table-cell table:style-name="ce44" office:value-type="float" office:value="1738" calcext:value-type="float">
            <text:p>1738</text:p>
          </table:table-cell>
          <table:table-cell table:style-name="ce52" table:formula="of:=SUM([.D59:.H59])" office:value-type="float" office:value="4410" calcext:value-type="float">
            <text:p>4410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9]=126;70;IF([.T59]=112;70;IF([.T59]=98;70;IF([.T59]=96;60;IF([.T59]=84;60;IF([.T59]=108;60;IF([.T59]=90;50;IF([.T59]=72;40;IF([.T59]=80;40;IF([.T59]=100;50;IF([.T59]=54;30;IF([.T59]=36;20;IF([.T59]=18;10;IF([.T59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2/23/Peci_Icon.png/revision/latest?cb=201304280242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Peci_-_Pevtha_-_Pinaria&quot;;&quot;Peci&quot;)" office:value-type="string" office:string-value="Peci" calcext:value-type="string">
            <text:p>Peci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05" calcext:value-type="float">
            <text:p>205</text:p>
          </table:table-cell>
          <table:table-cell table:style-name="ce32" office:value-type="float" office:value="158" calcext:value-type="float">
            <text:p>158</text:p>
          </table:table-cell>
          <table:table-cell table:style-name="ce36" office:value-type="float" office:value="107" calcext:value-type="float">
            <text:p>107</text:p>
          </table:table-cell>
          <table:table-cell table:style-name="ce40" office:value-type="float" office:value="152" calcext:value-type="float">
            <text:p>152</text:p>
          </table:table-cell>
          <table:table-cell table:style-name="ce44" office:value-type="float" office:value="369" calcext:value-type="float">
            <text:p>369</text:p>
          </table:table-cell>
          <table:table-cell table:style-name="ce52" table:formula="of:=SUM([.D60:.H60])" office:value-type="float" office:value="991" calcext:value-type="float">
            <text:p>991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0]=126;70;IF([.T60]=112;70;IF([.T60]=98;70;IF([.T60]=96;60;IF([.T60]=84;60;IF([.T60]=108;60;IF([.T60]=90;50;IF([.T60]=72;40;IF([.T60]=80;40;IF([.T60]=100;50;IF([.T60]=54;30;IF([.T60]=36;20;IF([.T60]=18;10;IF([.T60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4/44/Pevtha_Icon.png/revision/latest?cb=201304280242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Peci_-_Pevtha_-_Pinaria&quot;;&quot;Pevtha&quot;)" office:value-type="string" office:string-value="Pevtha" calcext:value-type="string">
            <text:p>Pevth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350" calcext:value-type="float">
            <text:p>350</text:p>
          </table:table-cell>
          <table:table-cell table:style-name="ce32" office:value-type="float" office:value="252" calcext:value-type="float">
            <text:p>252</text:p>
          </table:table-cell>
          <table:table-cell table:style-name="ce36" office:value-type="float" office:value="163" calcext:value-type="float">
            <text:p>163</text:p>
          </table:table-cell>
          <table:table-cell table:style-name="ce40" office:value-type="float" office:value="243" calcext:value-type="float">
            <text:p>243</text:p>
          </table:table-cell>
          <table:table-cell table:style-name="ce44" office:value-type="float" office:value="750" calcext:value-type="float">
            <text:p>750</text:p>
          </table:table-cell>
          <table:table-cell table:style-name="ce52" table:formula="of:=SUM([.D61:.H61])" office:value-type="float" office:value="1758" calcext:value-type="float">
            <text:p>1758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1]=126;70;IF([.T61]=112;70;IF([.T61]=98;70;IF([.T61]=96;60;IF([.T61]=84;60;IF([.T61]=108;60;IF([.T61]=90;50;IF([.T61]=72;40;IF([.T61]=80;40;IF([.T61]=100;50;IF([.T61]=54;30;IF([.T61]=36;20;IF([.T61]=18;10;IF([.T6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5/57/Pinaria_Icon.png/revision/latest?cb=20130428024256'&quot;)" office:value-type="string" office:string-value="" calcext:value-type="error">
            <text:p>#NAME?</text:p>
          </table:table-cell>
          <table:table-cell table:style-name="ce11" table:formula="of:=HYPERLINK(&quot;http://defenderoftexel.wikia.com/wiki/Peci_-_Pevtha_-_Pinaria&quot;;&quot;Pinaria&quot;)" office:value-type="string" office:string-value="Pinaria" calcext:value-type="string">
            <text:p>Pinaria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971" calcext:value-type="float">
            <text:p>971</text:p>
          </table:table-cell>
          <table:table-cell table:style-name="ce32" office:value-type="float" office:value="686" calcext:value-type="float">
            <text:p>686</text:p>
          </table:table-cell>
          <table:table-cell table:style-name="ce36" office:value-type="float" office:value="459" calcext:value-type="float">
            <text:p>459</text:p>
          </table:table-cell>
          <table:table-cell table:style-name="ce40" office:value-type="float" office:value="664" calcext:value-type="float">
            <text:p>664</text:p>
          </table:table-cell>
          <table:table-cell table:style-name="ce44" office:value-type="float" office:value="1767" calcext:value-type="float">
            <text:p>1767</text:p>
          </table:table-cell>
          <table:table-cell table:style-name="ce52" table:formula="of:=SUM([.D62:.H62])" office:value-type="float" office:value="4547" calcext:value-type="float">
            <text:p>4547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2]=126;70;IF([.T62]=112;70;IF([.T62]=98;70;IF([.T62]=96;60;IF([.T62]=84;60;IF([.T62]=108;60;IF([.T62]=90;50;IF([.T62]=72;40;IF([.T62]=80;40;IF([.T62]=100;50;IF([.T62]=54;30;IF([.T62]=36;20;IF([.T62]=18;10;IF([.T62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7/7d/Brasus_Icon.png/revision/latest?cb=20130428023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asus_-_Mucapor_-_Zalmoxis&quot;;&quot;Brasus&quot;)" office:value-type="string" office:string-value="Brasus" calcext:value-type="string">
            <text:p>Brasus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166" calcext:value-type="float">
            <text:p>1166</text:p>
          </table:table-cell>
          <table:table-cell table:style-name="ce32" office:value-type="float" office:value="948" calcext:value-type="float">
            <text:p>948</text:p>
          </table:table-cell>
          <table:table-cell table:style-name="ce36" office:value-type="float" office:value="424" calcext:value-type="float">
            <text:p>424</text:p>
          </table:table-cell>
          <table:table-cell table:style-name="ce40" office:value-type="float" office:value="67" calcext:value-type="float">
            <text:p>67</text:p>
          </table:table-cell>
          <table:table-cell table:style-name="ce44" office:value-type="float" office:value="298" calcext:value-type="float">
            <text:p>298</text:p>
          </table:table-cell>
          <table:table-cell table:style-name="ce52" table:formula="of:=SUM([.D63:.H63])" office:value-type="float" office:value="2903" calcext:value-type="float">
            <text:p>2903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3]=126;70;IF([.T63]=112;70;IF([.T63]=98;70;IF([.T63]=96;60;IF([.T63]=84;60;IF([.T63]=108;60;IF([.T63]=90;50;IF([.T63]=72;40;IF([.T63]=80;40;IF([.T63]=100;50;IF([.T63]=54;30;IF([.T63]=36;20;IF([.T63]=18;10;IF([.T6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b/bc/Mucapor_Icon.png/revision/latest?cb=20130428023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asus_-_Mucapor_-_Zalmoxis&quot;;&quot;Mucapor&quot;)" office:value-type="string" office:string-value="Mucapor" calcext:value-type="string">
            <text:p>Mucapor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2550" calcext:value-type="float">
            <text:p>2550</text:p>
          </table:table-cell>
          <table:table-cell table:style-name="ce32" office:value-type="float" office:value="2133" calcext:value-type="float">
            <text:p>2133</text:p>
          </table:table-cell>
          <table:table-cell table:style-name="ce36" office:value-type="float" office:value="1056" calcext:value-type="float">
            <text:p>1056</text:p>
          </table:table-cell>
          <table:table-cell table:style-name="ce40" office:value-type="float" office:value="197" calcext:value-type="float">
            <text:p>197</text:p>
          </table:table-cell>
          <table:table-cell table:style-name="ce44" office:value-type="float" office:value="778" calcext:value-type="float">
            <text:p>778</text:p>
          </table:table-cell>
          <table:table-cell table:style-name="ce52" table:formula="of:=SUM([.D64:.H64])" office:value-type="float" office:value="6714" calcext:value-type="float">
            <text:p>6714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4]=126;70;IF([.T64]=112;70;IF([.T64]=98;70;IF([.T64]=96;60;IF([.T64]=84;60;IF([.T64]=108;60;IF([.T64]=90;50;IF([.T64]=72;40;IF([.T64]=80;40;IF([.T64]=100;50;IF([.T64]=54;30;IF([.T64]=36;20;IF([.T64]=18;10;IF([.T6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8/8b/Zalmoxis_Icon.png/revision/latest?cb=20130428023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asus_-_Mucapor_-_Zalmoxis&quot;;&quot;Zalmoxis&quot;)" office:value-type="string" office:string-value="Zalmoxis" calcext:value-type="string">
            <text:p>Zalmoxis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5027" calcext:value-type="float">
            <text:p>5027</text:p>
          </table:table-cell>
          <table:table-cell table:style-name="ce32" office:value-type="float" office:value="4249" calcext:value-type="float">
            <text:p>4249</text:p>
          </table:table-cell>
          <table:table-cell table:style-name="ce36" office:value-type="float" office:value="2181" calcext:value-type="float">
            <text:p>2181</text:p>
          </table:table-cell>
          <table:table-cell table:style-name="ce40" office:value-type="float" office:value="428" calcext:value-type="float">
            <text:p>428</text:p>
          </table:table-cell>
          <table:table-cell table:style-name="ce44" office:value-type="float" office:value="1631" calcext:value-type="float">
            <text:p>1631</text:p>
          </table:table-cell>
          <table:table-cell table:style-name="ce52" table:formula="of:=SUM([.D65:.H65])" office:value-type="float" office:value="13516" calcext:value-type="float">
            <text:p>13516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5]=126;70;IF([.T65]=112;70;IF([.T65]=98;70;IF([.T65]=96;60;IF([.T65]=84;60;IF([.T65]=108;60;IF([.T65]=90;50;IF([.T65]=72;40;IF([.T65]=80;40;IF([.T65]=100;50;IF([.T65]=54;30;IF([.T65]=36;20;IF([.T65]=18;10;IF([.T6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3/3a/Orolu_Icon.png/revision/latest?cb=20130428023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Orolu_-_Mucatra_-_Decaeneus&quot;;&quot;Orolu&quot;)" office:value-type="string" office:string-value="Orolu" calcext:value-type="string">
            <text:p>Orolu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66:.H66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6]=126;70;IF([.T66]=112;70;IF([.T66]=98;70;IF([.T66]=96;60;IF([.T66]=84;60;IF([.T66]=108;60;IF([.T66]=90;50;IF([.T66]=72;40;IF([.T66]=80;40;IF([.T66]=100;50;IF([.T66]=54;30;IF([.T66]=36;20;IF([.T66]=18;10;IF([.T6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0/0c/Mucatra_Icon.png/revision/latest?cb=201304280235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Orolu_-_Mucatra_-_Decaeneus&quot;;&quot;Mucatra&quot;)" office:value-type="string" office:string-value="Mucatra" calcext:value-type="string">
            <text:p>Mucatra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366" calcext:value-type="float">
            <text:p>1366</text:p>
          </table:table-cell>
          <table:table-cell table:style-name="ce32" office:value-type="float" office:value="1142" calcext:value-type="float">
            <text:p>1142</text:p>
          </table:table-cell>
          <table:table-cell table:style-name="ce36" office:value-type="float" office:value="565" calcext:value-type="float">
            <text:p>565</text:p>
          </table:table-cell>
          <table:table-cell table:style-name="ce40" office:value-type="float" office:value="105" calcext:value-type="float">
            <text:p>105</text:p>
          </table:table-cell>
          <table:table-cell table:style-name="ce44" office:value-type="float" office:value="417" calcext:value-type="float">
            <text:p>417</text:p>
          </table:table-cell>
          <table:table-cell table:style-name="ce52" table:formula="of:=SUM([.D67:.H67])" office:value-type="float" office:value="3595" calcext:value-type="float">
            <text:p>3595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7]=126;70;IF([.T67]=112;70;IF([.T67]=98;70;IF([.T67]=96;60;IF([.T67]=84;60;IF([.T67]=108;60;IF([.T67]=90;50;IF([.T67]=72;40;IF([.T67]=80;40;IF([.T67]=100;50;IF([.T67]=54;30;IF([.T67]=36;20;IF([.T67]=18;10;IF([.T6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9/9e/Decaeneus_Icon.png/revision/latest?cb=201304280235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Orolu_-_Mucatra_-_Decaeneus&quot;;&quot;Decaeneus&quot;)" office:value-type="string" office:string-value="Decaeneus" calcext:value-type="string">
            <text:p>Decaeneus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3845" calcext:value-type="float">
            <text:p>3845</text:p>
          </table:table-cell>
          <table:table-cell table:style-name="ce32" office:value-type="float" office:value="3278" calcext:value-type="float">
            <text:p>3278</text:p>
          </table:table-cell>
          <table:table-cell table:style-name="ce36" office:value-type="float" office:value="1723" calcext:value-type="float">
            <text:p>1723</text:p>
          </table:table-cell>
          <table:table-cell table:style-name="ce40" office:value-type="float" office:value="351" calcext:value-type="float">
            <text:p>351</text:p>
          </table:table-cell>
          <table:table-cell table:style-name="ce44" office:value-type="float" office:value="1298" calcext:value-type="float">
            <text:p>1298</text:p>
          </table:table-cell>
          <table:table-cell table:style-name="ce52" table:formula="of:=SUM([.D68:.H68])" office:value-type="float" office:value="10495" calcext:value-type="float">
            <text:p>10495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8]=126;70;IF([.T68]=112;70;IF([.T68]=98;70;IF([.T68]=96;60;IF([.T68]=84;60;IF([.T68]=108;60;IF([.T68]=90;50;IF([.T68]=72;40;IF([.T68]=80;40;IF([.T68]=100;50;IF([.T68]=54;30;IF([.T68]=36;20;IF([.T68]=18;10;IF([.T6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11" office:value-type="string" calcext:value-type="string">
            <text:p>tarbash</text:p>
          </table:table-cell>
          <table:table-cell table:style-name="ce20"/>
          <table:table-cell table:style-name="ce6" table:number-columns-repeated="4"/>
          <table:table-cell table:style-name="ce20"/>
          <table:table-cell table:style-name="ce52" table:formula="of:=SUM([.D69:.H69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69]=126;70;IF([.T69]=112;70;IF([.T69]=98;70;IF([.T69]=96;60;IF([.T69]=84;60;IF([.T69]=108;60;IF([.T69]=90;50;IF([.T69]=72;40;IF([.T69]=80;40;IF([.T69]=100;50;IF([.T69]=54;30;IF([.T69]=36;20;IF([.T69]=18;10;IF([.T69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4"/>
          <table:table-cell table:style-name="ce6"/>
          <table:table-cell table:style-name="ce20"/>
          <table:table-cell table:style-name="ce6" table:number-columns-repeated="4"/>
          <table:table-cell table:style-name="ce20"/>
          <table:table-cell table:style-name="ce52" table:formula="of:=SUM([.D70:.H70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70]=126;70;IF([.T70]=112;70;IF([.T70]=98;70;IF([.T70]=96;60;IF([.T70]=84;60;IF([.T70]=108;60;IF([.T70]=90;50;IF([.T70]=72;40;IF([.T70]=80;40;IF([.T70]=100;50;IF([.T70]=54;30;IF([.T70]=36;20;IF([.T70]=18;10;IF([.T70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4"/>
          <table:table-cell table:style-name="ce6"/>
          <table:table-cell table:style-name="ce20"/>
          <table:table-cell table:style-name="ce6" table:number-columns-repeated="4"/>
          <table:table-cell table:style-name="ce20"/>
          <table:table-cell table:style-name="ce52" table:formula="of:=SUM([.D71:.H71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71]=126;70;IF([.T71]=112;70;IF([.T71]=98;70;IF([.T71]=96;60;IF([.T71]=84;60;IF([.T71]=108;60;IF([.T71]=90;50;IF([.T71]=72;40;IF([.T71]=80;40;IF([.T71]=100;50;IF([.T71]=54;30;IF([.T71]=36;20;IF([.T71]=18;10;IF([.T71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4" table:formula="of:=image(&quot;http://vignette4.wikia.nocookie.net/defenderoftexel/images/9/90/Amberfew_Icon.png/revision/latest?cb=201304280347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berfew_-_Flaxburn_-_Fondwell&quot;;&quot;Amberfew&quot;)" office:value-type="string" office:string-value="Amberfew" calcext:value-type="string">
            <text:p>Amberfew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91" calcext:value-type="float">
            <text:p>191</text:p>
          </table:table-cell>
          <table:table-cell table:style-name="ce32" office:value-type="float" office:value="145" calcext:value-type="float">
            <text:p>145</text:p>
          </table:table-cell>
          <table:table-cell table:style-name="ce36" office:value-type="float" office:value="102" calcext:value-type="float">
            <text:p>102</text:p>
          </table:table-cell>
          <table:table-cell table:style-name="ce40" office:value-type="float" office:value="142" calcext:value-type="float">
            <text:p>142</text:p>
          </table:table-cell>
          <table:table-cell table:style-name="ce44" office:value-type="float" office:value="343" calcext:value-type="float">
            <text:p>343</text:p>
          </table:table-cell>
          <table:table-cell table:style-name="ce52" table:formula="of:=SUM([.D72:.H72])" office:value-type="float" office:value="923" calcext:value-type="float">
            <text:p>923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2]=126;70;IF([.T72]=112;70;IF([.T72]=98;70;IF([.T72]=96;60;IF([.T72]=84;60;IF([.T72]=108;60;IF([.T72]=90;50;IF([.T72]=72;40;IF([.T72]=80;40;IF([.T72]=100;50;IF([.T72]=54;30;IF([.T72]=36;20;IF([.T72]=18;10;IF([.T72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1/1b/Flaxburn_Icon.png/revision/latest?cb=201304280347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berfew_-_Flaxburn_-_Fondwell&quot;;&quot;Flaxburn&quot;)" office:value-type="string" office:string-value="Flaxburn" calcext:value-type="string">
            <text:p>Flaxbur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03" calcext:value-type="float">
            <text:p>303</text:p>
          </table:table-cell>
          <table:table-cell table:style-name="ce32" office:value-type="float" office:value="217" calcext:value-type="float">
            <text:p>217</text:p>
          </table:table-cell>
          <table:table-cell table:style-name="ce36" office:value-type="float" office:value="141" calcext:value-type="float">
            <text:p>141</text:p>
          </table:table-cell>
          <table:table-cell table:style-name="ce40" office:value-type="float" office:value="209" calcext:value-type="float">
            <text:p>209</text:p>
          </table:table-cell>
          <table:table-cell table:style-name="ce44" office:value-type="float" office:value="650" calcext:value-type="float">
            <text:p>650</text:p>
          </table:table-cell>
          <table:table-cell table:style-name="ce52" table:formula="of:=SUM([.D73:.H73])" office:value-type="float" office:value="1520" calcext:value-type="float">
            <text:p>1520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3]=126;70;IF([.T73]=112;70;IF([.T73]=98;70;IF([.T73]=96;60;IF([.T73]=84;60;IF([.T73]=108;60;IF([.T73]=90;50;IF([.T73]=72;40;IF([.T73]=80;40;IF([.T73]=100;50;IF([.T73]=54;30;IF([.T73]=36;20;IF([.T73]=18;10;IF([.T7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7/7e/Fondwell_Icon.png/revision/latest?cb=201304280347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berfew_-_Flaxburn_-_Fondwell&quot;;&quot;Fondwell&quot;)" office:value-type="string" office:string-value="Fondwell" calcext:value-type="string">
            <text:p>Fondwell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816" calcext:value-type="float">
            <text:p>816</text:p>
          </table:table-cell>
          <table:table-cell table:style-name="ce32" office:value-type="float" office:value="612" calcext:value-type="float">
            <text:p>612</text:p>
          </table:table-cell>
          <table:table-cell table:style-name="ce36" office:value-type="float" office:value="413" calcext:value-type="float">
            <text:p>413</text:p>
          </table:table-cell>
          <table:table-cell table:style-name="ce40" office:value-type="float" office:value="593" calcext:value-type="float">
            <text:p>593</text:p>
          </table:table-cell>
          <table:table-cell table:style-name="ce44" office:value-type="float" office:value="1580" calcext:value-type="float">
            <text:p>1580</text:p>
          </table:table-cell>
          <table:table-cell table:style-name="ce52" table:formula="of:=SUM([.D74:.H74])" office:value-type="float" office:value="4014" calcext:value-type="float">
            <text:p>4014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4]=126;70;IF([.T74]=112;70;IF([.T74]=98;70;IF([.T74]=96;60;IF([.T74]=84;60;IF([.T74]=108;60;IF([.T74]=90;50;IF([.T74]=72;40;IF([.T74]=80;40;IF([.T74]=100;50;IF([.T74]=54;30;IF([.T74]=36;20;IF([.T74]=18;10;IF([.T7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6/62/Bewell_Icon.png/revision/latest?cb=201304280347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Bewell_-_Bluesplint_-_Rosemane&quot;;&quot;Bewell&quot;)" office:value-type="string" office:string-value="Bewell" calcext:value-type="string">
            <text:p>Bewell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91" calcext:value-type="float">
            <text:p>191</text:p>
          </table:table-cell>
          <table:table-cell table:style-name="ce32" office:value-type="float" office:value="145" calcext:value-type="float">
            <text:p>145</text:p>
          </table:table-cell>
          <table:table-cell table:style-name="ce36" office:value-type="float" office:value="102" calcext:value-type="float">
            <text:p>102</text:p>
          </table:table-cell>
          <table:table-cell table:style-name="ce40" office:value-type="float" office:value="142" calcext:value-type="float">
            <text:p>142</text:p>
          </table:table-cell>
          <table:table-cell table:style-name="ce44" office:value-type="float" office:value="347" calcext:value-type="float">
            <text:p>347</text:p>
          </table:table-cell>
          <table:table-cell table:style-name="ce52" table:formula="of:=SUM([.D75:.H75])" office:value-type="float" office:value="927" calcext:value-type="float">
            <text:p>927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5]=126;70;IF([.T75]=112;70;IF([.T75]=98;70;IF([.T75]=96;60;IF([.T75]=84;60;IF([.T75]=108;60;IF([.T75]=90;50;IF([.T75]=72;40;IF([.T75]=80;40;IF([.T75]=100;50;IF([.T75]=54;30;IF([.T75]=36;20;IF([.T75]=18;10;IF([.T7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b/b3/Bluesplint_Icon.png/revision/latest?cb=201304280347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Bewell_-_Bluesplint_-_Rosemane&quot;;&quot;Bluesplint&quot;)" office:value-type="string" office:string-value="Bluesplint" calcext:value-type="string">
            <text:p>Bluesplin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76:.H76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6]=126;70;IF([.T76]=112;70;IF([.T76]=98;70;IF([.T76]=96;60;IF([.T76]=84;60;IF([.T76]=108;60;IF([.T76]=90;50;IF([.T76]=72;40;IF([.T76]=80;40;IF([.T76]=100;50;IF([.T76]=54;30;IF([.T76]=36;20;IF([.T76]=18;10;IF([.T7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3/3b/Rosemane_Icon.png/revision/latest?cb=201304280347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Bewell_-_Bluesplint_-_Rosemane&quot;;&quot;Rosemane&quot;)" office:value-type="string" office:string-value="Rosemane" calcext:value-type="string">
            <text:p>Roseman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871" calcext:value-type="float">
            <text:p>871</text:p>
          </table:table-cell>
          <table:table-cell table:style-name="ce32" office:value-type="float" office:value="655" calcext:value-type="float">
            <text:p>655</text:p>
          </table:table-cell>
          <table:table-cell table:style-name="ce36" office:value-type="float" office:value="439" calcext:value-type="float">
            <text:p>439</text:p>
          </table:table-cell>
          <table:table-cell table:style-name="ce40" office:value-type="float" office:value="633" calcext:value-type="float">
            <text:p>633</text:p>
          </table:table-cell>
          <table:table-cell table:style-name="ce44" office:value-type="float" office:value="1693" calcext:value-type="float">
            <text:p>1693</text:p>
          </table:table-cell>
          <table:table-cell table:style-name="ce52" table:formula="of:=SUM([.D77:.H77])" office:value-type="float" office:value="4291" calcext:value-type="float">
            <text:p>4291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7]=126;70;IF([.T77]=112;70;IF([.T77]=98;70;IF([.T77]=96;60;IF([.T77]=84;60;IF([.T77]=108;60;IF([.T77]=90;50;IF([.T77]=72;40;IF([.T77]=80;40;IF([.T77]=100;50;IF([.T77]=54;30;IF([.T77]=36;20;IF([.T77]=18;10;IF([.T7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f/Bolefang_Icon.png/revision/latest?cb=201304280347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onzenail&quot;;&quot;Bolefang&quot;)" office:value-type="string" office:string-value="Bolefang" calcext:value-type="string">
            <text:p>Bolefan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163" calcext:value-type="float">
            <text:p>1163</text:p>
          </table:table-cell>
          <table:table-cell table:style-name="ce32" office:value-type="float" office:value="945" calcext:value-type="float">
            <text:p>945</text:p>
          </table:table-cell>
          <table:table-cell table:style-name="ce36" office:value-type="float" office:value="424" calcext:value-type="float">
            <text:p>424</text:p>
          </table:table-cell>
          <table:table-cell table:style-name="ce40" office:value-type="float" office:value="67" calcext:value-type="float">
            <text:p>67</text:p>
          </table:table-cell>
          <table:table-cell table:style-name="ce44" office:value-type="float" office:value="296" calcext:value-type="float">
            <text:p>296</text:p>
          </table:table-cell>
          <table:table-cell table:style-name="ce52" table:formula="of:=SUM([.D78:.H78])" office:value-type="float" office:value="2895" calcext:value-type="float">
            <text:p>289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8]=126;70;IF([.T78]=112;70;IF([.T78]=98;70;IF([.T78]=96;60;IF([.T78]=84;60;IF([.T78]=108;60;IF([.T78]=90;50;IF([.T78]=72;40;IF([.T78]=80;40;IF([.T78]=100;50;IF([.T78]=54;30;IF([.T78]=36;20;IF([.T78]=18;10;IF([.T7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4/42/Brickfoot_Icon.png/revision/latest?cb=201304280347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onzenail&quot;;&quot;Brickfoot&quot;)" office:value-type="string" office:string-value="Brickfoot" calcext:value-type="string">
            <text:p>Brickfoo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98" calcext:value-type="float">
            <text:p>2498</text:p>
          </table:table-cell>
          <table:table-cell table:style-name="ce32" office:value-type="float" office:value="2089" calcext:value-type="float">
            <text:p>2089</text:p>
          </table:table-cell>
          <table:table-cell table:style-name="ce36" office:value-type="float" office:value="1037" calcext:value-type="float">
            <text:p>1037</text:p>
          </table:table-cell>
          <table:table-cell table:style-name="ce40" office:value-type="float" office:value="191" calcext:value-type="float">
            <text:p>191</text:p>
          </table:table-cell>
          <table:table-cell table:style-name="ce44" office:value-type="float" office:value="762" calcext:value-type="float">
            <text:p>762</text:p>
          </table:table-cell>
          <table:table-cell table:style-name="ce52" table:formula="of:=SUM([.D79:.H79])" office:value-type="float" office:value="6577" calcext:value-type="float">
            <text:p>6577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9]=126;70;IF([.T79]=112;70;IF([.T79]=98;70;IF([.T79]=96;60;IF([.T79]=84;60;IF([.T79]=108;60;IF([.T79]=90;50;IF([.T79]=72;40;IF([.T79]=80;40;IF([.T79]=100;50;IF([.T79]=54;30;IF([.T79]=36;20;IF([.T79]=18;10;IF([.T7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1.wikia.nocookie.net/__cb20130428034754/defenderoftexel/images/thumb/2/23/Bronzenail_Icon.png/40px-Bronzenai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onzenail&quot;; &quot;Bronzenail&quot;)" office:value-type="string" office:string-value="Bronzenail" calcext:value-type="string">
            <text:p>Bronzenai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129" calcext:value-type="float">
            <text:p>5129</text:p>
          </table:table-cell>
          <table:table-cell table:style-name="ce32" office:value-type="float" office:value="4336" calcext:value-type="float">
            <text:p>4336</text:p>
          </table:table-cell>
          <table:table-cell table:style-name="ce36" office:value-type="float" office:value="2224" calcext:value-type="float">
            <text:p>2224</text:p>
          </table:table-cell>
          <table:table-cell table:style-name="ce40" office:value-type="float" office:value="440" calcext:value-type="float">
            <text:p>440</text:p>
          </table:table-cell>
          <table:table-cell table:style-name="ce44" office:value-type="float" office:value="1664" calcext:value-type="float">
            <text:p>1664</text:p>
          </table:table-cell>
          <table:table-cell table:style-name="ce52" table:formula="of:=SUM([.D80:.H80])" office:value-type="float" office:value="13793" calcext:value-type="float">
            <text:p>13793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0]=126;70;IF([.T80]=112;70;IF([.T80]=98;70;IF([.T80]=96;60;IF([.T80]=84;60;IF([.T80]=108;60;IF([.T80]=90;50;IF([.T80]=72;40;IF([.T80]=80;40;IF([.T80]=100;50;IF([.T80]=54;30;IF([.T80]=36;20;IF([.T80]=18;10;IF([.T8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3/3d/Burntback_Icon.png/revision/latest?cb=201304280347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Burntback_-_Witherclay_-_Slateshanks&quot;;&quot;Burntback&quot;)" office:value-type="string" office:string-value="Burntback" calcext:value-type="string">
            <text:p>Burntbac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81" calcext:value-type="float">
            <text:p>581</text:p>
          </table:table-cell>
          <table:table-cell table:style-name="ce32" office:value-type="float" office:value="472" calcext:value-type="float">
            <text:p>472</text:p>
          </table:table-cell>
          <table:table-cell table:style-name="ce36" office:value-type="float" office:value="210" calcext:value-type="float">
            <text:p>210</text:p>
          </table:table-cell>
          <table:table-cell table:style-name="ce40" office:value-type="float" office:value="31" calcext:value-type="float">
            <text:p>31</text:p>
          </table:table-cell>
          <table:table-cell table:style-name="ce44" office:value-type="float" office:value="149" calcext:value-type="float">
            <text:p>149</text:p>
          </table:table-cell>
          <table:table-cell table:style-name="ce52" table:formula="of:=SUM([.D81:.H81])" office:value-type="float" office:value="1443" calcext:value-type="float">
            <text:p>1443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1]=126;70;IF([.T81]=112;70;IF([.T81]=98;70;IF([.T81]=96;60;IF([.T81]=84;60;IF([.T81]=108;60;IF([.T81]=90;50;IF([.T81]=72;40;IF([.T81]=80;40;IF([.T81]=100;50;IF([.T81]=54;30;IF([.T81]=36;20;IF([.T81]=18;10;IF([.T8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1/12/Witherclay_Icon.png/revision/latest?cb=201304280347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Burntback_-_Witherclay_-_Slateshanks&quot;;&quot;Witherclay&quot;)" office:value-type="string" office:string-value="Witherclay" calcext:value-type="string">
            <text:p>Withercla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82:.H82])" office:value-type="float" office:value="5" calcext:value-type="float">
            <text:p>5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2]=126;70;IF([.T82]=112;70;IF([.T82]=98;70;IF([.T82]=96;60;IF([.T82]=84;60;IF([.T82]=108;60;IF([.T82]=90;50;IF([.T82]=72;40;IF([.T82]=80;40;IF([.T82]=100;50;IF([.T82]=54;30;IF([.T82]=36;20;IF([.T82]=18;10;IF([.T82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4.wikia.nocookie.net/__cb20130428034755/defenderoftexel/images/thumb/d/dc/Slateshanks_Icon.png/40px-Slateshank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lateshanks&quot;; &quot;Slateshanks&quot;)" office:value-type="string" office:string-value="Slateshanks" calcext:value-type="string">
            <text:p>Slateshank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977" calcext:value-type="float">
            <text:p>3977</text:p>
          </table:table-cell>
          <table:table-cell table:style-name="ce32" office:value-type="float" office:value="3388" calcext:value-type="float">
            <text:p>3388</text:p>
          </table:table-cell>
          <table:table-cell table:style-name="ce36" office:value-type="float" office:value="1785" calcext:value-type="float">
            <text:p>1785</text:p>
          </table:table-cell>
          <table:table-cell table:style-name="ce40" office:value-type="float" office:value="360" calcext:value-type="float">
            <text:p>360</text:p>
          </table:table-cell>
          <table:table-cell table:style-name="ce44" office:value-type="float" office:value="1345" calcext:value-type="float">
            <text:p>1345</text:p>
          </table:table-cell>
          <table:table-cell table:style-name="ce52" table:formula="of:=SUM([.D83:.H83])" office:value-type="float" office:value="10855" calcext:value-type="float">
            <text:p>10855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3]=126;70;IF([.T83]=112;70;IF([.T83]=98;70;IF([.T83]=96;60;IF([.T83]=84;60;IF([.T83]=108;60;IF([.T83]=90;50;IF([.T83]=72;40;IF([.T83]=80;40;IF([.T83]=100;50;IF([.T83]=54;30;IF([.T83]=36;20;IF([.T83]=18;10;IF([.T8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e/ef/Halflight_Icon.png/revision/latest?cb=201304280347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rlghast&quot;;&quot;Halflight&quot;)" office:value-type="string" office:string-value="Halflight" calcext:value-type="string">
            <text:p>Halfligh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624" calcext:value-type="float">
            <text:p>624</text:p>
          </table:table-cell>
          <table:table-cell table:style-name="ce32" office:value-type="float" office:value="684" calcext:value-type="float">
            <text:p>684</text:p>
          </table:table-cell>
          <table:table-cell table:style-name="ce36" office:value-type="float" office:value="292" calcext:value-type="float">
            <text:p>292</text:p>
          </table:table-cell>
          <table:table-cell table:style-name="ce40" office:value-type="float" office:value="532" calcext:value-type="float">
            <text:p>532</text:p>
          </table:table-cell>
          <table:table-cell table:style-name="ce44" office:value-type="float" office:value="481" calcext:value-type="float">
            <text:p>481</text:p>
          </table:table-cell>
          <table:table-cell table:style-name="ce52" table:formula="of:=SUM([.D84:.H84])" office:value-type="float" office:value="2613" calcext:value-type="float">
            <text:p>2613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4]=126;70;IF([.T84]=112;70;IF([.T84]=98;70;IF([.T84]=96;60;IF([.T84]=84;60;IF([.T84]=108;60;IF([.T84]=90;50;IF([.T84]=72;40;IF([.T84]=80;40;IF([.T84]=100;50;IF([.T84]=54;30;IF([.T84]=36;20;IF([.T84]=18;10;IF([.T8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0/0f/Darkbegone_Icon.png/revision/latest?cb=201304280347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rlghast&quot;;&quot;Darkbegone&quot;)" office:value-type="string" office:string-value="Darkbegone" calcext:value-type="string">
            <text:p>Darkbego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445" calcext:value-type="float">
            <text:p>1445</text:p>
          </table:table-cell>
          <table:table-cell table:style-name="ce32" office:value-type="float" office:value="1546" calcext:value-type="float">
            <text:p>1546</text:p>
          </table:table-cell>
          <table:table-cell table:style-name="ce36" office:value-type="float" office:value="730" calcext:value-type="float">
            <text:p>730</text:p>
          </table:table-cell>
          <table:table-cell table:style-name="ce40" office:value-type="float" office:value="1244" calcext:value-type="float">
            <text:p>1244</text:p>
          </table:table-cell>
          <table:table-cell table:style-name="ce44" office:value-type="float" office:value="1145" calcext:value-type="float">
            <text:p>1145</text:p>
          </table:table-cell>
          <table:table-cell table:style-name="ce52" table:formula="of:=SUM([.D85:.H85])" office:value-type="float" office:value="6110" calcext:value-type="float">
            <text:p>6110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5]=126;70;IF([.T85]=112;70;IF([.T85]=98;70;IF([.T85]=96;60;IF([.T85]=84;60;IF([.T85]=108;60;IF([.T85]=90;50;IF([.T85]=72;40;IF([.T85]=80;40;IF([.T85]=100;50;IF([.T85]=54;30;IF([.T85]=36;20;IF([.T85]=18;10;IF([.T8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34756/defenderoftexel/images/thumb/e/e3/Darlghast_Icon.png/40px-Darlghas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rlghast&quot;; &quot;Darlghast&quot;)" office:value-type="string" office:string-value="Darlghast" calcext:value-type="string">
            <text:p>Darlghas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113" calcext:value-type="float">
            <text:p>3113</text:p>
          </table:table-cell>
          <table:table-cell table:style-name="ce32" office:value-type="float" office:value="3321" calcext:value-type="float">
            <text:p>3321</text:p>
          </table:table-cell>
          <table:table-cell table:style-name="ce36" office:value-type="float" office:value="1618" calcext:value-type="float">
            <text:p>1618</text:p>
          </table:table-cell>
          <table:table-cell table:style-name="ce40" office:value-type="float" office:value="2700" calcext:value-type="float">
            <text:p>2700</text:p>
          </table:table-cell>
          <table:table-cell table:style-name="ce44" office:value-type="float" office:value="2498" calcext:value-type="float">
            <text:p>2498</text:p>
          </table:table-cell>
          <table:table-cell table:style-name="ce52" table:formula="of:=SUM([.D86:.H86])" office:value-type="float" office:value="13250" calcext:value-type="float">
            <text:p>13250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6]=126;70;IF([.T86]=112;70;IF([.T86]=98;70;IF([.T86]=96;60;IF([.T86]=84;60;IF([.T86]=108;60;IF([.T86]=90;50;IF([.T86]=72;40;IF([.T86]=80;40;IF([.T86]=100;50;IF([.T86]=54;30;IF([.T86]=36;20;IF([.T86]=18;10;IF([.T8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7/72/Fallowfrost_Icon.png/revision/latest?cb=20130604030122&quot;)" office:value-type="string" office:string-value="" calcext:value-type="error">
            <text:p>#NAME?</text:p>
          </table:table-cell>
          <table:table-cell table:style-name="ce11" table:formula="of:=HYPERLINK(&quot;http://defenderoftexel.wikia.com/wiki/Fallowfrost_-_Greysap_-_Griefall&quot;;&quot;Fallowfrost&quot;)" office:value-type="string" office:string-value="Fallowfrost" calcext:value-type="string">
            <text:p>Fallowfros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87:.H87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7]=126;70;IF([.T87]=112;70;IF([.T87]=98;70;IF([.T87]=96;60;IF([.T87]=84;60;IF([.T87]=108;60;IF([.T87]=90;50;IF([.T87]=72;40;IF([.T87]=80;40;IF([.T87]=100;50;IF([.T87]=54;30;IF([.T87]=36;20;IF([.T87]=18;10;IF([.T8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a/ab/Greysap_Icon.png/revision/latest?cb=20130604030123&quot;)" office:value-type="string" office:string-value="" calcext:value-type="error">
            <text:p>#NAME?</text:p>
          </table:table-cell>
          <table:table-cell table:style-name="ce11" table:formula="of:=HYPERLINK(&quot;http://defenderoftexel.wikia.com/wiki/Fallowfrost_-_Greysap_-_Griefall&quot;;&quot;Greysay&quot;)" office:value-type="string" office:string-value="Greysay" calcext:value-type="string">
            <text:p>Greysa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88:.H88])" office:value-type="float" office:value="5" calcext:value-type="float">
            <text:p>5</text:p>
          </table:table-cell>
          <table:table-cell table:style-name="ce59" office:value-type="string" calcext:value-type="string">
            <text:p>Quicke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8]=126;70;IF([.T88]=112;70;IF([.T88]=98;70;IF([.T88]=96;60;IF([.T88]=84;60;IF([.T88]=108;60;IF([.T88]=90;50;IF([.T88]=72;40;IF([.T88]=80;40;IF([.T88]=100;50;IF([.T88]=54;30;IF([.T88]=36;20;IF([.T88]=18;10;IF([.T8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.wikia.com/defenderoftexel/images/d/d3/Griefal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Fallowfrost_-_Greysap_-_Griefall&quot;; &quot;Griefall&quot;)" office:value-type="string" office:string-value="Griefall" calcext:value-type="string">
            <text:p>Griefal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287" calcext:value-type="float">
            <text:p>2287</text:p>
          </table:table-cell>
          <table:table-cell table:style-name="ce32" office:value-type="float" office:value="2436" calcext:value-type="float">
            <text:p>2436</text:p>
          </table:table-cell>
          <table:table-cell table:style-name="ce36" office:value-type="float" office:value="1216" calcext:value-type="float">
            <text:p>1216</text:p>
          </table:table-cell>
          <table:table-cell table:style-name="ce40" office:value-type="float" office:value="1994" calcext:value-type="float">
            <text:p>1994</text:p>
          </table:table-cell>
          <table:table-cell table:style-name="ce44" office:value-type="float" office:value="1850" calcext:value-type="float">
            <text:p>1850</text:p>
          </table:table-cell>
          <table:table-cell table:style-name="ce52" table:formula="of:=SUM([.D89:.H89])" office:value-type="float" office:value="9783" calcext:value-type="float">
            <text:p>9783</text:p>
          </table:table-cell>
          <table:table-cell table:style-name="ce59" office:value-type="string" calcext:value-type="string">
            <text:p>Quicken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89]=126;70;IF([.T89]=112;70;IF([.T89]=98;70;IF([.T89]=96;60;IF([.T89]=84;60;IF([.T89]=108;60;IF([.T89]=90;50;IF([.T89]=72;40;IF([.T89]=80;40;IF([.T89]=100;50;IF([.T89]=54;30;IF([.T89]=36;20;IF([.T89]=18;10;IF([.T8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b/b5/Redfang_Icon.png/revision/latest?cb=201304280358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dfang_-_Greengrief_-_Foolsgold&quot;;&quot;Redfang&quot;)" office:value-type="string" office:string-value="Redfang" calcext:value-type="string">
            <text:p>Redfan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88" calcext:value-type="float">
            <text:p>588</text:p>
          </table:table-cell>
          <table:table-cell table:style-name="ce32" office:value-type="float" office:value="693" calcext:value-type="float">
            <text:p>693</text:p>
          </table:table-cell>
          <table:table-cell table:style-name="ce36" office:value-type="float" office:value="322" calcext:value-type="float">
            <text:p>322</text:p>
          </table:table-cell>
          <table:table-cell table:style-name="ce40" office:value-type="float" office:value="59" calcext:value-type="float">
            <text:p>59</text:p>
          </table:table-cell>
          <table:table-cell table:style-name="ce44" office:value-type="float" office:value="82" calcext:value-type="float">
            <text:p>82</text:p>
          </table:table-cell>
          <table:table-cell table:style-name="ce52" table:formula="of:=SUM([.D90:.H90])" office:value-type="float" office:value="1744" calcext:value-type="float">
            <text:p>1744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0]=126;70;IF([.T90]=112;70;IF([.T90]=98;70;IF([.T90]=96;60;IF([.T90]=84;60;IF([.T90]=108;60;IF([.T90]=90;50;IF([.T90]=72;40;IF([.T90]=80;40;IF([.T90]=100;50;IF([.T90]=54;30;IF([.T90]=36;20;IF([.T90]=18;10;IF([.T9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2/24/Greengrief_Icon.png/revision/latest?cb=201304280358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dfang_-_Greengrief_-_Foolsgold&quot;;&quot;Greengrief&quot;)" office:value-type="string" office:string-value="Greengrief" calcext:value-type="string">
            <text:p>Greengrief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32" office:value-type="float" office:value="1501" calcext:value-type="float">
            <text:p>1501</text:p>
          </table:table-cell>
          <table:table-cell table:style-name="ce36" office:value-type="float" office:value="875" calcext:value-type="float">
            <text:p>875</text:p>
          </table:table-cell>
          <table:table-cell table:style-name="ce40" office:value-type="float" office:value="174" calcext:value-type="float">
            <text:p>174</text:p>
          </table:table-cell>
          <table:table-cell table:style-name="ce44" office:value-type="float" office:value="231" calcext:value-type="float">
            <text:p>231</text:p>
          </table:table-cell>
          <table:table-cell table:style-name="ce52" table:formula="of:=SUM([.D91:.H91])" office:value-type="float" office:value="4081" calcext:value-type="float">
            <text:p>4081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1]=126;70;IF([.T91]=112;70;IF([.T91]=98;70;IF([.T91]=96;60;IF([.T91]=84;60;IF([.T91]=108;60;IF([.T91]=90;50;IF([.T91]=72;40;IF([.T91]=80;40;IF([.T91]=100;50;IF([.T91]=54;30;IF([.T91]=36;20;IF([.T91]=18;10;IF([.T91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35848/defenderoftexel/images/thumb/6/67/Foolsgold_Icon.png/40px-Foolsgold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Foolsgold&quot;; &quot;Foolsgold&quot;)" office:value-type="string" office:string-value="Foolsgold" calcext:value-type="string">
            <text:p>Foolsgol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75" calcext:value-type="float">
            <text:p>2475</text:p>
          </table:table-cell>
          <table:table-cell table:style-name="ce32" office:value-type="float" office:value="2827" calcext:value-type="float">
            <text:p>2827</text:p>
          </table:table-cell>
          <table:table-cell table:style-name="ce36" office:value-type="float" office:value="1516" calcext:value-type="float">
            <text:p>1516</text:p>
          </table:table-cell>
          <table:table-cell table:style-name="ce40" office:value-type="float" office:value="356" calcext:value-type="float">
            <text:p>356</text:p>
          </table:table-cell>
          <table:table-cell table:style-name="ce44" office:value-type="float" office:value="473" calcext:value-type="float">
            <text:p>473</text:p>
          </table:table-cell>
          <table:table-cell table:style-name="ce52" table:formula="of:=SUM([.D92:.H92])" office:value-type="float" office:value="7647" calcext:value-type="float">
            <text:p>7647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2]=126;70;IF([.T92]=112;70;IF([.T92]=98;70;IF([.T92]=96;60;IF([.T92]=84;60;IF([.T92]=108;60;IF([.T92]=90;50;IF([.T92]=72;40;IF([.T92]=80;40;IF([.T92]=100;50;IF([.T92]=54;30;IF([.T92]=36;20;IF([.T92]=18;10;IF([.T9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a/ad/Clayfeather_Icon.png/revision/latest?cb=201304280358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Harrowfond&quot;;&quot;Clayfeather&quot;)" office:value-type="string" office:string-value="Clayfeather" calcext:value-type="string">
            <text:p>Clayfeath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93:.H93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3]=126;70;IF([.T93]=112;70;IF([.T93]=98;70;IF([.T93]=96;60;IF([.T93]=84;60;IF([.T93]=108;60;IF([.T93]=90;50;IF([.T93]=72;40;IF([.T93]=80;40;IF([.T93]=100;50;IF([.T93]=54;30;IF([.T93]=36;20;IF([.T93]=18;10;IF([.T9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7/7c/Fawnlocks_Icon.png/revision/latest?cb=201304280358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Harrowfond&quot;;&quot;Fawnlocks&quot;)" office:value-type="string" office:string-value="Fawnlocks" calcext:value-type="string">
            <text:p>Fawnlock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94:.H94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4]=126;70;IF([.T94]=112;70;IF([.T94]=98;70;IF([.T94]=96;60;IF([.T94]=84;60;IF([.T94]=108;60;IF([.T94]=90;50;IF([.T94]=72;40;IF([.T94]=80;40;IF([.T94]=100;50;IF([.T94]=54;30;IF([.T94]=36;20;IF([.T94]=18;10;IF([.T9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.wikia.com/defenderoftexel/images/c/ca/Harrowfond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Harrowfond&quot;; &quot;Harrowfond&quot;)" office:value-type="string" office:string-value="Harrowfond" calcext:value-type="string">
            <text:p>Harrowfon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737" calcext:value-type="float">
            <text:p>2737</text:p>
          </table:table-cell>
          <table:table-cell table:style-name="ce32" office:value-type="float" office:value="3129" calcext:value-type="float">
            <text:p>3129</text:p>
          </table:table-cell>
          <table:table-cell table:style-name="ce36" office:value-type="float" office:value="1677" calcext:value-type="float">
            <text:p>1677</text:p>
          </table:table-cell>
          <table:table-cell table:style-name="ce40" office:value-type="float" office:value="393" calcext:value-type="float">
            <text:p>393</text:p>
          </table:table-cell>
          <table:table-cell table:style-name="ce44" office:value-type="float" office:value="526" calcext:value-type="float">
            <text:p>526</text:p>
          </table:table-cell>
          <table:table-cell table:style-name="ce52" table:formula="of:=SUM([.D95:.H95])" office:value-type="float" office:value="8462" calcext:value-type="float">
            <text:p>8462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5]=126;70;IF([.T95]=112;70;IF([.T95]=98;70;IF([.T95]=96;60;IF([.T95]=84;60;IF([.T95]=108;60;IF([.T95]=90;50;IF([.T95]=72;40;IF([.T95]=80;40;IF([.T95]=100;50;IF([.T95]=54;30;IF([.T95]=36;20;IF([.T95]=18;10;IF([.T9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1/12/Heartsweet_Icon.png/revision/latest?cb=20130428035847&quot;)" office:value-type="string" office:string-value="" calcext:value-type="error">
            <text:p>#NAME?</text:p>
          </table:table-cell>
          <table:table-cell table:style-name="ce11" table:formula="of:=HYPERLINK(&quot;http://defenderoftexel.wikia.com/wiki/Heartsweet_-_Heartswift_-_Illenswift&quot;;&quot;Heartsweet&quot;)" office:value-type="string" office:string-value="Heartsweet" calcext:value-type="string">
            <text:p>Heartswee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96:.H96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6]=126;70;IF([.T96]=112;70;IF([.T96]=98;70;IF([.T96]=96;60;IF([.T96]=84;60;IF([.T96]=108;60;IF([.T96]=90;50;IF([.T96]=72;40;IF([.T96]=80;40;IF([.T96]=100;50;IF([.T96]=54;30;IF([.T96]=36;20;IF([.T96]=18;10;IF([.T9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4/42/Heartswift_Icon.png/revision/latest?cb=20130428035847&quot;)" office:value-type="string" office:string-value="" calcext:value-type="error">
            <text:p>#NAME?</text:p>
          </table:table-cell>
          <table:table-cell table:style-name="ce11" table:formula="of:=HYPERLINK(&quot;http://defenderoftexel.wikia.com/wiki/Heartsweet_-_Heartswift_-_Illenswift&quot;;&quot;Heartswift&quot;)" office:value-type="string" office:string-value="Heartswift" calcext:value-type="string">
            <text:p>Heartswif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97:.H97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7]=126;70;IF([.T97]=112;70;IF([.T97]=98;70;IF([.T97]=96;60;IF([.T97]=84;60;IF([.T97]=108;60;IF([.T97]=90;50;IF([.T97]=72;40;IF([.T97]=80;40;IF([.T97]=100;50;IF([.T97]=54;30;IF([.T97]=36;20;IF([.T97]=18;10;IF([.T9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35850/defenderoftexel/images/thumb/0/06/Illenswift_Icon.png/40px-Illenswif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Illenswift&quot;; &quot;Illenswift&quot;)" office:value-type="string" office:string-value="Illenswift" calcext:value-type="string">
            <text:p>Illenswif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04" calcext:value-type="float">
            <text:p>1804</text:p>
          </table:table-cell>
          <table:table-cell table:style-name="ce32" office:value-type="float" office:value="1268" calcext:value-type="float">
            <text:p>1268</text:p>
          </table:table-cell>
          <table:table-cell table:style-name="ce36" office:value-type="float" office:value="817" calcext:value-type="float">
            <text:p>817</text:p>
          </table:table-cell>
          <table:table-cell table:style-name="ce40" office:value-type="float" office:value="5191" calcext:value-type="float">
            <text:p>5191</text:p>
          </table:table-cell>
          <table:table-cell table:style-name="ce44" office:value-type="float" office:value="4943" calcext:value-type="float">
            <text:p>4943</text:p>
          </table:table-cell>
          <table:table-cell table:style-name="ce52" table:formula="of:=SUM([.D98:.H98])" office:value-type="float" office:value="14023" calcext:value-type="float">
            <text:p>14023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8]=126;70;IF([.T98]=112;70;IF([.T98]=98;70;IF([.T98]=96;60;IF([.T98]=84;60;IF([.T98]=108;60;IF([.T98]=90;50;IF([.T98]=72;40;IF([.T98]=80;40;IF([.T98]=100;50;IF([.T98]=54;30;IF([.T98]=36;20;IF([.T98]=18;10;IF([.T9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c/c9/Illfond_Icon.png/revision/latest?cb=20130428035848&quot;)" office:value-type="string" office:string-value="" calcext:value-type="error">
            <text:p>#NAME?</text:p>
          </table:table-cell>
          <table:table-cell table:style-name="ce11" table:formula="of:=HYPERLINK(&quot;http://defenderoftexel.wikia.com/wiki/Illfond_-_Jadewing_-_Jinxan&quot;;&quot;Illfound&quot;)" office:value-type="string" office:string-value="Illfound" calcext:value-type="string">
            <text:p>Illfoun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2" calcext:value-type="float">
            <text:p>182</text:p>
          </table:table-cell>
          <table:table-cell table:style-name="ce32" office:value-type="float" office:value="117" calcext:value-type="float">
            <text:p>117</text:p>
          </table:table-cell>
          <table:table-cell table:style-name="ce36" office:value-type="float" office:value="73" calcext:value-type="float">
            <text:p>73</text:p>
          </table:table-cell>
          <table:table-cell table:style-name="ce40" office:value-type="float" office:value="653" calcext:value-type="float">
            <text:p>653</text:p>
          </table:table-cell>
          <table:table-cell table:style-name="ce44" office:value-type="float" office:value="612" calcext:value-type="float">
            <text:p>612</text:p>
          </table:table-cell>
          <table:table-cell table:style-name="ce52" table:formula="of:=SUM([.D99:.H99])" office:value-type="float" office:value="1637" calcext:value-type="float">
            <text:p>1637</text:p>
          </table:table-cell>
          <table:table-cell table:style-name="ce59" office:value-type="string" calcext:value-type="string">
            <text:p>Hea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99]=126;70;IF([.T99]=112;70;IF([.T99]=98;70;IF([.T99]=96;60;IF([.T99]=84;60;IF([.T99]=108;60;IF([.T99]=90;50;IF([.T99]=72;40;IF([.T99]=80;40;IF([.T99]=100;50;IF([.T99]=54;30;IF([.T99]=36;20;IF([.T99]=18;10;IF([.T9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c/c1/Jadewing_Icon.png/revision/latest?cb=20130428035848&quot;)" office:value-type="string" office:string-value="" calcext:value-type="error">
            <text:p>#NAME?</text:p>
          </table:table-cell>
          <table:table-cell table:style-name="ce11" table:formula="of:=HYPERLINK(&quot;http://defenderoftexel.wikia.com/wiki/Illfond_-_Jadewing_-_Jinxan&quot;;&quot;Jadewing&quot;)" office:value-type="string" office:string-value="Jadewing" calcext:value-type="string">
            <text:p>Jadewin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68" calcext:value-type="float">
            <text:p>468</text:p>
          </table:table-cell>
          <table:table-cell table:style-name="ce32" office:value-type="float" office:value="325" calcext:value-type="float">
            <text:p>325</text:p>
          </table:table-cell>
          <table:table-cell table:style-name="ce36" office:value-type="float" office:value="206" calcext:value-type="float">
            <text:p>206</text:p>
          </table:table-cell>
          <table:table-cell table:style-name="ce40" office:value-type="float" office:value="1432" calcext:value-type="float">
            <text:p>1432</text:p>
          </table:table-cell>
          <table:table-cell table:style-name="ce44" office:value-type="float" office:value="1356" calcext:value-type="float">
            <text:p>1356</text:p>
          </table:table-cell>
          <table:table-cell table:style-name="ce52" table:formula="of:=SUM([.D100:.H100])" office:value-type="float" office:value="3787" calcext:value-type="float">
            <text:p>3787</text:p>
          </table:table-cell>
          <table:table-cell table:style-name="ce59" office:value-type="string" calcext:value-type="string">
            <text:p>Heal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0]=126;70;IF([.T100]=112;70;IF([.T100]=98;70;IF([.T100]=96;60;IF([.T100]=84;60;IF([.T100]=108;60;IF([.T100]=90;50;IF([.T100]=72;40;IF([.T100]=80;40;IF([.T100]=100;50;IF([.T100]=54;30;IF([.T100]=36;20;IF([.T100]=18;10;IF([.T10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4.wikia.nocookie.net/__cb20130502174026/defenderoftexel/images/thumb/8/8d/Jinxan_Icon.png/50px-Jinxa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Jinxan&quot;; &quot;Jinxan&quot;)" office:value-type="string" office:string-value="Jinxan" calcext:value-type="string">
            <text:p>Jinxa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444" calcext:value-type="float">
            <text:p>1444</text:p>
          </table:table-cell>
          <table:table-cell table:style-name="ce32" office:value-type="float" office:value="1023" calcext:value-type="float">
            <text:p>1023</text:p>
          </table:table-cell>
          <table:table-cell table:style-name="ce36" office:value-type="float" office:value="666" calcext:value-type="float">
            <text:p>666</text:p>
          </table:table-cell>
          <table:table-cell table:style-name="ce40" office:value-type="float" office:value="3998" calcext:value-type="float">
            <text:p>3998</text:p>
          </table:table-cell>
          <table:table-cell table:style-name="ce44" office:value-type="float" office:value="3816" calcext:value-type="float">
            <text:p>3816</text:p>
          </table:table-cell>
          <table:table-cell table:style-name="ce52" table:formula="of:=SUM([.D101:.H101])" office:value-type="float" office:value="10947" calcext:value-type="float">
            <text:p>10947</text:p>
          </table:table-cell>
          <table:table-cell table:style-name="ce59" office:value-type="string" calcext:value-type="string">
            <text:p>Hea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1]=126;70;IF([.T101]=112;70;IF([.T101]=98;70;IF([.T101]=96;60;IF([.T101]=84;60;IF([.T101]=108;60;IF([.T101]=90;50;IF([.T101]=72;40;IF([.T101]=80;40;IF([.T101]=100;50;IF([.T101]=54;30;IF([.T101]=36;20;IF([.T101]=18;10;IF([.T10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e/e1/Limefoot_Icon.png/revision/latest?cb=20130428035848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mefoot_-_Banelove_-_Lightbane&quot;;&quot;Limefoot&quot;)" office:value-type="string" office:string-value="Limefoot" calcext:value-type="string">
            <text:p>Limefoo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622" calcext:value-type="float">
            <text:p>622</text:p>
          </table:table-cell>
          <table:table-cell table:style-name="ce32" office:value-type="float" office:value="736" calcext:value-type="float">
            <text:p>736</text:p>
          </table:table-cell>
          <table:table-cell table:style-name="ce36" office:value-type="float" office:value="343" calcext:value-type="float">
            <text:p>343</text:p>
          </table:table-cell>
          <table:table-cell table:style-name="ce40" office:value-type="float" office:value="62" calcext:value-type="float">
            <text:p>62</text:p>
          </table:table-cell>
          <table:table-cell table:style-name="ce44" office:value-type="float" office:value="88" calcext:value-type="float">
            <text:p>88</text:p>
          </table:table-cell>
          <table:table-cell table:style-name="ce52" table:formula="of:=SUM([.D102:.H102])" office:value-type="float" office:value="1851" calcext:value-type="float">
            <text:p>1851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2]=126;70;IF([.T102]=112;70;IF([.T102]=98;70;IF([.T102]=96;60;IF([.T102]=84;60;IF([.T102]=108;60;IF([.T102]=90;50;IF([.T102]=72;40;IF([.T102]=80;40;IF([.T102]=100;50;IF([.T102]=54;30;IF([.T102]=36;20;IF([.T102]=18;10;IF([.T10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3/31/Banelove_Icon.png/revision/latest?cb=20130428035849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mefoot_-_Banelove_-_Lightbane&quot;;&quot;Banelove&quot;)" office:value-type="string" office:string-value="Banelove" calcext:value-type="string">
            <text:p>Banelov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387" calcext:value-type="float">
            <text:p>1387</text:p>
          </table:table-cell>
          <table:table-cell table:style-name="ce32" office:value-type="float" office:value="1601" calcext:value-type="float">
            <text:p>1601</text:p>
          </table:table-cell>
          <table:table-cell table:style-name="ce36" office:value-type="float" office:value="828" calcext:value-type="float">
            <text:p>828</text:p>
          </table:table-cell>
          <table:table-cell table:style-name="ce40" office:value-type="float" office:value="184" calcext:value-type="float">
            <text:p>184</text:p>
          </table:table-cell>
          <table:table-cell table:style-name="ce44" office:value-type="float" office:value="246" calcext:value-type="float">
            <text:p>246</text:p>
          </table:table-cell>
          <table:table-cell table:style-name="ce52" table:formula="of:=SUM([.D103:.H103])" office:value-type="float" office:value="4246" calcext:value-type="float">
            <text:p>4246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3]=126;70;IF([.T103]=112;70;IF([.T103]=98;70;IF([.T103]=96;60;IF([.T103]=84;60;IF([.T103]=108;60;IF([.T103]=90;50;IF([.T103]=72;40;IF([.T103]=80;40;IF([.T103]=100;50;IF([.T103]=54;30;IF([.T103]=36;20;IF([.T103]=18;10;IF([.T103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4.wikia.nocookie.net/__cb20130428035851/defenderoftexel/images/thumb/4/4e/Lightbane_Icon.png/40px-Lightban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ghtbane&quot;; &quot;Lightbane&quot;)" office:value-type="string" office:string-value="Lightbane" calcext:value-type="string">
            <text:p>Lightba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918" calcext:value-type="float">
            <text:p>2918</text:p>
          </table:table-cell>
          <table:table-cell table:style-name="ce32" office:value-type="float" office:value="3337" calcext:value-type="float">
            <text:p>3337</text:p>
          </table:table-cell>
          <table:table-cell table:style-name="ce36" office:value-type="float" office:value="1787" calcext:value-type="float">
            <text:p>1787</text:p>
          </table:table-cell>
          <table:table-cell table:style-name="ce40" office:value-type="float" office:value="422" calcext:value-type="float">
            <text:p>422</text:p>
          </table:table-cell>
          <table:table-cell table:style-name="ce44" office:value-type="float" office:value="560" calcext:value-type="float">
            <text:p>560</text:p>
          </table:table-cell>
          <table:table-cell table:style-name="ce52" table:formula="of:=SUM([.D104:.H104])" office:value-type="float" office:value="9024" calcext:value-type="float">
            <text:p>902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4]=126;70;IF([.T104]=112;70;IF([.T104]=98;70;IF([.T104]=96;60;IF([.T104]=84;60;IF([.T104]=108;60;IF([.T104]=90;50;IF([.T104]=72;40;IF([.T104]=80;40;IF([.T104]=100;50;IF([.T104]=54;30;IF([.T104]=36;20;IF([.T104]=18;10;IF([.T10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d/d5/Loatheill_Icon.png/revision/latest?cb=201304280358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atheill_-_Copperbite_-_Silverclaw&quot;;&quot;Loatheill&quot;)" office:value-type="string" office:string-value="Loatheill" calcext:value-type="string">
            <text:p>Loatheil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05:.H105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5]=126;70;IF([.T105]=112;70;IF([.T105]=98;70;IF([.T105]=96;60;IF([.T105]=84;60;IF([.T105]=108;60;IF([.T105]=90;50;IF([.T105]=72;40;IF([.T105]=80;40;IF([.T105]=100;50;IF([.T105]=54;30;IF([.T105]=36;20;IF([.T105]=18;10;IF([.T105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a/ab/Copperbite_Icon.png/revision/latest?cb=201304280358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atheill_-_Copperbite_-_Silverclaw&quot;;&quot;Copperbite&quot;)" office:value-type="string" office:string-value="Copperbite" calcext:value-type="string">
            <text:p>Copperbit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06:.H106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6]=126;70;IF([.T106]=112;70;IF([.T106]=98;70;IF([.T106]=96;60;IF([.T106]=84;60;IF([.T106]=108;60;IF([.T106]=90;50;IF([.T106]=72;40;IF([.T106]=80;40;IF([.T106]=100;50;IF([.T106]=54;30;IF([.T106]=36;20;IF([.T106]=18;10;IF([.T106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4/42/Silverclaw_Icon.png/revision/latest?cb=20130624155831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atheill_-_Copperbite_-_Silverclaw&quot;;&quot;Silverclaw&quot;)" office:value-type="string" office:string-value="Silverclaw" calcext:value-type="string">
            <text:p>Silverclaw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824" calcext:value-type="float">
            <text:p>2824</text:p>
          </table:table-cell>
          <table:table-cell table:style-name="ce32" office:value-type="float" office:value="3227" calcext:value-type="float">
            <text:p>3227</text:p>
          </table:table-cell>
          <table:table-cell table:style-name="ce36" office:value-type="float" office:value="1730" calcext:value-type="float">
            <text:p>1730</text:p>
          </table:table-cell>
          <table:table-cell table:style-name="ce40" office:value-type="float" office:value="408" calcext:value-type="float">
            <text:p>408</text:p>
          </table:table-cell>
          <table:table-cell table:style-name="ce44" office:value-type="float" office:value="540" calcext:value-type="float">
            <text:p>540</text:p>
          </table:table-cell>
          <table:table-cell table:style-name="ce52" table:formula="of:=SUM([.D107:.H107])" office:value-type="float" office:value="8729" calcext:value-type="float">
            <text:p>8729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7]=126;70;IF([.T107]=112;70;IF([.T107]=98;70;IF([.T107]=96;60;IF([.T107]=84;60;IF([.T107]=108;60;IF([.T107]=90;50;IF([.T107]=72;40;IF([.T107]=80;40;IF([.T107]=100;50;IF([.T107]=54;30;IF([.T107]=36;20;IF([.T107]=18;10;IF([.T10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1/1b/Mossback_Icon.png/revision/latest?cb=201304280358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kepeace&quot;;&quot;Mossback&quot;)" office:value-type="string" office:string-value="Mossback" calcext:value-type="string">
            <text:p>Mossback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04" calcext:value-type="float">
            <text:p>204</text:p>
          </table:table-cell>
          <table:table-cell table:style-name="ce32" office:value-type="float" office:value="217" calcext:value-type="float">
            <text:p>217</text:p>
          </table:table-cell>
          <table:table-cell table:style-name="ce36" office:value-type="float" office:value="108" calcext:value-type="float">
            <text:p>108</text:p>
          </table:table-cell>
          <table:table-cell table:style-name="ce40" office:value-type="float" office:value="176" calcext:value-type="float">
            <text:p>176</text:p>
          </table:table-cell>
          <table:table-cell table:style-name="ce44" office:value-type="float" office:value="165" calcext:value-type="float">
            <text:p>165</text:p>
          </table:table-cell>
          <table:table-cell table:style-name="ce52" table:formula="of:=SUM([.D108:.H108])" office:value-type="float" office:value="870" calcext:value-type="float">
            <text:p>870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8]=126;70;IF([.T108]=112;70;IF([.T108]=98;70;IF([.T108]=96;60;IF([.T108]=84;60;IF([.T108]=108;60;IF([.T108]=90;50;IF([.T108]=72;40;IF([.T108]=80;40;IF([.T108]=100;50;IF([.T108]=54;30;IF([.T108]=36;20;IF([.T108]=18;10;IF([.T108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8/8a/Lowluck_Icon.png/revision/latest?cb=201304280358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kepeace&quot;;&quot;Lowluck&quot;)" office:value-type="string" office:string-value="Lowluck" calcext:value-type="string">
            <text:p>Lowluck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58" calcext:value-type="float">
            <text:p>358</text:p>
          </table:table-cell>
          <table:table-cell table:style-name="ce32" office:value-type="float" office:value="390" calcext:value-type="float">
            <text:p>390</text:p>
          </table:table-cell>
          <table:table-cell table:style-name="ce36" office:value-type="float" office:value="167" calcext:value-type="float">
            <text:p>167</text:p>
          </table:table-cell>
          <table:table-cell table:style-name="ce40" office:value-type="float" office:value="305" calcext:value-type="float">
            <text:p>305</text:p>
          </table:table-cell>
          <table:table-cell table:style-name="ce44" office:value-type="float" office:value="277" calcext:value-type="float">
            <text:p>277</text:p>
          </table:table-cell>
          <table:table-cell table:style-name="ce52" table:formula="of:=SUM([.D109:.H109])" office:value-type="float" office:value="1497" calcext:value-type="float">
            <text:p>1497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09]=126;70;IF([.T109]=112;70;IF([.T109]=98;70;IF([.T109]=96;60;IF([.T109]=84;60;IF([.T109]=108;60;IF([.T109]=90;50;IF([.T109]=72;40;IF([.T109]=80;40;IF([.T109]=100;50;IF([.T109]=54;30;IF([.T109]=36;20;IF([.T109]=18;10;IF([.T10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35854/defenderoftexel/images/thumb/0/0d/Makepeace_Icon.png/50px-Makepeac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kepeace&quot;; &quot;Makepeace&quot;)" office:value-type="string" office:string-value="Makepeace" calcext:value-type="string">
            <text:p>Makepeac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967" calcext:value-type="float">
            <text:p>967</text:p>
          </table:table-cell>
          <table:table-cell table:style-name="ce32" office:value-type="float" office:value="1035" calcext:value-type="float">
            <text:p>1035</text:p>
          </table:table-cell>
          <table:table-cell table:style-name="ce36" office:value-type="float" office:value="486" calcext:value-type="float">
            <text:p>486</text:p>
          </table:table-cell>
          <table:table-cell table:style-name="ce40" office:value-type="float" office:value="831" calcext:value-type="float">
            <text:p>831</text:p>
          </table:table-cell>
          <table:table-cell table:style-name="ce44" office:value-type="float" office:value="766" calcext:value-type="float">
            <text:p>766</text:p>
          </table:table-cell>
          <table:table-cell table:style-name="ce52" table:formula="of:=SUM([.D110:.H110])" office:value-type="float" office:value="4085" calcext:value-type="float">
            <text:p>4085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0]=126;70;IF([.T110]=112;70;IF([.T110]=98;70;IF([.T110]=96;60;IF([.T110]=84;60;IF([.T110]=108;60;IF([.T110]=90;50;IF([.T110]=72;40;IF([.T110]=80;40;IF([.T110]=100;50;IF([.T110]=54;30;IF([.T110]=36;20;IF([.T110]=18;10;IF([.T110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b/be/Whitespore_Icon.png/revision/latest?cb=201304280358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ndfoot&quot;;&quot;Whitespore&quot;)" office:value-type="string" office:string-value="Whitespore" calcext:value-type="string">
            <text:p>Whitespor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51" calcext:value-type="float">
            <text:p>351</text:p>
          </table:table-cell>
          <table:table-cell table:style-name="ce32" office:value-type="float" office:value="298" calcext:value-type="float">
            <text:p>298</text:p>
          </table:table-cell>
          <table:table-cell table:style-name="ce36" office:value-type="float" office:value="157" calcext:value-type="float">
            <text:p>157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119" calcext:value-type="float">
            <text:p>119</text:p>
          </table:table-cell>
          <table:table-cell table:style-name="ce52" table:formula="of:=SUM([.D111:.H111])" office:value-type="float" office:value="955" calcext:value-type="float">
            <text:p>95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1]=126;70;IF([.T111]=112;70;IF([.T111]=98;70;IF([.T111]=96;60;IF([.T111]=84;60;IF([.T111]=108;60;IF([.T111]=90;50;IF([.T111]=72;40;IF([.T111]=80;40;IF([.T111]=100;50;IF([.T111]=54;30;IF([.T111]=36;20;IF([.T111]=18;10;IF([.T111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8/81/Redrime_Icon.png/revision/latest?cb=201304280358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ndfoot&quot;;&quot;Redrime&quot;)" office:value-type="string" office:string-value="Redrime" calcext:value-type="string">
            <text:p>Redrim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685" calcext:value-type="float">
            <text:p>685</text:p>
          </table:table-cell>
          <table:table-cell table:style-name="ce32" office:value-type="float" office:value="556" calcext:value-type="float">
            <text:p>556</text:p>
          </table:table-cell>
          <table:table-cell table:style-name="ce36" office:value-type="float" office:value="248" calcext:value-type="float">
            <text:p>248</text:p>
          </table:table-cell>
          <table:table-cell table:style-name="ce40" office:value-type="float" office:value="38" calcext:value-type="float">
            <text:p>38</text:p>
          </table:table-cell>
          <table:table-cell table:style-name="ce44" office:value-type="float" office:value="174" calcext:value-type="float">
            <text:p>174</text:p>
          </table:table-cell>
          <table:table-cell table:style-name="ce52" table:formula="of:=SUM([.D112:.H112])" office:value-type="float" office:value="1701" calcext:value-type="float">
            <text:p>1701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2]=126;70;IF([.T112]=112;70;IF([.T112]=98;70;IF([.T112]=96;60;IF([.T112]=84;60;IF([.T112]=108;60;IF([.T112]=90;50;IF([.T112]=72;40;IF([.T112]=80;40;IF([.T112]=100;50;IF([.T112]=54;30;IF([.T112]=36;20;IF([.T112]=18;10;IF([.T11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40435/defenderoftexel/images/thumb/7/72/Rendfoot_Icon.png/50px-Rendfoo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ndfoot&quot;; &quot;Rendfoot&quot;)" office:value-type="string" office:string-value="Rendfoot" calcext:value-type="string">
            <text:p>Rendfoo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628" calcext:value-type="float">
            <text:p>1628</text:p>
          </table:table-cell>
          <table:table-cell table:style-name="ce32" office:value-type="float" office:value="1361" calcext:value-type="float">
            <text:p>1361</text:p>
          </table:table-cell>
          <table:table-cell table:style-name="ce36" office:value-type="float" office:value="673" calcext:value-type="float">
            <text:p>673</text:p>
          </table:table-cell>
          <table:table-cell table:style-name="ce40" office:value-type="float" office:value="124" calcext:value-type="float">
            <text:p>124</text:p>
          </table:table-cell>
          <table:table-cell table:style-name="ce44" office:value-type="float" office:value="498" calcext:value-type="float">
            <text:p>498</text:p>
          </table:table-cell>
          <table:table-cell table:style-name="ce52" table:formula="of:=SUM([.D113:.H113])" office:value-type="float" office:value="4284" calcext:value-type="float">
            <text:p>428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3]=126;70;IF([.T113]=112;70;IF([.T113]=98;70;IF([.T113]=96;60;IF([.T113]=84;60;IF([.T113]=108;60;IF([.T113]=90;50;IF([.T113]=72;40;IF([.T113]=80;40;IF([.T113]=100;50;IF([.T113]=54;30;IF([.T113]=36;20;IF([.T113]=18;10;IF([.T11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8/8f/Rosewilt_Icon.png/revision/latest?cb=20130428040434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ewilt_-_Rustborn_-_Blackspill&quot;;&quot;Rosewilt&quot;)" office:value-type="string" office:string-value="Rosewilt" calcext:value-type="string">
            <text:p>Rosewil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01" calcext:value-type="float">
            <text:p>201</text:p>
          </table:table-cell>
          <table:table-cell table:style-name="ce32" office:value-type="float" office:value="131" calcext:value-type="float">
            <text:p>131</text:p>
          </table:table-cell>
          <table:table-cell table:style-name="ce36" office:value-type="float" office:value="82" calcext:value-type="float">
            <text:p>82</text:p>
          </table:table-cell>
          <table:table-cell table:style-name="ce40" office:value-type="float" office:value="718" calcext:value-type="float">
            <text:p>718</text:p>
          </table:table-cell>
          <table:table-cell table:style-name="ce44" office:value-type="float" office:value="677" calcext:value-type="float">
            <text:p>677</text:p>
          </table:table-cell>
          <table:table-cell table:style-name="ce52" table:formula="of:=SUM([.D114:.H114])" office:value-type="float" office:value="1809" calcext:value-type="float">
            <text:p>1809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4]=126;70;IF([.T114]=112;70;IF([.T114]=98;70;IF([.T114]=96;60;IF([.T114]=84;60;IF([.T114]=108;60;IF([.T114]=90;50;IF([.T114]=72;40;IF([.T114]=80;40;IF([.T114]=100;50;IF([.T114]=54;30;IF([.T114]=36;20;IF([.T114]=18;10;IF([.T11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e/e4/Rustborn_Icon.png/revision/latest?cb=20130428040434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ewilt_-_Rustborn_-_Blackspill&quot;;&quot;Rustborn&quot;)" office:value-type="string" office:string-value="Rustborn" calcext:value-type="string">
            <text:p>Rustbor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15:.H115])" office:value-type="float" office:value="5" calcext:value-type="float">
            <text:p>5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5]=126;70;IF([.T115]=112;70;IF([.T115]=98;70;IF([.T115]=96;60;IF([.T115]=84;60;IF([.T115]=108;60;IF([.T115]=90;50;IF([.T115]=72;40;IF([.T115]=80;40;IF([.T115]=100;50;IF([.T115]=54;30;IF([.T115]=36;20;IF([.T115]=18;10;IF([.T11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1.wikia.nocookie.net/__cb20130428040436/defenderoftexel/images/thumb/6/62/Blackspill_Icon.png/40px-Blackspil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Blackspill&quot;; &quot;Blackspill&quot;)" office:value-type="string" office:string-value="Blackspill" calcext:value-type="string">
            <text:p>Blackspil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80" calcext:value-type="float">
            <text:p>1080</text:p>
          </table:table-cell>
          <table:table-cell table:style-name="ce32" office:value-type="float" office:value="758" calcext:value-type="float">
            <text:p>758</text:p>
          </table:table-cell>
          <table:table-cell table:style-name="ce36" office:value-type="float" office:value="489" calcext:value-type="float">
            <text:p>489</text:p>
          </table:table-cell>
          <table:table-cell table:style-name="ce40" office:value-type="float" office:value="3114" calcext:value-type="float">
            <text:p>3114</text:p>
          </table:table-cell>
          <table:table-cell table:style-name="ce44" office:value-type="float" office:value="2964" calcext:value-type="float">
            <text:p>2964</text:p>
          </table:table-cell>
          <table:table-cell table:style-name="ce52" table:formula="of:=SUM([.D116:.H116])" office:value-type="float" office:value="8405" calcext:value-type="float">
            <text:p>8405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6]=126;70;IF([.T116]=112;70;IF([.T116]=98;70;IF([.T116]=96;60;IF([.T116]=84;60;IF([.T116]=108;60;IF([.T116]=90;50;IF([.T116]=72;40;IF([.T116]=80;40;IF([.T116]=100;50;IF([.T116]=54;30;IF([.T116]=36;20;IF([.T116]=18;10;IF([.T11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5/5f/Lossill_Icon.png/revision/latest?cb=20130428040434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ssill_-_Lovebane_-_Stonesong&quot;;&quot;Lossill&quot;)" office:value-type="string" office:string-value="Lossill" calcext:value-type="string">
            <text:p>Lossil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55" calcext:value-type="float">
            <text:p>255</text:p>
          </table:table-cell>
          <table:table-cell table:style-name="ce32" office:value-type="float" office:value="168" calcext:value-type="float">
            <text:p>168</text:p>
          </table:table-cell>
          <table:table-cell table:style-name="ce36" office:value-type="float" office:value="106" calcext:value-type="float">
            <text:p>106</text:p>
          </table:table-cell>
          <table:table-cell table:style-name="ce40" office:value-type="float" office:value="921" calcext:value-type="float">
            <text:p>921</text:p>
          </table:table-cell>
          <table:table-cell table:style-name="ce44" office:value-type="float" office:value="867" calcext:value-type="float">
            <text:p>867</text:p>
          </table:table-cell>
          <table:table-cell table:style-name="ce52" table:formula="of:=SUM([.D117:.H117])" office:value-type="float" office:value="2317" calcext:value-type="float">
            <text:p>2317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7]=126;70;IF([.T117]=112;70;IF([.T117]=98;70;IF([.T117]=96;60;IF([.T117]=84;60;IF([.T117]=108;60;IF([.T117]=90;50;IF([.T117]=72;40;IF([.T117]=80;40;IF([.T117]=100;50;IF([.T117]=54;30;IF([.T117]=36;20;IF([.T117]=18;10;IF([.T11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b/bf/Lovebane_Icon.png/revision/latest?cb=20130428040435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ssill_-_Lovebane_-_Stonesong&quot;;&quot;Lovebane&quot;)" office:value-type="string" office:string-value="Lovebane" calcext:value-type="string">
            <text:p>Loveba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18:.H118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8]=126;70;IF([.T118]=112;70;IF([.T118]=98;70;IF([.T118]=96;60;IF([.T118]=84;60;IF([.T118]=108;60;IF([.T118]=90;50;IF([.T118]=72;40;IF([.T118]=80;40;IF([.T118]=100;50;IF([.T118]=54;30;IF([.T118]=36;20;IF([.T118]=18;10;IF([.T11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3.wikia.nocookie.net/__cb20130428040437/defenderoftexel/images/thumb/0/01/Stonesong_Icon.png/40px-Stonesong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onesong&quot;; &quot;Stonesong&quot;)" office:value-type="string" office:string-value="Stonesong" calcext:value-type="string">
            <text:p>Stoneson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470" calcext:value-type="float">
            <text:p>1470</text:p>
          </table:table-cell>
          <table:table-cell table:style-name="ce32" office:value-type="float" office:value="1031" calcext:value-type="float">
            <text:p>1031</text:p>
          </table:table-cell>
          <table:table-cell table:style-name="ce36" office:value-type="float" office:value="666" calcext:value-type="float">
            <text:p>666</text:p>
          </table:table-cell>
          <table:table-cell table:style-name="ce40" office:value-type="float" office:value="4226" calcext:value-type="float">
            <text:p>4226</text:p>
          </table:table-cell>
          <table:table-cell table:style-name="ce44" office:value-type="float" office:value="4023" calcext:value-type="float">
            <text:p>4023</text:p>
          </table:table-cell>
          <table:table-cell table:style-name="ce52" table:formula="of:=SUM([.D119:.H119])" office:value-type="float" office:value="11416" calcext:value-type="float">
            <text:p>11416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19]=126;70;IF([.T119]=112;70;IF([.T119]=98;70;IF([.T119]=96;60;IF([.T119]=84;60;IF([.T119]=108;60;IF([.T119]=90;50;IF([.T119]=72;40;IF([.T119]=80;40;IF([.T119]=100;50;IF([.T119]=54;30;IF([.T119]=36;20;IF([.T119]=18;10;IF([.T11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d/d8/Springfolly_Icon.png/revision/latest?cb=20130428040435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arthwart&quot;;&quot;Springfolly&quot;)" office:value-type="string" office:string-value="Springfolly" calcext:value-type="string">
            <text:p>Springfolly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94" calcext:value-type="float">
            <text:p>194</text:p>
          </table:table-cell>
          <table:table-cell table:style-name="ce32" office:value-type="float" office:value="206" calcext:value-type="float">
            <text:p>206</text:p>
          </table:table-cell>
          <table:table-cell table:style-name="ce36" office:value-type="float" office:value="102" calcext:value-type="float">
            <text:p>102</text:p>
          </table:table-cell>
          <table:table-cell table:style-name="ce40" office:value-type="float" office:value="169" calcext:value-type="float">
            <text:p>169</text:p>
          </table:table-cell>
          <table:table-cell table:style-name="ce44" office:value-type="float" office:value="158" calcext:value-type="float">
            <text:p>158</text:p>
          </table:table-cell>
          <table:table-cell table:style-name="ce52" table:formula="of:=SUM([.D120:.H120])" office:value-type="float" office:value="829" calcext:value-type="float">
            <text:p>829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0]=126;70;IF([.T120]=112;70;IF([.T120]=98;70;IF([.T120]=96;60;IF([.T120]=84;60;IF([.T120]=108;60;IF([.T120]=90;50;IF([.T120]=72;40;IF([.T120]=80;40;IF([.T120]=100;50;IF([.T120]=54;30;IF([.T120]=36;20;IF([.T120]=18;10;IF([.T120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e/ec/Starblight_Icon.png/revision/latest?cb=20130428040435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arthwart&quot;;&quot;Starblight&quot;)" office:value-type="string" office:string-value="Starblight" calcext:value-type="string">
            <text:p>Starbligh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58" calcext:value-type="float">
            <text:p>358</text:p>
          </table:table-cell>
          <table:table-cell table:style-name="ce32" office:value-type="float" office:value="390" calcext:value-type="float">
            <text:p>390</text:p>
          </table:table-cell>
          <table:table-cell table:style-name="ce36" office:value-type="float" office:value="167" calcext:value-type="float">
            <text:p>167</text:p>
          </table:table-cell>
          <table:table-cell table:style-name="ce40" office:value-type="float" office:value="305" calcext:value-type="float">
            <text:p>305</text:p>
          </table:table-cell>
          <table:table-cell table:style-name="ce44" office:value-type="float" office:value="277" calcext:value-type="float">
            <text:p>277</text:p>
          </table:table-cell>
          <table:table-cell table:style-name="ce52" table:formula="of:=SUM([.D121:.H121])" office:value-type="float" office:value="1497" calcext:value-type="float">
            <text:p>1497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1]=126;70;IF([.T121]=112;70;IF([.T121]=98;70;IF([.T121]=96;60;IF([.T121]=84;60;IF([.T121]=108;60;IF([.T121]=90;50;IF([.T121]=72;40;IF([.T121]=80;40;IF([.T121]=100;50;IF([.T121]=54;30;IF([.T121]=36;20;IF([.T121]=18;10;IF([.T12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1.wikia.nocookie.net/__cb20130428040438/defenderoftexel/images/thumb/6/63/Starthwart_Icon.png/40px-Starthwar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arthwart&quot;; &quot;Starthwart&quot;)" office:value-type="string" office:string-value="Starthwart" calcext:value-type="string">
            <text:p>Starthwar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935" calcext:value-type="float">
            <text:p>935</text:p>
          </table:table-cell>
          <table:table-cell table:style-name="ce32" office:value-type="float" office:value="1000" calcext:value-type="float">
            <text:p>1000</text:p>
          </table:table-cell>
          <table:table-cell table:style-name="ce36" office:value-type="float" office:value="472" calcext:value-type="float">
            <text:p>472</text:p>
          </table:table-cell>
          <table:table-cell table:style-name="ce40" office:value-type="float" office:value="803" calcext:value-type="float">
            <text:p>803</text:p>
          </table:table-cell>
          <table:table-cell table:style-name="ce44" office:value-type="float" office:value="742" calcext:value-type="float">
            <text:p>742</text:p>
          </table:table-cell>
          <table:table-cell table:style-name="ce52" table:formula="of:=SUM([.D122:.H122])" office:value-type="float" office:value="3952" calcext:value-type="float">
            <text:p>3952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2]=126;70;IF([.T122]=112;70;IF([.T122]=98;70;IF([.T122]=96;60;IF([.T122]=84;60;IF([.T122]=108;60;IF([.T122]=90;50;IF([.T122]=72;40;IF([.T122]=80;40;IF([.T122]=100;50;IF([.T122]=54;30;IF([.T122]=36;20;IF([.T122]=18;10;IF([.T122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9/9b/Strawspill_Icon.png/revision/latest?cb=20130428040436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rawspill_-_Summerslip_-_Sunback&quot;;&quot;Strawspill&quot;)" office:value-type="string" office:string-value="Strawspill" calcext:value-type="string">
            <text:p>Strawspill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223" calcext:value-type="float">
            <text:p>223</text:p>
          </table:table-cell>
          <table:table-cell table:style-name="ce36" office:value-type="float" office:value="108" calcext:value-type="float">
            <text:p>108</text:p>
          </table:table-cell>
          <table:table-cell table:style-name="ce40" office:value-type="float" office:value="180" calcext:value-type="float">
            <text:p>180</text:p>
          </table:table-cell>
          <table:table-cell table:style-name="ce44" office:value-type="float" office:value="168" calcext:value-type="float">
            <text:p>168</text:p>
          </table:table-cell>
          <table:table-cell table:style-name="ce52" table:formula="of:=SUM([.D123:.H123])" office:value-type="float" office:value="887" calcext:value-type="float">
            <text:p>887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3]=126;70;IF([.T123]=112;70;IF([.T123]=98;70;IF([.T123]=96;60;IF([.T123]=84;60;IF([.T123]=108;60;IF([.T123]=90;50;IF([.T123]=72;40;IF([.T123]=80;40;IF([.T123]=100;50;IF([.T123]=54;30;IF([.T123]=36;20;IF([.T123]=18;10;IF([.T123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a/a0/Summerslip_Icon.png/revision/latest?cb=20130428040436&quot;)" office:value-type="string" office:string-value="" calcext:value-type="error">
            <text:p>#NAME?</text:p>
          </table:table-cell>
          <table:table-cell table:style-name="ce11" table:formula="of:=HYPERLINK(&quot;http://defenderoftexel.wikia.com/wiki/Strawspill_-_Summerslip_-_Sunback&quot;;&quot;Summerslip&quot;)" office:value-type="string" office:string-value="Summerslip" calcext:value-type="string">
            <text:p>Summerslip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70" calcext:value-type="float">
            <text:p>370</text:p>
          </table:table-cell>
          <table:table-cell table:style-name="ce32" office:value-type="float" office:value="404" calcext:value-type="float">
            <text:p>404</text:p>
          </table:table-cell>
          <table:table-cell table:style-name="ce36" office:value-type="float" office:value="174" calcext:value-type="float">
            <text:p>174</text:p>
          </table:table-cell>
          <table:table-cell table:style-name="ce40" office:value-type="float" office:value="315" calcext:value-type="float">
            <text:p>315</text:p>
          </table:table-cell>
          <table:table-cell table:style-name="ce44" office:value-type="float" office:value="287" calcext:value-type="float">
            <text:p>287</text:p>
          </table:table-cell>
          <table:table-cell table:style-name="ce52" table:formula="of:=SUM([.D124:.H124])" office:value-type="float" office:value="1550" calcext:value-type="float">
            <text:p>1550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4]=126;70;IF([.T124]=112;70;IF([.T124]=98;70;IF([.T124]=96;60;IF([.T124]=84;60;IF([.T124]=108;60;IF([.T124]=90;50;IF([.T124]=72;40;IF([.T124]=80;40;IF([.T124]=100;50;IF([.T124]=54;30;IF([.T124]=36;20;IF([.T124]=18;10;IF([.T12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40438/defenderoftexel/images/thumb/6/6c/Sunback_Icon.png/40px-Sunback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unback&quot;; &quot;Sunback&quot;)" office:value-type="string" office:string-value="Sunback" calcext:value-type="string">
            <text:p>Sunback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950" calcext:value-type="float">
            <text:p>950</text:p>
          </table:table-cell>
          <table:table-cell table:style-name="ce32" office:value-type="float" office:value="1017" calcext:value-type="float">
            <text:p>1017</text:p>
          </table:table-cell>
          <table:table-cell table:style-name="ce36" office:value-type="float" office:value="479" calcext:value-type="float">
            <text:p>479</text:p>
          </table:table-cell>
          <table:table-cell table:style-name="ce40" office:value-type="float" office:value="821" calcext:value-type="float">
            <text:p>821</text:p>
          </table:table-cell>
          <table:table-cell table:style-name="ce44" office:value-type="float" office:value="756" calcext:value-type="float">
            <text:p>756</text:p>
          </table:table-cell>
          <table:table-cell table:style-name="ce52" table:formula="of:=SUM([.D125:.H125])" office:value-type="float" office:value="4023" calcext:value-type="float">
            <text:p>4023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5]=126;70;IF([.T125]=112;70;IF([.T125]=98;70;IF([.T125]=96;60;IF([.T125]=84;60;IF([.T125]=108;60;IF([.T125]=90;50;IF([.T125]=72;40;IF([.T125]=80;40;IF([.T125]=100;50;IF([.T125]=54;30;IF([.T125]=36;20;IF([.T125]=18;10;IF([.T125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f/f0/Sweetbane_Icon.png/revision/latest?cb=20130428040437&quot;)" office:value-type="string" office:string-value="" calcext:value-type="error">
            <text:p>#NAME?</text:p>
          </table:table-cell>
          <table:table-cell table:style-name="ce11" table:formula="of:=HYPERLINK(&quot;http://defenderoftexel.wikia.com/wiki/Sweetbane_-_Sweetgrief_-_Tideborn&quot;;&quot;Sweetbane&quot;)" office:value-type="string" office:string-value="Sweetbane" calcext:value-type="string">
            <text:p>Sweetba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973" calcext:value-type="float">
            <text:p>973</text:p>
          </table:table-cell>
          <table:table-cell table:style-name="ce32" office:value-type="float" office:value="1151" calcext:value-type="float">
            <text:p>1151</text:p>
          </table:table-cell>
          <table:table-cell table:style-name="ce36" office:value-type="float" office:value="536" calcext:value-type="float">
            <text:p>536</text:p>
          </table:table-cell>
          <table:table-cell table:style-name="ce40" office:value-type="float" office:value="102" calcext:value-type="float">
            <text:p>102</text:p>
          </table:table-cell>
          <table:table-cell table:style-name="ce44" office:value-type="float" office:value="138" calcext:value-type="float">
            <text:p>138</text:p>
          </table:table-cell>
          <table:table-cell table:style-name="ce52" table:formula="of:=SUM([.D126:.H126])" office:value-type="float" office:value="2900" calcext:value-type="float">
            <text:p>2900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6]=126;70;IF([.T126]=112;70;IF([.T126]=98;70;IF([.T126]=96;60;IF([.T126]=84;60;IF([.T126]=108;60;IF([.T126]=90;50;IF([.T126]=72;40;IF([.T126]=80;40;IF([.T126]=100;50;IF([.T126]=54;30;IF([.T126]=36;20;IF([.T126]=18;10;IF([.T12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3.wikia.nocookie.net/defenderoftexel/images/9/9f/Sweetgrief_Icon.png/revision/latest?cb=20130428040437&quot;)" office:value-type="string" office:string-value="" calcext:value-type="error">
            <text:p>#NAME?</text:p>
          </table:table-cell>
          <table:table-cell table:style-name="ce11" table:formula="of:=HYPERLINK(&quot;http://defenderoftexel.wikia.com/wiki/Sweetbane_-_Sweetgrief_-_Tideborn&quot;;&quot;Sweetgrief&quot;)" office:value-type="string" office:string-value="Sweetgrief" calcext:value-type="string">
            <text:p>Sweetgrief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140" calcext:value-type="float">
            <text:p>2140</text:p>
          </table:table-cell>
          <table:table-cell table:style-name="ce32" office:value-type="float" office:value="2471" calcext:value-type="float">
            <text:p>2471</text:p>
          </table:table-cell>
          <table:table-cell table:style-name="ce36" office:value-type="float" office:value="1279" calcext:value-type="float">
            <text:p>1279</text:p>
          </table:table-cell>
          <table:table-cell table:style-name="ce40" office:value-type="float" office:value="283" calcext:value-type="float">
            <text:p>283</text:p>
          </table:table-cell>
          <table:table-cell table:style-name="ce44" office:value-type="float" office:value="380" calcext:value-type="float">
            <text:p>380</text:p>
          </table:table-cell>
          <table:table-cell table:style-name="ce52" table:formula="of:=SUM([.D127:.H127])" office:value-type="float" office:value="6553" calcext:value-type="float">
            <text:p>6553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7]=126;70;IF([.T127]=112;70;IF([.T127]=98;70;IF([.T127]=96;60;IF([.T127]=84;60;IF([.T127]=108;60;IF([.T127]=90;50;IF([.T127]=72;40;IF([.T127]=80;40;IF([.T127]=100;50;IF([.T127]=54;30;IF([.T127]=36;20;IF([.T127]=18;10;IF([.T12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1.wikia.nocookie.net/__cb20130428040439/defenderoftexel/images/thumb/6/6f/Tideborn_Icon.png/40px-Tidebor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deborn&quot;; &quot;Tideborn&quot;)" office:value-type="string" office:string-value="Tideborn" calcext:value-type="string">
            <text:p>Tidebor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444" calcext:value-type="float">
            <text:p>4444</text:p>
          </table:table-cell>
          <table:table-cell table:style-name="ce32" office:value-type="float" office:value="5081" calcext:value-type="float">
            <text:p>5081</text:p>
          </table:table-cell>
          <table:table-cell table:style-name="ce36" office:value-type="float" office:value="2723" calcext:value-type="float">
            <text:p>2723</text:p>
          </table:table-cell>
          <table:table-cell table:style-name="ce40" office:value-type="float" office:value="640" calcext:value-type="float">
            <text:p>640</text:p>
          </table:table-cell>
          <table:table-cell table:style-name="ce44" office:value-type="float" office:value="851" calcext:value-type="float">
            <text:p>851</text:p>
          </table:table-cell>
          <table:table-cell table:style-name="ce52" table:formula="of:=SUM([.D128:.H128])" office:value-type="float" office:value="13739" calcext:value-type="float">
            <text:p>13739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8]=126;70;IF([.T128]=112;70;IF([.T128]=98;70;IF([.T128]=96;60;IF([.T128]=84;60;IF([.T128]=108;60;IF([.T128]=90;50;IF([.T128]=72;40;IF([.T128]=80;40;IF([.T128]=100;50;IF([.T128]=54;30;IF([.T128]=36;20;IF([.T128]=18;10;IF([.T12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c/c5/Umberfoot_Icon.png/revision/latest?cb=201305022146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Umberfoot_-_Wellfond_-_Wheatsap&quot;;&quot;Umberfoot&quot;)" office:value-type="string" office:string-value="Umberfoot" calcext:value-type="string">
            <text:p>Umberfoo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669" calcext:value-type="float">
            <text:p>669</text:p>
          </table:table-cell>
          <table:table-cell table:style-name="ce32" office:value-type="float" office:value="790" calcext:value-type="float">
            <text:p>790</text:p>
          </table:table-cell>
          <table:table-cell table:style-name="ce36" office:value-type="float" office:value="365" calcext:value-type="float">
            <text:p>365</text:p>
          </table:table-cell>
          <table:table-cell table:style-name="ce40" office:value-type="float" office:value="68" calcext:value-type="float">
            <text:p>68</text:p>
          </table:table-cell>
          <table:table-cell table:style-name="ce44" office:value-type="float" office:value="94" calcext:value-type="float">
            <text:p>94</text:p>
          </table:table-cell>
          <table:table-cell table:style-name="ce52" table:formula="of:=SUM([.D129:.H129])" office:value-type="float" office:value="1986" calcext:value-type="float">
            <text:p>1986</text:p>
          </table:table-cell>
          <table:table-cell table:style-name="ce59" office:value-type="string" calcext:value-type="string">
            <text:p>Counte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29]=126;70;IF([.T129]=112;70;IF([.T129]=98;70;IF([.T129]=96;60;IF([.T129]=84;60;IF([.T129]=108;60;IF([.T129]=90;50;IF([.T129]=72;40;IF([.T129]=80;40;IF([.T129]=100;50;IF([.T129]=54;30;IF([.T129]=36;20;IF([.T129]=18;10;IF([.T12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1.wikia.nocookie.net/defenderoftexel/images/e/ef/Wellfond_Icon.png/revision/latest?cb=20130502214707&quot;)" office:value-type="string" office:string-value="" calcext:value-type="error">
            <text:p>#NAME?</text:p>
          </table:table-cell>
          <table:table-cell table:style-name="ce11" table:formula="of:=HYPERLINK(&quot;http://defenderoftexel.wikia.com/wiki/Umberfoot_-_Wellfond_-_Wheatsap&quot;;&quot;Wellfond&quot;)" office:value-type="string" office:string-value="Wellfond" calcext:value-type="string">
            <text:p>Wellfon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30:.H130])" office:value-type="float" office:value="5" calcext:value-type="float">
            <text:p>5</text:p>
          </table:table-cell>
          <table:table-cell table:style-name="ce59" office:value-type="string" calcext:value-type="string">
            <text:p>Counte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0]=126;70;IF([.T130]=112;70;IF([.T130]=98;70;IF([.T130]=96;60;IF([.T130]=84;60;IF([.T130]=108;60;IF([.T130]=90;50;IF([.T130]=72;40;IF([.T130]=80;40;IF([.T130]=100;50;IF([.T130]=54;30;IF([.T130]=36;20;IF([.T130]=18;10;IF([.T13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.wikia.com/defenderoftexel/images/8/84/Wheatsap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Wheatsap&quot;; &quot;Wheatsap&quot;)" office:value-type="string" office:string-value="Wheatsap" calcext:value-type="string">
            <text:p>Wheatsap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049" calcext:value-type="float">
            <text:p>3049</text:p>
          </table:table-cell>
          <table:table-cell table:style-name="ce32" office:value-type="float" office:value="3484" calcext:value-type="float">
            <text:p>3484</text:p>
          </table:table-cell>
          <table:table-cell table:style-name="ce36" office:value-type="float" office:value="1867" calcext:value-type="float">
            <text:p>1867</text:p>
          </table:table-cell>
          <table:table-cell table:style-name="ce40" office:value-type="float" office:value="439" calcext:value-type="float">
            <text:p>439</text:p>
          </table:table-cell>
          <table:table-cell table:style-name="ce44" office:value-type="float" office:value="584" calcext:value-type="float">
            <text:p>584</text:p>
          </table:table-cell>
          <table:table-cell table:style-name="ce52" table:formula="of:=SUM([.D131:.H131])" office:value-type="float" office:value="9423" calcext:value-type="float">
            <text:p>9423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1]=126;70;IF([.T131]=112;70;IF([.T131]=98;70;IF([.T131]=96;60;IF([.T131]=84;60;IF([.T131]=108;60;IF([.T131]=90;50;IF([.T131]=72;40;IF([.T131]=80;40;IF([.T131]=100;50;IF([.T131]=54;30;IF([.T131]=36;20;IF([.T131]=18;10;IF([.T13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5" table:formula="of:=image(&quot;http://vignette2.wikia.nocookie.net/defenderoftexel/images/8/84/Jonquil_Icon.png/revision/latest?cb=20130428040438&quot;)" office:value-type="string" office:string-value="" calcext:value-type="error">
            <text:p>#NAME?</text:p>
          </table:table-cell>
          <table:table-cell table:style-name="ce11" table:formula="of:=HYPERLINK(&quot;http://defenderoftexel.wikia.com/wiki/Jonquil_-_Sablehead_-_Brightplume&quot;;&quot;Jonquil&quot;)" office:value-type="string" office:string-value="Jonquil" calcext:value-type="string">
            <text:p>Jonquil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05" calcext:value-type="float">
            <text:p>205</text:p>
          </table:table-cell>
          <table:table-cell table:style-name="ce32" office:value-type="float" office:value="156" calcext:value-type="float">
            <text:p>156</text:p>
          </table:table-cell>
          <table:table-cell table:style-name="ce36" office:value-type="float" office:value="107" calcext:value-type="float">
            <text:p>107</text:p>
          </table:table-cell>
          <table:table-cell table:style-name="ce40" office:value-type="float" office:value="152" calcext:value-type="float">
            <text:p>152</text:p>
          </table:table-cell>
          <table:table-cell table:style-name="ce44" office:value-type="float" office:value="369" calcext:value-type="float">
            <text:p>369</text:p>
          </table:table-cell>
          <table:table-cell table:style-name="ce52" table:formula="of:=SUM([.D132:.H132])" office:value-type="float" office:value="989" calcext:value-type="float">
            <text:p>989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2]=126;70;IF([.T132]=112;70;IF([.T132]=98;70;IF([.T132]=96;60;IF([.T132]=84;60;IF([.T132]=108;60;IF([.T132]=90;50;IF([.T132]=72;40;IF([.T132]=80;40;IF([.T132]=100;50;IF([.T132]=54;30;IF([.T132]=36;20;IF([.T132]=18;10;IF([.T132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5" table:formula="of:=image(&quot;http://vignette4.wikia.nocookie.net/defenderoftexel/images/e/e1/Sablehead_Icon.png/revision/latest?cb=20130428040438&quot;)" office:value-type="string" office:string-value="" calcext:value-type="error">
            <text:p>#NAME?</text:p>
          </table:table-cell>
          <table:table-cell table:style-name="ce11" table:formula="of:=HYPERLINK(&quot;http://defenderoftexel.wikia.com/wiki/Jonquil_-_Sablehead_-_Brightplume&quot;;&quot;Sablehead&quot;)" office:value-type="string" office:string-value="Sablehead" calcext:value-type="string">
            <text:p>Sablehead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43" calcext:value-type="float">
            <text:p>343</text:p>
          </table:table-cell>
          <table:table-cell table:style-name="ce32" office:value-type="float" office:value="247" calcext:value-type="float">
            <text:p>247</text:p>
          </table:table-cell>
          <table:table-cell table:style-name="ce36" office:value-type="float" office:value="160" calcext:value-type="float">
            <text:p>160</text:p>
          </table:table-cell>
          <table:table-cell table:style-name="ce40" office:value-type="float" office:value="238" calcext:value-type="float">
            <text:p>238</text:p>
          </table:table-cell>
          <table:table-cell table:style-name="ce44" office:value-type="float" office:value="740" calcext:value-type="float">
            <text:p>740</text:p>
          </table:table-cell>
          <table:table-cell table:style-name="ce52" table:formula="of:=SUM([.D133:.H133])" office:value-type="float" office:value="1728" calcext:value-type="float">
            <text:p>1728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3]=126;70;IF([.T133]=112;70;IF([.T133]=98;70;IF([.T133]=96;60;IF([.T133]=84;60;IF([.T133]=108;60;IF([.T133]=90;50;IF([.T133]=72;40;IF([.T133]=80;40;IF([.T133]=100;50;IF([.T133]=54;30;IF([.T133]=36;20;IF([.T133]=18;10;IF([.T13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2.wikia.nocookie.net/__cb20130428040440/defenderoftexel/images/thumb/4/47/Brightplume_Icon.png/40px-Brightplum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Brightplume&quot;; &quot;Brightplume&quot;)" office:value-type="string" office:string-value="Brightplume" calcext:value-type="string">
            <text:p>Brightplum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889" calcext:value-type="float">
            <text:p>889</text:p>
          </table:table-cell>
          <table:table-cell table:style-name="ce32" office:value-type="float" office:value="669" calcext:value-type="float">
            <text:p>669</text:p>
          </table:table-cell>
          <table:table-cell table:style-name="ce36" office:value-type="float" office:value="449" calcext:value-type="float">
            <text:p>449</text:p>
          </table:table-cell>
          <table:table-cell table:style-name="ce40" office:value-type="float" office:value="647" calcext:value-type="float">
            <text:p>647</text:p>
          </table:table-cell>
          <table:table-cell table:style-name="ce44" office:value-type="float" office:value="1722" calcext:value-type="float">
            <text:p>1722</text:p>
          </table:table-cell>
          <table:table-cell table:style-name="ce52" table:formula="of:=SUM([.D134:.H134])" office:value-type="float" office:value="4376" calcext:value-type="float">
            <text:p>4376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4]=126;70;IF([.T134]=112;70;IF([.T134]=98;70;IF([.T134]=96;60;IF([.T134]=84;60;IF([.T134]=108;60;IF([.T134]=90;50;IF([.T134]=72;40;IF([.T134]=80;40;IF([.T134]=100;50;IF([.T134]=54;30;IF([.T134]=36;20;IF([.T134]=18;10;IF([.T13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5" table:formula="of:=image(&quot;http://vignette2.wikia.nocookie.net/defenderoftexel/images/7/7e/Cloudshard_Icon.png/revision/latest?cb=20130428040438&quot;)" office:value-type="string" office:string-value="" calcext:value-type="error">
            <text:p>#NAME?</text:p>
          </table:table-cell>
          <table:table-cell table:style-name="ce11" table:formula="of:=HYPERLINK(&quot;http://defenderoftexel.wikia.com/wiki/Cloudshard_-_Iristost_-_Darkbloom&quot;;&quot;Cloudshard&quot;)" office:value-type="string" office:string-value="Cloudshard" calcext:value-type="string">
            <text:p>Cloudshard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156" calcext:value-type="float">
            <text:p>156</text:p>
          </table:table-cell>
          <table:table-cell table:style-name="ce36" office:value-type="float" office:value="104" calcext:value-type="float">
            <text:p>104</text:p>
          </table:table-cell>
          <table:table-cell table:style-name="ce40" office:value-type="float" office:value="152" calcext:value-type="float">
            <text:p>152</text:p>
          </table:table-cell>
          <table:table-cell table:style-name="ce44" office:value-type="float" office:value="365" calcext:value-type="float">
            <text:p>365</text:p>
          </table:table-cell>
          <table:table-cell table:style-name="ce52" table:formula="of:=SUM([.D135:.H135])" office:value-type="float" office:value="985" calcext:value-type="float">
            <text:p>98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5]=126;70;IF([.T135]=112;70;IF([.T135]=98;70;IF([.T135]=96;60;IF([.T135]=84;60;IF([.T135]=108;60;IF([.T135]=90;50;IF([.T135]=72;40;IF([.T135]=80;40;IF([.T135]=100;50;IF([.T135]=54;30;IF([.T135]=36;20;IF([.T135]=18;10;IF([.T13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5" table:formula="of:=image(&quot;http://vignette1.wikia.nocookie.net/defenderoftexel/images/0/01/Iristost_Icon.png/revision/latest?cb=201304280434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Cloudshard_-_Iristost_-_Darkbloom&quot;;&quot;Iristost&quot;)" office:value-type="string" office:string-value="Iristost" calcext:value-type="string">
            <text:p>Iristos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60" calcext:value-type="float">
            <text:p>360</text:p>
          </table:table-cell>
          <table:table-cell table:style-name="ce32" office:value-type="float" office:value="258" calcext:value-type="float">
            <text:p>258</text:p>
          </table:table-cell>
          <table:table-cell table:style-name="ce36" office:value-type="float" office:value="165" calcext:value-type="float">
            <text:p>165</text:p>
          </table:table-cell>
          <table:table-cell table:style-name="ce40" office:value-type="float" office:value="249" calcext:value-type="float">
            <text:p>249</text:p>
          </table:table-cell>
          <table:table-cell table:style-name="ce44" office:value-type="float" office:value="772" calcext:value-type="float">
            <text:p>772</text:p>
          </table:table-cell>
          <table:table-cell table:style-name="ce52" table:formula="of:=SUM([.D136:.H136])" office:value-type="float" office:value="1804" calcext:value-type="float">
            <text:p>1804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6]=126;70;IF([.T136]=112;70;IF([.T136]=98;70;IF([.T136]=96;60;IF([.T136]=84;60;IF([.T136]=108;60;IF([.T136]=90;50;IF([.T136]=72;40;IF([.T136]=80;40;IF([.T136]=100;50;IF([.T136]=54;30;IF([.T136]=36;20;IF([.T136]=18;10;IF([.T13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images1.wikia.nocookie.net/__cb20130429214355/defenderoftexel/images/b/b5/Darkbloom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rkbloom&quot;; &quot;Darkbloom&quot;)" office:value-type="string" office:string-value="Darkbloom" calcext:value-type="string">
            <text:p>Darkbloom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951" calcext:value-type="float">
            <text:p>951</text:p>
          </table:table-cell>
          <table:table-cell table:style-name="ce32" office:value-type="float" office:value="713" calcext:value-type="float">
            <text:p>713</text:p>
          </table:table-cell>
          <table:table-cell table:style-name="ce36" office:value-type="float" office:value="478" calcext:value-type="float">
            <text:p>478</text:p>
          </table:table-cell>
          <table:table-cell table:style-name="ce40" office:value-type="float" office:value="691" calcext:value-type="float">
            <text:p>691</text:p>
          </table:table-cell>
          <table:table-cell table:style-name="ce44" office:value-type="float" office:value="1840" calcext:value-type="float">
            <text:p>1840</text:p>
          </table:table-cell>
          <table:table-cell table:style-name="ce52" table:formula="of:=SUM([.D137:.H137])" office:value-type="float" office:value="4673" calcext:value-type="float">
            <text:p>4673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7]=126;70;IF([.T137]=112;70;IF([.T137]=98;70;IF([.T137]=96;60;IF([.T137]=84;60;IF([.T137]=108;60;IF([.T137]=90;50;IF([.T137]=72;40;IF([.T137]=80;40;IF([.T137]=100;50;IF([.T137]=54;30;IF([.T137]=36;20;IF([.T137]=18;10;IF([.T13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2.wikia.nocookie.net/defenderoftexel/images/8/84/Aplaa_Icon.png/revision/latest?cb=201304280448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Aplaa_-_Appan_-_Anti%27iikusu&quot;;&quot;Aplaa&quot;)" office:value-type="string" office:string-value="Aplaa" calcext:value-type="string">
            <text:p>Apla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77" calcext:value-type="float">
            <text:p>177</text:p>
          </table:table-cell>
          <table:table-cell table:style-name="ce32" office:value-type="float" office:value="168" calcext:value-type="float">
            <text:p>168</text:p>
          </table:table-cell>
          <table:table-cell table:style-name="ce36" office:value-type="float" office:value="94" calcext:value-type="float">
            <text:p>94</text:p>
          </table:table-cell>
          <table:table-cell table:style-name="ce40" office:value-type="float" office:value="134" calcext:value-type="float">
            <text:p>134</text:p>
          </table:table-cell>
          <table:table-cell table:style-name="ce44" office:value-type="float" office:value="324" calcext:value-type="float">
            <text:p>324</text:p>
          </table:table-cell>
          <table:table-cell table:style-name="ce52" table:formula="of:=SUM([.D138:.H138])" office:value-type="float" office:value="897" calcext:value-type="float">
            <text:p>897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8]=126;70;IF([.T138]=112;70;IF([.T138]=98;70;IF([.T138]=96;60;IF([.T138]=84;60;IF([.T138]=108;60;IF([.T138]=90;50;IF([.T138]=72;40;IF([.T138]=80;40;IF([.T138]=100;50;IF([.T138]=54;30;IF([.T138]=36;20;IF([.T138]=18;10;IF([.T138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7/72/Appan_Icon.png/revision/latest?cb=201304280448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Aplaa_-_Appan_-_Anti%27iikusu&quot;;&quot;Appan&quot;)" office:value-type="string" office:string-value="Appan" calcext:value-type="string">
            <text:p>Appa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06" calcext:value-type="float">
            <text:p>306</text:p>
          </table:table-cell>
          <table:table-cell table:style-name="ce32" office:value-type="float" office:value="220" calcext:value-type="float">
            <text:p>220</text:p>
          </table:table-cell>
          <table:table-cell table:style-name="ce36" office:value-type="float" office:value="141" calcext:value-type="float">
            <text:p>141</text:p>
          </table:table-cell>
          <table:table-cell table:style-name="ce40" office:value-type="float" office:value="213" calcext:value-type="float">
            <text:p>213</text:p>
          </table:table-cell>
          <table:table-cell table:style-name="ce44" office:value-type="float" office:value="657" calcext:value-type="float">
            <text:p>657</text:p>
          </table:table-cell>
          <table:table-cell table:style-name="ce52" table:formula="of:=SUM([.D139:.H139])" office:value-type="float" office:value="1537" calcext:value-type="float">
            <text:p>1537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39]=126;70;IF([.T139]=112;70;IF([.T139]=98;70;IF([.T139]=96;60;IF([.T139]=84;60;IF([.T139]=108;60;IF([.T139]=90;50;IF([.T139]=72;40;IF([.T139]=80;40;IF([.T139]=100;50;IF([.T139]=54;30;IF([.T139]=36;20;IF([.T139]=18;10;IF([.T13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4858/defenderoftexel/images/thumb/a/af/Anti%27iikusu_Icon.png/50px-Anti%27iikus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nti'iikusu&quot;; &quot;Anti'iikusu&quot;)" office:value-type="string" office:string-value="Anti'iikusu" calcext:value-type="string">
            <text:p>Anti'iikusu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784" calcext:value-type="float">
            <text:p>784</text:p>
          </table:table-cell>
          <table:table-cell table:style-name="ce32" office:value-type="float" office:value="588" calcext:value-type="float">
            <text:p>588</text:p>
          </table:table-cell>
          <table:table-cell table:style-name="ce36" office:value-type="float" office:value="397" calcext:value-type="float">
            <text:p>397</text:p>
          </table:table-cell>
          <table:table-cell table:style-name="ce40" office:value-type="float" office:value="570" calcext:value-type="float">
            <text:p>570</text:p>
          </table:table-cell>
          <table:table-cell table:style-name="ce44" office:value-type="float" office:value="1519" calcext:value-type="float">
            <text:p>1519</text:p>
          </table:table-cell>
          <table:table-cell table:style-name="ce52" table:formula="of:=SUM([.D140:.H140])" office:value-type="float" office:value="3858" calcext:value-type="float">
            <text:p>3858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0]=126;70;IF([.T140]=112;70;IF([.T140]=98;70;IF([.T140]=96;60;IF([.T140]=84;60;IF([.T140]=108;60;IF([.T140]=90;50;IF([.T140]=72;40;IF([.T140]=80;40;IF([.T140]=100;50;IF([.T140]=54;30;IF([.T140]=36;20;IF([.T140]=18;10;IF([.T140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4" table:formula="of:=image(&quot;http://vignette4.wikia.nocookie.net/defenderoftexel/images/7/71/Utuaa_Icon.png/revision/latest?cb=201304280800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Zuuthusu&quot;;&quot;Utuaa&quot;)" office:value-type="string" office:string-value="Utuaa" calcext:value-type="string">
            <text:p>Utua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80" calcext:value-type="float">
            <text:p>180</text:p>
          </table:table-cell>
          <table:table-cell table:style-name="ce32" office:value-type="float" office:value="138" calcext:value-type="float">
            <text:p>138</text:p>
          </table:table-cell>
          <table:table-cell table:style-name="ce36" office:value-type="float" office:value="94" calcext:value-type="float">
            <text:p>94</text:p>
          </table:table-cell>
          <table:table-cell table:style-name="ce40" office:value-type="float" office:value="134" calcext:value-type="float">
            <text:p>134</text:p>
          </table:table-cell>
          <table:table-cell table:style-name="ce44" office:value-type="float" office:value="332" calcext:value-type="float">
            <text:p>332</text:p>
          </table:table-cell>
          <table:table-cell table:style-name="ce52" table:formula="of:=SUM([.D141:.H141])" office:value-type="float" office:value="878" calcext:value-type="float">
            <text:p>878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1]=126;70;IF([.T141]=112;70;IF([.T141]=98;70;IF([.T141]=96;60;IF([.T141]=84;60;IF([.T141]=108;60;IF([.T141]=90;50;IF([.T141]=72;40;IF([.T141]=80;40;IF([.T141]=100;50;IF([.T141]=54;30;IF([.T141]=36;20;IF([.T141]=18;10;IF([.T141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f/f2/Yahatti-Il_Icon.png/revision/latest?cb=201304280448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Zuuthusu&quot;;&quot;Yahatt-Il&quot;)" office:value-type="string" office:string-value="Yahatt-Il" calcext:value-type="string">
            <text:p>Yahatt-Il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42:.H142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2]=126;70;IF([.T142]=112;70;IF([.T142]=98;70;IF([.T142]=96;60;IF([.T142]=84;60;IF([.T142]=108;60;IF([.T142]=90;50;IF([.T142]=72;40;IF([.T142]=80;40;IF([.T142]=100;50;IF([.T142]=54;30;IF([.T142]=36;20;IF([.T142]=18;10;IF([.T14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3.wikia.nocookie.net/__cb20130428080118/defenderoftexel/images/thumb/6/6f/Zuuthusu_Icon.png/50px-Zuuthus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Zuuthusu&quot;; &quot;Zuuthusu&quot;)" office:value-type="string" office:string-value="Zuuthusu" calcext:value-type="string">
            <text:p>Zuuthusu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889" calcext:value-type="float">
            <text:p>889</text:p>
          </table:table-cell>
          <table:table-cell table:style-name="ce32" office:value-type="float" office:value="669" calcext:value-type="float">
            <text:p>669</text:p>
          </table:table-cell>
          <table:table-cell table:style-name="ce36" office:value-type="float" office:value="449" calcext:value-type="float">
            <text:p>449</text:p>
          </table:table-cell>
          <table:table-cell table:style-name="ce40" office:value-type="float" office:value="647" calcext:value-type="float">
            <text:p>647</text:p>
          </table:table-cell>
          <table:table-cell table:style-name="ce44" office:value-type="float" office:value="1722" calcext:value-type="float">
            <text:p>1722</text:p>
          </table:table-cell>
          <table:table-cell table:style-name="ce52" table:formula="of:=SUM([.D143:.H143])" office:value-type="float" office:value="4376" calcext:value-type="float">
            <text:p>4376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3]=126;70;IF([.T143]=112;70;IF([.T143]=98;70;IF([.T143]=96;60;IF([.T143]=84;60;IF([.T143]=108;60;IF([.T143]=90;50;IF([.T143]=72;40;IF([.T143]=80;40;IF([.T143]=100;50;IF([.T143]=54;30;IF([.T143]=36;20;IF([.T143]=18;10;IF([.T14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0/07/Baassiia_Icon.png/revision/latest?cb=201304280448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assiia_-_Balashi_-_Balathu&quot;;&quot;Baassiia&quot;)" office:value-type="string" office:string-value="Baassiia" calcext:value-type="string">
            <text:p>Baassi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66" calcext:value-type="float">
            <text:p>566</text:p>
          </table:table-cell>
          <table:table-cell table:style-name="ce32" office:value-type="float" office:value="671" calcext:value-type="float">
            <text:p>671</text:p>
          </table:table-cell>
          <table:table-cell table:style-name="ce36" office:value-type="float" office:value="312" calcext:value-type="float">
            <text:p>312</text:p>
          </table:table-cell>
          <table:table-cell table:style-name="ce40" office:value-type="float" office:value="56" calcext:value-type="float">
            <text:p>56</text:p>
          </table:table-cell>
          <table:table-cell table:style-name="ce44" office:value-type="float" office:value="78" calcext:value-type="float">
            <text:p>78</text:p>
          </table:table-cell>
          <table:table-cell table:style-name="ce52" table:formula="of:=SUM([.D144:.H144])" office:value-type="float" office:value="1683" calcext:value-type="float">
            <text:p>1683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4]=126;70;IF([.T144]=112;70;IF([.T144]=98;70;IF([.T144]=96;60;IF([.T144]=84;60;IF([.T144]=108;60;IF([.T144]=90;50;IF([.T144]=72;40;IF([.T144]=80;40;IF([.T144]=100;50;IF([.T144]=54;30;IF([.T144]=36;20;IF([.T144]=18;10;IF([.T14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2/24/Balashi_Icon.png/revision/latest?cb=201304280448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assiia_-_Balashi_-_Balathu&quot;;&quot;Balashi&quot;)" office:value-type="string" office:string-value="Balashi" calcext:value-type="string">
            <text:p>Balash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45:.H145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5]=126;70;IF([.T145]=112;70;IF([.T145]=98;70;IF([.T145]=96;60;IF([.T145]=84;60;IF([.T145]=108;60;IF([.T145]=90;50;IF([.T145]=72;40;IF([.T145]=80;40;IF([.T145]=100;50;IF([.T145]=54;30;IF([.T145]=36;20;IF([.T145]=18;10;IF([.T14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428044859/defenderoftexel/images/thumb/e/ef/Balathu_Icon.png/50px-Balath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lathu&quot;; &quot;Balathu&quot;)" office:value-type="string" office:string-value="Balathu" calcext:value-type="string">
            <text:p>Balath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569" calcext:value-type="float">
            <text:p>2569</text:p>
          </table:table-cell>
          <table:table-cell table:style-name="ce32" office:value-type="float" office:value="2937" calcext:value-type="float">
            <text:p>2937</text:p>
          </table:table-cell>
          <table:table-cell table:style-name="ce36" office:value-type="float" office:value="1573" calcext:value-type="float">
            <text:p>1573</text:p>
          </table:table-cell>
          <table:table-cell table:style-name="ce40" office:value-type="float" office:value="370" calcext:value-type="float">
            <text:p>370</text:p>
          </table:table-cell>
          <table:table-cell table:style-name="ce44" office:value-type="float" office:value="491" calcext:value-type="float">
            <text:p>491</text:p>
          </table:table-cell>
          <table:table-cell table:style-name="ce52" table:formula="of:=SUM([.D146:.H146])" office:value-type="float" office:value="7940" calcext:value-type="float">
            <text:p>7940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6]=126;70;IF([.T146]=112;70;IF([.T146]=98;70;IF([.T146]=96;60;IF([.T146]=84;60;IF([.T146]=108;60;IF([.T146]=90;50;IF([.T146]=72;40;IF([.T146]=80;40;IF([.T146]=100;50;IF([.T146]=54;30;IF([.T146]=36;20;IF([.T146]=18;10;IF([.T14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1/1c/Yadidatum_Icon.png/revision/latest?cb=201304280448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Yadidatum_-_Zakiti_-_Zirat-Banit&quot;;&quot;Yadidatum&quot;)" office:value-type="string" office:string-value="Yadidatum" calcext:value-type="string">
            <text:p>Yadidatu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47:.H147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7]=126;70;IF([.T147]=112;70;IF([.T147]=98;70;IF([.T147]=96;60;IF([.T147]=84;60;IF([.T147]=108;60;IF([.T147]=90;50;IF([.T147]=72;40;IF([.T147]=80;40;IF([.T147]=100;50;IF([.T147]=54;30;IF([.T147]=36;20;IF([.T147]=18;10;IF([.T14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f/f2/Zakiti_Icon.png/revision/latest?cb=201304280448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Yadidatum_-_Zakiti_-_Zirat-Banit&quot;;&quot;Zakiti&quot;)" office:value-type="string" office:string-value="Zakiti" calcext:value-type="string">
            <text:p>Zakit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48:.H148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8]=126;70;IF([.T148]=112;70;IF([.T148]=98;70;IF([.T148]=96;60;IF([.T148]=84;60;IF([.T148]=108;60;IF([.T148]=90;50;IF([.T148]=72;40;IF([.T148]=80;40;IF([.T148]=100;50;IF([.T148]=54;30;IF([.T148]=36;20;IF([.T148]=18;10;IF([.T14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4860/defenderoftexel/images/a/aa/Zirat-Bani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Zirat-Banit&quot;; &quot;Zirat-Banit&quot;)" office:value-type="string" office:string-value="Zirat-Banit" calcext:value-type="string">
            <text:p>Zirat-Bani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49:.H149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49]=126;70;IF([.T149]=112;70;IF([.T149]=98;70;IF([.T149]=96;60;IF([.T149]=84;60;IF([.T149]=108;60;IF([.T149]=90;50;IF([.T149]=72;40;IF([.T149]=80;40;IF([.T149]=100;50;IF([.T149]=54;30;IF([.T149]=36;20;IF([.T149]=18;10;IF([.T14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d/de/Allatu_Icon.png/revision/latest?cb=20130428045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Allatu_-_Amata_-_Anagalmeshshu&quot;;&quot;Allatu&quot;)" office:value-type="string" office:string-value="Allatu" calcext:value-type="string">
            <text:p>Allat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50:.H150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0]=126;70;IF([.T150]=112;70;IF([.T150]=98;70;IF([.T150]=96;60;IF([.T150]=84;60;IF([.T150]=108;60;IF([.T150]=90;50;IF([.T150]=72;40;IF([.T150]=80;40;IF([.T150]=100;50;IF([.T150]=54;30;IF([.T150]=36;20;IF([.T150]=18;10;IF([.T15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e/ed/Amata_Icon.png/revision/latest?cb=20130428045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Allatu_-_Amata_-_Anagalmeshshu&quot;;&quot;Amata&quot;)" office:value-type="string" office:string-value="Amata" calcext:value-type="string">
            <text:p>Amat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91" calcext:value-type="float">
            <text:p>591</text:p>
          </table:table-cell>
          <table:table-cell table:style-name="ce32" office:value-type="float" office:value="1439" calcext:value-type="float">
            <text:p>1439</text:p>
          </table:table-cell>
          <table:table-cell table:style-name="ce36" office:value-type="float" office:value="292" calcext:value-type="float">
            <text:p>292</text:p>
          </table:table-cell>
          <table:table-cell table:style-name="ce40" office:value-type="float" office:value="1361" calcext:value-type="float">
            <text:p>1361</text:p>
          </table:table-cell>
          <table:table-cell table:style-name="ce44" office:value-type="float" office:value="390" calcext:value-type="float">
            <text:p>390</text:p>
          </table:table-cell>
          <table:table-cell table:style-name="ce52" table:formula="of:=SUM([.D151:.H151])" office:value-type="float" office:value="4073" calcext:value-type="float">
            <text:p>4073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1]=126;70;IF([.T151]=112;70;IF([.T151]=98;70;IF([.T151]=96;60;IF([.T151]=84;60;IF([.T151]=108;60;IF([.T151]=90;50;IF([.T151]=72;40;IF([.T151]=80;40;IF([.T151]=100;50;IF([.T151]=54;30;IF([.T151]=36;20;IF([.T151]=18;10;IF([.T151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0428045557/defenderoftexel/images/thumb/b/b9/Anagalmeshshu_Icon.png/50px-Anagalmeshsh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nagalmeshshu&quot;; &quot;Anagalmeshshu&quot;)" office:value-type="string" office:string-value="Anagalmeshshu" calcext:value-type="string">
            <text:p>Anagalmeshsh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212" calcext:value-type="float">
            <text:p>1212</text:p>
          </table:table-cell>
          <table:table-cell table:style-name="ce32" office:value-type="float" office:value="2818" calcext:value-type="float">
            <text:p>2818</text:p>
          </table:table-cell>
          <table:table-cell table:style-name="ce36" office:value-type="float" office:value="615" calcext:value-type="float">
            <text:p>615</text:p>
          </table:table-cell>
          <table:table-cell table:style-name="ce40" office:value-type="float" office:value="2677" calcext:value-type="float">
            <text:p>2677</text:p>
          </table:table-cell>
          <table:table-cell table:style-name="ce44" office:value-type="float" office:value="816" calcext:value-type="float">
            <text:p>816</text:p>
          </table:table-cell>
          <table:table-cell table:style-name="ce52" table:formula="of:=SUM([.D152:.H152])" office:value-type="float" office:value="8138" calcext:value-type="float">
            <text:p>8138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2]=126;70;IF([.T152]=112;70;IF([.T152]=98;70;IF([.T152]=96;60;IF([.T152]=84;60;IF([.T152]=108;60;IF([.T152]=90;50;IF([.T152]=72;40;IF([.T152]=80;40;IF([.T152]=100;50;IF([.T152]=54;30;IF([.T152]=36;20;IF([.T152]=18;10;IF([.T15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c/c8/Dipatusu_Icon.png/revision/latest?cb=201304280455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Dipatusu_-_Arishaka_-_Ugurnaszir&quot;;&quot;Dipatusu&quot;)" office:value-type="string" office:string-value="Dipatusu" calcext:value-type="string">
            <text:p>Dipatus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10" calcext:value-type="float">
            <text:p>310</text:p>
          </table:table-cell>
          <table:table-cell table:style-name="ce32" office:value-type="float" office:value="206" calcext:value-type="float">
            <text:p>206</text:p>
          </table:table-cell>
          <table:table-cell table:style-name="ce36" office:value-type="float" office:value="128" calcext:value-type="float">
            <text:p>128</text:p>
          </table:table-cell>
          <table:table-cell table:style-name="ce40" office:value-type="float" office:value="1120" calcext:value-type="float">
            <text:p>1120</text:p>
          </table:table-cell>
          <table:table-cell table:style-name="ce44" office:value-type="float" office:value="1050" calcext:value-type="float">
            <text:p>1050</text:p>
          </table:table-cell>
          <table:table-cell table:style-name="ce52" table:formula="of:=SUM([.D153:.H153])" office:value-type="float" office:value="2814" calcext:value-type="float">
            <text:p>2814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3]=126;70;IF([.T153]=112;70;IF([.T153]=98;70;IF([.T153]=96;60;IF([.T153]=84;60;IF([.T153]=108;60;IF([.T153]=90;50;IF([.T153]=72;40;IF([.T153]=80;40;IF([.T153]=100;50;IF([.T153]=54;30;IF([.T153]=36;20;IF([.T153]=18;10;IF([.T15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f/f0/Arishaka_Icon.png/revision/latest?cb=201304280455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Dipatusu_-_Arishaka_-_Ugurnaszir&quot;;&quot;Arishaka&quot;)" office:value-type="string" office:string-value="Arishaka" calcext:value-type="string">
            <text:p>Arishak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54:.H154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4]=126;70;IF([.T154]=112;70;IF([.T154]=98;70;IF([.T154]=96;60;IF([.T154]=84;60;IF([.T154]=108;60;IF([.T154]=90;50;IF([.T154]=72;40;IF([.T154]=80;40;IF([.T154]=100;50;IF([.T154]=54;30;IF([.T154]=36;20;IF([.T154]=18;10;IF([.T15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5558/defenderoftexel/images/thumb/2/21/Ugurnaszir_Icon.png/50px-Ugurnaszi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Ugurnaszir&quot;; &quot;Ugurnaszir&quot;)" office:value-type="string" office:string-value="Ugurnaszir" calcext:value-type="string">
            <text:p>Ugurnaszi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777" calcext:value-type="float">
            <text:p>1777</text:p>
          </table:table-cell>
          <table:table-cell table:style-name="ce32" office:value-type="float" office:value="1247" calcext:value-type="float">
            <text:p>1247</text:p>
          </table:table-cell>
          <table:table-cell table:style-name="ce36" office:value-type="float" office:value="805" calcext:value-type="float">
            <text:p>805</text:p>
          </table:table-cell>
          <table:table-cell table:style-name="ce40" office:value-type="float" office:value="5109" calcext:value-type="float">
            <text:p>5109</text:p>
          </table:table-cell>
          <table:table-cell table:style-name="ce44" office:value-type="float" office:value="4865" calcext:value-type="float">
            <text:p>4865</text:p>
          </table:table-cell>
          <table:table-cell table:style-name="ce52" table:formula="of:=SUM([.D155:.H155])" office:value-type="float" office:value="13803" calcext:value-type="float">
            <text:p>13803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5]=126;70;IF([.T155]=112;70;IF([.T155]=98;70;IF([.T155]=96;60;IF([.T155]=84;60;IF([.T155]=108;60;IF([.T155]=90;50;IF([.T155]=72;40;IF([.T155]=80;40;IF([.T155]=100;50;IF([.T155]=54;30;IF([.T155]=36;20;IF([.T155]=18;10;IF([.T15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4/49/Damkina_Icon.png/revision/latest?cb=201304280455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mkina_-_Davke_-_Ellat-Gula&quot;;&quot;Damkina&quot;)" office:value-type="string" office:string-value="Damkina" calcext:value-type="string">
            <text:p>Damkin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09" calcext:value-type="float">
            <text:p>209</text:p>
          </table:table-cell>
          <table:table-cell table:style-name="ce32" office:value-type="float" office:value="582" calcext:value-type="float">
            <text:p>582</text:p>
          </table:table-cell>
          <table:table-cell table:style-name="ce36" office:value-type="float" office:value="95" calcext:value-type="float">
            <text:p>95</text:p>
          </table:table-cell>
          <table:table-cell table:style-name="ce40" office:value-type="float" office:value="545" calcext:value-type="float">
            <text:p>545</text:p>
          </table:table-cell>
          <table:table-cell table:style-name="ce44" office:value-type="float" office:value="132" calcext:value-type="float">
            <text:p>132</text:p>
          </table:table-cell>
          <table:table-cell table:style-name="ce52" table:formula="of:=SUM([.D156:.H156])" office:value-type="float" office:value="1563" calcext:value-type="float">
            <text:p>1563</text:p>
          </table:table-cell>
          <table:table-cell table:style-name="ce59" office:value-type="string" calcext:value-type="string">
            <text:p>Pryo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6]=126;70;IF([.T156]=112;70;IF([.T156]=98;70;IF([.T156]=96;60;IF([.T156]=84;60;IF([.T156]=108;60;IF([.T156]=90;50;IF([.T156]=72;40;IF([.T156]=80;40;IF([.T156]=100;50;IF([.T156]=54;30;IF([.T156]=36;20;IF([.T156]=18;10;IF([.T15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4/4c/Davke_Icon.png/revision/latest?cb=20130428045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Damkina_-_Davke_-_Ellat-Gula&quot;;&quot;Davke&quot;)" office:value-type="string" office:string-value="Davke" calcext:value-type="string">
            <text:p>Davk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57:.H157])" office:value-type="float" office:value="5" calcext:value-type="float">
            <text:p>5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7]=126;70;IF([.T157]=112;70;IF([.T157]=98;70;IF([.T157]=96;60;IF([.T157]=84;60;IF([.T157]=108;60;IF([.T157]=90;50;IF([.T157]=72;40;IF([.T157]=80;40;IF([.T157]=100;50;IF([.T157]=54;30;IF([.T157]=36;20;IF([.T157]=18;10;IF([.T15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5559/defenderoftexel/images/thumb/a/ac/Ellat-Gula_Icon.png/50px-Ellat-Gul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Ellat-Gula&quot;; &quot;Ellat-Gula&quot;)" office:value-type="string" office:string-value="Ellat-Gula" calcext:value-type="string">
            <text:p>Ellat-Gul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218" calcext:value-type="float">
            <text:p>1218</text:p>
          </table:table-cell>
          <table:table-cell table:style-name="ce32" office:value-type="float" office:value="2834" calcext:value-type="float">
            <text:p>2834</text:p>
          </table:table-cell>
          <table:table-cell table:style-name="ce36" office:value-type="float" office:value="618" calcext:value-type="float">
            <text:p>618</text:p>
          </table:table-cell>
          <table:table-cell table:style-name="ce40" office:value-type="float" office:value="2693" calcext:value-type="float">
            <text:p>2693</text:p>
          </table:table-cell>
          <table:table-cell table:style-name="ce44" office:value-type="float" office:value="819" calcext:value-type="float">
            <text:p>819</text:p>
          </table:table-cell>
          <table:table-cell table:style-name="ce52" table:formula="of:=SUM([.D158:.H158])" office:value-type="float" office:value="8182" calcext:value-type="float">
            <text:p>8182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8]=126;70;IF([.T158]=112;70;IF([.T158]=98;70;IF([.T158]=96;60;IF([.T158]=84;60;IF([.T158]=108;60;IF([.T158]=90;50;IF([.T158]=72;40;IF([.T158]=80;40;IF([.T158]=100;50;IF([.T158]=54;30;IF([.T158]=36;20;IF([.T158]=18;10;IF([.T15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a/a9/Ea-nasir_Icon.png/revision/latest?cb=20130428045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Ea-nasir_-_Ekurzakir_-_Enshunu&quot;;&quot;Ea-nasir&quot;)" office:value-type="string" office:string-value="Ea-nasir" calcext:value-type="string">
            <text:p>Ea-nasi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5" calcext:value-type="float">
            <text:p>185</text:p>
          </table:table-cell>
          <table:table-cell table:style-name="ce32" office:value-type="float" office:value="121" calcext:value-type="float">
            <text:p>121</text:p>
          </table:table-cell>
          <table:table-cell table:style-name="ce36" office:value-type="float" office:value="76" calcext:value-type="float">
            <text:p>76</text:p>
          </table:table-cell>
          <table:table-cell table:style-name="ce40" office:value-type="float" office:value="664" calcext:value-type="float">
            <text:p>664</text:p>
          </table:table-cell>
          <table:table-cell table:style-name="ce44" office:value-type="float" office:value="624" calcext:value-type="float">
            <text:p>624</text:p>
          </table:table-cell>
          <table:table-cell table:style-name="ce52" table:formula="of:=SUM([.D159:.H159])" office:value-type="float" office:value="1670" calcext:value-type="float">
            <text:p>1670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59]=126;70;IF([.T159]=112;70;IF([.T159]=98;70;IF([.T159]=96;60;IF([.T159]=84;60;IF([.T159]=108;60;IF([.T159]=90;50;IF([.T159]=72;40;IF([.T159]=80;40;IF([.T159]=100;50;IF([.T159]=54;30;IF([.T159]=36;20;IF([.T159]=18;10;IF([.T15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4/48/Ekurzakir_Icon.png/revision/latest?cb=20130428045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Ea-nasir_-_Ekurzakir_-_Enshunu&quot;;&quot;Ekurzakir&quot;)" office:value-type="string" office:string-value="Ekurzakir" calcext:value-type="string">
            <text:p>Ekurzaki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92" calcext:value-type="float">
            <text:p>492</text:p>
          </table:table-cell>
          <table:table-cell table:style-name="ce32" office:value-type="float" office:value="343" calcext:value-type="float">
            <text:p>343</text:p>
          </table:table-cell>
          <table:table-cell table:style-name="ce36" office:value-type="float" office:value="219" calcext:value-type="float">
            <text:p>219</text:p>
          </table:table-cell>
          <table:table-cell table:style-name="ce40" office:value-type="float" office:value="1507" calcext:value-type="float">
            <text:p>1507</text:p>
          </table:table-cell>
          <table:table-cell table:style-name="ce44" office:value-type="float" office:value="1432" calcext:value-type="float">
            <text:p>1432</text:p>
          </table:table-cell>
          <table:table-cell table:style-name="ce52" table:formula="of:=SUM([.D160:.H160])" office:value-type="float" office:value="3993" calcext:value-type="float">
            <text:p>3993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0]=126;70;IF([.T160]=112;70;IF([.T160]=98;70;IF([.T160]=96;60;IF([.T160]=84;60;IF([.T160]=108;60;IF([.T160]=90;50;IF([.T160]=72;40;IF([.T160]=80;40;IF([.T160]=100;50;IF([.T160]=54;30;IF([.T160]=36;20;IF([.T160]=18;10;IF([.T16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5560/defenderoftexel/images/thumb/0/09/Enshunu_Icon.png/50px-Enshun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Enshunu&quot;; &quot;Enshunu&quot;)" office:value-type="string" office:string-value="Enshunu" calcext:value-type="string">
            <text:p>Enshun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29" calcext:value-type="float">
            <text:p>1029</text:p>
          </table:table-cell>
          <table:table-cell table:style-name="ce32" office:value-type="float" office:value="723" calcext:value-type="float">
            <text:p>723</text:p>
          </table:table-cell>
          <table:table-cell table:style-name="ce36" office:value-type="float" office:value="466" calcext:value-type="float">
            <text:p>466</text:p>
          </table:table-cell>
          <table:table-cell table:style-name="ce40" office:value-type="float" office:value="2960" calcext:value-type="float">
            <text:p>2960</text:p>
          </table:table-cell>
          <table:table-cell table:style-name="ce44" office:value-type="float" office:value="2817" calcext:value-type="float">
            <text:p>2817</text:p>
          </table:table-cell>
          <table:table-cell table:style-name="ce52" table:formula="of:=SUM([.D161:.H161])" office:value-type="float" office:value="7995" calcext:value-type="float">
            <text:p>7995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1]=126;70;IF([.T161]=112;70;IF([.T161]=98;70;IF([.T161]=96;60;IF([.T161]=84;60;IF([.T161]=108;60;IF([.T161]=90;50;IF([.T161]=72;40;IF([.T161]=80;40;IF([.T161]=100;50;IF([.T161]=54;30;IF([.T161]=36;20;IF([.T161]=18;10;IF([.T16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b/b1/Kalumtum_Icon.png/revision/latest?cb=2013042808022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issare&quot;;&quot;Kalumtum&quot;)" office:value-type="string" office:string-value="Kalumtum" calcext:value-type="string">
            <text:p>Kalumtum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54" calcext:value-type="float">
            <text:p>254</text:p>
          </table:table-cell>
          <table:table-cell table:style-name="ce32" office:value-type="float" office:value="270" calcext:value-type="float">
            <text:p>270</text:p>
          </table:table-cell>
          <table:table-cell table:style-name="ce36" office:value-type="float" office:value="135" calcext:value-type="float">
            <text:p>135</text:p>
          </table:table-cell>
          <table:table-cell table:style-name="ce40" office:value-type="float" office:value="22" calcext:value-type="float">
            <text:p>22</text:p>
          </table:table-cell>
          <table:table-cell table:style-name="ce44" office:value-type="float" office:value="207" calcext:value-type="float">
            <text:p>207</text:p>
          </table:table-cell>
          <table:table-cell table:style-name="ce52" table:formula="of:=SUM([.D162:.H162])" office:value-type="float" office:value="888" calcext:value-type="float">
            <text:p>888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2]=126;70;IF([.T162]=112;70;IF([.T162]=98;70;IF([.T162]=96;60;IF([.T162]=84;60;IF([.T162]=108;60;IF([.T162]=90;50;IF([.T162]=72;40;IF([.T162]=80;40;IF([.T162]=100;50;IF([.T162]=54;30;IF([.T162]=36;20;IF([.T162]=18;10;IF([.T162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9/91/Kishar_Icon.png/revision/latest?cb=2013042805031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issare&quot;;&quot;Kishar&quot;)" office:value-type="string" office:string-value="Kishar" calcext:value-type="string">
            <text:p>Kisha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462" calcext:value-type="float">
            <text:p>462</text:p>
          </table:table-cell>
          <table:table-cell table:style-name="ce32" office:value-type="float" office:value="503" calcext:value-type="float">
            <text:p>503</text:p>
          </table:table-cell>
          <table:table-cell table:style-name="ce36" office:value-type="float" office:value="215" calcext:value-type="float">
            <text:p>215</text:p>
          </table:table-cell>
          <table:table-cell table:style-name="ce40" office:value-type="float" office:value="392" calcext:value-type="float">
            <text:p>392</text:p>
          </table:table-cell>
          <table:table-cell table:style-name="ce44" office:value-type="float" office:value="355" calcext:value-type="float">
            <text:p>355</text:p>
          </table:table-cell>
          <table:table-cell table:style-name="ce52" table:formula="of:=SUM([.D163:.H163])" office:value-type="float" office:value="1927" calcext:value-type="float">
            <text:p>1927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3]=126;70;IF([.T163]=112;70;IF([.T163]=98;70;IF([.T163]=96;60;IF([.T163]=84;60;IF([.T163]=108;60;IF([.T163]=90;50;IF([.T163]=72;40;IF([.T163]=80;40;IF([.T163]=100;50;IF([.T163]=54;30;IF([.T163]=36;20;IF([.T163]=18;10;IF([.T16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50313/defenderoftexel/images/thumb/f/fd/Kissare_Icon.png/50px-Kissar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Kissare&quot;; &quot;Kissare&quot;)" office:value-type="string" office:string-value="Kissare" calcext:value-type="string">
            <text:p>Kissar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203" calcext:value-type="float">
            <text:p>1203</text:p>
          </table:table-cell>
          <table:table-cell table:style-name="ce32" office:value-type="float" office:value="1290" calcext:value-type="float">
            <text:p>1290</text:p>
          </table:table-cell>
          <table:table-cell table:style-name="ce36" office:value-type="float" office:value="608" calcext:value-type="float">
            <text:p>608</text:p>
          </table:table-cell>
          <table:table-cell table:style-name="ce40" office:value-type="float" office:value="1039" calcext:value-type="float">
            <text:p>1039</text:p>
          </table:table-cell>
          <table:table-cell table:style-name="ce44" office:value-type="float" office:value="955" calcext:value-type="float">
            <text:p>955</text:p>
          </table:table-cell>
          <table:table-cell table:style-name="ce52" table:formula="of:=SUM([.D164:.H164])" office:value-type="float" office:value="5095" calcext:value-type="float">
            <text:p>5095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4]=126;70;IF([.T164]=112;70;IF([.T164]=98;70;IF([.T164]=96;60;IF([.T164]=84;60;IF([.T164]=108;60;IF([.T164]=90;50;IF([.T164]=72;40;IF([.T164]=80;40;IF([.T164]=100;50;IF([.T164]=54;30;IF([.T164]=36;20;IF([.T164]=18;10;IF([.T16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f/fd/Niiqiarqusu_Icon.png/revision/latest?cb=20130428050311&quot;)" office:value-type="string" office:string-value="" calcext:value-type="error">
            <text:p>#NAME?</text:p>
          </table:table-cell>
          <table:table-cell table:style-name="ce11" table:formula="of:=HYPERLINK(&quot;http://defenderoftexel.wikia.com/wiki/Numunia&quot;;&quot;Niiqiarqusu&quot;)" office:value-type="string" office:string-value="Niiqiarqusu" calcext:value-type="string">
            <text:p>Niiqiarqusu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15" calcext:value-type="float">
            <text:p>215</text:p>
          </table:table-cell>
          <table:table-cell table:style-name="ce32" office:value-type="float" office:value="230" calcext:value-type="float">
            <text:p>230</text:p>
          </table:table-cell>
          <table:table-cell table:style-name="ce36" office:value-type="float" office:value="112" calcext:value-type="float">
            <text:p>112</text:p>
          </table:table-cell>
          <table:table-cell table:style-name="ce40" office:value-type="float" office:value="187" calcext:value-type="float">
            <text:p>187</text:p>
          </table:table-cell>
          <table:table-cell table:style-name="ce44" office:value-type="float" office:value="175" calcext:value-type="float">
            <text:p>175</text:p>
          </table:table-cell>
          <table:table-cell table:style-name="ce52" table:formula="of:=SUM([.D165:.H165])" office:value-type="float" office:value="919" calcext:value-type="float">
            <text:p>919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5]=126;70;IF([.T165]=112;70;IF([.T165]=98;70;IF([.T165]=96;60;IF([.T165]=84;60;IF([.T165]=108;60;IF([.T165]=90;50;IF([.T165]=72;40;IF([.T165]=80;40;IF([.T165]=100;50;IF([.T165]=54;30;IF([.T165]=36;20;IF([.T165]=18;10;IF([.T16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3/3e/Nikanuur_Icon.png/revision/latest?cb=20130428050311&quot;)" office:value-type="string" office:string-value="" calcext:value-type="error">
            <text:p>#NAME?</text:p>
          </table:table-cell>
          <table:table-cell table:style-name="ce11" table:formula="of:=HYPERLINK(&quot;http://defenderoftexel.wikia.com/wiki/Numunia&quot;;&quot;Nikanuur&quot;)" office:value-type="string" office:string-value="Nikanuur" calcext:value-type="string">
            <text:p>Nikanuu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66:.H166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6]=126;70;IF([.T166]=112;70;IF([.T166]=98;70;IF([.T166]=96;60;IF([.T166]=84;60;IF([.T166]=108;60;IF([.T166]=90;50;IF([.T166]=72;40;IF([.T166]=80;40;IF([.T166]=100;50;IF([.T166]=54;30;IF([.T166]=36;20;IF([.T166]=18;10;IF([.T16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428050313/defenderoftexel/images/thumb/4/4d/Numunia_Icon.png/50px-Numun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Numunia&quot;; &quot;Numunia&quot;)" office:value-type="string" office:string-value="Numunia" calcext:value-type="string">
            <text:p>Numuni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041" calcext:value-type="float">
            <text:p>1041</text:p>
          </table:table-cell>
          <table:table-cell table:style-name="ce32" office:value-type="float" office:value="1117" calcext:value-type="float">
            <text:p>1117</text:p>
          </table:table-cell>
          <table:table-cell table:style-name="ce36" office:value-type="float" office:value="526" calcext:value-type="float">
            <text:p>526</text:p>
          </table:table-cell>
          <table:table-cell table:style-name="ce40" office:value-type="float" office:value="897" calcext:value-type="float">
            <text:p>897</text:p>
          </table:table-cell>
          <table:table-cell table:style-name="ce44" office:value-type="float" office:value="828" calcext:value-type="float">
            <text:p>828</text:p>
          </table:table-cell>
          <table:table-cell table:style-name="ce52" table:formula="of:=SUM([.D167:.H167])" office:value-type="float" office:value="4409" calcext:value-type="float">
            <text:p>4409</text:p>
          </table:table-cell>
          <table:table-cell table:style-name="ce59" office:value-type="string" calcext:value-type="string">
            <text:p>Illu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7]=126;70;IF([.T167]=112;70;IF([.T167]=98;70;IF([.T167]=96;60;IF([.T167]=84;60;IF([.T167]=108;60;IF([.T167]=90;50;IF([.T167]=72;40;IF([.T167]=80;40;IF([.T167]=100;50;IF([.T167]=54;30;IF([.T167]=36;20;IF([.T167]=18;10;IF([.T16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1/18/Uppulu_Icon.png/revision/latest?cb=20130428050312&quot;)" office:value-type="string" office:string-value="" calcext:value-type="error">
            <text:p>#NAME?</text:p>
          </table:table-cell>
          <table:table-cell table:style-name="ce11" table:formula="of:=HYPERLINK(&quot;http://defenderoftexel.wikia.com/wiki/Suusaandar&quot;;&quot;Uppulu&quot;)" office:value-type="string" office:string-value="Uppulu" calcext:value-type="string">
            <text:p>Uppulu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68:.H168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8]=126;70;IF([.T168]=112;70;IF([.T168]=98;70;IF([.T168]=96;60;IF([.T168]=84;60;IF([.T168]=108;60;IF([.T168]=90;50;IF([.T168]=72;40;IF([.T168]=80;40;IF([.T168]=100;50;IF([.T168]=54;30;IF([.T168]=36;20;IF([.T168]=18;10;IF([.T168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1/16/Enusat_Icon.png/revision/latest?cb=20130428050312&quot;)" office:value-type="string" office:string-value="" calcext:value-type="error">
            <text:p>#NAME?</text:p>
          </table:table-cell>
          <table:table-cell table:style-name="ce11" table:formula="of:=HYPERLINK(&quot;http://defenderoftexel.wikia.com/wiki/Suusaandar&quot;;&quot;Enusat&quot;)" office:value-type="string" office:string-value="Enusat" calcext:value-type="string">
            <text:p>Enusa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69:.H169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69]=126;70;IF([.T169]=112;70;IF([.T169]=98;70;IF([.T169]=96;60;IF([.T169]=84;60;IF([.T169]=108;60;IF([.T169]=90;50;IF([.T169]=72;40;IF([.T169]=80;40;IF([.T169]=100;50;IF([.T169]=54;30;IF([.T169]=36;20;IF([.T169]=18;10;IF([.T16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428050314/defenderoftexel/images/thumb/1/14/Suusaandar_Icon.png/50px-Suusaanda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uusaandar&quot;; &quot;Suusaandar&quot;)" office:value-type="string" office:string-value="Suusaandar" calcext:value-type="string">
            <text:p>Suusaanda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877" calcext:value-type="float">
            <text:p>1877</text:p>
          </table:table-cell>
          <table:table-cell table:style-name="ce32" office:value-type="float" office:value="2167" calcext:value-type="float">
            <text:p>2167</text:p>
          </table:table-cell>
          <table:table-cell table:style-name="ce36" office:value-type="float" office:value="1118" calcext:value-type="float">
            <text:p>1118</text:p>
          </table:table-cell>
          <table:table-cell table:style-name="ce40" office:value-type="float" office:value="249" calcext:value-type="float">
            <text:p>249</text:p>
          </table:table-cell>
          <table:table-cell table:style-name="ce44" office:value-type="float" office:value="335" calcext:value-type="float">
            <text:p>335</text:p>
          </table:table-cell>
          <table:table-cell table:style-name="ce52" table:formula="of:=SUM([.D170:.H170])" office:value-type="float" office:value="5746" calcext:value-type="float">
            <text:p>5746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0]=126;70;IF([.T170]=112;70;IF([.T170]=98;70;IF([.T170]=96;60;IF([.T170]=84;60;IF([.T170]=108;60;IF([.T170]=90;50;IF([.T170]=72;40;IF([.T170]=80;40;IF([.T170]=100;50;IF([.T170]=54;30;IF([.T170]=36;20;IF([.T170]=18;10;IF([.T170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8/Amarud_Icon.png/revision/latest?cb=201304280503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Ariistuun&quot;;&quot;Amarud&quot;)" office:value-type="string" office:string-value="Amarud" calcext:value-type="string">
            <text:p>Amarud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71:.H171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1]=126;70;IF([.T171]=112;70;IF([.T171]=98;70;IF([.T171]=96;60;IF([.T171]=84;60;IF([.T171]=108;60;IF([.T171]=90;50;IF([.T171]=72;40;IF([.T171]=80;40;IF([.T171]=100;50;IF([.T171]=54;30;IF([.T171]=36;20;IF([.T171]=18;10;IF([.T171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7/75/Amaragu_Icon.png/revision/latest?cb=201304280503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Ariistuun&quot;;&quot;Amaragu&quot;)" office:value-type="string" office:string-value="Amaragu" calcext:value-type="string">
            <text:p>Amaragu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72:.H172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2]=126;70;IF([.T172]=112;70;IF([.T172]=98;70;IF([.T172]=96;60;IF([.T172]=84;60;IF([.T172]=108;60;IF([.T172]=90;50;IF([.T172]=72;40;IF([.T172]=80;40;IF([.T172]=100;50;IF([.T172]=54;30;IF([.T172]=36;20;IF([.T172]=18;10;IF([.T17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50315/defenderoftexel/images/c/ca/Ariistuu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riistuun&quot;; &quot;Ariistuun&quot;)" office:value-type="string" office:string-value="Ariistuun" calcext:value-type="string">
            <text:p>Ariistuu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314" calcext:value-type="float">
            <text:p>2314</text:p>
          </table:table-cell>
          <table:table-cell table:style-name="ce32" office:value-type="float" office:value="2675" calcext:value-type="float">
            <text:p>2675</text:p>
          </table:table-cell>
          <table:table-cell table:style-name="ce36" office:value-type="float" office:value="1381" calcext:value-type="float">
            <text:p>1381</text:p>
          </table:table-cell>
          <table:table-cell table:style-name="ce40" office:value-type="float" office:value="308" calcext:value-type="float">
            <text:p>308</text:p>
          </table:table-cell>
          <table:table-cell table:style-name="ce44" office:value-type="float" office:value="412" calcext:value-type="float">
            <text:p>412</text:p>
          </table:table-cell>
          <table:table-cell table:style-name="ce52" table:formula="of:=SUM([.D173:.H173])" office:value-type="float" office:value="7090" calcext:value-type="float">
            <text:p>7090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3]=126;70;IF([.T173]=112;70;IF([.T173]=98;70;IF([.T173]=96;60;IF([.T173]=84;60;IF([.T173]=108;60;IF([.T173]=90;50;IF([.T173]=72;40;IF([.T173]=80;40;IF([.T173]=100;50;IF([.T173]=54;30;IF([.T173]=36;20;IF([.T173]=18;10;IF([.T17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0/09/Rubati_Icon.png/revision/latest?cb=201304280503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Rubati_-_Shala_-_Tashmitum&quot;;&quot;Rubati&quot;)" office:value-type="string" office:string-value="Rubati" calcext:value-type="string">
            <text:p>Rubat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91" calcext:value-type="float">
            <text:p>591</text:p>
          </table:table-cell>
          <table:table-cell table:style-name="ce32" office:value-type="float" office:value="696" calcext:value-type="float">
            <text:p>696</text:p>
          </table:table-cell>
          <table:table-cell table:style-name="ce36" office:value-type="float" office:value="325" calcext:value-type="float">
            <text:p>325</text:p>
          </table:table-cell>
          <table:table-cell table:style-name="ce40" office:value-type="float" office:value="59" calcext:value-type="float">
            <text:p>59</text:p>
          </table:table-cell>
          <table:table-cell table:style-name="ce44" office:value-type="float" office:value="82" calcext:value-type="float">
            <text:p>82</text:p>
          </table:table-cell>
          <table:table-cell table:style-name="ce52" table:formula="of:=SUM([.D174:.H174])" office:value-type="float" office:value="1753" calcext:value-type="float">
            <text:p>1753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4]=126;70;IF([.T174]=112;70;IF([.T174]=98;70;IF([.T174]=96;60;IF([.T174]=84;60;IF([.T174]=108;60;IF([.T174]=90;50;IF([.T174]=72;40;IF([.T174]=80;40;IF([.T174]=100;50;IF([.T174]=54;30;IF([.T174]=36;20;IF([.T174]=18;10;IF([.T17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2/23/Shala_Icon.png/revision/latest?cb=20130428050314&quot;)" office:value-type="string" office:string-value="" calcext:value-type="error">
            <text:p>#NAME?</text:p>
          </table:table-cell>
          <table:table-cell table:style-name="ce11" table:formula="of:=HYPERLINK(&quot;http://defenderoftexel.wikia.com/wiki/Rubati_-_Shala_-_Tashmitum&quot;;&quot;Shala&quot;)" office:value-type="string" office:string-value="Shala" calcext:value-type="string">
            <text:p>Shal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75:.H175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5]=126;70;IF([.T175]=112;70;IF([.T175]=98;70;IF([.T175]=96;60;IF([.T175]=84;60;IF([.T175]=108;60;IF([.T175]=90;50;IF([.T175]=72;40;IF([.T175]=80;40;IF([.T175]=100;50;IF([.T175]=54;30;IF([.T175]=36;20;IF([.T175]=18;10;IF([.T17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50316/defenderoftexel/images/thumb/7/71/Tashmitum_Icon.png/50px-Tashmitum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Tashmitum&quot;; &quot;Tashmitum&quot;)" office:value-type="string" office:string-value="Tashmitum" calcext:value-type="string">
            <text:p>Tashmitu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858" calcext:value-type="float">
            <text:p>2858</text:p>
          </table:table-cell>
          <table:table-cell table:style-name="ce32" office:value-type="float" office:value="3268" calcext:value-type="float">
            <text:p>3268</text:p>
          </table:table-cell>
          <table:table-cell table:style-name="ce36" office:value-type="float" office:value="1753" calcext:value-type="float">
            <text:p>1753</text:p>
          </table:table-cell>
          <table:table-cell table:style-name="ce40" office:value-type="float" office:value="410" calcext:value-type="float">
            <text:p>410</text:p>
          </table:table-cell>
          <table:table-cell table:style-name="ce44" office:value-type="float" office:value="549" calcext:value-type="float">
            <text:p>549</text:p>
          </table:table-cell>
          <table:table-cell table:style-name="ce52" table:formula="of:=SUM([.D176:.H176])" office:value-type="float" office:value="8838" calcext:value-type="float">
            <text:p>8838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6]=126;70;IF([.T176]=112;70;IF([.T176]=98;70;IF([.T176]=96;60;IF([.T176]=84;60;IF([.T176]=108;60;IF([.T176]=90;50;IF([.T176]=72;40;IF([.T176]=80;40;IF([.T176]=100;50;IF([.T176]=54;30;IF([.T176]=36;20;IF([.T176]=18;10;IF([.T17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2/28/Sargon_Icon.png/revision/latest?cb=20130428050314&quot;)" office:value-type="string" office:string-value="" calcext:value-type="error">
            <text:p>#NAME?</text:p>
          </table:table-cell>
          <table:table-cell table:style-name="ce11" table:formula="of:=HYPERLINK(&quot;http://defenderoftexel.wikia.com/wiki/Sargon_-_Seluku_-_Shu-Turul&quot;;&quot;Sargon&quot;)" office:value-type="string" office:string-value="Sargon" calcext:value-type="string">
            <text:p>Sargo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77:.H177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7]=126;70;IF([.T177]=112;70;IF([.T177]=98;70;IF([.T177]=96;60;IF([.T177]=84;60;IF([.T177]=108;60;IF([.T177]=90;50;IF([.T177]=72;40;IF([.T177]=80;40;IF([.T177]=100;50;IF([.T177]=54;30;IF([.T177]=36;20;IF([.T177]=18;10;IF([.T17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5/57/Seluku_Icon.png/revision/latest?cb=20130428050314&quot;)" office:value-type="string" office:string-value="" calcext:value-type="error">
            <text:p>#NAME?</text:p>
          </table:table-cell>
          <table:table-cell table:style-name="ce11" table:formula="of:=HYPERLINK(&quot;http://defenderoftexel.wikia.com/wiki/Sargon_-_Seluku_-_Shu-Turul&quot;;&quot;Seluku&quot;)" office:value-type="string" office:string-value="Seluku" calcext:value-type="string">
            <text:p>Seluk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78:.H178])" office:value-type="float" office:value="5" calcext:value-type="float">
            <text:p>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8]=126;70;IF([.T178]=112;70;IF([.T178]=98;70;IF([.T178]=96;60;IF([.T178]=84;60;IF([.T178]=108;60;IF([.T178]=90;50;IF([.T178]=72;40;IF([.T178]=80;40;IF([.T178]=100;50;IF([.T178]=54;30;IF([.T178]=36;20;IF([.T178]=18;10;IF([.T17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50318/defenderoftexel/images/thumb/e/e3/Shu-Turul_Icon.png/50px-Shu-Turu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hu-Turul&quot;; &quot;Shu-Turul&quot;)" office:value-type="string" office:string-value="Shu-Turul" calcext:value-type="string">
            <text:p>Shu-Turu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841" calcext:value-type="float">
            <text:p>2841</text:p>
          </table:table-cell>
          <table:table-cell table:style-name="ce32" office:value-type="float" office:value="3603" calcext:value-type="float">
            <text:p>3603</text:p>
          </table:table-cell>
          <table:table-cell table:style-name="ce36" office:value-type="float" office:value="1740" calcext:value-type="float">
            <text:p>1740</text:p>
          </table:table-cell>
          <table:table-cell table:style-name="ce40" office:value-type="float" office:value="410" calcext:value-type="float">
            <text:p>410</text:p>
          </table:table-cell>
          <table:table-cell table:style-name="ce44" office:value-type="float" office:value="543" calcext:value-type="float">
            <text:p>543</text:p>
          </table:table-cell>
          <table:table-cell table:style-name="ce52" table:formula="of:=SUM([.D179:.H179])" office:value-type="float" office:value="9137" calcext:value-type="float">
            <text:p>9137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79]=126;70;IF([.T179]=112;70;IF([.T179]=98;70;IF([.T179]=96;60;IF([.T179]=84;60;IF([.T179]=108;60;IF([.T179]=90;50;IF([.T179]=72;40;IF([.T179]=80;40;IF([.T179]=100;50;IF([.T179]=54;30;IF([.T179]=36;20;IF([.T179]=18;10;IF([.T17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1/15/Agu_Icon.png/revision/latest?cb=20130428051432&quot;)" office:value-type="string" office:string-value="" calcext:value-type="error">
            <text:p>#NAME?</text:p>
          </table:table-cell>
          <table:table-cell table:style-name="ce11" table:formula="of:=HYPERLINK(&quot;http://defenderoftexel.wikia.com/wiki/Agu_-_Ilgi_-_Namtar&quot;;&quot;Agu&quot;)" office:value-type="string" office:string-value="Agu" calcext:value-type="string">
            <text:p>Ag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0:.H180])" office:value-type="float" office:value="5" calcext:value-type="float">
            <text:p>5</text:p>
          </table:table-cell>
          <table:table-cell table:style-name="ce59" office:value-type="string" calcext:value-type="string">
            <text:p>Stamped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0]=126;70;IF([.T180]=112;70;IF([.T180]=98;70;IF([.T180]=96;60;IF([.T180]=84;60;IF([.T180]=108;60;IF([.T180]=90;50;IF([.T180]=72;40;IF([.T180]=80;40;IF([.T180]=100;50;IF([.T180]=54;30;IF([.T180]=36;20;IF([.T180]=18;10;IF([.T18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0/0d/Ilgi_Icon.png/revision/latest?cb=20130428051432&quot;)" office:value-type="string" office:string-value="" calcext:value-type="error">
            <text:p>#NAME?</text:p>
          </table:table-cell>
          <table:table-cell table:style-name="ce11" table:formula="of:=HYPERLINK(&quot;http://defenderoftexel.wikia.com/wiki/Agu_-_Ilgi_-_Namtar&quot;;&quot;Ilgi&quot;)" office:value-type="string" office:string-value="Ilgi" calcext:value-type="string">
            <text:p>Ilg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1:.H181])" office:value-type="float" office:value="5" calcext:value-type="float">
            <text:p>5</text:p>
          </table:table-cell>
          <table:table-cell table:style-name="ce59" office:value-type="string" calcext:value-type="string">
            <text:p>Stamped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1]=126;70;IF([.T181]=112;70;IF([.T181]=98;70;IF([.T181]=96;60;IF([.T181]=84;60;IF([.T181]=108;60;IF([.T181]=90;50;IF([.T181]=72;40;IF([.T181]=80;40;IF([.T181]=100;50;IF([.T181]=54;30;IF([.T181]=36;20;IF([.T181]=18;10;IF([.T181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51435/defenderoftexel/images/thumb/a/ad/Namtar_Icon.png/50px-Namta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Namtar&quot;; &quot;Namtar&quot;)" office:value-type="string" office:string-value="Namtar" calcext:value-type="string">
            <text:p>Namta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989" calcext:value-type="float">
            <text:p>4989</text:p>
          </table:table-cell>
          <table:table-cell table:style-name="ce32" office:value-type="float" office:value="4219" calcext:value-type="float">
            <text:p>4219</text:p>
          </table:table-cell>
          <table:table-cell table:style-name="ce36" office:value-type="float" office:value="2166" calcext:value-type="float">
            <text:p>2166</text:p>
          </table:table-cell>
          <table:table-cell table:style-name="ce40" office:value-type="float" office:value="426" calcext:value-type="float">
            <text:p>426</text:p>
          </table:table-cell>
          <table:table-cell table:style-name="ce44" office:value-type="float" office:value="1619" calcext:value-type="float">
            <text:p>1619</text:p>
          </table:table-cell>
          <table:table-cell table:style-name="ce52" table:formula="of:=SUM([.D182:.H182])" office:value-type="float" office:value="13419" calcext:value-type="float">
            <text:p>13419</text:p>
          </table:table-cell>
          <table:table-cell table:style-name="ce59" office:value-type="string" calcext:value-type="string">
            <text:p>Stamped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2]=126;70;IF([.T182]=112;70;IF([.T182]=98;70;IF([.T182]=96;60;IF([.T182]=84;60;IF([.T182]=108;60;IF([.T182]=90;50;IF([.T182]=72;40;IF([.T182]=80;40;IF([.T182]=100;50;IF([.T182]=54;30;IF([.T182]=36;20;IF([.T182]=18;10;IF([.T18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8/8f/Cainei_Icon.png/revision/latest?cb=20130904152821&quot;)" office:value-type="string" office:string-value="" calcext:value-type="error">
            <text:p>#NAME?</text:p>
          </table:table-cell>
          <table:table-cell table:style-name="ce11" table:formula="of:=HYPERLINK(&quot;http://defenderoftexel.wikia.com/wiki/Cainei_-_Papni_-_Ramtha&quot;;&quot;Cainei&quot;)" office:value-type="string" office:string-value="Cainei" calcext:value-type="string">
            <text:p>Caine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3:.H183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3]=126;70;IF([.T183]=112;70;IF([.T183]=98;70;IF([.T183]=96;60;IF([.T183]=84;60;IF([.T183]=108;60;IF([.T183]=90;50;IF([.T183]=72;40;IF([.T183]=80;40;IF([.T183]=100;50;IF([.T183]=54;30;IF([.T183]=36;20;IF([.T183]=18;10;IF([.T18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a/a7/Papni_Icon.png/revision/latest?cb=20130904152822&quot;)" office:value-type="string" office:string-value="" calcext:value-type="error">
            <text:p>#NAME?</text:p>
          </table:table-cell>
          <table:table-cell table:style-name="ce11" table:formula="of:=HYPERLINK(&quot;http://defenderoftexel.wikia.com/wiki/Cainei_-_Papni_-_Ramtha&quot;;&quot;Papni&quot;)" office:value-type="string" office:string-value="Papni" calcext:value-type="string">
            <text:p>Papn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4:.H184])" office:value-type="float" office:value="5" calcext:value-type="float">
            <text:p>5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4]=126;70;IF([.T184]=112;70;IF([.T184]=98;70;IF([.T184]=96;60;IF([.T184]=84;60;IF([.T184]=108;60;IF([.T184]=90;50;IF([.T184]=72;40;IF([.T184]=80;40;IF([.T184]=100;50;IF([.T184]=54;30;IF([.T184]=36;20;IF([.T184]=18;10;IF([.T18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6/69/Ramth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amtha&quot;; &quot;Ramtha&quot;)" office:value-type="string" office:string-value="Ramtha" calcext:value-type="string">
            <text:p>Ramth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617" calcext:value-type="float">
            <text:p>1617</text:p>
          </table:table-cell>
          <table:table-cell table:style-name="ce32" office:value-type="float" office:value="3764" calcext:value-type="float">
            <text:p>3764</text:p>
          </table:table-cell>
          <table:table-cell table:style-name="ce36" office:value-type="float" office:value="820" calcext:value-type="float">
            <text:p>820</text:p>
          </table:table-cell>
          <table:table-cell table:style-name="ce40" office:value-type="float" office:value="3572" calcext:value-type="float">
            <text:p>3572</text:p>
          </table:table-cell>
          <table:table-cell table:style-name="ce44" office:value-type="float" office:value="1087" calcext:value-type="float">
            <text:p>1087</text:p>
          </table:table-cell>
          <table:table-cell table:style-name="ce52" table:formula="of:=SUM([.D185:.H185])" office:value-type="float" office:value="10860" calcext:value-type="float">
            <text:p>10860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5]=126;70;IF([.T185]=112;70;IF([.T185]=98;70;IF([.T185]=96;60;IF([.T185]=84;60;IF([.T185]=108;60;IF([.T185]=90;50;IF([.T185]=72;40;IF([.T185]=80;40;IF([.T185]=100;50;IF([.T185]=54;30;IF([.T185]=36;20;IF([.T185]=18;10;IF([.T18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f/f3/Emesh_Icon.png/revision/latest?cb=20130904134106&quot;)" office:value-type="string" office:string-value="" calcext:value-type="error">
            <text:p>#NAME?</text:p>
          </table:table-cell>
          <table:table-cell table:style-name="ce11" table:formula="of:=HYPERLINK(&quot;http://defenderoftexel.wikia.com/wiki/Enkimdu&quot;;&quot;Emesh&quot;)" office:value-type="string" office:string-value="Emesh" calcext:value-type="string">
            <text:p>Emesh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9" calcext:value-type="float">
            <text:p>249</text:p>
          </table:table-cell>
          <table:table-cell table:style-name="ce32" office:value-type="float" office:value="165" calcext:value-type="float">
            <text:p>165</text:p>
          </table:table-cell>
          <table:table-cell table:style-name="ce36" office:value-type="float" office:value="103" calcext:value-type="float">
            <text:p>103</text:p>
          </table:table-cell>
          <table:table-cell table:style-name="ce40" office:value-type="float" office:value="899" calcext:value-type="float">
            <text:p>899</text:p>
          </table:table-cell>
          <table:table-cell table:style-name="ce44" office:value-type="float" office:value="842" calcext:value-type="float">
            <text:p>842</text:p>
          </table:table-cell>
          <table:table-cell table:style-name="ce52" table:formula="of:=SUM([.D186:.H186])" office:value-type="float" office:value="2258" calcext:value-type="float">
            <text:p>2258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6]=126;70;IF([.T186]=112;70;IF([.T186]=98;70;IF([.T186]=96;60;IF([.T186]=84;60;IF([.T186]=108;60;IF([.T186]=90;50;IF([.T186]=72;40;IF([.T186]=80;40;IF([.T186]=100;50;IF([.T186]=54;30;IF([.T186]=36;20;IF([.T186]=18;10;IF([.T18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2/21/Ennugi_Icon.png/revision/latest?cb=20130904134107&quot;)" office:value-type="string" office:string-value="" calcext:value-type="error">
            <text:p>#NAME?</text:p>
          </table:table-cell>
          <table:table-cell table:style-name="ce11" table:formula="of:=HYPERLINK(&quot;http://defenderoftexel.wikia.com/wiki/Enkimdu&quot;;&quot;Ennugi&quot;)" office:value-type="string" office:string-value="Ennugi" calcext:value-type="string">
            <text:p>Ennug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7:.H187])" office:value-type="float" office:value="5" calcext:value-type="float">
            <text:p>5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7]=126;70;IF([.T187]=112;70;IF([.T187]=98;70;IF([.T187]=96;60;IF([.T187]=84;60;IF([.T187]=108;60;IF([.T187]=90;50;IF([.T187]=72;40;IF([.T187]=80;40;IF([.T187]=100;50;IF([.T187]=54;30;IF([.T187]=36;20;IF([.T187]=18;10;IF([.T18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c/c8/Enkimdu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Enkimdu&quot;; &quot;Enkimdu&quot;)" office:value-type="string" office:string-value="Enkimdu" calcext:value-type="string">
            <text:p>Enkimd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351" calcext:value-type="float">
            <text:p>1351</text:p>
          </table:table-cell>
          <table:table-cell table:style-name="ce32" office:value-type="float" office:value="948" calcext:value-type="float">
            <text:p>948</text:p>
          </table:table-cell>
          <table:table-cell table:style-name="ce36" office:value-type="float" office:value="611" calcext:value-type="float">
            <text:p>611</text:p>
          </table:table-cell>
          <table:table-cell table:style-name="ce40" office:value-type="float" office:value="3891" calcext:value-type="float">
            <text:p>3891</text:p>
          </table:table-cell>
          <table:table-cell table:style-name="ce44" office:value-type="float" office:value="3703" calcext:value-type="float">
            <text:p>3703</text:p>
          </table:table-cell>
          <table:table-cell table:style-name="ce52" table:formula="of:=SUM([.D188:.H188])" office:value-type="float" office:value="10504" calcext:value-type="float">
            <text:p>10504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8]=126;70;IF([.T188]=112;70;IF([.T188]=98;70;IF([.T188]=96;60;IF([.T188]=84;60;IF([.T188]=108;60;IF([.T188]=90;50;IF([.T188]=72;40;IF([.T188]=80;40;IF([.T188]=100;50;IF([.T188]=54;30;IF([.T188]=36;20;IF([.T188]=18;10;IF([.T18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c/c0/Mylitta_Icon.png/revision/latest?cb=20130428051433&quot;)" office:value-type="string" office:string-value="" calcext:value-type="error">
            <text:p>#NAME?</text:p>
          </table:table-cell>
          <table:table-cell table:style-name="ce11" table:formula="of:=HYPERLINK(&quot;http://defenderoftexel.wikia.com/wiki/Mylitta_-_Neith_-_Tauthe&quot;;&quot;Mylitta&quot;)" office:value-type="string" office:string-value="Mylitta" calcext:value-type="string">
            <text:p>Mylitt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89:.H189])" office:value-type="float" office:value="5" calcext:value-type="float">
            <text:p>5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89]=126;70;IF([.T189]=112;70;IF([.T189]=98;70;IF([.T189]=96;60;IF([.T189]=84;60;IF([.T189]=108;60;IF([.T189]=90;50;IF([.T189]=72;40;IF([.T189]=80;40;IF([.T189]=100;50;IF([.T189]=54;30;IF([.T189]=36;20;IF([.T189]=18;10;IF([.T18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5/53/Neith_Icon.png/revision/latest?cb=20130428051433&quot;)" office:value-type="string" office:string-value="" calcext:value-type="error">
            <text:p>#NAME?</text:p>
          </table:table-cell>
          <table:table-cell table:style-name="ce11" table:formula="of:=HYPERLINK(&quot;http://defenderoftexel.wikia.com/wiki/Mylitta_-_Neith_-_Tauthe&quot;;&quot;Neith&quot;)" office:value-type="string" office:string-value="Neith" calcext:value-type="string">
            <text:p>Neith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14" calcext:value-type="float">
            <text:p>414</text:p>
          </table:table-cell>
          <table:table-cell table:style-name="ce32" office:value-type="float" office:value="286" calcext:value-type="float">
            <text:p>286</text:p>
          </table:table-cell>
          <table:table-cell table:style-name="ce36" office:value-type="float" office:value="183" calcext:value-type="float">
            <text:p>183</text:p>
          </table:table-cell>
          <table:table-cell table:style-name="ce40" office:value-type="float" office:value="1265" calcext:value-type="float">
            <text:p>1265</text:p>
          </table:table-cell>
          <table:table-cell table:style-name="ce44" office:value-type="float" office:value="1202" calcext:value-type="float">
            <text:p>1202</text:p>
          </table:table-cell>
          <table:table-cell table:style-name="ce52" table:formula="of:=SUM([.D190:.H190])" office:value-type="float" office:value="3350" calcext:value-type="float">
            <text:p>3350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0]=126;70;IF([.T190]=112;70;IF([.T190]=98;70;IF([.T190]=96;60;IF([.T190]=84;60;IF([.T190]=108;60;IF([.T190]=90;50;IF([.T190]=72;40;IF([.T190]=80;40;IF([.T190]=100;50;IF([.T190]=54;30;IF([.T190]=36;20;IF([.T190]=18;10;IF([.T19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51435/defenderoftexel/images/thumb/9/9d/Tauthe_Icon.png/50px-Tauth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Tauthe&quot;; &quot;Tauthe&quot;)" office:value-type="string" office:string-value="Tauthe" calcext:value-type="string">
            <text:p>Tauth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256" calcext:value-type="float">
            <text:p>1256</text:p>
          </table:table-cell>
          <table:table-cell table:style-name="ce32" office:value-type="float" office:value="889" calcext:value-type="float">
            <text:p>889</text:p>
          </table:table-cell>
          <table:table-cell table:style-name="ce36" office:value-type="float" office:value="579" calcext:value-type="float">
            <text:p>579</text:p>
          </table:table-cell>
          <table:table-cell table:style-name="ce40" office:value-type="float" office:value="3469" calcext:value-type="float">
            <text:p>3469</text:p>
          </table:table-cell>
          <table:table-cell table:style-name="ce44" office:value-type="float" office:value="3310" calcext:value-type="float">
            <text:p>3310</text:p>
          </table:table-cell>
          <table:table-cell table:style-name="ce52" table:formula="of:=SUM([.D191:.H191])" office:value-type="float" office:value="9503" calcext:value-type="float">
            <text:p>9503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1]=126;70;IF([.T191]=112;70;IF([.T191]=98;70;IF([.T191]=96;60;IF([.T191]=84;60;IF([.T191]=108;60;IF([.T191]=90;50;IF([.T191]=72;40;IF([.T191]=80;40;IF([.T191]=100;50;IF([.T191]=54;30;IF([.T191]=36;20;IF([.T191]=18;10;IF([.T19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03134956/defenderoftexel/images/thumb/a/ac/Abaminsk_Icon.png/50px-Abaminsk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baminsk&quot;; &quot;Abaminsk&quot;)" office:value-type="string" office:string-value="Abaminsk" calcext:value-type="string">
            <text:p>Abaminsk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1296" calcext:value-type="float">
            <text:p>11296</text:p>
          </table:table-cell>
          <table:table-cell table:style-name="ce32" office:value-type="float" office:value="8033" calcext:value-type="float">
            <text:p>8033</text:p>
          </table:table-cell>
          <table:table-cell table:style-name="ce36" office:value-type="float" office:value="9360" calcext:value-type="float">
            <text:p>9360</text:p>
          </table:table-cell>
          <table:table-cell table:style-name="ce40" office:value-type="float" office:value="981" calcext:value-type="float">
            <text:p>981</text:p>
          </table:table-cell>
          <table:table-cell table:style-name="ce44" office:value-type="float" office:value="1206" calcext:value-type="float">
            <text:p>1206</text:p>
          </table:table-cell>
          <table:table-cell table:style-name="ce52" table:formula="of:=SUM([.D192:.H192])" office:value-type="float" office:value="30876" calcext:value-type="float">
            <text:p>30876</text:p>
          </table:table-cell>
          <table:table-cell table:style-name="ce59" office:value-type="string" calcext:value-type="string">
            <text:p>Icequak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192]=126;70;IF([.T192]=112;70;IF([.T192]=98;70;IF([.T192]=96;60;IF([.T192]=84;60;IF([.T192]=108;60;IF([.T192]=90;50;IF([.T192]=72;40;IF([.T192]=80;40;IF([.T192]=100;50;IF([.T192]=54;30;IF([.T192]=36;20;IF([.T192]=18;10;IF([.T192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0520210529/defenderoftexel/images/thumb/f/fd/Adrahasis_Icon.png/50px-Adrahasi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drahasis&quot;; &quot;Adrahasis&quot;)" office:value-type="string" office:string-value="Adrahasis" calcext:value-type="string">
            <text:p>Adrahasi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545" calcext:value-type="float">
            <text:p>3545</text:p>
          </table:table-cell>
          <table:table-cell table:style-name="ce32" office:value-type="float" office:value="2997" calcext:value-type="float">
            <text:p>2997</text:p>
          </table:table-cell>
          <table:table-cell table:style-name="ce36" office:value-type="float" office:value="1537" calcext:value-type="float">
            <text:p>1537</text:p>
          </table:table-cell>
          <table:table-cell table:style-name="ce40" office:value-type="float" office:value="303" calcext:value-type="float">
            <text:p>303</text:p>
          </table:table-cell>
          <table:table-cell table:style-name="ce44" office:value-type="float" office:value="1151" calcext:value-type="float">
            <text:p>1151</text:p>
          </table:table-cell>
          <table:table-cell table:style-name="ce52" table:formula="of:=SUM([.D193:.H193])" office:value-type="float" office:value="9533" calcext:value-type="float">
            <text:p>9533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3]=126;70;IF([.T193]=112;70;IF([.T193]=98;70;IF([.T193]=96;60;IF([.T193]=84;60;IF([.T193]=108;60;IF([.T193]=90;50;IF([.T193]=72;40;IF([.T193]=80;40;IF([.T193]=100;50;IF([.T193]=54;30;IF([.T193]=36;20;IF([.T193]=18;10;IF([.T19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15143605/defenderoftexel/images/thumb/f/f2/Aescalina_Icon.png/50px-Aescalin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escalina&quot;; &quot;Aescalina&quot;)" office:value-type="string" office:string-value="Aescalina" calcext:value-type="string">
            <text:p>Aescalin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8129" calcext:value-type="float">
            <text:p>8129</text:p>
          </table:table-cell>
          <table:table-cell table:style-name="ce32" office:value-type="float" office:value="1079" calcext:value-type="float">
            <text:p>1079</text:p>
          </table:table-cell>
          <table:table-cell table:style-name="ce36" office:value-type="float" office:value="2902" calcext:value-type="float">
            <text:p>2902</text:p>
          </table:table-cell>
          <table:table-cell table:style-name="ce40" office:value-type="float" office:value="16690" calcext:value-type="float">
            <text:p>16690</text:p>
          </table:table-cell>
          <table:table-cell table:style-name="ce44" office:value-type="float" office:value="5517" calcext:value-type="float">
            <text:p>5517</text:p>
          </table:table-cell>
          <table:table-cell table:style-name="ce52" table:formula="of:=SUM([.D194:.H194])" office:value-type="float" office:value="34317" calcext:value-type="float">
            <text:p>34317</text:p>
          </table:table-cell>
          <table:table-cell table:style-name="ce59" office:value-type="string" calcext:value-type="string">
            <text:p>Hallow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194]=126;70;IF([.T194]=112;70;IF([.T194]=98;70;IF([.T194]=96;60;IF([.T194]=84;60;IF([.T194]=108;60;IF([.T194]=90;50;IF([.T194]=72;40;IF([.T194]=80;40;IF([.T194]=100;50;IF([.T194]=54;30;IF([.T194]=36;20;IF([.T194]=18;10;IF([.T194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704201029/defenderoftexel/images/3/39/Aestasia_Infern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estasia_Inferna&quot;; &quot;Aestasia Inferna&quot;)" office:value-type="string" office:string-value="Aestasia Inferna" calcext:value-type="string">
            <text:p>Aestasia Infern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7716" calcext:value-type="float">
            <text:p>7716</text:p>
          </table:table-cell>
          <table:table-cell table:style-name="ce32" office:value-type="float" office:value="14010" calcext:value-type="float">
            <text:p>14010</text:p>
          </table:table-cell>
          <table:table-cell table:style-name="ce36" office:value-type="float" office:value="4664" calcext:value-type="float">
            <text:p>4664</text:p>
          </table:table-cell>
          <table:table-cell table:style-name="ce40" office:value-type="float" office:value="5276" calcext:value-type="float">
            <text:p>5276</text:p>
          </table:table-cell>
          <table:table-cell table:style-name="ce44" office:value-type="float" office:value="1860" calcext:value-type="float">
            <text:p>1860</text:p>
          </table:table-cell>
          <table:table-cell table:style-name="ce52" table:formula="of:=SUM([.D195:.H195])" office:value-type="float" office:value="33526" calcext:value-type="float">
            <text:p>33526</text:p>
          </table:table-cell>
          <table:table-cell table:style-name="ce59" office:value-type="string" calcext:value-type="string">
            <text:p>Wildfire</text:p>
          </table:table-cell>
          <table:table-cell table:style-name="ce59" office:value-type="string" calcext:value-type="string">
            <text:p>Double 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195]=126;70;IF([.T195]=112;70;IF([.T195]=98;70;IF([.T195]=96;60;IF([.T195]=84;60;IF([.T195]=108;60;IF([.T195]=90;50;IF([.T195]=72;40;IF([.T195]=80;40;IF([.T195]=100;50;IF([.T195]=54;30;IF([.T195]=36;20;IF([.T195]=18;10;IF([.T195]=60;30))))))))))))))" office:value-type="float" office:value="60" calcext:value-type="float">
            <text:p>60</text:p>
          </table:table-cell>
          <table:table-cell table:style-name="ce67" office:value-type="float" office:value="96" calcext:value-type="float">
            <text:p>9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b/bc/Afandi_Icon.png/revision/latest?cb=20141111143930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xha_-_Afandi_-_Nasreddin&quot;;&quot;Afandi&quot;)" office:value-type="string" office:string-value="Afandi" calcext:value-type="string">
            <text:p>Afand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96:.H196])" office:value-type="float" office:value="5" calcext:value-type="float">
            <text:p>5</text:p>
          </table:table-cell>
          <table:table-cell table:style-name="ce59" office:value-type="string" calcext:value-type="string">
            <text:p>Lark</text:p>
          </table:table-cell>
          <table:table-cell table:style-name="ce59" office:value-type="string" calcext:value-type="string">
            <text:p>Random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6]=126;70;IF([.T196]=112;70;IF([.T196]=98;70;IF([.T196]=96;60;IF([.T196]=84;60;IF([.T196]=108;60;IF([.T196]=90;50;IF([.T196]=72;40;IF([.T196]=80;40;IF([.T196]=100;50;IF([.T196]=54;30;IF([.T196]=36;20;IF([.T196]=18;10;IF([.T196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0428052647/defenderoftexel/images/thumb/4/49/Ahati-waqrat_Icon.png/50px-Ahati-waqra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hati-waqrat&quot;; &quot;Ahati-waqrat&quot;)" office:value-type="string" office:string-value="Ahati-waqrat" calcext:value-type="string">
            <text:p>Ahati-waqrat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1221" calcext:value-type="float">
            <text:p>1221</text:p>
          </table:table-cell>
          <table:table-cell table:style-name="ce33" office:value-type="float" office:value="856" calcext:value-type="float">
            <text:p>856</text:p>
          </table:table-cell>
          <table:table-cell table:style-name="ce37" office:value-type="float" office:value="553" calcext:value-type="float">
            <text:p>553</text:p>
          </table:table-cell>
          <table:table-cell table:style-name="ce41" office:value-type="float" office:value="3511" calcext:value-type="float">
            <text:p>3511</text:p>
          </table:table-cell>
          <table:table-cell table:style-name="ce45" office:value-type="float" office:value="3344" calcext:value-type="float">
            <text:p>3344</text:p>
          </table:table-cell>
          <table:table-cell table:style-name="ce53" table:formula="of:=SUM([.D197:.H197])" office:value-type="float" office:value="9485" calcext:value-type="float">
            <text:p>9485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197]=126;70;IF([.T197]=112;70;IF([.T197]=98;70;IF([.T197]=96;60;IF([.T197]=84;60;IF([.T197]=108;60;IF([.T197]=90;50;IF([.T197]=72;40;IF([.T197]=80;40;IF([.T197]=100;50;IF([.T197]=54;30;IF([.T197]=36;20;IF([.T197]=18;10;IF([.T197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5/52/Dwiggy_Icon.png/revision/latest?cb=20141209145943&quot;)" office:value-type="string" office:string-value="" calcext:value-type="error">
            <text:p>#NAME?</text:p>
          </table:table-cell>
          <table:table-cell table:style-name="ce11" table:formula="of:=HYPERLINK(&quot;http://defenderoftexel.wikia.com/wiki/Dwiggy_-_Sphagnus_-_Entodon&quot;;&quot;Dwiggy&quot;)" office:value-type="string" office:string-value="Dwiggy" calcext:value-type="string">
            <text:p>Dwigg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98:.H198])" office:value-type="float" office:value="5" calcext:value-type="float">
            <text:p>5</text:p>
          </table:table-cell>
          <table:table-cell table:style-name="ce59" office:value-type="string" calcext:value-type="string">
            <text:p>Smirk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Novice</text:p>
          </table:table-cell>
          <table:table-cell table:style-name="ce7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8]=126;70;IF([.T198]=112;70;IF([.T198]=98;70;IF([.T198]=96;60;IF([.T198]=84;60;IF([.T198]=108;60;IF([.T198]=90;50;IF([.T198]=72;40;IF([.T198]=80;40;IF([.T198]=100;50;IF([.T198]=54;30;IF([.T198]=36;20;IF([.T198]=18;10;IF([.T19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f/f9/Sphagnus_Icon.png/revision/latest?cb=20141209145942&quot;)" office:value-type="string" office:string-value="" calcext:value-type="error">
            <text:p>#NAME?</text:p>
          </table:table-cell>
          <table:table-cell table:style-name="ce11" table:formula="of:=HYPERLINK(&quot;http://defenderoftexel.wikia.com/wiki/Dwiggy_-_Sphagnus_-_Entodon&quot;;&quot;Sphagnus&quot;)" office:value-type="string" office:string-value="Sphagnus" calcext:value-type="string">
            <text:p>Sphagn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199:.H199])" office:value-type="float" office:value="5" calcext:value-type="float">
            <text:p>5</text:p>
          </table:table-cell>
          <table:table-cell table:style-name="ce59" office:value-type="string" calcext:value-type="string">
            <text:p>Smirk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7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199]=126;70;IF([.T199]=112;70;IF([.T199]=98;70;IF([.T199]=96;60;IF([.T199]=84;60;IF([.T199]=108;60;IF([.T199]=90;50;IF([.T199]=72;40;IF([.T199]=80;40;IF([.T199]=100;50;IF([.T199]=54;30;IF([.T199]=36;20;IF([.T199]=18;10;IF([.T19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4/4d/Entodon_Icon.png/revision/latest?cb=20141209145942&quot;)" office:value-type="string" office:string-value="" calcext:value-type="error">
            <text:p>#NAME?</text:p>
          </table:table-cell>
          <table:table-cell table:style-name="ce11" table:formula="of:=HYPERLINK(&quot;http://defenderoftexel.wikia.com/wiki/Dwiggy_-_Sphagnus_-_Entodon&quot;;&quot;Entodon&quot;)" office:value-type="string" office:string-value="Entodon" calcext:value-type="string">
            <text:p>Entodo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398" calcext:value-type="float">
            <text:p>5398</text:p>
          </table:table-cell>
          <table:table-cell table:style-name="ce32" office:value-type="float" office:value="6280" calcext:value-type="float">
            <text:p>6280</text:p>
          </table:table-cell>
          <table:table-cell table:style-name="ce36" office:value-type="float" office:value="4369" calcext:value-type="float">
            <text:p>4369</text:p>
          </table:table-cell>
          <table:table-cell table:style-name="ce40" office:value-type="float" office:value="615" calcext:value-type="float">
            <text:p>615</text:p>
          </table:table-cell>
          <table:table-cell table:style-name="ce44" office:value-type="float" office:value="742" calcext:value-type="float">
            <text:p>742</text:p>
          </table:table-cell>
          <table:table-cell table:style-name="ce52" table:formula="of:=SUM([.D200:.H200])" office:value-type="float" office:value="17404" calcext:value-type="float">
            <text:p>17404</text:p>
          </table:table-cell>
          <table:table-cell table:style-name="ce59" office:value-type="string" calcext:value-type="string">
            <text:p>Smirk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00]=126;70;IF([.T200]=112;70;IF([.T200]=98;70;IF([.T200]=96;60;IF([.T200]=84;60;IF([.T200]=108;60;IF([.T200]=90;50;IF([.T200]=72;40;IF([.T200]=80;40;IF([.T200]=100;50;IF([.T200]=54;30;IF([.T200]=36;20;IF([.T200]=18;10;IF([.T20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1:.H201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1]=126;70;IF([.T201]=112;70;IF([.T201]=98;70;IF([.T201]=96;60;IF([.T201]=84;60;IF([.T201]=108;60;IF([.T201]=90;50;IF([.T201]=72;40;IF([.T201]=80;40;IF([.T201]=100;50;IF([.T201]=54;30;IF([.T201]=36;20;IF([.T201]=18;10;IF([.T201]=60;30))))))))))))))" office:value-type="float" office:value="0" calcext:value-type="float">
            <text:p>0</text:p>
          </table:table-cell>
          <table:table-cell table:style-name="ce6"/>
          <table:table-cell table:style-name="ce74"/>
          <table:table-cell table:number-columns-repeated="1003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2:.H202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2]=126;70;IF([.T202]=112;70;IF([.T202]=98;70;IF([.T202]=96;60;IF([.T202]=84;60;IF([.T202]=108;60;IF([.T202]=90;50;IF([.T202]=72;40;IF([.T202]=80;40;IF([.T202]=100;50;IF([.T202]=54;30;IF([.T202]=36;20;IF([.T202]=18;10;IF([.T202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3:.H203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3]=126;70;IF([.T203]=112;70;IF([.T203]=98;70;IF([.T203]=96;60;IF([.T203]=84;60;IF([.T203]=108;60;IF([.T203]=90;50;IF([.T203]=72;40;IF([.T203]=80;40;IF([.T203]=100;50;IF([.T203]=54;30;IF([.T203]=36;20;IF([.T203]=18;10;IF([.T203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4:.H204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4]=126;70;IF([.T204]=112;70;IF([.T204]=98;70;IF([.T204]=96;60;IF([.T204]=84;60;IF([.T204]=108;60;IF([.T204]=90;50;IF([.T204]=72;40;IF([.T204]=80;40;IF([.T204]=100;50;IF([.T204]=54;30;IF([.T204]=36;20;IF([.T204]=18;10;IF([.T204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5:.H205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5]=126;70;IF([.T205]=112;70;IF([.T205]=98;70;IF([.T205]=96;60;IF([.T205]=84;60;IF([.T205]=108;60;IF([.T205]=90;50;IF([.T205]=72;40;IF([.T205]=80;40;IF([.T205]=100;50;IF([.T205]=54;30;IF([.T205]=36;20;IF([.T205]=18;10;IF([.T205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6:.H206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6]=126;70;IF([.T206]=112;70;IF([.T206]=98;70;IF([.T206]=96;60;IF([.T206]=84;60;IF([.T206]=108;60;IF([.T206]=90;50;IF([.T206]=72;40;IF([.T206]=80;40;IF([.T206]=100;50;IF([.T206]=54;30;IF([.T206]=36;20;IF([.T206]=18;10;IF([.T206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7:.H207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7]=126;70;IF([.T207]=112;70;IF([.T207]=98;70;IF([.T207]=96;60;IF([.T207]=84;60;IF([.T207]=108;60;IF([.T207]=90;50;IF([.T207]=72;40;IF([.T207]=80;40;IF([.T207]=100;50;IF([.T207]=54;30;IF([.T207]=36;20;IF([.T207]=18;10;IF([.T207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8:.H208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8]=126;70;IF([.T208]=112;70;IF([.T208]=98;70;IF([.T208]=96;60;IF([.T208]=84;60;IF([.T208]=108;60;IF([.T208]=90;50;IF([.T208]=72;40;IF([.T208]=80;40;IF([.T208]=100;50;IF([.T208]=54;30;IF([.T208]=36;20;IF([.T208]=18;10;IF([.T208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09:.H209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09]=126;70;IF([.T209]=112;70;IF([.T209]=98;70;IF([.T209]=96;60;IF([.T209]=84;60;IF([.T209]=108;60;IF([.T209]=90;50;IF([.T209]=72;40;IF([.T209]=80;40;IF([.T209]=100;50;IF([.T209]=54;30;IF([.T209]=36;20;IF([.T209]=18;10;IF([.T209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0:.H210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0]=126;70;IF([.T210]=112;70;IF([.T210]=98;70;IF([.T210]=96;60;IF([.T210]=84;60;IF([.T210]=108;60;IF([.T210]=90;50;IF([.T210]=72;40;IF([.T210]=80;40;IF([.T210]=100;50;IF([.T210]=54;30;IF([.T210]=36;20;IF([.T210]=18;10;IF([.T210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1:.H211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1]=126;70;IF([.T211]=112;70;IF([.T211]=98;70;IF([.T211]=96;60;IF([.T211]=84;60;IF([.T211]=108;60;IF([.T211]=90;50;IF([.T211]=72;40;IF([.T211]=80;40;IF([.T211]=100;50;IF([.T211]=54;30;IF([.T211]=36;20;IF([.T211]=18;10;IF([.T211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2:.H212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2]=126;70;IF([.T212]=112;70;IF([.T212]=98;70;IF([.T212]=96;60;IF([.T212]=84;60;IF([.T212]=108;60;IF([.T212]=90;50;IF([.T212]=72;40;IF([.T212]=80;40;IF([.T212]=100;50;IF([.T212]=54;30;IF([.T212]=36;20;IF([.T212]=18;10;IF([.T212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3:.H213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3]=126;70;IF([.T213]=112;70;IF([.T213]=98;70;IF([.T213]=96;60;IF([.T213]=84;60;IF([.T213]=108;60;IF([.T213]=90;50;IF([.T213]=72;40;IF([.T213]=80;40;IF([.T213]=100;50;IF([.T213]=54;30;IF([.T213]=36;20;IF([.T213]=18;10;IF([.T213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4:.H214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4]=126;70;IF([.T214]=112;70;IF([.T214]=98;70;IF([.T214]=96;60;IF([.T214]=84;60;IF([.T214]=108;60;IF([.T214]=90;50;IF([.T214]=72;40;IF([.T214]=80;40;IF([.T214]=100;50;IF([.T214]=54;30;IF([.T214]=36;20;IF([.T214]=18;10;IF([.T214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22"/>
          <table:table-cell table:style-name="ce6" table:number-columns-repeated="4"/>
          <table:table-cell table:style-name="ce20"/>
          <table:table-cell table:style-name="ce52" table:formula="of:=SUM([.D215:.H215])" office:value-type="float" office:value="0" calcext:value-type="float">
            <text:p>0</text:p>
          </table:table-cell>
          <table:table-cell table:style-name="ce6" table:number-columns-repeated="9"/>
          <table:table-cell table:style-name="ce67" table:formula="of:=IF([.T215]=126;70;IF([.T215]=112;70;IF([.T215]=98;70;IF([.T215]=96;60;IF([.T215]=84;60;IF([.T215]=108;60;IF([.T215]=90;50;IF([.T215]=72;40;IF([.T215]=80;40;IF([.T215]=100;50;IF([.T215]=54;30;IF([.T215]=36;20;IF([.T215]=18;10;IF([.T215]=60;30))))))))))))))" office:value-type="float" office:value="0" calcext:value-type="float">
            <text:p>0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7" table:formula="of:=image(&quot;http://vignette1.wikia.nocookie.net/defenderoftexel/images/0/07/Yinyin_Icon.png/revision/latest?cb=20141216160131&quot;)" office:value-type="string" office:string-value="" calcext:value-type="error">
            <text:p>#NAME?</text:p>
          </table:table-cell>
          <table:table-cell table:style-name="ce13" table:formula="of:=HYPERLINK(&quot;http://defenderoftexel.wikia.com/wiki/Yinyin_-_Aisa_-_Liodys&quot;;&quot;Yinyin&quot;)" office:value-type="string" office:string-value="Yinyin" calcext:value-type="string">
            <text:p>Yinyin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16:.H216])" office:value-type="float" office:value="5" calcext:value-type="float">
            <text:p>5</text:p>
          </table:table-cell>
          <table:table-cell table:style-name="ce61" office:value-type="string" calcext:value-type="string">
            <text:p>Drench</text:p>
          </table:table-cell>
          <table:table-cell table:style-name="ce61" office:value-type="string" calcext:value-type="string">
            <text:p>Single</text:p>
          </table:table-cell>
          <table:table-cell table:style-name="ce61" office:value-type="string" calcext:value-type="string">
            <text:p>Adept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16]=126;70;IF([.T216]=112;70;IF([.T216]=98;70;IF([.T216]=96;60;IF([.T216]=84;60;IF([.T216]=108;60;IF([.T216]=90;50;IF([.T216]=72;40;IF([.T216]=80;40;IF([.T216]=100;50;IF([.T216]=54;30;IF([.T216]=36;20;IF([.T216]=18;10;IF([.T216]=60;30))))))))))))))" office:value-type="float" office:value="40" calcext:value-type="float">
            <text:p>40</text:p>
          </table:table-cell>
          <table:table-cell table:style-name="ce69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d/d5/Aisa_Icon.png/revision/latest?cb=20141216160131&quot;)" office:value-type="string" office:string-value="" calcext:value-type="error">
            <text:p>#NAME?</text:p>
          </table:table-cell>
          <table:table-cell table:style-name="ce13" table:formula="of:=HYPERLINK(&quot;http://defenderoftexel.wikia.com/wiki/Yinyin_-_Aisa_-_Liodys&quot;;&quot;Aisa&quot;)" office:value-type="string" office:string-value="Aisa" calcext:value-type="string">
            <text:p>Ais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17:.H217])" office:value-type="float" office:value="5" calcext:value-type="float">
            <text:p>5</text:p>
          </table:table-cell>
          <table:table-cell table:style-name="ce61" office:value-type="string" calcext:value-type="string">
            <text:p>Icebreak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Adept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17]=126;70;IF([.T217]=112;70;IF([.T217]=98;70;IF([.T217]=96;60;IF([.T217]=84;60;IF([.T217]=108;60;IF([.T217]=90;50;IF([.T217]=72;40;IF([.T217]=80;40;IF([.T217]=100;50;IF([.T217]=54;30;IF([.T217]=36;20;IF([.T217]=18;10;IF([.T217]=60;30))))))))))))))" office:value-type="float" office:value="50" calcext:value-type="float">
            <text:p>50</text:p>
          </table:table-cell>
          <table:table-cell table:style-name="ce69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e/ea/Liodys_Icon.png/revision/latest?cb=20141216160130&quot;)" office:value-type="string" office:string-value="" calcext:value-type="error">
            <text:p>#NAME?</text:p>
          </table:table-cell>
          <table:table-cell table:style-name="ce13" table:formula="of:=HYPERLINK(&quot;http://defenderoftexel.wikia.com/wiki/Yinyin_-_Aisa_-_Liodys&quot;;&quot;Liodys&quot;)" office:value-type="string" office:string-value="Liodys" calcext:value-type="string">
            <text:p>Liody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9790" calcext:value-type="float">
            <text:p>9790</text:p>
          </table:table-cell>
          <table:table-cell table:style-name="ce34" office:value-type="float" office:value="17760" calcext:value-type="float">
            <text:p>17760</text:p>
          </table:table-cell>
          <table:table-cell table:style-name="ce38" office:value-type="float" office:value="5924" calcext:value-type="float">
            <text:p>5924</text:p>
          </table:table-cell>
          <table:table-cell table:style-name="ce42" office:value-type="float" office:value="6700" calcext:value-type="float">
            <text:p>6700</text:p>
          </table:table-cell>
          <table:table-cell table:style-name="ce46" office:value-type="float" office:value="2364" calcext:value-type="float">
            <text:p>2364</text:p>
          </table:table-cell>
          <table:table-cell table:style-name="ce54" table:formula="of:=SUM([.D218:.H218])" office:value-type="float" office:value="42538" calcext:value-type="float">
            <text:p>42538</text:p>
          </table:table-cell>
          <table:table-cell table:style-name="ce61" office:value-type="string" calcext:value-type="string">
            <text:p>Icebreak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Elite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L</text:p>
          </table:table-cell>
          <table:table-cell table:style-name="ce66" office:value-type="float" office:value="4" calcext:value-type="float">
            <text:p>4</text:p>
          </table:table-cell>
          <table:table-cell table:style-name="ce69" table:formula="of:=IF([.T218]=126;70;IF([.T218]=112;70;IF([.T218]=98;70;IF([.T218]=96;60;IF([.T218]=84;60;IF([.T218]=108;60;IF([.T218]=90;50;IF([.T218]=72;40;IF([.T218]=80;40;IF([.T218]=100;50;IF([.T218]=54;30;IF([.T218]=36;20;IF([.T218]=18;10;IF([.T218]=60;30))))))))))))))" office:value-type="float" office:value="70" calcext:value-type="float">
            <text:p>70</text:p>
          </table:table-cell>
          <table:table-cell table:style-name="ce69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5/51/Bludruz_Icon.png/revision/latest?cb=201412161617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Bludruz_-_Sughilo_-_Charok&quot;;&quot;Bludruz&quot;)" office:value-type="string" office:string-value="Bludruz" calcext:value-type="string">
            <text:p>Bludruz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19:.H219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19]=126;70;IF([.T219]=112;70;IF([.T219]=98;70;IF([.T219]=96;60;IF([.T219]=84;60;IF([.T219]=108;60;IF([.T219]=90;50;IF([.T219]=72;40;IF([.T219]=80;40;IF([.T219]=100;50;IF([.T219]=54;30;IF([.T219]=36;20;IF([.T219]=18;10;IF([.T21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9/91/Sughilo_Icon.png/revision/latest?cb=201412161617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Bludruz_-_Sughilo_-_Charok&quot;;&quot;Sughilo&quot;)" office:value-type="string" office:string-value="Sughilo" calcext:value-type="string">
            <text:p>Sughil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20:.H220])" office:value-type="float" office:value="5" calcext:value-type="float">
            <text:p>5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20]=126;70;IF([.T220]=112;70;IF([.T220]=98;70;IF([.T220]=96;60;IF([.T220]=84;60;IF([.T220]=108;60;IF([.T220]=90;50;IF([.T220]=72;40;IF([.T220]=80;40;IF([.T220]=100;50;IF([.T220]=54;30;IF([.T220]=36;20;IF([.T220]=18;10;IF([.T22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4/4d/Charok_Icon.png/revision/latest?cb=201412161617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Bludruz_-_Sughilo_-_Charok&quot;;&quot;Charok&quot;)" office:value-type="string" office:string-value="Charok" calcext:value-type="string">
            <text:p>Charo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339" calcext:value-type="float">
            <text:p>3339</text:p>
          </table:table-cell>
          <table:table-cell table:style-name="ce32" office:value-type="float" office:value="5079" calcext:value-type="float">
            <text:p>5079</text:p>
          </table:table-cell>
          <table:table-cell table:style-name="ce36" office:value-type="float" office:value="1736" calcext:value-type="float">
            <text:p>1736</text:p>
          </table:table-cell>
          <table:table-cell table:style-name="ce40" office:value-type="float" office:value="1046" calcext:value-type="float">
            <text:p>1046</text:p>
          </table:table-cell>
          <table:table-cell table:style-name="ce44" office:value-type="float" office:value="5268" calcext:value-type="float">
            <text:p>5268</text:p>
          </table:table-cell>
          <table:table-cell table:style-name="ce52" table:formula="of:=SUM([.D221:.H221])" office:value-type="float" office:value="16468" calcext:value-type="float">
            <text:p>16468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21]=126;70;IF([.T221]=112;70;IF([.T221]=98;70;IF([.T221]=96;60;IF([.T221]=84;60;IF([.T221]=108;60;IF([.T221]=90;50;IF([.T221]=72;40;IF([.T221]=80;40;IF([.T221]=100;50;IF([.T221]=54;30;IF([.T221]=36;20;IF([.T221]=18;10;IF([.T22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3/34/Breotan_Icon.png/revision/latest?cb=20141216160838&quot;)" office:value-type="string" office:string-value="" calcext:value-type="error">
            <text:p>#NAME?</text:p>
          </table:table-cell>
          <table:table-cell table:style-name="ce13" table:formula="of:=HYPERLINK(&quot;http://defenderoftexel.wikia.com/wiki/Breotan_-_Spliddle_-_Ooberteub&quot;;&quot;Breotan&quot;)" office:value-type="string" office:string-value="Breotan" calcext:value-type="string">
            <text:p>Breota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22:.H222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Theri</text:p>
          </table:table-cell>
          <table:table-cell table:style-name="ce72" office:value-type="string" calcext:value-type="string">
            <text:p>U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22]=126;70;IF([.T222]=112;70;IF([.T222]=98;70;IF([.T222]=96;60;IF([.T222]=84;60;IF([.T222]=108;60;IF([.T222]=90;50;IF([.T222]=72;40;IF([.T222]=80;40;IF([.T222]=100;50;IF([.T222]=54;30;IF([.T222]=36;20;IF([.T222]=18;10;IF([.T222]=60;30))))))))))))))" office:value-type="float" office:value="20" calcext:value-type="float">
            <text:p>20</text:p>
          </table:table-cell>
          <table:table-cell table:style-name="ce69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f/f7/Spliddle_Icon.png/revision/latest?cb=20141216160838&quot;)" office:value-type="string" office:string-value="" calcext:value-type="error">
            <text:p>#NAME?</text:p>
          </table:table-cell>
          <table:table-cell table:style-name="ce13" table:formula="of:=HYPERLINK(&quot;http://defenderoftexel.wikia.com/wiki/Breotan_-_Spliddle_-_Ooberteub&quot;;&quot;Spiddle&quot;)" office:value-type="string" office:string-value="Spiddle" calcext:value-type="string">
            <text:p>Spiddl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23:.H223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Theri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23]=126;70;IF([.T223]=112;70;IF([.T223]=98;70;IF([.T223]=96;60;IF([.T223]=84;60;IF([.T223]=108;60;IF([.T223]=90;50;IF([.T223]=72;40;IF([.T223]=80;40;IF([.T223]=100;50;IF([.T223]=54;30;IF([.T223]=36;20;IF([.T223]=18;10;IF([.T223]=60;30))))))))))))))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4.wikia.nocookie.net/defenderoftexel/images/0/0e/Ooberteub_Icon.png/revision/latest?cb=20141216160837&quot;)" office:value-type="string" office:string-value="" calcext:value-type="error">
            <text:p>#NAME?</text:p>
          </table:table-cell>
          <table:table-cell table:style-name="ce13" table:formula="of:=HYPERLINK(&quot;http://defenderoftexel.wikia.com/wiki/Breotan_-_Spliddle_-_Ooberteub&quot;;&quot;Oobereub&quot;)" office:value-type="string" office:string-value="Oobereub" calcext:value-type="string">
            <text:p>Oobereub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3568" calcext:value-type="float">
            <text:p>3568</text:p>
          </table:table-cell>
          <table:table-cell table:style-name="ce34" office:value-type="float" office:value="4497" calcext:value-type="float">
            <text:p>4497</text:p>
          </table:table-cell>
          <table:table-cell table:style-name="ce38" office:value-type="float" office:value="1179" calcext:value-type="float">
            <text:p>1179</text:p>
          </table:table-cell>
          <table:table-cell table:style-name="ce42" office:value-type="float" office:value="4102" calcext:value-type="float">
            <text:p>4102</text:p>
          </table:table-cell>
          <table:table-cell table:style-name="ce46" office:value-type="float" office:value="783" calcext:value-type="float">
            <text:p>783</text:p>
          </table:table-cell>
          <table:table-cell table:style-name="ce54" table:formula="of:=SUM([.D224:.H224])" office:value-type="float" office:value="14129" calcext:value-type="float">
            <text:p>14129</text:p>
          </table:table-cell>
          <table:table-cell table:style-name="ce61" office:value-type="string" calcext:value-type="string">
            <text:p>Flodd</text:p>
          </table:table-cell>
          <table:table-cell table:style-name="ce61" office:value-type="string" calcext:value-type="string">
            <text:p>Single</text:p>
          </table:table-cell>
          <table:table-cell table:style-name="ce61" office:value-type="string" calcext:value-type="string">
            <text:p>Adept</text:p>
          </table:table-cell>
          <table:table-cell table:style-name="ce66" office:value-type="float" office:value="0" calcext:value-type="float">
            <text:p>0</text:p>
          </table:table-cell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Theri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24]=126;70;IF([.T224]=112;70;IF([.T224]=98;70;IF([.T224]=96;60;IF([.T224]=84;60;IF([.T224]=108;60;IF([.T224]=90;50;IF([.T224]=72;40;IF([.T224]=80;40;IF([.T224]=100;50;IF([.T224]=54;30;IF([.T224]=36;20;IF([.T224]=18;10;IF([.T224]=60;30))))))))))))))" office:value-type="float" office:value="40" calcext:value-type="float">
            <text:p>40</text:p>
          </table:table-cell>
          <table:table-cell table:style-name="ce69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0/09/Pelznikel_Icon.png/revision/latest?cb=20141216162555&quot;)" office:value-type="string" office:string-value="" calcext:value-type="error">
            <text:p>#NAME?</text:p>
          </table:table-cell>
          <table:table-cell table:style-name="ce13" table:formula="of:=HYPERLINK(&quot;http://defenderoftexel.wikia.com/wiki/Pelznikel_-_Snorri_-_Jolfaor_Greenman&quot;;&quot;Pelnikel&quot;)" office:value-type="string" office:string-value="Pelnikel" calcext:value-type="string">
            <text:p>Pelnikel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25:.H225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Guru</text:p>
          </table:table-cell>
          <table:table-cell table:style-name="ce69" office:value-type="string" calcext:value-type="string">
            <text:p>Earth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25]=126;70;IF([.T225]=112;70;IF([.T225]=98;70;IF([.T225]=96;60;IF([.T225]=84;60;IF([.T225]=108;60;IF([.T225]=90;50;IF([.T225]=72;40;IF([.T225]=80;40;IF([.T225]=100;50;IF([.T225]=54;30;IF([.T225]=36;20;IF([.T225]=18;10;IF([.T225]=60;30))))))))))))))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c/cb/Snorri_Icon.png/revision/latest?cb=20141216162555&quot;)" office:value-type="string" office:string-value="" calcext:value-type="error">
            <text:p>#NAME?</text:p>
          </table:table-cell>
          <table:table-cell table:style-name="ce13" table:formula="of:=HYPERLINK(&quot;http://defenderoftexel.wikia.com/wiki/Pelznikel_-_Snorri_-_Jolfaor_Greenman&quot;;&quot;Snorri&quot;)" office:value-type="string" office:string-value="Snorri" calcext:value-type="string">
            <text:p>Snorri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26:.H226])" office:value-type="float" office:value="5" calcext:value-type="float">
            <text:p>5</text:p>
          </table:table-cell>
          <table:table-cell table:style-name="ce61" office:value-type="string" calcext:value-type="string">
            <text:p>Ramble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Adept</text:p>
          </table:table-cell>
          <table:table-cell table:style-name="ce7"/>
          <table:table-cell table:style-name="ce69" office:value-type="string" calcext:value-type="string">
            <text:p>Guru</text:p>
          </table:table-cell>
          <table:table-cell table:style-name="ce69" office:value-type="string" calcext:value-type="string">
            <text:p>Earth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26]=126;70;IF([.T226]=112;70;IF([.T226]=98;70;IF([.T226]=96;60;IF([.T226]=84;60;IF([.T226]=108;60;IF([.T226]=90;50;IF([.T226]=72;40;IF([.T226]=80;40;IF([.T226]=100;50;IF([.T226]=54;30;IF([.T226]=36;20;IF([.T226]=18;10;IF([.T226]=60;30))))))))))))))" office:value-type="float" office:value="40" calcext:value-type="float">
            <text:p>40</text:p>
          </table:table-cell>
          <table:table-cell table:style-name="ce69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e/e9/Jolfaor_Greenman_Icon.png/revision/latest?cb=20141216162555&quot;)" office:value-type="string" office:string-value="" calcext:value-type="error">
            <text:p>#NAME?</text:p>
          </table:table-cell>
          <table:table-cell table:style-name="ce13" table:formula="of:=HYPERLINK(&quot;http://defenderoftexel.wikia.com/wiki/Pelznikel_-_Snorri_-_Jolfaor_Greenman&quot;;&quot;Greenman&quot;)" office:value-type="string" office:string-value="Greenman" calcext:value-type="string">
            <text:p>Greenman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0136" calcext:value-type="float">
            <text:p>10136</text:p>
          </table:table-cell>
          <table:table-cell table:style-name="ce34" office:value-type="float" office:value="1348" calcext:value-type="float">
            <text:p>1348</text:p>
          </table:table-cell>
          <table:table-cell table:style-name="ce38" office:value-type="float" office:value="3624" calcext:value-type="float">
            <text:p>3624</text:p>
          </table:table-cell>
          <table:table-cell table:style-name="ce42" office:value-type="float" office:value="20775" calcext:value-type="float">
            <text:p>20775</text:p>
          </table:table-cell>
          <table:table-cell table:style-name="ce46" office:value-type="float" office:value="6882" calcext:value-type="float">
            <text:p>6882</text:p>
          </table:table-cell>
          <table:table-cell table:style-name="ce54" table:formula="of:=SUM([.D227:.H227])" office:value-type="float" office:value="42765" calcext:value-type="float">
            <text:p>42765</text:p>
          </table:table-cell>
          <table:table-cell table:style-name="ce61" office:value-type="string" calcext:value-type="string">
            <text:p>Ramble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Elite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Guru</text:p>
          </table:table-cell>
          <table:table-cell table:style-name="ce69" office:value-type="string" calcext:value-type="string">
            <text:p>Earth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L</text:p>
          </table:table-cell>
          <table:table-cell table:style-name="ce66" office:value-type="float" office:value="4" calcext:value-type="float">
            <text:p>4</text:p>
          </table:table-cell>
          <table:table-cell table:style-name="ce69" table:formula="of:=IF([.T227]=126;70;IF([.T227]=112;70;IF([.T227]=98;70;IF([.T227]=96;60;IF([.T227]=84;60;IF([.T227]=108;60;IF([.T227]=90;50;IF([.T227]=72;40;IF([.T227]=80;40;IF([.T227]=100;50;IF([.T227]=54;30;IF([.T227]=36;20;IF([.T227]=18;10;IF([.T227]=60;30))))))))))))))" office:value-type="float" office:value="60" calcext:value-type="float">
            <text:p>60</text:p>
          </table:table-cell>
          <table:table-cell table:style-name="ce69" office:value-type="float" office:value="108" calcext:value-type="float">
            <text:p>10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a/ab/Murina_Icon.png/revision/latest?cb=20141223155205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rina_-_Suvin_-_Magin&quot;;&quot;Murina&quot;)" office:value-type="string" office:string-value="Murina" calcext:value-type="string">
            <text:p>Murin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28:.H228])" office:value-type="float" office:value="5" calcext:value-type="float">
            <text:p>5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28]=126;70;IF([.T228]=112;70;IF([.T228]=98;70;IF([.T228]=96;60;IF([.T228]=84;60;IF([.T228]=108;60;IF([.T228]=90;50;IF([.T228]=72;40;IF([.T228]=80;40;IF([.T228]=100;50;IF([.T228]=54;30;IF([.T228]=36;20;IF([.T228]=18;10;IF([.T228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a/aa/Suvin_Icon.png/revision/latest?cb=20141223155159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rina_-_Suvin_-_Magin&quot;;&quot;Suvin&quot;)" office:value-type="string" office:string-value="Suvin" calcext:value-type="string">
            <text:p>Suvi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29:.H229])" office:value-type="float" office:value="5" calcext:value-type="float">
            <text:p>5</text:p>
          </table:table-cell>
          <table:table-cell table:style-name="ce59" office:value-type="string" calcext:value-type="string">
            <text:p>Swoo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29]=126;70;IF([.T229]=112;70;IF([.T229]=98;70;IF([.T229]=96;60;IF([.T229]=84;60;IF([.T229]=108;60;IF([.T229]=90;50;IF([.T229]=72;40;IF([.T229]=80;40;IF([.T229]=100;50;IF([.T229]=54;30;IF([.T229]=36;20;IF([.T229]=18;10;IF([.T229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c/cd/Magin_Icon.png/revision/latest?cb=201412231551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rina_-_Suvin_-_Magin&quot;;&quot;Magin&quot;)" office:value-type="string" office:string-value="Magin" calcext:value-type="string">
            <text:p>Magi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8788" calcext:value-type="float">
            <text:p>8788</text:p>
          </table:table-cell>
          <table:table-cell table:style-name="ce32" office:value-type="float" office:value="13383" calcext:value-type="float">
            <text:p>13383</text:p>
          </table:table-cell>
          <table:table-cell table:style-name="ce36" office:value-type="float" office:value="4588" calcext:value-type="float">
            <text:p>4588</text:p>
          </table:table-cell>
          <table:table-cell table:style-name="ce40" office:value-type="float" office:value="2788" calcext:value-type="float">
            <text:p>2788</text:p>
          </table:table-cell>
          <table:table-cell table:style-name="ce44" office:value-type="float" office:value="13879" calcext:value-type="float">
            <text:p>13879</text:p>
          </table:table-cell>
          <table:table-cell table:style-name="ce52" table:formula="of:=SUM([.D230:.H230])" office:value-type="float" office:value="43426" calcext:value-type="float">
            <text:p>43426</text:p>
          </table:table-cell>
          <table:table-cell table:style-name="ce59" office:value-type="string" calcext:value-type="string">
            <text:p>Swoo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230]=126;70;IF([.T230]=112;70;IF([.T230]=98;70;IF([.T230]=96;60;IF([.T230]=84;60;IF([.T230]=108;60;IF([.T230]=90;50;IF([.T230]=72;40;IF([.T230]=80;40;IF([.T230]=100;50;IF([.T230]=54;30;IF([.T230]=36;20;IF([.T230]=18;10;IF([.T230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d/d9/Lou-Izza_Icon.png/revision/latest?cb=20141223155942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u-Izza_-_Godey_-_Austinius&quot;;&quot;Lou-Izza&quot;)" office:value-type="string" office:string-value="Lou-Izza" calcext:value-type="string">
            <text:p>Lou-Izz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1:.H231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1]=126;70;IF([.T231]=112;70;IF([.T231]=98;70;IF([.T231]=96;60;IF([.T231]=84;60;IF([.T231]=108;60;IF([.T231]=90;50;IF([.T231]=72;40;IF([.T231]=80;40;IF([.T231]=100;50;IF([.T231]=54;30;IF([.T231]=36;20;IF([.T231]=18;10;IF([.T23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5/51/Godey_Icon.png/revision/latest?cb=20141223155942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u-Izza_-_Godey_-_Austinius&quot;;&quot;Godey&quot;)" office:value-type="string" office:string-value="Godey" calcext:value-type="string">
            <text:p>Gode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2:.H232])" office:value-type="float" office:value="5" calcext:value-type="float">
            <text:p>5</text:p>
          </table:table-cell>
          <table:table-cell table:style-name="ce59" office:value-type="string" calcext:value-type="string">
            <text:p>Elfin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2]=126;70;IF([.T232]=112;70;IF([.T232]=98;70;IF([.T232]=96;60;IF([.T232]=84;60;IF([.T232]=108;60;IF([.T232]=90;50;IF([.T232]=72;40;IF([.T232]=80;40;IF([.T232]=100;50;IF([.T232]=54;30;IF([.T232]=36;20;IF([.T232]=18;10;IF([.T232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c/c6/Austinius_Icon.png/revision/latest?cb=20141223155942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u-Izza_-_Godey_-_Austinius&quot;;&quot;Austinius&quot;)" office:value-type="string" office:string-value="Austinius" calcext:value-type="string">
            <text:p>Austini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219" calcext:value-type="float">
            <text:p>3219</text:p>
          </table:table-cell>
          <table:table-cell table:style-name="ce32" office:value-type="float" office:value="5253" calcext:value-type="float">
            <text:p>5253</text:p>
          </table:table-cell>
          <table:table-cell table:style-name="ce36" office:value-type="float" office:value="2674" calcext:value-type="float">
            <text:p>2674</text:p>
          </table:table-cell>
          <table:table-cell table:style-name="ce40" office:value-type="float" office:value="4205" calcext:value-type="float">
            <text:p>4205</text:p>
          </table:table-cell>
          <table:table-cell table:style-name="ce44" office:value-type="float" office:value="514" calcext:value-type="float">
            <text:p>514</text:p>
          </table:table-cell>
          <table:table-cell table:style-name="ce52" table:formula="of:=SUM([.D233:.H233])" office:value-type="float" office:value="15865" calcext:value-type="float">
            <text:p>15865</text:p>
          </table:table-cell>
          <table:table-cell table:style-name="ce59" office:value-type="string" calcext:value-type="string">
            <text:p>Elfin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3]=126;70;IF([.T233]=112;70;IF([.T233]=98;70;IF([.T233]=96;60;IF([.T233]=84;60;IF([.T233]=108;60;IF([.T233]=90;50;IF([.T233]=72;40;IF([.T233]=80;40;IF([.T233]=100;50;IF([.T233]=54;30;IF([.T233]=36;20;IF([.T233]=18;10;IF([.T23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8/80/Maslu_Icon.png/revision/latest?cb=20141223165603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slu_-_Senbar_-_Lulim-Nisig&quot;;&quot;Maslu&quot;)" office:value-type="string" office:string-value="Maslu" calcext:value-type="string">
            <text:p>Masl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4:.H234])" office:value-type="float" office:value="5" calcext:value-type="float">
            <text:p>5</text:p>
          </table:table-cell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4]=126;70;IF([.T234]=112;70;IF([.T234]=98;70;IF([.T234]=96;60;IF([.T234]=84;60;IF([.T234]=108;60;IF([.T234]=90;50;IF([.T234]=72;40;IF([.T234]=80;40;IF([.T234]=100;50;IF([.T234]=54;30;IF([.T234]=36;20;IF([.T234]=18;10;IF([.T23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8/88/Senbar_Icon.png/revision/latest?cb=201412231610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slu_-_Senbar_-_Lulim-Nisig&quot;;&quot;Senbar&quot;)" office:value-type="string" office:string-value="Senbar" calcext:value-type="string">
            <text:p>Senba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5:.H235])" office:value-type="float" office:value="5" calcext:value-type="float">
            <text:p>5</text:p>
          </table:table-cell>
          <table:table-cell table:style-name="ce59" office:value-type="string" calcext:value-type="string">
            <text:p>Sweethart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5]=126;70;IF([.T235]=112;70;IF([.T235]=98;70;IF([.T235]=96;60;IF([.T235]=84;60;IF([.T235]=108;60;IF([.T235]=90;50;IF([.T235]=72;40;IF([.T235]=80;40;IF([.T235]=100;50;IF([.T235]=54;30;IF([.T235]=36;20;IF([.T235]=18;10;IF([.T23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3/3e/Lulim-Nisig_Icon.png/revision/latest?cb=20141223161017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slu_-_Senbar_-_Lulim-Nisig&quot;;&quot;Lulim-Nisig&quot;)" office:value-type="string" office:string-value="Lulim-Nisig" calcext:value-type="string">
            <text:p>Lulim-Nisi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138" calcext:value-type="float">
            <text:p>2138</text:p>
          </table:table-cell>
          <table:table-cell table:style-name="ce32" office:value-type="float" office:value="1503" calcext:value-type="float">
            <text:p>1503</text:p>
          </table:table-cell>
          <table:table-cell table:style-name="ce36" office:value-type="float" office:value="970" calcext:value-type="float">
            <text:p>970</text:p>
          </table:table-cell>
          <table:table-cell table:style-name="ce40" office:value-type="float" office:value="6155" calcext:value-type="float">
            <text:p>6155</text:p>
          </table:table-cell>
          <table:table-cell table:style-name="ce44" office:value-type="float" office:value="5860" calcext:value-type="float">
            <text:p>5860</text:p>
          </table:table-cell>
          <table:table-cell table:style-name="ce52" table:formula="of:=SUM([.D236:.H236])" office:value-type="float" office:value="16626" calcext:value-type="float">
            <text:p>16626</text:p>
          </table:table-cell>
          <table:table-cell table:style-name="ce59" office:value-type="string" calcext:value-type="string">
            <text:p>Sweethart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6]=126;70;IF([.T236]=112;70;IF([.T236]=98;70;IF([.T236]=96;60;IF([.T236]=84;60;IF([.T236]=108;60;IF([.T236]=90;50;IF([.T236]=72;40;IF([.T236]=80;40;IF([.T236]=100;50;IF([.T236]=54;30;IF([.T236]=36;20;IF([.T236]=18;10;IF([.T23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a/ae/Kris_Icon.png/revision/latest?cb=20141223162239&quot;)" office:value-type="string" office:string-value="" calcext:value-type="error">
            <text:p>#NAME?</text:p>
          </table:table-cell>
          <table:table-cell table:style-name="ce11" table:formula="of:=HYPERLINK(&quot;http://defenderoftexel.wikia.com/wiki/Kris_-_Nikolaos_-_Zinniklos&quot;;&quot;Kris&quot;)" office:value-type="string" office:string-value="Kris" calcext:value-type="string">
            <text:p>Kri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7:.H237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7]=126;70;IF([.T237]=112;70;IF([.T237]=98;70;IF([.T237]=96;60;IF([.T237]=84;60;IF([.T237]=108;60;IF([.T237]=90;50;IF([.T237]=72;40;IF([.T237]=80;40;IF([.T237]=100;50;IF([.T237]=54;30;IF([.T237]=36;20;IF([.T237]=18;10;IF([.T23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2/27/Nikolaos_Icon.png/revision/latest?cb=20141223162239&quot;)" office:value-type="string" office:string-value="" calcext:value-type="error">
            <text:p>#NAME?</text:p>
          </table:table-cell>
          <table:table-cell table:style-name="ce11" table:formula="of:=HYPERLINK(&quot;http://defenderoftexel.wikia.com/wiki/Kris_-_Nikolaos_-_Zinniklos&quot;;&quot;Nikolaos&quot;)" office:value-type="string" office:string-value="Nikolaos" calcext:value-type="string">
            <text:p>Nikolao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38:.H238])" office:value-type="float" office:value="5" calcext:value-type="float">
            <text:p>5</text:p>
          </table:table-cell>
          <table:table-cell table:style-name="ce59" office:value-type="string" calcext:value-type="string">
            <text:p>Merrymake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8]=126;70;IF([.T238]=112;70;IF([.T238]=98;70;IF([.T238]=96;60;IF([.T238]=84;60;IF([.T238]=108;60;IF([.T238]=90;50;IF([.T238]=72;40;IF([.T238]=80;40;IF([.T238]=100;50;IF([.T238]=54;30;IF([.T238]=36;20;IF([.T238]=18;10;IF([.T23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4/41/Zinniklos_Icon.png/revision/latest?cb=2014122316223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ris_-_Nikolaos_-_Zinniklos&quot;;&quot;Zinniklos&quot;)" office:value-type="string" office:string-value="Zinniklos" calcext:value-type="string">
            <text:p>Zinniklo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030" calcext:value-type="float">
            <text:p>3030</text:p>
          </table:table-cell>
          <table:table-cell table:style-name="ce32" office:value-type="float" office:value="7045" calcext:value-type="float">
            <text:p>7045</text:p>
          </table:table-cell>
          <table:table-cell table:style-name="ce36" office:value-type="float" office:value="1539" calcext:value-type="float">
            <text:p>1539</text:p>
          </table:table-cell>
          <table:table-cell table:style-name="ce40" office:value-type="float" office:value="6689" calcext:value-type="float">
            <text:p>6689</text:p>
          </table:table-cell>
          <table:table-cell table:style-name="ce44" office:value-type="float" office:value="2039" calcext:value-type="float">
            <text:p>2039</text:p>
          </table:table-cell>
          <table:table-cell table:style-name="ce52" table:formula="of:=SUM([.D239:.H239])" office:value-type="float" office:value="20342" calcext:value-type="float">
            <text:p>20342</text:p>
          </table:table-cell>
          <table:table-cell table:style-name="ce59" office:value-type="string" calcext:value-type="string">
            <text:p>Merrymake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39]=126;70;IF([.T239]=112;70;IF([.T239]=98;70;IF([.T239]=96;60;IF([.T239]=84;60;IF([.T239]=108;60;IF([.T239]=90;50;IF([.T239]=72;40;IF([.T239]=80;40;IF([.T239]=100;50;IF([.T239]=54;30;IF([.T239]=36;20;IF([.T239]=18;10;IF([.T23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2/25/Gud_Icon.png/revision/latest?cb=20141225035123&quot;)" office:value-type="string" office:string-value="" calcext:value-type="error">
            <text:p>#NAME?</text:p>
          </table:table-cell>
          <table:table-cell table:style-name="ce11" table:formula="of:=HYPERLINK(&quot;http://defenderoftexel.wikia.com/wiki/%3F%3F%3F_-_Suguguud_-_%3F%3F%3F&quot;;&quot;Gud&quot;)" office:value-type="string" office:string-value="Gud" calcext:value-type="string">
            <text:p>Gu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0:.H240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0]=126;70;IF([.T240]=112;70;IF([.T240]=98;70;IF([.T240]=96;60;IF([.T240]=84;60;IF([.T240]=108;60;IF([.T240]=90;50;IF([.T240]=72;40;IF([.T240]=80;40;IF([.T240]=100;50;IF([.T240]=54;30;IF([.T240]=36;20;IF([.T240]=18;10;IF([.T24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e/ef/Suguguud_Icon.png/revision/latest?cb=201412231521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%3F%3F%3F_-_Suguguud_-_%3F%3F%3F&quot;;&quot;Suguguud&quot;)" office:value-type="string" office:string-value="Suguguud" calcext:value-type="string">
            <text:p>Suguguu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1:.H241])" office:value-type="float" office:value="5" calcext:value-type="float">
            <text:p>5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1]=126;70;IF([.T241]=112;70;IF([.T241]=98;70;IF([.T241]=96;60;IF([.T241]=84;60;IF([.T241]=108;60;IF([.T241]=90;50;IF([.T241]=72;40;IF([.T241]=80;40;IF([.T241]=100;50;IF([.T241]=54;30;IF([.T241]=36;20;IF([.T241]=18;10;IF([.T241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2/2d/Eme-Gilimma_Icon.png/revision/latest?cb=20141225035149&quot;)" office:value-type="string" office:string-value="" calcext:value-type="error">
            <text:p>#NAME?</text:p>
          </table:table-cell>
          <table:table-cell table:style-name="ce11" table:formula="of:=HYPERLINK(&quot;http://defenderoftexel.wikia.com/wiki/%3F%3F%3F_-_Suguguud_-_%3F%3F%3F&quot;;&quot;Eme-Gilimma&quot;)" office:value-type="string" office:string-value="Eme-Gilimma" calcext:value-type="string">
            <text:p>Eme-Gilimm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2:.H242])" office:value-type="float" office:value="5" calcext:value-type="float">
            <text:p>5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2]=126;70;IF([.T242]=112;70;IF([.T242]=98;70;IF([.T242]=96;60;IF([.T242]=84;60;IF([.T242]=108;60;IF([.T242]=90;50;IF([.T242]=72;40;IF([.T242]=80;40;IF([.T242]=100;50;IF([.T242]=54;30;IF([.T242]=36;20;IF([.T242]=18;10;IF([.T24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d/d7/Titus_Icon.png/revision/latest?cb=20141229010902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tus_-_Aengus_-_Konan&quot;;&quot;Titus&quot;)" office:value-type="string" office:string-value="Titus" calcext:value-type="string">
            <text:p>Titus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194" calcext:value-type="float">
            <text:p>1194</text:p>
          </table:table-cell>
          <table:table-cell table:style-name="ce32" office:value-type="float" office:value="684" calcext:value-type="float">
            <text:p>684</text:p>
          </table:table-cell>
          <table:table-cell table:style-name="ce36" office:value-type="float" office:value="807" calcext:value-type="float">
            <text:p>807</text:p>
          </table:table-cell>
          <table:table-cell table:style-name="ce40" office:value-type="float" office:value="3379" calcext:value-type="float">
            <text:p>3379</text:p>
          </table:table-cell>
          <table:table-cell table:style-name="ce44" office:value-type="float" office:value="4299" calcext:value-type="float">
            <text:p>4299</text:p>
          </table:table-cell>
          <table:table-cell table:style-name="ce52" table:formula="of:=SUM([.D243:.H243])" office:value-type="float" office:value="10363" calcext:value-type="float">
            <text:p>10363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3]=126;70;IF([.T243]=112;70;IF([.T243]=98;70;IF([.T243]=96;60;IF([.T243]=84;60;IF([.T243]=108;60;IF([.T243]=90;50;IF([.T243]=72;40;IF([.T243]=80;40;IF([.T243]=100;50;IF([.T243]=54;30;IF([.T243]=36;20;IF([.T243]=18;10;IF([.T243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a/a5/Aengus_Icon.png/revision/latest?cb=20141229011022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tus_-_Aengus_-_Konan&quot;;&quot;Aengus&quot;)" office:value-type="string" office:string-value="Aengus" calcext:value-type="string">
            <text:p>Aengus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364" calcext:value-type="float">
            <text:p>2364</text:p>
          </table:table-cell>
          <table:table-cell table:style-name="ce32" office:value-type="float" office:value="1380" calcext:value-type="float">
            <text:p>1380</text:p>
          </table:table-cell>
          <table:table-cell table:style-name="ce36" office:value-type="float" office:value="1617" calcext:value-type="float">
            <text:p>1617</text:p>
          </table:table-cell>
          <table:table-cell table:style-name="ce40" office:value-type="float" office:value="6355" calcext:value-type="float">
            <text:p>6355</text:p>
          </table:table-cell>
          <table:table-cell table:style-name="ce44" office:value-type="float" office:value="7959" calcext:value-type="float">
            <text:p>7959</text:p>
          </table:table-cell>
          <table:table-cell table:style-name="ce52" table:formula="of:=SUM([.D244:.H244])" office:value-type="float" office:value="19675" calcext:value-type="float">
            <text:p>19675</text:p>
          </table:table-cell>
          <table:table-cell table:style-name="ce59" office:value-type="string" calcext:value-type="string">
            <text:p>Mistlefo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4]=126;70;IF([.T244]=112;70;IF([.T244]=98;70;IF([.T244]=96;60;IF([.T244]=84;60;IF([.T244]=108;60;IF([.T244]=90;50;IF([.T244]=72;40;IF([.T244]=80;40;IF([.T244]=100;50;IF([.T244]=54;30;IF([.T244]=36;20;IF([.T244]=18;10;IF([.T244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8/84/Konan_Icon.png/revision/latest?cb=20141229011116&quot;)" office:value-type="string" office:string-value="" calcext:value-type="error">
            <text:p>#NAME?</text:p>
          </table:table-cell>
          <table:table-cell table:style-name="ce11" table:formula="of:=HYPERLINK(&quot;http://defenderoftexel.wikia.com/wiki/Titus_-_Aengus_-_Konan&quot;;&quot;Konan&quot;)" office:value-type="string" office:string-value="Konan" calcext:value-type="string">
            <text:p>Kona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5072" calcext:value-type="float">
            <text:p>5072</text:p>
          </table:table-cell>
          <table:table-cell table:style-name="ce32" office:value-type="float" office:value="2979" calcext:value-type="float">
            <text:p>2979</text:p>
          </table:table-cell>
          <table:table-cell table:style-name="ce36" office:value-type="float" office:value="3486" calcext:value-type="float">
            <text:p>3486</text:p>
          </table:table-cell>
          <table:table-cell table:style-name="ce40" office:value-type="float" office:value="13647" calcext:value-type="float">
            <text:p>13647</text:p>
          </table:table-cell>
          <table:table-cell table:style-name="ce44" office:value-type="float" office:value="17146" calcext:value-type="float">
            <text:p>17146</text:p>
          </table:table-cell>
          <table:table-cell table:style-name="ce52" table:formula="of:=SUM([.D245:.H245])" office:value-type="float" office:value="42330" calcext:value-type="float">
            <text:p>42330</text:p>
          </table:table-cell>
          <table:table-cell table:style-name="ce59" office:value-type="string" calcext:value-type="string">
            <text:p>Mistlefo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245]=126;70;IF([.T245]=112;70;IF([.T245]=98;70;IF([.T245]=96;60;IF([.T245]=84;60;IF([.T245]=108;60;IF([.T245]=90;50;IF([.T245]=72;40;IF([.T245]=80;40;IF([.T245]=100;50;IF([.T245]=54;30;IF([.T245]=36;20;IF([.T245]=18;10;IF([.T245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5/56/Iv_Icon.png/revision/latest?cb=20141230160803&quot;)" office:value-type="string" office:string-value="" calcext:value-type="error">
            <text:p>#NAME?</text:p>
          </table:table-cell>
          <table:table-cell table:style-name="ce11" table:formula="of:=HYPERLINK(&quot;http://defenderoftexel.wikia.com/wiki/Iv_-_Sibert_-_Saxan&quot;;&quot;Iv&quot;)" office:value-type="string" office:string-value="Iv" calcext:value-type="string">
            <text:p>Iv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6:.H246])" office:value-type="float" office:value="5" calcext:value-type="float">
            <text:p>5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6]=126;70;IF([.T246]=112;70;IF([.T246]=98;70;IF([.T246]=96;60;IF([.T246]=84;60;IF([.T246]=108;60;IF([.T246]=90;50;IF([.T246]=72;40;IF([.T246]=80;40;IF([.T246]=100;50;IF([.T246]=54;30;IF([.T246]=36;20;IF([.T246]=18;10;IF([.T246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b/b8/Sibert_Icon.png/revision/latest?cb=20141230160846&quot;)" office:value-type="string" office:string-value="" calcext:value-type="error">
            <text:p>#NAME?</text:p>
          </table:table-cell>
          <table:table-cell table:style-name="ce11" table:formula="of:=HYPERLINK(&quot;http://defenderoftexel.wikia.com/wiki/Iv_-_Sibert_-_Saxan&quot;;&quot;Sibert&quot;)" office:value-type="string" office:string-value="Sibert" calcext:value-type="string">
            <text:p>Sibert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7:.H247])" office:value-type="float" office:value="5" calcext:value-type="float">
            <text:p>5</text:p>
          </table:table-cell>
          <table:table-cell table:style-name="ce59" office:value-type="string" calcext:value-type="string">
            <text:p>Lupa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7]=126;70;IF([.T247]=112;70;IF([.T247]=98;70;IF([.T247]=96;60;IF([.T247]=84;60;IF([.T247]=108;60;IF([.T247]=90;50;IF([.T247]=72;40;IF([.T247]=80;40;IF([.T247]=100;50;IF([.T247]=54;30;IF([.T247]=36;20;IF([.T247]=18;10;IF([.T247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6/66/Saxan_Icon.png/revision/latest?cb=20141230160940&quot;)" office:value-type="string" office:string-value="" calcext:value-type="error">
            <text:p>#NAME?</text:p>
          </table:table-cell>
          <table:table-cell table:style-name="ce11" table:formula="of:=HYPERLINK(&quot;http://defenderoftexel.wikia.com/wiki/Iv_-_Sibert_-_Saxan&quot;;&quot;Saxan&quot;)" office:value-type="string" office:string-value="Saxan" calcext:value-type="string">
            <text:p>Saxa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052" calcext:value-type="float">
            <text:p>2052</text:p>
          </table:table-cell>
          <table:table-cell table:style-name="ce32" office:value-type="float" office:value="3588" calcext:value-type="float">
            <text:p>3588</text:p>
          </table:table-cell>
          <table:table-cell table:style-name="ce36" office:value-type="float" office:value="1890" calcext:value-type="float">
            <text:p>1890</text:p>
          </table:table-cell>
          <table:table-cell table:style-name="ce40" office:value-type="float" office:value="22186" calcext:value-type="float">
            <text:p>22186</text:p>
          </table:table-cell>
          <table:table-cell table:style-name="ce44" office:value-type="float" office:value="16326" calcext:value-type="float">
            <text:p>16326</text:p>
          </table:table-cell>
          <table:table-cell table:style-name="ce52" table:formula="of:=SUM([.D248:.H248])" office:value-type="float" office:value="46042" calcext:value-type="float">
            <text:p>46042</text:p>
          </table:table-cell>
          <table:table-cell table:style-name="ce59" office:value-type="string" calcext:value-type="string">
            <text:p>Lupa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248]=126;70;IF([.T248]=112;70;IF([.T248]=98;70;IF([.T248]=96;60;IF([.T248]=84;60;IF([.T248]=108;60;IF([.T248]=90;50;IF([.T248]=72;40;IF([.T248]=80;40;IF([.T248]=100;50;IF([.T248]=54;30;IF([.T248]=36;20;IF([.T248]=18;10;IF([.T248]=60;30))))))))))))))" office:value-type="float" office:value="60" calcext:value-type="float">
            <text:p>60</text:p>
          </table:table-cell>
          <table:table-cell table:style-name="ce67" office:value-type="float" office:value="108" calcext:value-type="float">
            <text:p>10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7/7f/Qaton_Icon.png/revision/latest?cb=20141230190910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ton_-_Sirhitu_-_Esemtu-Ezzu&quot;;&quot;Qaton&quot;)" office:value-type="string" office:string-value="Qaton" calcext:value-type="string">
            <text:p>Qato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49:.H249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49]=126;70;IF([.T249]=112;70;IF([.T249]=98;70;IF([.T249]=96;60;IF([.T249]=84;60;IF([.T249]=108;60;IF([.T249]=90;50;IF([.T249]=72;40;IF([.T249]=80;40;IF([.T249]=100;50;IF([.T249]=54;30;IF([.T249]=36;20;IF([.T249]=18;10;IF([.T24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1/11/Sirhitu_Icon.png/revision/latest?cb=20141231154223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ton_-_Sirhitu_-_Esemtu-Ezzu&quot;;&quot;Sirhitu&quot;)" office:value-type="string" office:string-value="Sirhitu" calcext:value-type="string">
            <text:p>Sirhit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0:.H250])" office:value-type="float" office:value="5" calcext:value-type="float">
            <text:p>5</text:p>
          </table:table-cell>
          <table:table-cell table:style-name="ce59" office:value-type="string" calcext:value-type="string">
            <text:p>Sipho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0]=126;70;IF([.T250]=112;70;IF([.T250]=98;70;IF([.T250]=96;60;IF([.T250]=84;60;IF([.T250]=108;60;IF([.T250]=90;50;IF([.T250]=72;40;IF([.T250]=80;40;IF([.T250]=100;50;IF([.T250]=54;30;IF([.T250]=36;20;IF([.T250]=18;10;IF([.T25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c/cd/Esemtu-Ezzu_Icon.png/revision/latest?cb=201412301909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ton_-_Sirhitu_-_Esemtu-Ezzu&quot;;&quot;Esemtu-Ezzu&quot;)" office:value-type="string" office:string-value="Esemtu-Ezzu" calcext:value-type="string">
            <text:p>Esemtu-Ezz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008" calcext:value-type="float">
            <text:p>2008</text:p>
          </table:table-cell>
          <table:table-cell table:style-name="ce32" office:value-type="float" office:value="1175" calcext:value-type="float">
            <text:p>1175</text:p>
          </table:table-cell>
          <table:table-cell table:style-name="ce36" office:value-type="float" office:value="1373" calcext:value-type="float">
            <text:p>1373</text:p>
          </table:table-cell>
          <table:table-cell table:style-name="ce40" office:value-type="float" office:value="5417" calcext:value-type="float">
            <text:p>5417</text:p>
          </table:table-cell>
          <table:table-cell table:style-name="ce44" office:value-type="float" office:value="6790" calcext:value-type="float">
            <text:p>6790</text:p>
          </table:table-cell>
          <table:table-cell table:style-name="ce52" table:formula="of:=SUM([.D251:.H251])" office:value-type="float" office:value="16763" calcext:value-type="float">
            <text:p>16763</text:p>
          </table:table-cell>
          <table:table-cell table:style-name="ce59" office:value-type="string" calcext:value-type="string">
            <text:p>Sipho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1]=126;70;IF([.T251]=112;70;IF([.T251]=98;70;IF([.T251]=96;60;IF([.T251]=84;60;IF([.T251]=108;60;IF([.T251]=90;50;IF([.T251]=72;40;IF([.T251]=80;40;IF([.T251]=100;50;IF([.T251]=54;30;IF([.T251]=36;20;IF([.T251]=18;10;IF([.T25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a/ad/Lasam_Icon.png/revision/latest?cb=20141230185229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sam_-_Halaquin_-_Nabalkutu&quot;;&quot;Lasam&quot;)" office:value-type="string" office:string-value="Lasam" calcext:value-type="string">
            <text:p>Lasa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2:.H252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2]=126;70;IF([.T252]=112;70;IF([.T252]=98;70;IF([.T252]=96;60;IF([.T252]=84;60;IF([.T252]=108;60;IF([.T252]=90;50;IF([.T252]=72;40;IF([.T252]=80;40;IF([.T252]=100;50;IF([.T252]=54;30;IF([.T252]=36;20;IF([.T252]=18;10;IF([.T25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f/f3/Halaquin_Icon.png/revision/latest?cb=20141230185411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sam_-_Halaquin_-_Nabalkutu&quot;;&quot;Halaquin&quot;)" office:value-type="string" office:string-value="Halaquin" calcext:value-type="string">
            <text:p>Halaqui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3:.H253])" office:value-type="float" office:value="5" calcext:value-type="float">
            <text:p>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3]=126;70;IF([.T253]=112;70;IF([.T253]=98;70;IF([.T253]=96;60;IF([.T253]=84;60;IF([.T253]=108;60;IF([.T253]=90;50;IF([.T253]=72;40;IF([.T253]=80;40;IF([.T253]=100;50;IF([.T253]=54;30;IF([.T253]=36;20;IF([.T253]=18;10;IF([.T253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e/e8/Nabalkutu_Icon.png/revision/latest?cb=20141230185519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sam_-_Halaquin_-_Nabalkutu&quot;;&quot;Nabalkutu&quot;)" office:value-type="string" office:string-value="Nabalkutu" calcext:value-type="string">
            <text:p>Nabalkut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969" calcext:value-type="float">
            <text:p>3969</text:p>
          </table:table-cell>
          <table:table-cell table:style-name="ce32" office:value-type="float" office:value="5568" calcext:value-type="float">
            <text:p>5568</text:p>
          </table:table-cell>
          <table:table-cell table:style-name="ce36" office:value-type="float" office:value="1214" calcext:value-type="float">
            <text:p>1214</text:p>
          </table:table-cell>
          <table:table-cell table:style-name="ce40" office:value-type="float" office:value="3562" calcext:value-type="float">
            <text:p>3562</text:p>
          </table:table-cell>
          <table:table-cell table:style-name="ce44" office:value-type="float" office:value="1612" calcext:value-type="float">
            <text:p>1612</text:p>
          </table:table-cell>
          <table:table-cell table:style-name="ce52" table:formula="of:=SUM([.D254:.H254])" office:value-type="float" office:value="15925" calcext:value-type="float">
            <text:p>1592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4]=126;70;IF([.T254]=112;70;IF([.T254]=98;70;IF([.T254]=96;60;IF([.T254]=84;60;IF([.T254]=108;60;IF([.T254]=90;50;IF([.T254]=72;40;IF([.T254]=80;40;IF([.T254]=100;50;IF([.T254]=54;30;IF([.T254]=36;20;IF([.T254]=18;10;IF([.T25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d/d0/Putu_Icon.png/revision/latest?cb=201412301858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Putu_-_Muhhu_-_Qaqqadu&quot;;&quot;Putu&quot;)" office:value-type="string" office:string-value="Putu" calcext:value-type="string">
            <text:p>Putu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5345" calcext:value-type="float">
            <text:p>5345</text:p>
          </table:table-cell>
          <table:table-cell table:style-name="ce32" office:value-type="float" office:value="2273" calcext:value-type="float">
            <text:p>2273</text:p>
          </table:table-cell>
          <table:table-cell table:style-name="ce36" office:value-type="float" office:value="2491" calcext:value-type="float">
            <text:p>2491</text:p>
          </table:table-cell>
          <table:table-cell table:style-name="ce40" office:value-type="float" office:value="389" calcext:value-type="float">
            <text:p>389</text:p>
          </table:table-cell>
          <table:table-cell table:style-name="ce44" office:value-type="float" office:value="425" calcext:value-type="float">
            <text:p>425</text:p>
          </table:table-cell>
          <table:table-cell table:style-name="ce52" table:formula="of:=SUM([.D255:.H255])" office:value-type="float" office:value="10923" calcext:value-type="float">
            <text:p>10923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5]=126;70;IF([.T255]=112;70;IF([.T255]=98;70;IF([.T255]=96;60;IF([.T255]=84;60;IF([.T255]=108;60;IF([.T255]=90;50;IF([.T255]=72;40;IF([.T255]=80;40;IF([.T255]=100;50;IF([.T255]=54;30;IF([.T255]=36;20;IF([.T255]=18;10;IF([.T255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1/1b/Muhhu_Icon.png/revision/latest?cb=201412301859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Putu_-_Muhhu_-_Qaqqadu&quot;;&quot;Muhhu&quot;)" office:value-type="string" office:string-value="Muhhu" calcext:value-type="string">
            <text:p>Muhhu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9806" calcext:value-type="float">
            <text:p>9806</text:p>
          </table:table-cell>
          <table:table-cell table:style-name="ce32" office:value-type="float" office:value="4394" calcext:value-type="float">
            <text:p>4394</text:p>
          </table:table-cell>
          <table:table-cell table:style-name="ce36" office:value-type="float" office:value="4793" calcext:value-type="float">
            <text:p>4793</text:p>
          </table:table-cell>
          <table:table-cell table:style-name="ce40" office:value-type="float" office:value="796" calcext:value-type="float">
            <text:p>796</text:p>
          </table:table-cell>
          <table:table-cell table:style-name="ce44" office:value-type="float" office:value="869" calcext:value-type="float">
            <text:p>869</text:p>
          </table:table-cell>
          <table:table-cell table:style-name="ce52" table:formula="of:=SUM([.D256:.H256])" office:value-type="float" office:value="20658" calcext:value-type="float">
            <text:p>20658</text:p>
          </table:table-cell>
          <table:table-cell table:style-name="ce59" office:value-type="string" calcext:value-type="string">
            <text:p>Dragonflye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pe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6]=126;70;IF([.T256]=112;70;IF([.T256]=98;70;IF([.T256]=96;60;IF([.T256]=84;60;IF([.T256]=108;60;IF([.T256]=90;50;IF([.T256]=72;40;IF([.T256]=80;40;IF([.T256]=100;50;IF([.T256]=54;30;IF([.T256]=36;20;IF([.T256]=18;10;IF([.T256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a/ae/Qaqqadu_Icon.png/revision/latest?cb=201412301900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Putu_-_Muhhu_-_Qaqqadu&quot;;&quot;Qaqqadu&quot;)" office:value-type="string" office:string-value="Qaqqadu" calcext:value-type="string">
            <text:p>Qaqqadu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1379" calcext:value-type="float">
            <text:p>21379</text:p>
          </table:table-cell>
          <table:table-cell table:style-name="ce32" office:value-type="float" office:value="9476" calcext:value-type="float">
            <text:p>9476</text:p>
          </table:table-cell>
          <table:table-cell table:style-name="ce36" office:value-type="float" office:value="10359" calcext:value-type="float">
            <text:p>10359</text:p>
          </table:table-cell>
          <table:table-cell table:style-name="ce40" office:value-type="float" office:value="1728" calcext:value-type="float">
            <text:p>1728</text:p>
          </table:table-cell>
          <table:table-cell table:style-name="ce44" office:value-type="float" office:value="1898" calcext:value-type="float">
            <text:p>1898</text:p>
          </table:table-cell>
          <table:table-cell table:style-name="ce52" table:formula="of:=SUM([.D257:.H257])" office:value-type="float" office:value="44840" calcext:value-type="float">
            <text:p>44840</text:p>
          </table:table-cell>
          <table:table-cell table:style-name="ce59" office:value-type="string" calcext:value-type="string">
            <text:p>Dragonflye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257]=126;70;IF([.T257]=112;70;IF([.T257]=98;70;IF([.T257]=96;60;IF([.T257]=84;60;IF([.T257]=108;60;IF([.T257]=90;50;IF([.T257]=72;40;IF([.T257]=80;40;IF([.T257]=100;50;IF([.T257]=54;30;IF([.T257]=36;20;IF([.T257]=18;10;IF([.T257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c/c4/Kotiata_Icon.png/revision/latest?cb=2014123019020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tiata_-_Dicotella_-_Mendruta&quot;;&quot;Kotiata&quot;)" office:value-type="string" office:string-value="Kotiata" calcext:value-type="string">
            <text:p>Kotiat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8:.H258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8]=126;70;IF([.T258]=112;70;IF([.T258]=98;70;IF([.T258]=96;60;IF([.T258]=84;60;IF([.T258]=108;60;IF([.T258]=90;50;IF([.T258]=72;40;IF([.T258]=80;40;IF([.T258]=100;50;IF([.T258]=54;30;IF([.T258]=36;20;IF([.T258]=18;10;IF([.T25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b/b1/Dicotella_Icon.png/revision/latest?cb=20141230190301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tiata_-_Dicotella_-_Mendruta&quot;;&quot;Dicotella&quot;)" office:value-type="string" office:string-value="Dicotella" calcext:value-type="string">
            <text:p>Dicotell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59:.H259])" office:value-type="float" office:value="5" calcext:value-type="float">
            <text:p>5</text:p>
          </table:table-cell>
          <table:table-cell table:style-name="ce59" office:value-type="string" calcext:value-type="string">
            <text:p>Ven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59]=126;70;IF([.T259]=112;70;IF([.T259]=98;70;IF([.T259]=96;60;IF([.T259]=84;60;IF([.T259]=108;60;IF([.T259]=90;50;IF([.T259]=72;40;IF([.T259]=80;40;IF([.T259]=100;50;IF([.T259]=54;30;IF([.T259]=36;20;IF([.T259]=18;10;IF([.T25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7/73/Mendruta_Icon.png/revision/latest?cb=20141230190347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tiata_-_Dicotella_-_Mendruta&quot;;&quot;Mendruta&quot;)" office:value-type="string" office:string-value="Mendruta" calcext:value-type="string">
            <text:p>Mendrut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293" calcext:value-type="float">
            <text:p>5293</text:p>
          </table:table-cell>
          <table:table-cell table:style-name="ce32" office:value-type="float" office:value="3777" calcext:value-type="float">
            <text:p>3777</text:p>
          </table:table-cell>
          <table:table-cell table:style-name="ce36" office:value-type="float" office:value="4392" calcext:value-type="float">
            <text:p>4392</text:p>
          </table:table-cell>
          <table:table-cell table:style-name="ce40" office:value-type="float" office:value="454" calcext:value-type="float">
            <text:p>454</text:p>
          </table:table-cell>
          <table:table-cell table:style-name="ce44" office:value-type="float" office:value="562" calcext:value-type="float">
            <text:p>562</text:p>
          </table:table-cell>
          <table:table-cell table:style-name="ce52" table:formula="of:=SUM([.D260:.H260])" office:value-type="float" office:value="14478" calcext:value-type="float">
            <text:p>14478</text:p>
          </table:table-cell>
          <table:table-cell table:style-name="ce59" office:value-type="string" calcext:value-type="string">
            <text:p>Ven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60]=126;70;IF([.T260]=112;70;IF([.T260]=98;70;IF([.T260]=96;60;IF([.T260]=84;60;IF([.T260]=108;60;IF([.T260]=90;50;IF([.T260]=72;40;IF([.T260]=80;40;IF([.T260]=100;50;IF([.T260]=54;30;IF([.T260]=36;20;IF([.T260]=18;10;IF([.T26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b/b6/Zroyia_Icon.png/revision/latest?cb=20150506142620&quot;)" office:value-type="string" office:string-value="" calcext:value-type="error">
            <text:p>#NAME?</text:p>
          </table:table-cell>
          <table:table-cell table:style-name="ce11" table:formula="of:=HYPERLINK(&quot;http://defenderoftexel.wikia.com/wiki/Zroyia_-_Aghasa_-_Quabelona&quot;;&quot;Zroyia&quot;)" office:value-type="string" office:string-value="Zroyia" calcext:value-type="string">
            <text:p>Zroyi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61:.H261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61]=126;70;IF([.T261]=112;70;IF([.T261]=98;70;IF([.T261]=96;60;IF([.T261]=84;60;IF([.T261]=108;60;IF([.T261]=90;50;IF([.T261]=72;40;IF([.T261]=80;40;IF([.T261]=100;50;IF([.T261]=54;30;IF([.T261]=36;20;IF([.T261]=18;10;IF([.T261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8/8d/Aghasa_Icon.png/revision/latest?cb=201505061425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Zroyia_-_Aghasa_-_Quabelona&quot;;&quot;Aghasa&quot;)" office:value-type="string" office:string-value="Aghasa" calcext:value-type="string">
            <text:p>Aghas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62:.H262])" office:value-type="float" office:value="5" calcext:value-type="float">
            <text:p>5</text:p>
          </table:table-cell>
          <table:table-cell table:style-name="ce59" office:value-type="string" calcext:value-type="string">
            <text:p>Engulf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62]=126;70;IF([.T262]=112;70;IF([.T262]=98;70;IF([.T262]=96;60;IF([.T262]=84;60;IF([.T262]=108;60;IF([.T262]=90;50;IF([.T262]=72;40;IF([.T262]=80;40;IF([.T262]=100;50;IF([.T262]=54;30;IF([.T262]=36;20;IF([.T262]=18;10;IF([.T262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6/6a/Quabelona_Icon.png/revision/latest?cb=20150506142610&quot;)" office:value-type="string" office:string-value="" calcext:value-type="error">
            <text:p>#NAME?</text:p>
          </table:table-cell>
          <table:table-cell table:style-name="ce11" table:formula="of:=HYPERLINK(&quot;http://defenderoftexel.wikia.com/wiki/Zroyia_-_Aghasa_-_Quabelona&quot;;&quot;Quabelona&quot;)" office:value-type="string" office:string-value="Quabelona" calcext:value-type="string">
            <text:p>Quabelon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63:.H263])" office:value-type="float" office:value="5" calcext:value-type="float">
            <text:p>5</text:p>
          </table:table-cell>
          <table:table-cell table:style-name="ce59" office:value-type="string" calcext:value-type="string">
            <text:p>Engulf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263]=126;70;IF([.T263]=112;70;IF([.T263]=98;70;IF([.T263]=96;60;IF([.T263]=84;60;IF([.T263]=108;60;IF([.T263]=90;50;IF([.T263]=72;40;IF([.T263]=80;40;IF([.T263]=100;50;IF([.T263]=54;30;IF([.T263]=36;20;IF([.T263]=18;10;IF([.T263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f/f2/Mizutto_Icon.png/revision/latest?cb=20160930185116&quot;)" office:value-type="string" office:string-value="" calcext:value-type="error">
            <text:p>#NAME?</text:p>
          </table:table-cell>
          <table:table-cell table:style-name="ce13" table:formula="of:=HYPERLINK(&quot;http://defenderoftexel.wikia.com/wiki/Mizutto_-_Pelagrand_-_Wasserdief&quot;;&quot;Mizutto&quot;)" office:value-type="string" office:string-value="Mizutto" calcext:value-type="string">
            <text:p>Mizutt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64:.H264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U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4]=126;70;IF([.T264]=112;70;IF([.T264]=98;70;IF([.T264]=96;60;IF([.T264]=84;60;IF([.T264]=108;60;IF([.T264]=90;50;IF([.T264]=72;40;IF([.T264]=80;40;IF([.T264]=100;50;IF([.T264]=54;30;IF([.T264]=36;20;IF([.T264]=18;10;IF([.T264]=60;30))))))))))))))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4.wikia.nocookie.net/defenderoftexel/images/8/85/Pelagrand_Icon.png/revision/latest?cb=20160930185140&quot;)" office:value-type="string" office:string-value="" calcext:value-type="error">
            <text:p>#NAME?</text:p>
          </table:table-cell>
          <table:table-cell table:style-name="ce13" table:formula="of:=HYPERLINK(&quot;http://defenderoftexel.wikia.com/wiki/Mizutto_-_Pelagrand_-_Wasserdief&quot;;&quot;Pelagrand&quot;)" office:value-type="string" office:string-value="Pelagrand" calcext:value-type="string">
            <text:p>Pelagrand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65:.H265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5]=126;70;IF([.T265]=112;70;IF([.T265]=98;70;IF([.T265]=96;60;IF([.T265]=84;60;IF([.T265]=108;60;IF([.T265]=90;50;IF([.T265]=72;40;IF([.T265]=80;40;IF([.T265]=100;50;IF([.T265]=54;30;IF([.T265]=36;20;IF([.T265]=18;10;IF([.T265]=60;30))))))))))))))" office:value-type="float" office:value="40" calcext:value-type="float">
            <text:p>40</text:p>
          </table:table-cell>
          <table:table-cell table:style-name="ce69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9/99/Wasserdief_Icon.png/revision/latest?cb=20160930185156&quot;)" office:value-type="string" office:string-value="" calcext:value-type="error">
            <text:p>#NAME?</text:p>
          </table:table-cell>
          <table:table-cell table:style-name="ce13" table:formula="of:=HYPERLINK(&quot;http://defenderoftexel.wikia.com/wiki/Mizutto_-_Pelagrand_-_Wasserdief&quot;;&quot;Wasserdief&quot;)" office:value-type="string" office:string-value="Wasserdief" calcext:value-type="string">
            <text:p>Wasserdief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6082" calcext:value-type="float">
            <text:p>6082</text:p>
          </table:table-cell>
          <table:table-cell table:style-name="ce34" office:value-type="float" office:value="7075" calcext:value-type="float">
            <text:p>7075</text:p>
          </table:table-cell>
          <table:table-cell table:style-name="ce38" office:value-type="float" office:value="4295" calcext:value-type="float">
            <text:p>4295</text:p>
          </table:table-cell>
          <table:table-cell table:style-name="ce42" office:value-type="float" office:value="695" calcext:value-type="float">
            <text:p>695</text:p>
          </table:table-cell>
          <table:table-cell table:style-name="ce46" office:value-type="float" office:value="836" calcext:value-type="float">
            <text:p>836</text:p>
          </table:table-cell>
          <table:table-cell table:style-name="ce54" table:formula="of:=SUM([.D266:.H266])" office:value-type="float" office:value="18983" calcext:value-type="float">
            <text:p>18983</text:p>
          </table:table-cell>
          <table:table-cell table:style-name="ce61" office:value-type="string" calcext:value-type="string">
            <text:p>Binge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Adept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6]=126;70;IF([.T266]=112;70;IF([.T266]=98;70;IF([.T266]=96;60;IF([.T266]=84;60;IF([.T266]=108;60;IF([.T266]=90;50;IF([.T266]=72;40;IF([.T266]=80;40;IF([.T266]=100;50;IF([.T266]=54;30;IF([.T266]=36;20;IF([.T266]=18;10;IF([.T266]=60;30))))))))))))))" office:value-type="float" office:value="50" calcext:value-type="float">
            <text:p>50</text:p>
          </table:table-cell>
          <table:table-cell table:style-name="ce69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/>
          <table:table-cell table:style-name="ce13" table:formula="of:=HYPERLINK(&quot;http://defenderoftexel.wikia.com/wiki/Bayce_-_Drogue_-_Chrysostom&quot;;&quot;Bayce&quot;)" office:value-type="string" office:string-value="Bayce" calcext:value-type="string">
            <text:p>Bayc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67:.H267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Ai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U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7]=126;70;IF([.T267]=112;70;IF([.T267]=98;70;IF([.T267]=96;60;IF([.T267]=84;60;IF([.T267]=108;60;IF([.T267]=90;50;IF([.T267]=72;40;IF([.T267]=80;40;IF([.T267]=100;50;IF([.T267]=54;30;IF([.T267]=36;20;IF([.T267]=18;10;IF([.T267]=60;30))))))))))))))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/>
          <table:table-cell table:style-name="ce13" table:formula="of:=HYPERLINK(&quot;http://defenderoftexel.wikia.com/wiki/Bayce_-_Drogue_-_Chrysostom&quot;;&quot;Drogue&quot;)" office:value-type="string" office:string-value="Drogue" calcext:value-type="string">
            <text:p>Drogu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68:.H268])" office:value-type="float" office:value="5" calcext:value-type="float">
            <text:p>5</text:p>
          </table:table-cell>
          <table:table-cell table:style-name="ce61" office:value-type="string" calcext:value-type="string">
            <text:p>Gust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Novice</text:p>
          </table:table-cell>
          <table:table-cell table:style-name="ce66" office:value-type="float" office:value="4" calcext:value-type="float">
            <text:p>4</text:p>
          </table:table-cell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Ai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8]=126;70;IF([.T268]=112;70;IF([.T268]=98;70;IF([.T268]=96;60;IF([.T268]=84;60;IF([.T268]=108;60;IF([.T268]=90;50;IF([.T268]=72;40;IF([.T268]=80;40;IF([.T268]=100;50;IF([.T268]=54;30;IF([.T268]=36;20;IF([.T268]=18;10;IF([.T268]=60;30))))))))))))))" office:value-type="float" office:value="40" calcext:value-type="float">
            <text:p>40</text:p>
          </table:table-cell>
          <table:table-cell table:style-name="ce69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/>
          <table:table-cell table:style-name="ce13" table:formula="of:=HYPERLINK(&quot;http://defenderoftexel.wikia.com/wiki/Bayce_-_Drogue_-_Chrysostom&quot;;&quot;Chrysostom&quot;)" office:value-type="string" office:string-value="Chrysostom" calcext:value-type="string">
            <text:p>Chrysostom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69:.H269])" office:value-type="float" office:value="5" calcext:value-type="float">
            <text:p>5</text:p>
          </table:table-cell>
          <table:table-cell table:style-name="ce61" office:value-type="string" calcext:value-type="string">
            <text:p>Gust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Adept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Ai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69]=126;70;IF([.T269]=112;70;IF([.T269]=98;70;IF([.T269]=96;60;IF([.T269]=84;60;IF([.T269]=108;60;IF([.T269]=90;50;IF([.T269]=72;40;IF([.T269]=80;40;IF([.T269]=100;50;IF([.T269]=54;30;IF([.T269]=36;20;IF([.T269]=18;10;IF([.T269]=60;30))))))))))))))" office:value-type="float" office:value="50" calcext:value-type="float">
            <text:p>50</text:p>
          </table:table-cell>
          <table:table-cell table:style-name="ce69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b/b5/Zib_Icon.png/revision/latest?cb=20150502045906&quot;)" office:value-type="string" office:string-value="" calcext:value-type="error">
            <text:p>#NAME?</text:p>
          </table:table-cell>
          <table:table-cell table:style-name="ce11" table:formula="of:=HYPERLINK(&quot;http://defenderoftexel.wikia.com/wiki/Zib_-_Gunu_-_Imhamun&quot;;&quot;Zib&quot;)" office:value-type="string" office:string-value="Zib" calcext:value-type="string">
            <text:p>Zib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0:.H270])" office:value-type="float" office:value="5" calcext:value-type="float">
            <text:p>5</text:p>
          </table:table-cell>
          <table:table-cell table:style-name="ce59" office:value-type="string" calcext:value-type="string">
            <text:p>Freshen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0]=126;70;IF([.T270]=112;70;IF([.T270]=98;70;IF([.T270]=96;60;IF([.T270]=84;60;IF([.T270]=108;60;IF([.T270]=90;50;IF([.T270]=72;40;IF([.T270]=80;40;IF([.T270]=100;50;IF([.T270]=54;30;IF([.T270]=36;20;IF([.T270]=18;10;IF([.T27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6/64/Gunu_Icon.png/revision/latest?cb=20150502045812&quot;)" office:value-type="string" office:string-value="" calcext:value-type="error">
            <text:p>#NAME?</text:p>
          </table:table-cell>
          <table:table-cell table:style-name="ce11" table:formula="of:=HYPERLINK(&quot;http://defenderoftexel.wikia.com/wiki/Zib_-_Gunu_-_Imhamun&quot;;&quot;Gunu&quot;)" office:value-type="string" office:string-value="Gunu" calcext:value-type="string">
            <text:p>Gun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1:.H271])" office:value-type="float" office:value="5" calcext:value-type="float">
            <text:p>5</text:p>
          </table:table-cell>
          <table:table-cell table:style-name="ce59" office:value-type="string" calcext:value-type="string">
            <text:p>Freshen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1]=126;70;IF([.T271]=112;70;IF([.T271]=98;70;IF([.T271]=96;60;IF([.T271]=84;60;IF([.T271]=108;60;IF([.T271]=90;50;IF([.T271]=72;40;IF([.T271]=80;40;IF([.T271]=100;50;IF([.T271]=54;30;IF([.T271]=36;20;IF([.T271]=18;10;IF([.T271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2/21/Imhamun_Icon.png/revision/latest?cb=20150502045839&quot;)" office:value-type="string" office:string-value="" calcext:value-type="error">
            <text:p>#NAME?</text:p>
          </table:table-cell>
          <table:table-cell table:style-name="ce11" table:formula="of:=HYPERLINK(&quot;http://defenderoftexel.wikia.com/wiki/Zib_-_Gunu_-_Imhamun&quot;;&quot;Imhamun&quot;)" office:value-type="string" office:string-value="Imhamun" calcext:value-type="string">
            <text:p>Imhamu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697" calcext:value-type="float">
            <text:p>4697</text:p>
          </table:table-cell>
          <table:table-cell table:style-name="ce32" office:value-type="float" office:value="614" calcext:value-type="float">
            <text:p>614</text:p>
          </table:table-cell>
          <table:table-cell table:style-name="ce36" office:value-type="float" office:value="1670" calcext:value-type="float">
            <text:p>1670</text:p>
          </table:table-cell>
          <table:table-cell table:style-name="ce40" office:value-type="float" office:value="9554" calcext:value-type="float">
            <text:p>9554</text:p>
          </table:table-cell>
          <table:table-cell table:style-name="ce44" office:value-type="float" office:value="3186" calcext:value-type="float">
            <text:p>3186</text:p>
          </table:table-cell>
          <table:table-cell table:style-name="ce52" table:formula="of:=SUM([.D272:.H272])" office:value-type="float" office:value="19721" calcext:value-type="float">
            <text:p>19721</text:p>
          </table:table-cell>
          <table:table-cell table:style-name="ce59" office:value-type="string" calcext:value-type="string">
            <text:p>Freshen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2]=126;70;IF([.T272]=112;70;IF([.T272]=98;70;IF([.T272]=96;60;IF([.T272]=84;60;IF([.T272]=108;60;IF([.T272]=90;50;IF([.T272]=72;40;IF([.T272]=80;40;IF([.T272]=100;50;IF([.T272]=54;30;IF([.T272]=36;20;IF([.T272]=18;10;IF([.T272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b/ba/Semapo_Icon.png/revision/latest?cb=201505061426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Semapo_-_Deimathias_-_Agamidablo&quot;;&quot;Semapo&quot;)" office:value-type="string" office:string-value="Semapo" calcext:value-type="string">
            <text:p>Semap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3:.H273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3]=126;70;IF([.T273]=112;70;IF([.T273]=98;70;IF([.T273]=96;60;IF([.T273]=84;60;IF([.T273]=108;60;IF([.T273]=90;50;IF([.T273]=72;40;IF([.T273]=80;40;IF([.T273]=100;50;IF([.T273]=54;30;IF([.T273]=36;20;IF([.T273]=18;10;IF([.T27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c/c6/Deimathias_Icon.png/revision/latest?cb=201505061426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Semapo_-_Deimathias_-_Agamidablo&quot;;&quot;Deimathias&quot;)" office:value-type="string" office:string-value="Deimathias" calcext:value-type="string">
            <text:p>Deimathia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4:.H274])" office:value-type="float" office:value="5" calcext:value-type="float">
            <text:p>5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4]=126;70;IF([.T274]=112;70;IF([.T274]=98;70;IF([.T274]=96;60;IF([.T274]=84;60;IF([.T274]=108;60;IF([.T274]=90;50;IF([.T274]=72;40;IF([.T274]=80;40;IF([.T274]=100;50;IF([.T274]=54;30;IF([.T274]=36;20;IF([.T274]=18;10;IF([.T27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f/f6/Agamidablo_Icon.png/revision/latest?cb=20150506142633&quot;)" office:value-type="string" office:string-value="" calcext:value-type="error">
            <text:p>#NAME?</text:p>
          </table:table-cell>
          <table:table-cell table:style-name="ce11" table:formula="of:=HYPERLINK(&quot;http://defenderoftexel.wikia.com/wiki/Semapo_-_Deimathias_-_Agamidablo&quot;;&quot;Agamidablo&quot;)" office:value-type="string" office:string-value="Agamidablo" calcext:value-type="string">
            <text:p>Agamidabl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5:.H275])" office:value-type="float" office:value="5" calcext:value-type="float">
            <text:p>5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5]=126;70;IF([.T275]=112;70;IF([.T275]=98;70;IF([.T275]=96;60;IF([.T275]=84;60;IF([.T275]=108;60;IF([.T275]=90;50;IF([.T275]=72;40;IF([.T275]=80;40;IF([.T275]=100;50;IF([.T275]=54;30;IF([.T275]=36;20;IF([.T275]=18;10;IF([.T27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c/c4/Kelara_Icon.png/revision/latest?cb=20150506142722&quot;)" office:value-type="string" office:string-value="" calcext:value-type="error">
            <text:p>#NAME?</text:p>
          </table:table-cell>
          <table:table-cell table:style-name="ce11" table:formula="of:=HYPERLINK(&quot;http://defenderoftexel.wikia.com/wiki/Kelara_-_Deagan_-_Hudjam&quot;;&quot;Kelara&quot;)" office:value-type="string" office:string-value="Kelara" calcext:value-type="string">
            <text:p>Kelar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6:.H276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6]=126;70;IF([.T276]=112;70;IF([.T276]=98;70;IF([.T276]=96;60;IF([.T276]=84;60;IF([.T276]=108;60;IF([.T276]=90;50;IF([.T276]=72;40;IF([.T276]=80;40;IF([.T276]=100;50;IF([.T276]=54;30;IF([.T276]=36;20;IF([.T276]=18;10;IF([.T27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e/ec/Deagan_Icon.png/revision/latest?cb=20150506142704&quot;)" office:value-type="string" office:string-value="" calcext:value-type="error">
            <text:p>#NAME?</text:p>
          </table:table-cell>
          <table:table-cell table:style-name="ce11" table:formula="of:=HYPERLINK(&quot;http://defenderoftexel.wikia.com/wiki/Kelara_-_Deagan_-_Hudjam&quot;;&quot;Deagan&quot;)" office:value-type="string" office:string-value="Deagan" calcext:value-type="string">
            <text:p>Deaga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7:.H277])" office:value-type="float" office:value="5" calcext:value-type="float">
            <text:p>5</text:p>
          </table:table-cell>
          <table:table-cell table:style-name="ce59" office:value-type="string" calcext:value-type="string">
            <text:p>Squir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7]=126;70;IF([.T277]=112;70;IF([.T277]=98;70;IF([.T277]=96;60;IF([.T277]=84;60;IF([.T277]=108;60;IF([.T277]=90;50;IF([.T277]=72;40;IF([.T277]=80;40;IF([.T277]=100;50;IF([.T277]=54;30;IF([.T277]=36;20;IF([.T277]=18;10;IF([.T277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f/f8/Hudjam_Icon.png/revision/latest?cb=20150506142712&quot;)" office:value-type="string" office:string-value="" calcext:value-type="error">
            <text:p>#NAME?</text:p>
          </table:table-cell>
          <table:table-cell table:style-name="ce11" table:formula="of:=HYPERLINK(&quot;http://defenderoftexel.wikia.com/wiki/Kelara_-_Deagan_-_Hudjam&quot;;&quot;Hudjam&quot;)" office:value-type="string" office:string-value="Hudjam" calcext:value-type="string">
            <text:p>Hudja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8:.H278])" office:value-type="float" office:value="5" calcext:value-type="float">
            <text:p>5</text:p>
          </table:table-cell>
          <table:table-cell table:style-name="ce59" office:value-type="string" calcext:value-type="string">
            <text:p>Squir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8]=126;70;IF([.T278]=112;70;IF([.T278]=98;70;IF([.T278]=96;60;IF([.T278]=84;60;IF([.T278]=108;60;IF([.T278]=90;50;IF([.T278]=72;40;IF([.T278]=80;40;IF([.T278]=100;50;IF([.T278]=54;30;IF([.T278]=36;20;IF([.T278]=18;10;IF([.T27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7/Hoorn-Ving_Icon.png/revision/latest?cb=20160806004312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orn-Ving_-_Zwa-Grot_-_Gou-Vlag&quot;;&quot;Hoorn-Ving&quot;)" office:value-type="string" office:string-value="Hoorn-Ving" calcext:value-type="string">
            <text:p>Hoorn-Vin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79:.H279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79]=126;70;IF([.T279]=112;70;IF([.T279]=98;70;IF([.T279]=96;60;IF([.T279]=84;60;IF([.T279]=108;60;IF([.T279]=90;50;IF([.T279]=72;40;IF([.T279]=80;40;IF([.T279]=100;50;IF([.T279]=54;30;IF([.T279]=36;20;IF([.T279]=18;10;IF([.T279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0/09/Zwa-Grot_Icon.png/revision/latest?cb=20160806004414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orn-Ving_-_Zwa-Grot_-_Gou-Vlag&quot;;&quot;Zwa-Grot&quot;)" office:value-type="string" office:string-value="Zwa-Grot" calcext:value-type="string">
            <text:p>Zwa-Gro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0:.H280])" office:value-type="float" office:value="5" calcext:value-type="float">
            <text:p>5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0]=126;70;IF([.T280]=112;70;IF([.T280]=98;70;IF([.T280]=96;60;IF([.T280]=84;60;IF([.T280]=108;60;IF([.T280]=90;50;IF([.T280]=72;40;IF([.T280]=80;40;IF([.T280]=100;50;IF([.T280]=54;30;IF([.T280]=36;20;IF([.T280]=18;10;IF([.T28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d/dc/Gou-Vlag_Icon.png/revision/latest?cb=20160806004428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orn-Ving_-_Zwa-Grot_-_Gou-Vlag&quot;;&quot;Gou-Vlag&quot;)" office:value-type="string" office:string-value="Gou-Vlag" calcext:value-type="string">
            <text:p>Gou-Vla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178" calcext:value-type="float">
            <text:p>2178</text:p>
          </table:table-cell>
          <table:table-cell table:style-name="ce32" office:value-type="float" office:value="1948" calcext:value-type="float">
            <text:p>1948</text:p>
          </table:table-cell>
          <table:table-cell table:style-name="ce36" office:value-type="float" office:value="1257" calcext:value-type="float">
            <text:p>1257</text:p>
          </table:table-cell>
          <table:table-cell table:style-name="ce40" office:value-type="float" office:value="7974" calcext:value-type="float">
            <text:p>7974</text:p>
          </table:table-cell>
          <table:table-cell table:style-name="ce44" office:value-type="float" office:value="7595" calcext:value-type="float">
            <text:p>7595</text:p>
          </table:table-cell>
          <table:table-cell table:style-name="ce52" table:formula="of:=SUM([.D281:.H281])" office:value-type="float" office:value="20952" calcext:value-type="float">
            <text:p>20952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1]=126;70;IF([.T281]=112;70;IF([.T281]=98;70;IF([.T281]=96;60;IF([.T281]=84;60;IF([.T281]=108;60;IF([.T281]=90;50;IF([.T281]=72;40;IF([.T281]=80;40;IF([.T281]=100;50;IF([.T281]=54;30;IF([.T281]=36;20;IF([.T281]=18;10;IF([.T28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6/61/Kohmoo_Icon.png/revision/latest?cb=20160806033330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hmoo_-_Puhshi_-_Suyzin&quot;;&quot;Kohmoo&quot;)" office:value-type="string" office:string-value="Kohmoo" calcext:value-type="string">
            <text:p>Kohmo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2:.H282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2]=126;70;IF([.T282]=112;70;IF([.T282]=98;70;IF([.T282]=96;60;IF([.T282]=84;60;IF([.T282]=108;60;IF([.T282]=90;50;IF([.T282]=72;40;IF([.T282]=80;40;IF([.T282]=100;50;IF([.T282]=54;30;IF([.T282]=36;20;IF([.T282]=18;10;IF([.T28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2/2c/Puhshi_Icon.png/revision/latest?cb=20160806033339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hmoo_-_Puhshi_-_Suyzin&quot;;&quot;Puhshi&quot;)" office:value-type="string" office:string-value="Puhshi" calcext:value-type="string">
            <text:p>Puhsh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3:.H283])" office:value-type="float" office:value="5" calcext:value-type="float">
            <text:p>5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3]=126;70;IF([.T283]=112;70;IF([.T283]=98;70;IF([.T283]=96;60;IF([.T283]=84;60;IF([.T283]=108;60;IF([.T283]=90;50;IF([.T283]=72;40;IF([.T283]=80;40;IF([.T283]=100;50;IF([.T283]=54;30;IF([.T283]=36;20;IF([.T283]=18;10;IF([.T283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7/70/Suyzin_Icon.png/revision/latest?cb=201608060333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Kohmoo_-_Puhshi_-_Suyzin&quot;;&quot;Suyzin&quot;)" office:value-type="string" office:string-value="Suyzin" calcext:value-type="string">
            <text:p>Suyzi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4:.H284])" office:value-type="float" office:value="5" calcext:value-type="float">
            <text:p>5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4]=126;70;IF([.T284]=112;70;IF([.T284]=98;70;IF([.T284]=96;60;IF([.T284]=84;60;IF([.T284]=108;60;IF([.T284]=90;50;IF([.T284]=72;40;IF([.T284]=80;40;IF([.T284]=100;50;IF([.T284]=54;30;IF([.T284]=36;20;IF([.T284]=18;10;IF([.T28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3.wikia.nocookie.net/defenderoftexel/images/c/c3/Leekan_Icon.png/revision/latest?cb=20160806034352&quot;)" office:value-type="string" office:string-value="" calcext:value-type="error">
            <text:p>#NAME?</text:p>
          </table:table-cell>
          <table:table-cell table:style-name="ce13" table:formula="of:=HYPERLINK(&quot;http://defenderoftexel.wikia.com/wiki/Leekan_-_Fancha_-_Tchanki&quot;;&quot;Leekan&quot;)" office:value-type="string" office:string-value="Leekan" calcext:value-type="string">
            <text:p>Leekan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85:.H285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Guru</text:p>
          </table:table-cell>
          <table:table-cell table:style-name="ce69" office:value-type="string" calcext:value-type="string">
            <text:p>Air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85]=126;70;IF([.T285]=112;70;IF([.T285]=98;70;IF([.T285]=96;60;IF([.T285]=84;60;IF([.T285]=108;60;IF([.T285]=90;50;IF([.T285]=72;40;IF([.T285]=80;40;IF([.T285]=100;50;IF([.T285]=54;30;IF([.T285]=36;20;IF([.T285]=18;10;IF([.T285]=60;30))))))))))))))" office:value-type="float" office:value="40" calcext:value-type="float">
            <text:p>40</text:p>
          </table:table-cell>
          <table:table-cell table:style-name="ce69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3/34/Fancha_Icon.png/revision/latest?cb=20160806034343&quot;)" office:value-type="string" office:string-value="" calcext:value-type="error">
            <text:p>#NAME?</text:p>
          </table:table-cell>
          <table:table-cell table:style-name="ce13" table:formula="of:=HYPERLINK(&quot;http://defenderoftexel.wikia.com/wiki/Leekan_-_Fancha_-_Tchanki&quot;;&quot;Fancha&quot;)" office:value-type="string" office:string-value="Fancha" calcext:value-type="string">
            <text:p>Fanch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86:.H286])" office:value-type="float" office:value="5" calcext:value-type="float">
            <text:p>5</text:p>
          </table:table-cell>
          <table:table-cell table:style-name="ce7" table:number-columns-repeated="7"/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86]=126;70;IF([.T286]=112;70;IF([.T286]=98;70;IF([.T286]=96;60;IF([.T286]=84;60;IF([.T286]=108;60;IF([.T286]=90;50;IF([.T286]=72;40;IF([.T286]=80;40;IF([.T286]=100;50;IF([.T286]=54;30;IF([.T286]=36;20;IF([.T286]=18;10;IF([.T286]=60;30))))))))))))))" office:value-type="float" office:value="50" calcext:value-type="float">
            <text:p>50</text:p>
          </table:table-cell>
          <table:table-cell table:style-name="ce69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d/de/Tchanki_Icon.png/revision/latest?cb=20160806034358&quot;)" office:value-type="string" office:string-value="" calcext:value-type="error">
            <text:p>#NAME?</text:p>
          </table:table-cell>
          <table:table-cell table:style-name="ce13" table:formula="of:=HYPERLINK(&quot;http://defenderoftexel.wikia.com/wiki/Leekan_-_Fancha_-_Tchanki&quot;;&quot;Tchanki&quot;)" office:value-type="string" office:string-value="Tchanki" calcext:value-type="string">
            <text:p>Tchanki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87:.H287])" office:value-type="float" office:value="5" calcext:value-type="float">
            <text:p>5</text:p>
          </table:table-cell>
          <table:table-cell table:style-name="ce61" office:value-type="string" calcext:value-type="string">
            <text:p>Defrust</text:p>
          </table:table-cell>
          <table:table-cell table:style-name="ce61" office:value-type="string" calcext:value-type="string">
            <text:p>All</text:p>
          </table:table-cell>
          <table:table-cell table:style-name="ce7" table:number-columns-repeated="5"/>
          <table:table-cell table:style-name="ce72" office:value-type="string" calcext:value-type="string">
            <text:p>L</text:p>
          </table:table-cell>
          <table:table-cell table:style-name="ce66" office:value-type="float" office:value="4" calcext:value-type="float">
            <text:p>4</text:p>
          </table:table-cell>
          <table:table-cell table:style-name="ce69" table:formula="of:=IF([.T287]=126;70;IF([.T287]=112;70;IF([.T287]=98;70;IF([.T287]=96;60;IF([.T287]=84;60;IF([.T287]=108;60;IF([.T287]=90;50;IF([.T287]=72;40;IF([.T287]=80;40;IF([.T287]=100;50;IF([.T287]=54;30;IF([.T287]=36;20;IF([.T287]=18;10;IF([.T287]=60;30))))))))))))))" office:value-type="float" office:value="70" calcext:value-type="float">
            <text:p>70</text:p>
          </table:table-cell>
          <table:table-cell table:style-name="ce69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6/64/Rhusvaru_Icon.png/revision/latest?cb=20160806034019&quot;)" office:value-type="string" office:string-value="" calcext:value-type="error">
            <text:p>#NAME?</text:p>
          </table:table-cell>
          <table:table-cell table:style-name="ce11" table:formula="of:=HYPERLINK(&quot;http://defenderoftexel.wikia.com/wiki/Rhusvaru_-_Sindoran_-_Kinnabari&quot;;&quot;Rhusvaru&quot;)" office:value-type="string" office:string-value="Rhusvaru" calcext:value-type="string">
            <text:p>Rhusvar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8:.H288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8]=126;70;IF([.T288]=112;70;IF([.T288]=98;70;IF([.T288]=96;60;IF([.T288]=84;60;IF([.T288]=108;60;IF([.T288]=90;50;IF([.T288]=72;40;IF([.T288]=80;40;IF([.T288]=100;50;IF([.T288]=54;30;IF([.T288]=36;20;IF([.T288]=18;10;IF([.T288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b/b9/Sindoran_Icon.png/revision/latest?cb=20160806034026&quot;)" office:value-type="string" office:string-value="" calcext:value-type="error">
            <text:p>#NAME?</text:p>
          </table:table-cell>
          <table:table-cell table:style-name="ce11" table:formula="of:=HYPERLINK(&quot;http://defenderoftexel.wikia.com/wiki/Rhusvaru_-_Sindoran_-_Kinnabari&quot;;&quot;Sindoran&quot;)" office:value-type="string" office:string-value="Sindoran" calcext:value-type="string">
            <text:p>Sindora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89:.H289])" office:value-type="float" office:value="5" calcext:value-type="float">
            <text:p>5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89]=126;70;IF([.T289]=112;70;IF([.T289]=98;70;IF([.T289]=96;60;IF([.T289]=84;60;IF([.T289]=108;60;IF([.T289]=90;50;IF([.T289]=72;40;IF([.T289]=80;40;IF([.T289]=100;50;IF([.T289]=54;30;IF([.T289]=36;20;IF([.T289]=18;10;IF([.T28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2/2f/Kinnabari_Icon.png/revision/latest?cb=20160806034009&quot;)" office:value-type="string" office:string-value="" calcext:value-type="error">
            <text:p>#NAME?</text:p>
          </table:table-cell>
          <table:table-cell table:style-name="ce11" table:formula="of:=HYPERLINK(&quot;http://defenderoftexel.wikia.com/wiki/Rhusvaru_-_Sindoran_-_Kinnabari&quot;;&quot;Kinnabari&quot;)" office:value-type="string" office:string-value="Kinnabari" calcext:value-type="string">
            <text:p>Kinnabar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447" calcext:value-type="float">
            <text:p>3447</text:p>
          </table:table-cell>
          <table:table-cell table:style-name="ce32" office:value-type="float" office:value="3345" calcext:value-type="float">
            <text:p>3345</text:p>
          </table:table-cell>
          <table:table-cell table:style-name="ce36" office:value-type="float" office:value="1678" calcext:value-type="float">
            <text:p>1678</text:p>
          </table:table-cell>
          <table:table-cell table:style-name="ce40" office:value-type="float" office:value="3447" calcext:value-type="float">
            <text:p>3447</text:p>
          </table:table-cell>
          <table:table-cell table:style-name="ce44" office:value-type="float" office:value="9242" calcext:value-type="float">
            <text:p>9242</text:p>
          </table:table-cell>
          <table:table-cell table:style-name="ce52" table:formula="of:=SUM([.D290:.H290])" office:value-type="float" office:value="21159" calcext:value-type="float">
            <text:p>21159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0]=126;70;IF([.T290]=112;70;IF([.T290]=98;70;IF([.T290]=96;60;IF([.T290]=84;60;IF([.T290]=108;60;IF([.T290]=90;50;IF([.T290]=72;40;IF([.T290]=80;40;IF([.T290]=100;50;IF([.T290]=54;30;IF([.T290]=36;20;IF([.T290]=18;10;IF([.T29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7/76/Erlene_Icon.png/revision/latest?cb=20150430171605&quot;)" office:value-type="string" office:string-value="" calcext:value-type="error">
            <text:p>#NAME?</text:p>
          </table:table-cell>
          <table:table-cell table:style-name="ce13" table:formula="of:=HYPERLINK(&quot;http://defenderoftexel.wikia.com/wiki/Erlene_-_Queenie_-_Lilla_Redlace&quot;;&quot;Erlene&quot;)" office:value-type="string" office:string-value="Erlene" calcext:value-type="string">
            <text:p>Erlen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91:.H291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Fire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U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91]=126;70;IF([.T291]=112;70;IF([.T291]=98;70;IF([.T291]=96;60;IF([.T291]=84;60;IF([.T291]=108;60;IF([.T291]=90;50;IF([.T291]=72;40;IF([.T291]=80;40;IF([.T291]=100;50;IF([.T291]=54;30;IF([.T291]=36;20;IF([.T291]=18;10;IF([.T291]=60;30))))))))))))))" office:value-type="float" office:value="40" calcext:value-type="float">
            <text:p>40</text:p>
          </table:table-cell>
          <table:table-cell table:style-name="ce69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b/bf/Queenie_Icon.png/revision/latest?cb=20150430171641&quot;)" office:value-type="string" office:string-value="" calcext:value-type="error">
            <text:p>#NAME?</text:p>
          </table:table-cell>
          <table:table-cell table:style-name="ce13" table:formula="of:=HYPERLINK(&quot;http://defenderoftexel.wikia.com/wiki/Erlene_-_Queenie_-_Lilla_Redlace&quot;;&quot;Queenie&quot;)" office:value-type="string" office:string-value="Queenie" calcext:value-type="string">
            <text:p>Queeni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92:.H292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Fire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92]=126;70;IF([.T292]=112;70;IF([.T292]=98;70;IF([.T292]=96;60;IF([.T292]=84;60;IF([.T292]=108;60;IF([.T292]=90;50;IF([.T292]=72;40;IF([.T292]=80;40;IF([.T292]=100;50;IF([.T292]=54;30;IF([.T292]=36;20;IF([.T292]=18;10;IF([.T292]=60;30))))))))))))))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3/3d/Lilla_Redlace_Icon.png/revision/latest?cb=20150430171624&quot;)" office:value-type="string" office:string-value="" calcext:value-type="error">
            <text:p>#NAME?</text:p>
          </table:table-cell>
          <table:table-cell table:style-name="ce13" table:formula="of:=HYPERLINK(&quot;http://defenderoftexel.wikia.com/wiki/Erlene_-_Queenie_-_Lilla_Redlace&quot;;&quot;Lilla Redlace&quot;)" office:value-type="string" office:string-value="Lilla Redlace" calcext:value-type="string">
            <text:p>Lilla Redlac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SUM([.D293:.H293])" office:value-type="float" office:value="5" calcext:value-type="float">
            <text:p>5</text:p>
          </table:table-cell>
          <table:table-cell table:style-name="ce7" table:number-columns-repeated="4"/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Fire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9" table:formula="of:=IF([.T293]=126;70;IF([.T293]=112;70;IF([.T293]=98;70;IF([.T293]=96;60;IF([.T293]=84;60;IF([.T293]=108;60;IF([.T293]=90;50;IF([.T293]=72;40;IF([.T293]=80;40;IF([.T293]=100;50;IF([.T293]=54;30;IF([.T293]=36;20;IF([.T293]=18;10;IF([.T293]=60;30))))))))))))))" office:value-type="float" office:value="20" calcext:value-type="float">
            <text:p>20</text:p>
          </table:table-cell>
          <table:table-cell table:style-name="ce69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5/54/Hnoss_Icon.png/revision/latest?cb=201504231805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Hnoss_-_Gersemi_-_Mistress_of_Seith&quot;;&quot;Hnoss&quot;)" office:value-type="string" office:string-value="Hnoss" calcext:value-type="string">
            <text:p>Hnos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4:.H294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4]=126;70;IF([.T294]=112;70;IF([.T294]=98;70;IF([.T294]=96;60;IF([.T294]=84;60;IF([.T294]=108;60;IF([.T294]=90;50;IF([.T294]=72;40;IF([.T294]=80;40;IF([.T294]=100;50;IF([.T294]=54;30;IF([.T294]=36;20;IF([.T294]=18;10;IF([.T29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9/92/Gersemi_Icon.png/revision/latest?cb=201504231804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Hnoss_-_Gersemi_-_Mistress_of_Seith&quot;;&quot;Gersemi&quot;)" office:value-type="string" office:string-value="Gersemi" calcext:value-type="string">
            <text:p>Gersem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5:.H295])" office:value-type="float" office:value="5" calcext:value-type="float">
            <text:p>5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5]=126;70;IF([.T295]=112;70;IF([.T295]=98;70;IF([.T295]=96;60;IF([.T295]=84;60;IF([.T295]=108;60;IF([.T295]=90;50;IF([.T295]=72;40;IF([.T295]=80;40;IF([.T295]=100;50;IF([.T295]=54;30;IF([.T295]=36;20;IF([.T295]=18;10;IF([.T295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8/8d/Mistress_of_Seith_Icon.png/revision/latest?cb=20150423180537&quot;)" office:value-type="string" office:string-value="" calcext:value-type="error">
            <text:p>#NAME?</text:p>
          </table:table-cell>
          <table:table-cell table:style-name="ce11" table:formula="of:=HYPERLINK(&quot;http://defenderoftexel.wikia.com/wiki/Hnoss_-_Gersemi_-_Mistress_of_Seith&quot;;&quot;Mistress of Seith&quot;)" office:value-type="string" office:string-value="Mistress of Seith" calcext:value-type="string">
            <text:p>Mistress of Seith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6:.H296])" office:value-type="float" office:value="5" calcext:value-type="float">
            <text:p>5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6]=126;70;IF([.T296]=112;70;IF([.T296]=98;70;IF([.T296]=96;60;IF([.T296]=84;60;IF([.T296]=108;60;IF([.T296]=90;50;IF([.T296]=72;40;IF([.T296]=80;40;IF([.T296]=100;50;IF([.T296]=54;30;IF([.T296]=36;20;IF([.T296]=18;10;IF([.T29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0/01/Bankam_Icon.png/revision/latest?cb=20150430165950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nkam_-_Llist_-_Tippitch&quot;;&quot;Bankam&quot;)" office:value-type="string" office:string-value="Bankam" calcext:value-type="string">
            <text:p>Banka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7:.H297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7]=126;70;IF([.T297]=112;70;IF([.T297]=98;70;IF([.T297]=96;60;IF([.T297]=84;60;IF([.T297]=108;60;IF([.T297]=90;50;IF([.T297]=72;40;IF([.T297]=80;40;IF([.T297]=100;50;IF([.T297]=54;30;IF([.T297]=36;20;IF([.T297]=18;10;IF([.T29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7/78/Llist_Icon.png/revision/latest?cb=20150430165923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nkam_-_Llist_-_Tippitch&quot;;&quot;Llist&quot;)" office:value-type="string" office:string-value="Llist" calcext:value-type="string">
            <text:p>Llis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8:.H298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8]=126;70;IF([.T298]=112;70;IF([.T298]=98;70;IF([.T298]=96;60;IF([.T298]=84;60;IF([.T298]=108;60;IF([.T298]=90;50;IF([.T298]=72;40;IF([.T298]=80;40;IF([.T298]=100;50;IF([.T298]=54;30;IF([.T298]=36;20;IF([.T298]=18;10;IF([.T29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a/a5/Tippitch_Icon.png/revision/latest?cb=20150430165840&quot;)" office:value-type="string" office:string-value="" calcext:value-type="error">
            <text:p>#NAME?</text:p>
          </table:table-cell>
          <table:table-cell table:style-name="ce11" table:formula="of:=HYPERLINK(&quot;http://defenderoftexel.wikia.com/wiki/Bankam_-_Llist_-_Tippitch&quot;;&quot;Tippitch&quot;)" office:value-type="string" office:string-value="Tippitch" calcext:value-type="string">
            <text:p>Tippitch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299:.H299])" office:value-type="float" office:value="5" calcext:value-type="float">
            <text:p>5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299]=126;70;IF([.T299]=112;70;IF([.T299]=98;70;IF([.T299]=96;60;IF([.T299]=84;60;IF([.T299]=108;60;IF([.T299]=90;50;IF([.T299]=72;40;IF([.T299]=80;40;IF([.T299]=100;50;IF([.T299]=54;30;IF([.T299]=36;20;IF([.T299]=18;10;IF([.T29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b/be/Quippaj_Icon.png/revision/latest?cb=201504301718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ippaj_-_Sally-San_-_Grimaaldi&quot;;&quot;Quippaj&quot;)" office:value-type="string" office:string-value="Quippaj" calcext:value-type="string">
            <text:p>Quippaj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00:.H300])" office:value-type="float" office:value="5" calcext:value-type="float">
            <text:p>5</text:p>
          </table:table-cell>
          <table:table-cell table:style-name="ce59" office:value-type="string" calcext:value-type="string">
            <text:p>Devancer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00]=126;70;IF([.T300]=112;70;IF([.T300]=98;70;IF([.T300]=96;60;IF([.T300]=84;60;IF([.T300]=108;60;IF([.T300]=90;50;IF([.T300]=72;40;IF([.T300]=80;40;IF([.T300]=100;50;IF([.T300]=54;30;IF([.T300]=36;20;IF([.T300]=18;10;IF([.T300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f/f6/Sally-San_Icon.png/revision/latest?cb=20150430171927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ippaj_-_Sally-San_-_Grimaaldi&quot;;&quot;Sally-San&quot;)" office:value-type="string" office:string-value="Sally-San" calcext:value-type="string">
            <text:p>Sally-Sa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01:.H301])" office:value-type="float" office:value="5" calcext:value-type="float">
            <text:p>5</text:p>
          </table:table-cell>
          <table:table-cell table:style-name="ce59" office:value-type="string" calcext:value-type="string">
            <text:p>Devancer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01]=126;70;IF([.T301]=112;70;IF([.T301]=98;70;IF([.T301]=96;60;IF([.T301]=84;60;IF([.T301]=108;60;IF([.T301]=90;50;IF([.T301]=72;40;IF([.T301]=80;40;IF([.T301]=100;50;IF([.T301]=54;30;IF([.T301]=36;20;IF([.T301]=18;10;IF([.T301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4/Grimaaldi_Icon.png/revision/latest?cb=201504301719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ippaj_-_Sally-San_-_Grimaaldi&quot;;&quot;Grimaaldi&quot;)" office:value-type="string" office:string-value="Grimaaldi" calcext:value-type="string">
            <text:p>Grimaaldi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8501" calcext:value-type="float">
            <text:p>8501</text:p>
          </table:table-cell>
          <table:table-cell table:style-name="ce32" office:value-type="float" office:value="12944" calcext:value-type="float">
            <text:p>12944</text:p>
          </table:table-cell>
          <table:table-cell table:style-name="ce36" office:value-type="float" office:value="4437" calcext:value-type="float">
            <text:p>4437</text:p>
          </table:table-cell>
          <table:table-cell table:style-name="ce40" office:value-type="float" office:value="2696" calcext:value-type="float">
            <text:p>2696</text:p>
          </table:table-cell>
          <table:table-cell table:style-name="ce44" office:value-type="float" office:value="13425" calcext:value-type="float">
            <text:p>13425</text:p>
          </table:table-cell>
          <table:table-cell table:style-name="ce52" table:formula="of:=SUM([.D302:.H302])" office:value-type="float" office:value="42003" calcext:value-type="float">
            <text:p>42003</text:p>
          </table:table-cell>
          <table:table-cell table:style-name="ce59" office:value-type="string" calcext:value-type="string">
            <text:p>Devancer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302]=126;70;IF([.T302]=112;70;IF([.T302]=98;70;IF([.T302]=96;60;IF([.T302]=84;60;IF([.T302]=108;60;IF([.T302]=90;50;IF([.T302]=72;40;IF([.T302]=80;40;IF([.T302]=100;50;IF([.T302]=54;30;IF([.T302]=36;20;IF([.T302]=18;10;IF([.T302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8" table:formula="of:=image(&quot;http://vignette3.wikia.nocookie.net/defenderoftexel/images/f/fc/Aistra_Icon.png/revision/latest?cb=20150506135837&quot;)" office:value-type="string" office:string-value="" calcext:value-type="error">
            <text:p>#NAME?</text:p>
          </table:table-cell>
          <table:table-cell table:style-name="ce13" table:formula="of:=HYPERLINK(&quot;http://defenderoftexel.wikia.com/wiki/Irax_-_Hieros_-_Aistra&quot;;&quot;Aistra&quot;)" office:value-type="string" office:string-value="Aistra" calcext:value-type="string">
            <text:p>Aistr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5351" calcext:value-type="float">
            <text:p>5351</text:p>
          </table:table-cell>
          <table:table-cell table:style-name="ce34" office:value-type="float" office:value="4527" calcext:value-type="float">
            <text:p>4527</text:p>
          </table:table-cell>
          <table:table-cell table:style-name="ce38" office:value-type="float" office:value="2321" calcext:value-type="float">
            <text:p>2321</text:p>
          </table:table-cell>
          <table:table-cell table:style-name="ce42" office:value-type="float" office:value="457" calcext:value-type="float">
            <text:p>457</text:p>
          </table:table-cell>
          <table:table-cell table:style-name="ce46" office:value-type="float" office:value="1736" calcext:value-type="float">
            <text:p>1736</text:p>
          </table:table-cell>
          <table:table-cell table:style-name="ce55"/>
          <table:table-cell table:style-name="ce61" office:value-type="string" calcext:value-type="string">
            <text:p>Stampede</text:p>
          </table:table-cell>
          <table:table-cell table:style-name="ce61" office:value-type="string" calcext:value-type="string">
            <text:p>Single</text:p>
          </table:table-cell>
          <table:table-cell table:style-name="ce61" office:value-type="string" calcext:value-type="string">
            <text:p>Elite</text:p>
          </table:table-cell>
          <table:table-cell table:style-name="ce7"/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7" table:formula="of:=IF([.T303]=126;70;IF([.T303]=112;70;IF([.T303]=98;70;IF([.T303]=96;60;IF([.T303]=84;60;IF([.T303]=108;60;IF([.T303]=90;50;IF([.T303]=72;40;IF([.T303]=80;40;IF([.T303]=100;50;IF([.T303]=54;30;IF([.T303]=36;20;IF([.T303]=18;10;IF([.T303]=60;30))))))))))))))" office:value-type="float" office:value="40" calcext:value-type="float">
            <text:p>40</text:p>
          </table:table-cell>
          <table:table-cell table:style-name="ce69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128163134/defenderoftexel/images/thumb/9/9b/Akhebina_Icon.png/50px-Akhebi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khebina&quot;; &quot;Akhebina&quot;)" office:value-type="string" office:string-value="Akhebina" calcext:value-type="string">
            <text:p>Akhebina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1912" calcext:value-type="float">
            <text:p>1912</text:p>
          </table:table-cell>
          <table:table-cell table:style-name="ce33" office:value-type="float" office:value="1116" calcext:value-type="float">
            <text:p>1116</text:p>
          </table:table-cell>
          <table:table-cell table:style-name="ce37" office:value-type="float" office:value="1309" calcext:value-type="float">
            <text:p>1309</text:p>
          </table:table-cell>
          <table:table-cell table:style-name="ce41" office:value-type="float" office:value="5153" calcext:value-type="float">
            <text:p>5153</text:p>
          </table:table-cell>
          <table:table-cell table:style-name="ce45" office:value-type="float" office:value="6457" calcext:value-type="float">
            <text:p>6457</text:p>
          </table:table-cell>
          <table:table-cell table:style-name="ce53" table:formula="of:=SUM([.D304:.H304])" office:value-type="float" office:value="15947" calcext:value-type="float">
            <text:p>15947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04]=126;70;IF([.T304]=112;70;IF([.T304]=98;70;IF([.T304]=96;60;IF([.T304]=84;60;IF([.T304]=108;60;IF([.T304]=90;50;IF([.T304]=72;40;IF([.T304]=80;40;IF([.T304]=100;50;IF([.T304]=54;30;IF([.T304]=36;20;IF([.T304]=18;10;IF([.T30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 table:number-rows-repeated="2">
          <table:table-cell table:style-name="ce9" table:number-columns-repeated="2"/>
          <table:table-cell table:style-name="ce24"/>
          <table:table-cell table:style-name="ce9" table:number-columns-repeated="4"/>
          <table:table-cell table:style-name="ce47"/>
          <table:table-cell table:style-name="ce56"/>
          <table:table-cell table:style-name="ce9" table:number-columns-repeated="11"/>
          <table:table-cell table:number-columns-repeated="1004"/>
        </table:table-row>
        <table:table-row table:style-name="ro2">
          <table:table-cell table:style-name="ce1" table:formula="of:=image(&quot;http://img1.wikia.nocookie.net/__cb20140715144026/defenderoftexel/images/c/c1/Akkad_Awakene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kkad_Awakened&quot;; &quot;Akkad Awakened&quot;)" office:value-type="string" office:string-value="Akkad Awakened" calcext:value-type="string">
            <text:p>Akkad Awakened</text:p>
          </table:table-cell>
          <table:table-cell table:style-name="ce21" office:value-type="float" office:value="3" calcext:value-type="float">
            <text:p>3</text:p>
          </table:table-cell>
          <table:table-cell table:style-name="ce28" office:value-type="float" office:value="12519" calcext:value-type="float">
            <text:p>12519</text:p>
          </table:table-cell>
          <table:table-cell table:style-name="ce33" office:value-type="float" office:value="10564" calcext:value-type="float">
            <text:p>10564</text:p>
          </table:table-cell>
          <table:table-cell table:style-name="ce37" office:value-type="float" office:value="5413" calcext:value-type="float">
            <text:p>5413</text:p>
          </table:table-cell>
          <table:table-cell table:style-name="ce41" office:value-type="float" office:value="1087" calcext:value-type="float">
            <text:p>1087</text:p>
          </table:table-cell>
          <table:table-cell table:style-name="ce45" office:value-type="float" office:value="4059" calcext:value-type="float">
            <text:p>4059</text:p>
          </table:table-cell>
          <table:table-cell table:style-name="ce53" table:formula="of:=SUM([.D307:.H307])" office:value-type="float" office:value="33642" calcext:value-type="float">
            <text:p>33642</text:p>
          </table:table-cell>
          <table:table-cell table:style-name="ce60" office:value-type="string" calcext:value-type="string">
            <text:p>Delirium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307]=126;70;IF([.T307]=112;70;IF([.T307]=98;70;IF([.T307]=96;60;IF([.T307]=84;60;IF([.T307]=108;60;IF([.T307]=90;50;IF([.T307]=72;40;IF([.T307]=80;40;IF([.T307]=100;50;IF([.T307]=54;30;IF([.T307]=36;20;IF([.T307]=18;10;IF([.T30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126131045/defenderoftexel/images/thumb/6/6a/Alectrya_Icon.png/50px-Alectry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lectrya&quot;;&quot;Alectrya&quot;)" office:value-type="string" office:string-value="Alectrya" calcext:value-type="string">
            <text:p>Alectry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266" calcext:value-type="float">
            <text:p>5266</text:p>
          </table:table-cell>
          <table:table-cell table:style-name="ce32" office:value-type="float" office:value="4453" calcext:value-type="float">
            <text:p>4453</text:p>
          </table:table-cell>
          <table:table-cell table:style-name="ce36" office:value-type="float" office:value="2284" calcext:value-type="float">
            <text:p>2284</text:p>
          </table:table-cell>
          <table:table-cell table:style-name="ce40" office:value-type="float" office:value="452" calcext:value-type="float">
            <text:p>452</text:p>
          </table:table-cell>
          <table:table-cell table:style-name="ce44" office:value-type="float" office:value="1707" calcext:value-type="float">
            <text:p>1707</text:p>
          </table:table-cell>
          <table:table-cell table:style-name="ce52" table:formula="of:=SUM([.D308:.H308])" office:value-type="float" office:value="14162" calcext:value-type="float">
            <text:p>14162</text:p>
          </table:table-cell>
          <table:table-cell table:style-name="ce59" office:value-type="string" calcext:value-type="string">
            <text:p>Heal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08]=126;70;IF([.T308]=112;70;IF([.T308]=98;70;IF([.T308]=96;60;IF([.T308]=84;60;IF([.T308]=108;60;IF([.T308]=90;50;IF([.T308]=72;40;IF([.T308]=80;40;IF([.T308]=100;50;IF([.T308]=54;30;IF([.T308]=36;20;IF([.T308]=18;10;IF([.T30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119125728/defenderoftexel/images/thumb/b/b0/Algallen_Icon.png/50px-Algallen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lgallen&quot;;&quot;Algallen&quot;)" office:value-type="string" office:string-value="Algallen" calcext:value-type="string">
            <text:p>Algalle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684" calcext:value-type="float">
            <text:p>1684</text:p>
          </table:table-cell>
          <table:table-cell table:style-name="ce32" office:value-type="float" office:value="3922" calcext:value-type="float">
            <text:p>3922</text:p>
          </table:table-cell>
          <table:table-cell table:style-name="ce36" office:value-type="float" office:value="854" calcext:value-type="float">
            <text:p>854</text:p>
          </table:table-cell>
          <table:table-cell table:style-name="ce40" office:value-type="float" office:value="3722" calcext:value-type="float">
            <text:p>3722</text:p>
          </table:table-cell>
          <table:table-cell table:style-name="ce44" office:value-type="float" office:value="1134" calcext:value-type="float">
            <text:p>1134</text:p>
          </table:table-cell>
          <table:table-cell table:style-name="ce52" table:formula="of:=SUM([.D309:.H309])" office:value-type="float" office:value="11316" calcext:value-type="float">
            <text:p>11316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09]=126;70;IF([.T309]=112;70;IF([.T309]=98;70;IF([.T309]=96;60;IF([.T309]=84;60;IF([.T309]=108;60;IF([.T309]=90;50;IF([.T309]=72;40;IF([.T309]=80;40;IF([.T309]=100;50;IF([.T309]=54;30;IF([.T309]=36;20;IF([.T309]=18;10;IF([.T30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1.wikia.nocookie.net/__cb20130924193516/defenderoftexel/images/thumb/f/fa/Alleumad_Icon.png/50px-Alleumad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lleumad&quot;; &quot;Alleumad&quot;)" office:value-type="string" office:string-value="Alleumad" calcext:value-type="string">
            <text:p>Alleuma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541" calcext:value-type="float">
            <text:p>2541</text:p>
          </table:table-cell>
          <table:table-cell table:style-name="ce32" office:value-type="float" office:value="4585" calcext:value-type="float">
            <text:p>4585</text:p>
          </table:table-cell>
          <table:table-cell table:style-name="ce36" office:value-type="float" office:value="1532" calcext:value-type="float">
            <text:p>1532</text:p>
          </table:table-cell>
          <table:table-cell table:style-name="ce40" office:value-type="float" office:value="1734" calcext:value-type="float">
            <text:p>1734</text:p>
          </table:table-cell>
          <table:table-cell table:style-name="ce44" office:value-type="float" office:value="607" calcext:value-type="float">
            <text:p>607</text:p>
          </table:table-cell>
          <table:table-cell table:style-name="ce52" table:formula="of:=SUM([.D310:.H310])" office:value-type="float" office:value="10999" calcext:value-type="float">
            <text:p>10999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0]=126;70;IF([.T310]=112;70;IF([.T310]=98;70;IF([.T310]=96;60;IF([.T310]=84;60;IF([.T310]=108;60;IF([.T310]=90;50;IF([.T310]=72;40;IF([.T310]=80;40;IF([.T310]=100;50;IF([.T310]=54;30;IF([.T310]=36;20;IF([.T310]=18;10;IF([.T31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2.wikia.nocookie.net/__cb20130428042455/defenderoftexel/images/thumb/c/cb/Amaralice_Icon.png/50px-Amaralice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maralice&quot;; &quot;Amaralice&quot;)" office:value-type="string" office:string-value="Amaralice" calcext:value-type="string">
            <text:p>Amaralic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78" calcext:value-type="float">
            <text:p>2678</text:p>
          </table:table-cell>
          <table:table-cell table:style-name="ce32" office:value-type="float" office:value="2043" calcext:value-type="float">
            <text:p>2043</text:p>
          </table:table-cell>
          <table:table-cell table:style-name="ce36" office:value-type="float" office:value="1392" calcext:value-type="float">
            <text:p>1392</text:p>
          </table:table-cell>
          <table:table-cell table:style-name="ce40" office:value-type="float" office:value="1980" calcext:value-type="float">
            <text:p>1980</text:p>
          </table:table-cell>
          <table:table-cell table:style-name="ce44" office:value-type="float" office:value="4999" calcext:value-type="float">
            <text:p>4999</text:p>
          </table:table-cell>
          <table:table-cell table:style-name="ce52" table:formula="of:=SUM([.D311:.H311])" office:value-type="float" office:value="13092" calcext:value-type="float">
            <text:p>13092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1]=126;70;IF([.T311]=112;70;IF([.T311]=98;70;IF([.T311]=96;60;IF([.T311]=84;60;IF([.T311]=108;60;IF([.T311]=90;50;IF([.T311]=72;40;IF([.T311]=80;40;IF([.T311]=100;50;IF([.T311]=54;30;IF([.T311]=36;20;IF([.T311]=18;10;IF([.T31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0428043230/defenderoftexel/images/thumb/7/79/Ambarender_Icon.png/50px-Ambarender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mbarender&quot;; &quot;Ambarender&quot;)" office:value-type="string" office:string-value="Ambarender" calcext:value-type="string">
            <text:p>Ambarend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814" calcext:value-type="float">
            <text:p>3814</text:p>
          </table:table-cell>
          <table:table-cell table:style-name="ce32" office:value-type="float" office:value="4363" calcext:value-type="float">
            <text:p>4363</text:p>
          </table:table-cell>
          <table:table-cell table:style-name="ce36" office:value-type="float" office:value="2337" calcext:value-type="float">
            <text:p>2337</text:p>
          </table:table-cell>
          <table:table-cell table:style-name="ce40" office:value-type="float" office:value="552" calcext:value-type="float">
            <text:p>552</text:p>
          </table:table-cell>
          <table:table-cell table:style-name="ce44" office:value-type="float" office:value="732" calcext:value-type="float">
            <text:p>732</text:p>
          </table:table-cell>
          <table:table-cell table:style-name="ce52" table:formula="of:=SUM([.D312:.H312])" office:value-type="float" office:value="11798" calcext:value-type="float">
            <text:p>11798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2]=126;70;IF([.T312]=112;70;IF([.T312]=98;70;IF([.T312]=96;60;IF([.T312]=84;60;IF([.T312]=108;60;IF([.T312]=90;50;IF([.T312]=72;40;IF([.T312]=80;40;IF([.T312]=100;50;IF([.T312]=54;30;IF([.T312]=36;20;IF([.T312]=18;10;IF([.T31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0181243/defenderoftexel/images/thumb/a/a7/Amereta_Icon.png/50px-Ameret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mereta&quot;;&quot;Amereta&quot;)" office:value-type="string" office:string-value="Amereta" calcext:value-type="string">
            <text:p>Amereta</text:p>
          </table:table-cell>
          <table:table-cell table:style-name="ce25"/>
          <table:table-cell table:style-name="ce28" office:value-type="float" office:value="3361" calcext:value-type="float">
            <text:p>3361</text:p>
          </table:table-cell>
          <table:table-cell table:style-name="ce33" office:value-type="float" office:value="4714" calcext:value-type="float">
            <text:p>4714</text:p>
          </table:table-cell>
          <table:table-cell table:style-name="ce37" office:value-type="float" office:value="1029" calcext:value-type="float">
            <text:p>1029</text:p>
          </table:table-cell>
          <table:table-cell table:style-name="ce41" office:value-type="float" office:value="3016" calcext:value-type="float">
            <text:p>3016</text:p>
          </table:table-cell>
          <table:table-cell table:style-name="ce45" office:value-type="float" office:value="1364" calcext:value-type="float">
            <text:p>1364</text:p>
          </table:table-cell>
          <table:table-cell table:style-name="ce53" table:formula="of:=SUM([.D313:.H313])" office:value-type="float" office:value="13484" calcext:value-type="float">
            <text:p>13484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13]=126;70;IF([.T313]=112;70;IF([.T313]=98;70;IF([.T313]=96;60;IF([.T313]=84;60;IF([.T313]=108;60;IF([.T313]=90;50;IF([.T313]=72;40;IF([.T313]=80;40;IF([.T313]=100;50;IF([.T313]=54;30;IF([.T313]=36;20;IF([.T313]=18;10;IF([.T31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7/7f/Ammadoc_Icon.png/revision/latest?cb=20150502072948&quot;)" office:value-type="string" office:string-value="" calcext:value-type="error">
            <text:p>#NAME?</text:p>
          </table:table-cell>
          <table:table-cell table:style-name="ce11" table:formula="of:=HYPERLINK(&quot;http://defenderoftexel.wikia.com/wiki/Teres_-_Ammadoc_-_Zalmodegicus&quot;;&quot;Ammadoc&quot;)" office:value-type="string" office:string-value="Ammadoc" calcext:value-type="string">
            <text:p>Ammadoc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14:.H314])" office:value-type="float" office:value="5" calcext:value-type="float">
            <text:p>5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4]=126;70;IF([.T314]=112;70;IF([.T314]=98;70;IF([.T314]=96;60;IF([.T314]=84;60;IF([.T314]=108;60;IF([.T314]=90;50;IF([.T314]=72;40;IF([.T314]=80;40;IF([.T314]=100;50;IF([.T314]=54;30;IF([.T314]=36;20;IF([.T314]=18;10;IF([.T314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72045/defenderoftexel/images/thumb/7/77/Anagalshu_Icon.png/50px-Anagalsh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nagalshu&quot;;&quot;Anagalshu&quot;)" office:value-type="string" office:string-value="Anagalshu" calcext:value-type="string">
            <text:p>Anagalshu</text:p>
          </table:table-cell>
          <table:table-cell table:style-name="ce25"/>
          <table:table-cell table:style-name="ce28" office:value-type="float" office:value="1974" calcext:value-type="float">
            <text:p>1974</text:p>
          </table:table-cell>
          <table:table-cell table:style-name="ce33" office:value-type="float" office:value="4595" calcext:value-type="float">
            <text:p>4595</text:p>
          </table:table-cell>
          <table:table-cell table:style-name="ce37" office:value-type="float" office:value="1002" calcext:value-type="float">
            <text:p>1002</text:p>
          </table:table-cell>
          <table:table-cell table:style-name="ce41" office:value-type="float" office:value="4361" calcext:value-type="float">
            <text:p>4361</text:p>
          </table:table-cell>
          <table:table-cell table:style-name="ce45" office:value-type="float" office:value="1328" calcext:value-type="float">
            <text:p>1328</text:p>
          </table:table-cell>
          <table:table-cell table:style-name="ce53" table:formula="of:=SUM([.D315:.H315])" office:value-type="float" office:value="13260" calcext:value-type="float">
            <text:p>13260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15]=126;70;IF([.T315]=112;70;IF([.T315]=98;70;IF([.T315]=96;60;IF([.T315]=84;60;IF([.T315]=108;60;IF([.T315]=90;50;IF([.T315]=72;40;IF([.T315]=80;40;IF([.T315]=100;50;IF([.T315]=54;30;IF([.T315]=36;20;IF([.T315]=18;10;IF([.T31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e/e7/Aniass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niasse&quot;; &quot;Aniasse&quot;)" office:value-type="string" office:string-value="Aniasse" calcext:value-type="string">
            <text:p>Aniasse</text:p>
          </table:table-cell>
          <table:table-cell table:style-name="ce25"/>
          <table:table-cell table:style-name="ce28" office:value-type="float" office:value="2081" calcext:value-type="float">
            <text:p>2081</text:p>
          </table:table-cell>
          <table:table-cell table:style-name="ce33" office:value-type="float" office:value="3165" calcext:value-type="float">
            <text:p>3165</text:p>
          </table:table-cell>
          <table:table-cell table:style-name="ce37" office:value-type="float" office:value="1081" calcext:value-type="float">
            <text:p>1081</text:p>
          </table:table-cell>
          <table:table-cell table:style-name="ce41" office:value-type="float" office:value="650" calcext:value-type="float">
            <text:p>650</text:p>
          </table:table-cell>
          <table:table-cell table:style-name="ce45" office:value-type="float" office:value="3285" calcext:value-type="float">
            <text:p>3285</text:p>
          </table:table-cell>
          <table:table-cell table:style-name="ce53" table:formula="of:=SUM([.D316:.H316])" office:value-type="float" office:value="10262" calcext:value-type="float">
            <text:p>10262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16]=126;70;IF([.T316]=112;70;IF([.T316]=98;70;IF([.T316]=96;60;IF([.T316]=84;60;IF([.T316]=108;60;IF([.T316]=90;50;IF([.T316]=72;40;IF([.T316]=80;40;IF([.T316]=100;50;IF([.T316]=54;30;IF([.T316]=36;20;IF([.T316]=18;10;IF([.T31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422131539/defenderoftexel/images/thumb/2/22/Antheia_All-fair_Icon.png/50px-Antheia_All-fair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ntheia_All-fair&quot;; &quot;Antheia All-fair&quot;)" office:value-type="string" office:string-value="Antheia All-fair" calcext:value-type="string">
            <text:p>Antheia All-fai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727" calcext:value-type="float">
            <text:p>727</text:p>
          </table:table-cell>
          <table:table-cell table:style-name="ce32" office:value-type="float" office:value="1279" calcext:value-type="float">
            <text:p>1279</text:p>
          </table:table-cell>
          <table:table-cell table:style-name="ce36" office:value-type="float" office:value="671" calcext:value-type="float">
            <text:p>671</text:p>
          </table:table-cell>
          <table:table-cell table:style-name="ce40" office:value-type="float" office:value="7902" calcext:value-type="float">
            <text:p>7902</text:p>
          </table:table-cell>
          <table:table-cell table:style-name="ce44" office:value-type="float" office:value="5847" calcext:value-type="float">
            <text:p>5847</text:p>
          </table:table-cell>
          <table:table-cell table:style-name="ce52" table:formula="of:=SUM([.D317:.H317])" office:value-type="float" office:value="16426" calcext:value-type="float">
            <text:p>16426</text:p>
          </table:table-cell>
          <table:table-cell table:style-name="ce59" office:value-type="string" calcext:value-type="string">
            <text:p>Hea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7]=126;70;IF([.T317]=112;70;IF([.T317]=98;70;IF([.T317]=96;60;IF([.T317]=84;60;IF([.T317]=108;60;IF([.T317]=90;50;IF([.T317]=72;40;IF([.T317]=80;40;IF([.T317]=100;50;IF([.T317]=54;30;IF([.T317]=36;20;IF([.T317]=18;10;IF([.T31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1/1b/Dub_Icon.png/revision/latest?cb=20150419131820&quot;)" office:value-type="string" office:string-value="" calcext:value-type="error">
            <text:p>#NAME?</text:p>
          </table:table-cell>
          <table:table-cell table:style-name="ce11" table:formula="of:=HYPERLINK(&quot;http://defenderoftexel.wikia.com/wiki/Dub_-_Anugia_-_Kibisegi&quot;;&quot;Anugia&quot;)" office:value-type="string" office:string-value="Anugia" calcext:value-type="string">
            <text:p>Anug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140" calcext:value-type="float">
            <text:p>1140</text:p>
          </table:table-cell>
          <table:table-cell table:style-name="ce32" office:value-type="float" office:value="2776" calcext:value-type="float">
            <text:p>2776</text:p>
          </table:table-cell>
          <table:table-cell table:style-name="ce36" office:value-type="float" office:value="568" calcext:value-type="float">
            <text:p>568</text:p>
          </table:table-cell>
          <table:table-cell table:style-name="ce40" office:value-type="float" office:value="2624" calcext:value-type="float">
            <text:p>2624</text:p>
          </table:table-cell>
          <table:table-cell table:style-name="ce44" office:value-type="float" office:value="755" calcext:value-type="float">
            <text:p>755</text:p>
          </table:table-cell>
          <table:table-cell table:style-name="ce52" table:formula="of:=SUM([.D318:.H318])" office:value-type="float" office:value="7863" calcext:value-type="float">
            <text:p>7863</text:p>
          </table:table-cell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8]=126;70;IF([.T318]=112;70;IF([.T318]=98;70;IF([.T318]=96;60;IF([.T318]=84;60;IF([.T318]=108;60;IF([.T318]=90;50;IF([.T318]=72;40;IF([.T318]=80;40;IF([.T318]=100;50;IF([.T318]=54;30;IF([.T318]=36;20;IF([.T318]=18;10;IF([.T31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2/25/Apputtu_Icon.png/revision/latest?cb=20141014145318&quot;)" office:value-type="string" office:string-value="" calcext:value-type="error">
            <text:p>#NAME?</text:p>
          </table:table-cell>
          <table:table-cell table:style-name="ce11" table:formula="of:=HYPERLINK(&quot;http://defenderoftexel.wikia.com/wiki/Wardu_-_Magaru_-_Apputtu&quot;;&quot;Apputtu&quot;)" office:value-type="string" office:string-value="Apputtu" calcext:value-type="string">
            <text:p>Apputt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811" calcext:value-type="float">
            <text:p>2811</text:p>
          </table:table-cell>
          <table:table-cell table:style-name="ce32" office:value-type="float" office:value="4278" calcext:value-type="float">
            <text:p>4278</text:p>
          </table:table-cell>
          <table:table-cell table:style-name="ce36" office:value-type="float" office:value="1461" calcext:value-type="float">
            <text:p>1461</text:p>
          </table:table-cell>
          <table:table-cell table:style-name="ce40" office:value-type="float" office:value="881" calcext:value-type="float">
            <text:p>881</text:p>
          </table:table-cell>
          <table:table-cell table:style-name="ce44" office:value-type="float" office:value="4437" calcext:value-type="float">
            <text:p>4437</text:p>
          </table:table-cell>
          <table:table-cell table:style-name="ce52" table:formula="of:=SUM([.D319:.H319])" office:value-type="float" office:value="13868" calcext:value-type="float">
            <text:p>13868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19]=126;70;IF([.T319]=112;70;IF([.T319]=98;70;IF([.T319]=96;60;IF([.T319]=84;60;IF([.T319]=108;60;IF([.T319]=90;50;IF([.T319]=72;40;IF([.T319]=80;40;IF([.T319]=100;50;IF([.T319]=54;30;IF([.T319]=36;20;IF([.T319]=18;10;IF([.T31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401123733/defenderoftexel/images/thumb/6/65/Aprilvis_Icon.png/50px-Aprilvis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prilvis&quot;; &quot;Aprilvis&quot;)" office:value-type="string" office:string-value="Aprilvis" calcext:value-type="string">
            <text:p>Aprilvi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394" calcext:value-type="float">
            <text:p>3394</text:p>
          </table:table-cell>
          <table:table-cell table:style-name="ce32" office:value-type="float" office:value="4760" calcext:value-type="float">
            <text:p>4760</text:p>
          </table:table-cell>
          <table:table-cell table:style-name="ce36" office:value-type="float" office:value="1038" calcext:value-type="float">
            <text:p>1038</text:p>
          </table:table-cell>
          <table:table-cell table:style-name="ce40" office:value-type="float" office:value="3045" calcext:value-type="float">
            <text:p>3045</text:p>
          </table:table-cell>
          <table:table-cell table:style-name="ce44" office:value-type="float" office:value="1377" calcext:value-type="float">
            <text:p>1377</text:p>
          </table:table-cell>
          <table:table-cell table:style-name="ce52" table:formula="of:=SUM([.D320:.H320])" office:value-type="float" office:value="13614" calcext:value-type="float">
            <text:p>13614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20]=126;70;IF([.T320]=112;70;IF([.T320]=98;70;IF([.T320]=96;60;IF([.T320]=84;60;IF([.T320]=108;60;IF([.T320]=90;50;IF([.T320]=72;40;IF([.T320]=80;40;IF([.T320]=100;50;IF([.T320]=54;30;IF([.T320]=36;20;IF([.T320]=18;10;IF([.T32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325125250/defenderoftexel/images/thumb/5/59/Aquarius_Icon.png/50px-Aquari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quarius&quot;; &quot;Aquarius&quot;)" office:value-type="string" office:string-value="Aquarius" calcext:value-type="string">
            <text:p>Aquarius</text:p>
          </table:table-cell>
          <table:table-cell table:style-name="ce25"/>
          <table:table-cell table:style-name="ce28" office:value-type="float" office:value="690" calcext:value-type="float">
            <text:p>690</text:p>
          </table:table-cell>
          <table:table-cell table:style-name="ce33" office:value-type="float" office:value="1214" calcext:value-type="float">
            <text:p>1214</text:p>
          </table:table-cell>
          <table:table-cell table:style-name="ce37" office:value-type="float" office:value="636" calcext:value-type="float">
            <text:p>636</text:p>
          </table:table-cell>
          <table:table-cell table:style-name="ce41" office:value-type="float" office:value="7503" calcext:value-type="float">
            <text:p>7503</text:p>
          </table:table-cell>
          <table:table-cell table:style-name="ce45" office:value-type="float" office:value="5553" calcext:value-type="float">
            <text:p>5553</text:p>
          </table:table-cell>
          <table:table-cell table:style-name="ce53" table:formula="of:=SUM([.D321:.H321])" office:value-type="float" office:value="15596" calcext:value-type="float">
            <text:p>15596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1]=126;70;IF([.T321]=112;70;IF([.T321]=98;70;IF([.T321]=96;60;IF([.T321]=84;60;IF([.T321]=108;60;IF([.T321]=90;50;IF([.T321]=72;40;IF([.T321]=80;40;IF([.T321]=100;50;IF([.T321]=54;30;IF([.T321]=36;20;IF([.T321]=18;10;IF([.T32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502220114/defenderoftexel/images/6/68/Aranethe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ranethea&quot;; &quot;Aranethea&quot;)" office:value-type="string" office:string-value="Aranethea" calcext:value-type="string">
            <text:p>Aranethe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19" calcext:value-type="float">
            <text:p>1819</text:p>
          </table:table-cell>
          <table:table-cell table:style-name="ce32" office:value-type="float" office:value="1277" calcext:value-type="float">
            <text:p>1277</text:p>
          </table:table-cell>
          <table:table-cell table:style-name="ce36" office:value-type="float" office:value="822" calcext:value-type="float">
            <text:p>822</text:p>
          </table:table-cell>
          <table:table-cell table:style-name="ce40" office:value-type="float" office:value="5232" calcext:value-type="float">
            <text:p>5232</text:p>
          </table:table-cell>
          <table:table-cell table:style-name="ce44" office:value-type="float" office:value="4981" calcext:value-type="float">
            <text:p>4981</text:p>
          </table:table-cell>
          <table:table-cell table:style-name="ce52" table:formula="of:=SUM([.D322:.H322])" office:value-type="float" office:value="14131" calcext:value-type="float">
            <text:p>14131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22]=126;70;IF([.T322]=112;70;IF([.T322]=98;70;IF([.T322]=96;60;IF([.T322]=84;60;IF([.T322]=108;60;IF([.T322]=90;50;IF([.T322]=72;40;IF([.T322]=80;40;IF([.T322]=100;50;IF([.T322]=54;30;IF([.T322]=36;20;IF([.T322]=18;10;IF([.T32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119153230/defenderoftexel/images/thumb/f/f9/Arathia_Icon.png/50px-Arath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ta_-_Cafatia_-_Arathia&quot;;&quot;Arathia&quot;)" office:value-type="string" office:string-value="Arathia" calcext:value-type="string">
            <text:p>Arathia</text:p>
          </table:table-cell>
          <table:table-cell table:style-name="ce25"/>
          <table:table-cell table:style-name="ce28" office:value-type="float" office:value="5238" calcext:value-type="float">
            <text:p>5238</text:p>
          </table:table-cell>
          <table:table-cell table:style-name="ce33" office:value-type="float" office:value="4427" calcext:value-type="float">
            <text:p>4427</text:p>
          </table:table-cell>
          <table:table-cell table:style-name="ce37" office:value-type="float" office:value="2271" calcext:value-type="float">
            <text:p>2271</text:p>
          </table:table-cell>
          <table:table-cell table:style-name="ce41" office:value-type="float" office:value="448" calcext:value-type="float">
            <text:p>448</text:p>
          </table:table-cell>
          <table:table-cell table:style-name="ce45" office:value-type="float" office:value="1697" calcext:value-type="float">
            <text:p>1697</text:p>
          </table:table-cell>
          <table:table-cell table:style-name="ce53" table:formula="of:=SUM([.D323:.H323])" office:value-type="float" office:value="14081" calcext:value-type="float">
            <text:p>14081</text:p>
          </table:table-cell>
          <table:table-cell table:style-name="ce60" office:value-type="string" calcext:value-type="string">
            <text:p>Ven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3]=126;70;IF([.T323]=112;70;IF([.T323]=98;70;IF([.T323]=96;60;IF([.T323]=84;60;IF([.T323]=108;60;IF([.T323]=90;50;IF([.T323]=72;40;IF([.T323]=80;40;IF([.T323]=100;50;IF([.T323]=54;30;IF([.T323]=36;20;IF([.T323]=18;10;IF([.T32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053/defenderoftexel/images/thumb/0/0a/Araziia_Icon.png/50px-Arazi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raziia&quot;; &quot;Araziia&quot;)" office:value-type="string" office:string-value="Araziia" calcext:value-type="string">
            <text:p>Araziia</text:p>
          </table:table-cell>
          <table:table-cell table:style-name="ce25"/>
          <table:table-cell table:style-name="ce28" office:value-type="float" office:value="2022" calcext:value-type="float">
            <text:p>2022</text:p>
          </table:table-cell>
          <table:table-cell table:style-name="ce33" office:value-type="float" office:value="1542" calcext:value-type="float">
            <text:p>1542</text:p>
          </table:table-cell>
          <table:table-cell table:style-name="ce37" office:value-type="float" office:value="1051" calcext:value-type="float">
            <text:p>1051</text:p>
          </table:table-cell>
          <table:table-cell table:style-name="ce41" office:value-type="float" office:value="1495" calcext:value-type="float">
            <text:p>1495</text:p>
          </table:table-cell>
          <table:table-cell table:style-name="ce45" office:value-type="float" office:value="3775" calcext:value-type="float">
            <text:p>3775</text:p>
          </table:table-cell>
          <table:table-cell table:style-name="ce53" table:formula="of:=SUM([.D324:.H324])" office:value-type="float" office:value="9885" calcext:value-type="float">
            <text:p>9885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4]=126;70;IF([.T324]=112;70;IF([.T324]=98;70;IF([.T324]=96;60;IF([.T324]=84;60;IF([.T324]=108;60;IF([.T324]=90;50;IF([.T324]=72;40;IF([.T324]=80;40;IF([.T324]=100;50;IF([.T324]=54;30;IF([.T324]=36;20;IF([.T324]=18;10;IF([.T32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823132119/defenderoftexel/images/thumb/c/cf/Arcuriand_Icon.png/50px-Arcuriand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rcuriand&quot;; &quot;Arcuriand&quot;)" office:value-type="string" office:string-value="Arcuriand" calcext:value-type="string">
            <text:p>Arcurian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301" calcext:value-type="float">
            <text:p>1301</text:p>
          </table:table-cell>
          <table:table-cell table:style-name="ce32" office:value-type="float" office:value="3763" calcext:value-type="float">
            <text:p>3763</text:p>
          </table:table-cell>
          <table:table-cell table:style-name="ce36" office:value-type="float" office:value="1162" calcext:value-type="float">
            <text:p>1162</text:p>
          </table:table-cell>
          <table:table-cell table:style-name="ce40" office:value-type="float" office:value="2476" calcext:value-type="float">
            <text:p>2476</text:p>
          </table:table-cell>
          <table:table-cell table:style-name="ce44" office:value-type="float" office:value="1790" calcext:value-type="float">
            <text:p>1790</text:p>
          </table:table-cell>
          <table:table-cell table:style-name="ce52" table:formula="of:=SUM([.D325:.H325])" office:value-type="float" office:value="10492" calcext:value-type="float">
            <text:p>10492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25]=126;70;IF([.T325]=112;70;IF([.T325]=98;70;IF([.T325]=96;60;IF([.T325]=84;60;IF([.T325]=108;60;IF([.T325]=90;50;IF([.T325]=72;40;IF([.T325]=80;40;IF([.T325]=100;50;IF([.T325]=54;30;IF([.T325]=36;20;IF([.T325]=18;10;IF([.T32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325115414/defenderoftexel/images/thumb/f/fc/Ares_Dreadsire_Icon.png/50px-Ares_Dreadsir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res_Dreadsire&quot;; &quot;Ares Dreadsire&quot;)" office:value-type="string" office:string-value="Ares Dreadsire" calcext:value-type="string">
            <text:p>Ares Dreadsire</text:p>
          </table:table-cell>
          <table:table-cell table:style-name="ce25"/>
          <table:table-cell table:style-name="ce28" office:value-type="float" office:value="12302" calcext:value-type="float">
            <text:p>12302</text:p>
          </table:table-cell>
          <table:table-cell table:style-name="ce33" office:value-type="float" office:value="8748" calcext:value-type="float">
            <text:p>8748</text:p>
          </table:table-cell>
          <table:table-cell table:style-name="ce37" office:value-type="float" office:value="10192" calcext:value-type="float">
            <text:p>10192</text:p>
          </table:table-cell>
          <table:table-cell table:style-name="ce41" office:value-type="float" office:value="1068" calcext:value-type="float">
            <text:p>1068</text:p>
          </table:table-cell>
          <table:table-cell table:style-name="ce45" office:value-type="float" office:value="1314" calcext:value-type="float">
            <text:p>1314</text:p>
          </table:table-cell>
          <table:table-cell table:style-name="ce53" table:formula="of:=SUM([.D326:.H326])" office:value-type="float" office:value="33624" calcext:value-type="float">
            <text:p>33624</text:p>
          </table:table-cell>
          <table:table-cell table:style-name="ce60" office:value-type="string" calcext:value-type="string">
            <text:p>Alalaz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326]=126;70;IF([.T326]=112;70;IF([.T326]=98;70;IF([.T326]=96;60;IF([.T326]=84;60;IF([.T326]=108;60;IF([.T326]=90;50;IF([.T326]=72;40;IF([.T326]=80;40;IF([.T326]=100;50;IF([.T326]=54;30;IF([.T326]=36;20;IF([.T326]=18;10;IF([.T32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217150055/defenderoftexel/images/thumb/5/53/Aril_Icon.png/50px-Ari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ele_-_Urphe_-_Aril&quot;;&quot;Aril&quot;)" office:value-type="string" office:string-value="Aril" calcext:value-type="string">
            <text:p>Aril</text:p>
          </table:table-cell>
          <table:table-cell table:style-name="ce25"/>
          <table:table-cell table:style-name="ce28" office:value-type="float" office:value="2246" calcext:value-type="float">
            <text:p>2246</text:p>
          </table:table-cell>
          <table:table-cell table:style-name="ce33" office:value-type="float" office:value="2178" calcext:value-type="float">
            <text:p>2178</text:p>
          </table:table-cell>
          <table:table-cell table:style-name="ce37" office:value-type="float" office:value="1093" calcext:value-type="float">
            <text:p>1093</text:p>
          </table:table-cell>
          <table:table-cell table:style-name="ce41" office:value-type="float" office:value="2246" calcext:value-type="float">
            <text:p>2246</text:p>
          </table:table-cell>
          <table:table-cell table:style-name="ce45" office:value-type="float" office:value="6021" calcext:value-type="float">
            <text:p>6021</text:p>
          </table:table-cell>
          <table:table-cell table:style-name="ce53" table:formula="of:=SUM([.D327:.H327])" office:value-type="float" office:value="13784" calcext:value-type="float">
            <text:p>13784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7]=126;70;IF([.T327]=112;70;IF([.T327]=98;70;IF([.T327]=96;60;IF([.T327]=84;60;IF([.T327]=108;60;IF([.T327]=90;50;IF([.T327]=72;40;IF([.T327]=80;40;IF([.T327]=100;50;IF([.T327]=54;30;IF([.T327]=36;20;IF([.T327]=18;10;IF([.T32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24251/defenderoftexel/images/thumb/b/bc/Arnza_Icon.png/40px-Arnz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rnza&quot;; &quot;Arnza&quot;)" office:value-type="string" office:string-value="Arnza" calcext:value-type="string">
            <text:p>Arnza</text:p>
          </table:table-cell>
          <table:table-cell table:style-name="ce25"/>
          <table:table-cell table:style-name="ce28" office:value-type="float" office:value="1166" calcext:value-type="float">
            <text:p>1166</text:p>
          </table:table-cell>
          <table:table-cell table:style-name="ce33" office:value-type="float" office:value="2716" calcext:value-type="float">
            <text:p>2716</text:p>
          </table:table-cell>
          <table:table-cell table:style-name="ce37" office:value-type="float" office:value="592" calcext:value-type="float">
            <text:p>592</text:p>
          </table:table-cell>
          <table:table-cell table:style-name="ce41" office:value-type="float" office:value="2576" calcext:value-type="float">
            <text:p>2576</text:p>
          </table:table-cell>
          <table:table-cell table:style-name="ce45" office:value-type="float" office:value="787" calcext:value-type="float">
            <text:p>787</text:p>
          </table:table-cell>
          <table:table-cell table:style-name="ce53" table:formula="of:=SUM([.D328:.H328])" office:value-type="float" office:value="7837" calcext:value-type="float">
            <text:p>7837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8]=126;70;IF([.T328]=112;70;IF([.T328]=98;70;IF([.T328]=96;60;IF([.T328]=84;60;IF([.T328]=108;60;IF([.T328]=90;50;IF([.T328]=72;40;IF([.T328]=80;40;IF([.T328]=100;50;IF([.T328]=54;30;IF([.T328]=36;20;IF([.T328]=18;10;IF([.T32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9/96/Arpopr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ena_-_Koadama_-_Arpopria&quot;; &quot;Arpopria&quot;)" office:value-type="string" office:string-value="Arpopria" calcext:value-type="string">
            <text:p>Arpopria</text:p>
          </table:table-cell>
          <table:table-cell table:style-name="ce25"/>
          <table:table-cell table:style-name="ce28" office:value-type="float" office:value="613" calcext:value-type="float">
            <text:p>613</text:p>
          </table:table-cell>
          <table:table-cell table:style-name="ce33" office:value-type="float" office:value="1801" calcext:value-type="float">
            <text:p>1801</text:p>
          </table:table-cell>
          <table:table-cell table:style-name="ce37" office:value-type="float" office:value="545" calcext:value-type="float">
            <text:p>545</text:p>
          </table:table-cell>
          <table:table-cell table:style-name="ce41" office:value-type="float" office:value="1174" calcext:value-type="float">
            <text:p>1174</text:p>
          </table:table-cell>
          <table:table-cell table:style-name="ce45" office:value-type="float" office:value="842" calcext:value-type="float">
            <text:p>842</text:p>
          </table:table-cell>
          <table:table-cell table:style-name="ce53" table:formula="of:=SUM([.D329:.H329])" office:value-type="float" office:value="4975" calcext:value-type="float">
            <text:p>4975</text:p>
          </table:table-cell>
          <table:table-cell table:style-name="ce60" office:value-type="string" calcext:value-type="string">
            <text:p>Quicken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29]=126;70;IF([.T329]=112;70;IF([.T329]=98;70;IF([.T329]=96;60;IF([.T329]=84;60;IF([.T329]=108;60;IF([.T329]=90;50;IF([.T329]=72;40;IF([.T329]=80;40;IF([.T329]=100;50;IF([.T329]=54;30;IF([.T329]=36;20;IF([.T329]=18;10;IF([.T32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6214140/defenderoftexel/images/thumb/f/f8/Artachsharta_Icon.png/50px-Artachshart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rtachsharta&quot;; &quot;Artachsharta&quot;)" office:value-type="string" office:string-value="Artachsharta" calcext:value-type="string">
            <text:p>Artachsharta</text:p>
          </table:table-cell>
          <table:table-cell table:style-name="ce25"/>
          <table:table-cell table:style-name="ce28" office:value-type="float" office:value="932" calcext:value-type="float">
            <text:p>932</text:p>
          </table:table-cell>
          <table:table-cell table:style-name="ce33" office:value-type="float" office:value="995" calcext:value-type="float">
            <text:p>995</text:p>
          </table:table-cell>
          <table:table-cell table:style-name="ce37" office:value-type="float" office:value="469" calcext:value-type="float">
            <text:p>469</text:p>
          </table:table-cell>
          <table:table-cell table:style-name="ce41" office:value-type="float" office:value="803" calcext:value-type="float">
            <text:p>803</text:p>
          </table:table-cell>
          <table:table-cell table:style-name="ce45" office:value-type="float" office:value="738" calcext:value-type="float">
            <text:p>738</text:p>
          </table:table-cell>
          <table:table-cell table:style-name="ce53" table:formula="of:=SUM([.D330:.H330])" office:value-type="float" office:value="3937" calcext:value-type="float">
            <text:p>3937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0]=126;70;IF([.T330]=112;70;IF([.T330]=98;70;IF([.T330]=96;60;IF([.T330]=84;60;IF([.T330]=108;60;IF([.T330]=90;50;IF([.T330]=72;40;IF([.T330]=80;40;IF([.T330]=100;50;IF([.T330]=54;30;IF([.T330]=36;20;IF([.T330]=18;10;IF([.T33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203134456/defenderoftexel/images/thumb/7/7a/Ascepeyka_Icon.png/50px-Ascepeyk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eligha_-_Owina_-_Ascepeyka&quot;;&quot;Ascepeyka&quot;)" office:value-type="string" office:string-value="Ascepeyka" calcext:value-type="string">
            <text:p>Ascepeyka</text:p>
          </table:table-cell>
          <table:table-cell table:style-name="ce25"/>
          <table:table-cell table:style-name="ce28" office:value-type="float" office:value="2016" calcext:value-type="float">
            <text:p>2016</text:p>
          </table:table-cell>
          <table:table-cell table:style-name="ce33" office:value-type="float" office:value="1416" calcext:value-type="float">
            <text:p>1416</text:p>
          </table:table-cell>
          <table:table-cell table:style-name="ce37" office:value-type="float" office:value="916" calcext:value-type="float">
            <text:p>916</text:p>
          </table:table-cell>
          <table:table-cell table:style-name="ce41" office:value-type="float" office:value="5802" calcext:value-type="float">
            <text:p>5802</text:p>
          </table:table-cell>
          <table:table-cell table:style-name="ce45" office:value-type="float" office:value="5527" calcext:value-type="float">
            <text:p>5527</text:p>
          </table:table-cell>
          <table:table-cell table:style-name="ce53" table:formula="of:=SUM([.D331:.H331])" office:value-type="float" office:value="15677" calcext:value-type="float">
            <text:p>15677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1]=126;70;IF([.T331]=112;70;IF([.T331]=98;70;IF([.T331]=96;60;IF([.T331]=84;60;IF([.T331]=108;60;IF([.T331]=90;50;IF([.T331]=72;40;IF([.T331]=80;40;IF([.T331]=100;50;IF([.T331]=54;30;IF([.T331]=36;20;IF([.T331]=18;10;IF([.T33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029130513/defenderoftexel/images/thumb/c/c4/Ashnan_Icon.png/50px-Ashna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zimua_-_Apulnidiszu_-_Ashnan&quot;;&quot;Ashnan&quot;)" office:value-type="string" office:string-value="Ashnan" calcext:value-type="string">
            <text:p>Ashnan</text:p>
          </table:table-cell>
          <table:table-cell table:style-name="ce25"/>
          <table:table-cell table:style-name="ce28" office:value-type="float" office:value="2256" calcext:value-type="float">
            <text:p>2256</text:p>
          </table:table-cell>
          <table:table-cell table:style-name="ce33" office:value-type="float" office:value="1717" calcext:value-type="float">
            <text:p>1717</text:p>
          </table:table-cell>
          <table:table-cell table:style-name="ce37" office:value-type="float" office:value="1171" calcext:value-type="float">
            <text:p>1171</text:p>
          </table:table-cell>
          <table:table-cell table:style-name="ce41" office:value-type="float" office:value="1667" calcext:value-type="float">
            <text:p>1667</text:p>
          </table:table-cell>
          <table:table-cell table:style-name="ce45" office:value-type="float" office:value="4206" calcext:value-type="float">
            <text:p>4206</text:p>
          </table:table-cell>
          <table:table-cell table:style-name="ce53" table:formula="of:=SUM([.D332:.H332])" office:value-type="float" office:value="11017" calcext:value-type="float">
            <text:p>11017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2]=126;70;IF([.T332]=112;70;IF([.T332]=98;70;IF([.T332]=96;60;IF([.T332]=84;60;IF([.T332]=108;60;IF([.T332]=90;50;IF([.T332]=72;40;IF([.T332]=80;40;IF([.T332]=100;50;IF([.T332]=54;30;IF([.T332]=36;20;IF([.T332]=18;10;IF([.T33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25190510/defenderoftexel/images/thumb/b/b6/Askoreia_Icon.png/50px-Askore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skoreia&quot;;&quot;Askoreia&quot;)" office:value-type="string" office:string-value="Askoreia" calcext:value-type="string">
            <text:p>Askoreia</text:p>
          </table:table-cell>
          <table:table-cell table:style-name="ce25"/>
          <table:table-cell table:style-name="ce28" office:value-type="float" office:value="3096" calcext:value-type="float">
            <text:p>3096</text:p>
          </table:table-cell>
          <table:table-cell table:style-name="ce33" office:value-type="float" office:value="5052" calcext:value-type="float">
            <text:p>5052</text:p>
          </table:table-cell>
          <table:table-cell table:style-name="ce37" office:value-type="float" office:value="2572" calcext:value-type="float">
            <text:p>2572</text:p>
          </table:table-cell>
          <table:table-cell table:style-name="ce41" office:value-type="float" office:value="4041" calcext:value-type="float">
            <text:p>4041</text:p>
          </table:table-cell>
          <table:table-cell table:style-name="ce45" office:value-type="float" office:value="494" calcext:value-type="float">
            <text:p>494</text:p>
          </table:table-cell>
          <table:table-cell table:style-name="ce53" table:formula="of:=SUM([.D333:.H333])" office:value-type="float" office:value="15255" calcext:value-type="float">
            <text:p>15255</text:p>
          </table:table-cell>
          <table:table-cell table:style-name="ce60" office:value-type="string" calcext:value-type="string">
            <text:p>Passe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3]=126;70;IF([.T333]=112;70;IF([.T333]=98;70;IF([.T333]=96;60;IF([.T333]=84;60;IF([.T333]=108;60;IF([.T333]=90;50;IF([.T333]=72;40;IF([.T333]=80;40;IF([.T333]=100;50;IF([.T333]=54;30;IF([.T333]=36;20;IF([.T333]=18;10;IF([.T33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4/41/Asphandiat_Icon.png/revision/latest?cb=20140930165926&quot;)" office:value-type="string" office:string-value="" calcext:value-type="error">
            <text:p>#NAME?</text:p>
          </table:table-cell>
          <table:table-cell table:style-name="ce11" table:formula="of:=HYPERLINK(&quot;http://defenderoftexel.wikia.com/wiki/Nazarre_-_Tangrihan_-_Asphandiat&quot;;&quot;Asphandiat&quot;)" office:value-type="string" office:string-value="Asphandiat" calcext:value-type="string">
            <text:p>Asphandia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41" calcext:value-type="float">
            <text:p>2441</text:p>
          </table:table-cell>
          <table:table-cell table:style-name="ce32" office:value-type="float" office:value="5677" calcext:value-type="float">
            <text:p>5677</text:p>
          </table:table-cell>
          <table:table-cell table:style-name="ce36" office:value-type="float" office:value="1236" calcext:value-type="float">
            <text:p>1236</text:p>
          </table:table-cell>
          <table:table-cell table:style-name="ce40" office:value-type="float" office:value="5387" calcext:value-type="float">
            <text:p>5387</text:p>
          </table:table-cell>
          <table:table-cell table:style-name="ce44" office:value-type="float" office:value="1642" calcext:value-type="float">
            <text:p>1642</text:p>
          </table:table-cell>
          <table:table-cell table:style-name="ce52" table:formula="of:=SUM([.D334:.H334])" office:value-type="float" office:value="16383" calcext:value-type="float">
            <text:p>16383</text:p>
          </table:table-cell>
          <table:table-cell table:style-name="ce59" office:value-type="string" calcext:value-type="string">
            <text:p>Ambiguate 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34]=126;70;IF([.T334]=112;70;IF([.T334]=98;70;IF([.T334]=96;60;IF([.T334]=84;60;IF([.T334]=108;60;IF([.T334]=90;50;IF([.T334]=72;40;IF([.T334]=80;40;IF([.T334]=100;50;IF([.T334]=54;30;IF([.T334]=36;20;IF([.T334]=18;10;IF([.T33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9/93/Assidhios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ssidhios&quot;; &quot;Assidhios&quot;)" office:value-type="string" office:string-value="Assidhios" calcext:value-type="string">
            <text:p>Assidhios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650" calcext:value-type="float">
            <text:p>3650</text:p>
          </table:table-cell>
          <table:table-cell table:style-name="ce32" office:value-type="float" office:value="1547" calcext:value-type="float">
            <text:p>1547</text:p>
          </table:table-cell>
          <table:table-cell table:style-name="ce36" office:value-type="float" office:value="1697" calcext:value-type="float">
            <text:p>1697</text:p>
          </table:table-cell>
          <table:table-cell table:style-name="ce40" office:value-type="float" office:value="263" calcext:value-type="float">
            <text:p>263</text:p>
          </table:table-cell>
          <table:table-cell table:style-name="ce44" office:value-type="float" office:value="289" calcext:value-type="float">
            <text:p>289</text:p>
          </table:table-cell>
          <table:table-cell table:style-name="ce52" table:formula="of:=SUM([.D335:.H335])" office:value-type="float" office:value="7446" calcext:value-type="float">
            <text:p>7446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35]=126;70;IF([.T335]=112;70;IF([.T335]=98;70;IF([.T335]=96;60;IF([.T335]=84;60;IF([.T335]=108;60;IF([.T335]=90;50;IF([.T335]=72;40;IF([.T335]=80;40;IF([.T335]=100;50;IF([.T335]=54;30;IF([.T335]=36;20;IF([.T335]=18;10;IF([.T335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304144325/defenderoftexel/images/thumb/6/64/Asteriskos_Icon.png/50px-Asteriskos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steriskos&quot;; &quot;Asteriskos&quot;)" office:value-type="string" office:string-value="Asteriskos" calcext:value-type="string">
            <text:p>Asterisko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289" calcext:value-type="float">
            <text:p>3289</text:p>
          </table:table-cell>
          <table:table-cell table:style-name="ce32" office:value-type="float" office:value="4146" calcext:value-type="float">
            <text:p>4146</text:p>
          </table:table-cell>
          <table:table-cell table:style-name="ce36" office:value-type="float" office:value="1088" calcext:value-type="float">
            <text:p>1088</text:p>
          </table:table-cell>
          <table:table-cell table:style-name="ce40" office:value-type="float" office:value="3782" calcext:value-type="float">
            <text:p>3782</text:p>
          </table:table-cell>
          <table:table-cell table:style-name="ce44" office:value-type="float" office:value="722" calcext:value-type="float">
            <text:p>722</text:p>
          </table:table-cell>
          <table:table-cell table:style-name="ce52" table:formula="of:=SUM([.D336:.H336])" office:value-type="float" office:value="13027" calcext:value-type="float">
            <text:p>13027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36]=126;70;IF([.T336]=112;70;IF([.T336]=98;70;IF([.T336]=96;60;IF([.T336]=84;60;IF([.T336]=108;60;IF([.T336]=90;50;IF([.T336]=72;40;IF([.T336]=80;40;IF([.T336]=100;50;IF([.T336]=54;30;IF([.T336]=36;20;IF([.T336]=18;10;IF([.T33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0181520/defenderoftexel/images/thumb/b/b5/Astruga_Icon.png/50px-Astrug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imelia_-_Firnelle_-_Astruga&quot;;&quot;Astruga&quot;)" office:value-type="string" office:string-value="Astruga" calcext:value-type="string">
            <text:p>Astruga</text:p>
          </table:table-cell>
          <table:table-cell table:style-name="ce25"/>
          <table:table-cell table:style-name="ce28" office:value-type="float" office:value="4944" calcext:value-type="float">
            <text:p>4944</text:p>
          </table:table-cell>
          <table:table-cell table:style-name="ce33" office:value-type="float" office:value="5656" calcext:value-type="float">
            <text:p>5656</text:p>
          </table:table-cell>
          <table:table-cell table:style-name="ce37" office:value-type="float" office:value="3033" calcext:value-type="float">
            <text:p>3033</text:p>
          </table:table-cell>
          <table:table-cell table:style-name="ce41" office:value-type="float" office:value="712" calcext:value-type="float">
            <text:p>712</text:p>
          </table:table-cell>
          <table:table-cell table:style-name="ce45" office:value-type="float" office:value="950" calcext:value-type="float">
            <text:p>950</text:p>
          </table:table-cell>
          <table:table-cell table:style-name="ce53" table:formula="of:=SUM([.D337:.H337])" office:value-type="float" office:value="15295" calcext:value-type="float">
            <text:p>15295</text:p>
          </table:table-cell>
          <table:table-cell table:style-name="ce60" office:value-type="string" calcext:value-type="string">
            <text:p>Snowdo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7]=126;70;IF([.T337]=112;70;IF([.T337]=98;70;IF([.T337]=96;60;IF([.T337]=84;60;IF([.T337]=108;60;IF([.T337]=90;50;IF([.T337]=72;40;IF([.T337]=80;40;IF([.T337]=100;50;IF([.T337]=54;30;IF([.T337]=36;20;IF([.T337]=18;10;IF([.T33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17104603/defenderoftexel/images/thumb/2/29/Atalanta_Unfettered_Icon.png/50px-Atalanta_Unfettere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alanta_Unfettered&quot;; &quot;Atalanta Unfettered&quot;)" office:value-type="string" office:string-value="Atalanta Unfettered" calcext:value-type="string">
            <text:p>Atalanta Unfettered</text:p>
          </table:table-cell>
          <table:table-cell table:style-name="ce25"/>
          <table:table-cell table:style-name="ce28" office:value-type="float" office:value="2509" calcext:value-type="float">
            <text:p>2509</text:p>
          </table:table-cell>
          <table:table-cell table:style-name="ce33" office:value-type="float" office:value="2438" calcext:value-type="float">
            <text:p>2438</text:p>
          </table:table-cell>
          <table:table-cell table:style-name="ce37" office:value-type="float" office:value="1222" calcext:value-type="float">
            <text:p>1222</text:p>
          </table:table-cell>
          <table:table-cell table:style-name="ce41" office:value-type="float" office:value="2509" calcext:value-type="float">
            <text:p>2509</text:p>
          </table:table-cell>
          <table:table-cell table:style-name="ce45" office:value-type="float" office:value="6732" calcext:value-type="float">
            <text:p>6732</text:p>
          </table:table-cell>
          <table:table-cell table:style-name="ce53" table:formula="of:=SUM([.D338:.H338])" office:value-type="float" office:value="15410" calcext:value-type="float">
            <text:p>1541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8]=126;70;IF([.T338]=112;70;IF([.T338]=98;70;IF([.T338]=96;60;IF([.T338]=84;60;IF([.T338]=108;60;IF([.T338]=90;50;IF([.T338]=72;40;IF([.T338]=80;40;IF([.T338]=100;50;IF([.T338]=54;30;IF([.T338]=36;20;IF([.T338]=18;10;IF([.T33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3907/defenderoftexel/images/7/7c/Atanah-Il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anah-Ili&quot;; &quot;Atanah-Ili&quot;)" office:value-type="string" office:string-value="Atanah-Ili" calcext:value-type="string">
            <text:p>Atanah-Ili</text:p>
          </table:table-cell>
          <table:table-cell table:style-name="ce25"/>
          <table:table-cell table:style-name="ce28" office:value-type="float" office:value="886" calcext:value-type="float">
            <text:p>886</text:p>
          </table:table-cell>
          <table:table-cell table:style-name="ce33" office:value-type="float" office:value="946" calcext:value-type="float">
            <text:p>946</text:p>
          </table:table-cell>
          <table:table-cell table:style-name="ce37" office:value-type="float" office:value="447" calcext:value-type="float">
            <text:p>447</text:p>
          </table:table-cell>
          <table:table-cell table:style-name="ce41" office:value-type="float" office:value="761" calcext:value-type="float">
            <text:p>761</text:p>
          </table:table-cell>
          <table:table-cell table:style-name="ce45" office:value-type="float" office:value="701" calcext:value-type="float">
            <text:p>701</text:p>
          </table:table-cell>
          <table:table-cell table:style-name="ce53" table:formula="of:=SUM([.D339:.H339])" office:value-type="float" office:value="3741" calcext:value-type="float">
            <text:p>3741</text:p>
          </table:table-cell>
          <table:table-cell table:style-name="ce60" office:value-type="string" calcext:value-type="string">
            <text:p>Inspi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39]=126;70;IF([.T339]=112;70;IF([.T339]=98;70;IF([.T339]=96;60;IF([.T339]=84;60;IF([.T339]=108;60;IF([.T339]=90;50;IF([.T339]=72;40;IF([.T339]=80;40;IF([.T339]=100;50;IF([.T339]=54;30;IF([.T339]=36;20;IF([.T339]=18;10;IF([.T33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45560/defenderoftexel/images/thumb/5/59/Ataneedusu_Icon.png/50px-Ataneedus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aneedusu&quot;; &quot;Ataneedusu&quot;)" office:value-type="string" office:string-value="Ataneedusu" calcext:value-type="string">
            <text:p>Ataneedusu</text:p>
          </table:table-cell>
          <table:table-cell table:style-name="ce25"/>
          <table:table-cell table:style-name="ce28" office:value-type="float" office:value="2787" calcext:value-type="float">
            <text:p>2787</text:p>
          </table:table-cell>
          <table:table-cell table:style-name="ce33" office:value-type="float" office:value="4236" calcext:value-type="float">
            <text:p>4236</text:p>
          </table:table-cell>
          <table:table-cell table:style-name="ce37" office:value-type="float" office:value="1446" calcext:value-type="float">
            <text:p>1446</text:p>
          </table:table-cell>
          <table:table-cell table:style-name="ce41" office:value-type="float" office:value="872" calcext:value-type="float">
            <text:p>872</text:p>
          </table:table-cell>
          <table:table-cell table:style-name="ce45" office:value-type="float" office:value="4393" calcext:value-type="float">
            <text:p>4393</text:p>
          </table:table-cell>
          <table:table-cell table:style-name="ce53" table:formula="of:=SUM([.D340:.H340])" office:value-type="float" office:value="13734" calcext:value-type="float">
            <text:p>13734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40]=126;70;IF([.T340]=112;70;IF([.T340]=98;70;IF([.T340]=96;60;IF([.T340]=84;60;IF([.T340]=108;60;IF([.T340]=90;50;IF([.T340]=72;40;IF([.T340]=80;40;IF([.T340]=100;50;IF([.T340]=54;30;IF([.T340]=36;20;IF([.T340]=18;10;IF([.T34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211132900/defenderoftexel/images/thumb/2/2e/Atirib_Icon.png/50px-Atirib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irib&quot;; &quot;Atirib&quot;)" office:value-type="string" office:string-value="Atirib" calcext:value-type="string">
            <text:p>Atirib</text:p>
          </table:table-cell>
          <table:table-cell table:style-name="ce25"/>
          <table:table-cell table:style-name="ce28" office:value-type="float" office:value="7083" calcext:value-type="float">
            <text:p>7083</text:p>
          </table:table-cell>
          <table:table-cell table:style-name="ce33" office:value-type="float" office:value="12863" calcext:value-type="float">
            <text:p>12863</text:p>
          </table:table-cell>
          <table:table-cell table:style-name="ce37" office:value-type="float" office:value="4282" calcext:value-type="float">
            <text:p>4282</text:p>
          </table:table-cell>
          <table:table-cell table:style-name="ce41" office:value-type="float" office:value="4844" calcext:value-type="float">
            <text:p>4844</text:p>
          </table:table-cell>
          <table:table-cell table:style-name="ce45" office:value-type="float" office:value="1708" calcext:value-type="float">
            <text:p>1708</text:p>
          </table:table-cell>
          <table:table-cell table:style-name="ce53" table:formula="of:=SUM([.D341:.H341])" office:value-type="float" office:value="30780" calcext:value-type="float">
            <text:p>30780</text:p>
          </table:table-cell>
          <table:table-cell table:style-name="ce60" office:value-type="string" calcext:value-type="string">
            <text:p>Nitpick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341]=126;70;IF([.T341]=112;70;IF([.T341]=98;70;IF([.T341]=96;60;IF([.T341]=84;60;IF([.T341]=108;60;IF([.T341]=90;50;IF([.T341]=72;40;IF([.T341]=80;40;IF([.T341]=100;50;IF([.T341]=54;30;IF([.T341]=36;20;IF([.T341]=18;10;IF([.T34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53958/defenderoftexel/images/thumb/3/31/Attii%27kusu_Icon.png/50px-Attii%27kus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tii'kusu&quot;; &quot;Attii'kusu&quot;)" office:value-type="string" office:string-value="Attii'kusu" calcext:value-type="string">
            <text:p>Attii'kusu</text:p>
          </table:table-cell>
          <table:table-cell table:style-name="ce25"/>
          <table:table-cell table:style-name="ce28" office:value-type="float" office:value="1801" calcext:value-type="float">
            <text:p>1801</text:p>
          </table:table-cell>
          <table:table-cell table:style-name="ce33" office:value-type="float" office:value="4197" calcext:value-type="float">
            <text:p>4197</text:p>
          </table:table-cell>
          <table:table-cell table:style-name="ce37" office:value-type="float" office:value="914" calcext:value-type="float">
            <text:p>914</text:p>
          </table:table-cell>
          <table:table-cell table:style-name="ce41" office:value-type="float" office:value="3981" calcext:value-type="float">
            <text:p>3981</text:p>
          </table:table-cell>
          <table:table-cell table:style-name="ce45" office:value-type="float" office:value="1212" calcext:value-type="float">
            <text:p>1212</text:p>
          </table:table-cell>
          <table:table-cell table:style-name="ce53" table:formula="of:=SUM([.D342:.H342])" office:value-type="float" office:value="12105" calcext:value-type="float">
            <text:p>12105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42]=126;70;IF([.T342]=112;70;IF([.T342]=98;70;IF([.T342]=96;60;IF([.T342]=84;60;IF([.T342]=108;60;IF([.T342]=90;50;IF([.T342]=72;40;IF([.T342]=80;40;IF([.T342]=100;50;IF([.T342]=54;30;IF([.T342]=36;20;IF([.T342]=18;10;IF([.T34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515045246/defenderoftexel/images/thumb/6/6c/Aubyzant_Icon.png/50px-Aubyzant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Plumstone&quot;; &quot;Aubyzant&quot;)" office:value-type="string" office:string-value="Aubyzant" calcext:value-type="string">
            <text:p>Aubyzant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350" calcext:value-type="float">
            <text:p>1350</text:p>
          </table:table-cell>
          <table:table-cell table:style-name="ce32" office:value-type="float" office:value="2105" calcext:value-type="float">
            <text:p>2105</text:p>
          </table:table-cell>
          <table:table-cell table:style-name="ce36" office:value-type="float" office:value="682" calcext:value-type="float">
            <text:p>682</text:p>
          </table:table-cell>
          <table:table-cell table:style-name="ce40" office:value-type="float" office:value="402" calcext:value-type="float">
            <text:p>402</text:p>
          </table:table-cell>
          <table:table-cell table:style-name="ce44" office:value-type="float" office:value="2188" calcext:value-type="float">
            <text:p>2188</text:p>
          </table:table-cell>
          <table:table-cell table:style-name="ce52" table:formula="of:=SUM([.D343:.H343])" office:value-type="float" office:value="6727" calcext:value-type="float">
            <text:p>6727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43]=126;70;IF([.T343]=112;70;IF([.T343]=98;70;IF([.T343]=96;60;IF([.T343]=84;60;IF([.T343]=108;60;IF([.T343]=90;50;IF([.T343]=72;40;IF([.T343]=80;40;IF([.T343]=100;50;IF([.T343]=54;30;IF([.T343]=36;20;IF([.T343]=18;10;IF([.T34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3232/defenderoftexel/images/3/3a/Audeline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Audelinea&quot;; &quot;Audelinea&quot;)" office:value-type="string" office:string-value="Audelinea" calcext:value-type="string">
            <text:p>Audeline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92" calcext:value-type="float">
            <text:p>1892</text:p>
          </table:table-cell>
          <table:table-cell table:style-name="ce32" office:value-type="float" office:value="2876" calcext:value-type="float">
            <text:p>2876</text:p>
          </table:table-cell>
          <table:table-cell table:style-name="ce36" office:value-type="float" office:value="982" calcext:value-type="float">
            <text:p>982</text:p>
          </table:table-cell>
          <table:table-cell table:style-name="ce40" office:value-type="float" office:value="593" calcext:value-type="float">
            <text:p>593</text:p>
          </table:table-cell>
          <table:table-cell table:style-name="ce44" office:value-type="float" office:value="2984" calcext:value-type="float">
            <text:p>2984</text:p>
          </table:table-cell>
          <table:table-cell table:style-name="ce52" table:formula="of:=SUM([.D344:.H344])" office:value-type="float" office:value="9327" calcext:value-type="float">
            <text:p>9327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44]=126;70;IF([.T344]=112;70;IF([.T344]=98;70;IF([.T344]=96;60;IF([.T344]=84;60;IF([.T344]=108;60;IF([.T344]=90;50;IF([.T344]=72;40;IF([.T344]=80;40;IF([.T344]=100;50;IF([.T344]=54;30;IF([.T344]=36;20;IF([.T344]=18;10;IF([.T34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10143012/defenderoftexel/images/thumb/3/32/Aurikhal_Icon.png/50px-Aurikha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urikhal&quot;; &quot;Aurikhal&quot;)" office:value-type="string" office:string-value="Aurikhal" calcext:value-type="string">
            <text:p>Aurikhal</text:p>
          </table:table-cell>
          <table:table-cell table:style-name="ce25"/>
          <table:table-cell table:style-name="ce28" office:value-type="float" office:value="2333" calcext:value-type="float">
            <text:p>2333</text:p>
          </table:table-cell>
          <table:table-cell table:style-name="ce33" office:value-type="float" office:value="5426" calcext:value-type="float">
            <text:p>5426</text:p>
          </table:table-cell>
          <table:table-cell table:style-name="ce37" office:value-type="float" office:value="1184" calcext:value-type="float">
            <text:p>1184</text:p>
          </table:table-cell>
          <table:table-cell table:style-name="ce41" office:value-type="float" office:value="5153" calcext:value-type="float">
            <text:p>5153</text:p>
          </table:table-cell>
          <table:table-cell table:style-name="ce45" office:value-type="float" office:value="5153" calcext:value-type="float">
            <text:p>5153</text:p>
          </table:table-cell>
          <table:table-cell table:style-name="ce53" table:formula="of:=SUM([.D345:.H345])" office:value-type="float" office:value="19249" calcext:value-type="float">
            <text:p>19249</text:p>
          </table:table-cell>
          <table:table-cell table:style-name="ce60" office:value-type="string" calcext:value-type="string">
            <text:p>Sizzl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45]=126;70;IF([.T345]=112;70;IF([.T345]=98;70;IF([.T345]=96;60;IF([.T345]=84;60;IF([.T345]=108;60;IF([.T345]=90;50;IF([.T345]=72;40;IF([.T345]=80;40;IF([.T345]=100;50;IF([.T345]=54;30;IF([.T345]=36;20;IF([.T345]=18;10;IF([.T34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325115923/defenderoftexel/images/thumb/6/63/Aurumetti_Icon.png/50px-Aurumett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urumetti&quot;; &quot;Aurumetti&quot;)" office:value-type="string" office:string-value="Aurumetti" calcext:value-type="string">
            <text:p>Aurumetti</text:p>
          </table:table-cell>
          <table:table-cell table:style-name="ce25"/>
          <table:table-cell table:style-name="ce28" office:value-type="float" office:value="3088" calcext:value-type="float">
            <text:p>3088</text:p>
          </table:table-cell>
          <table:table-cell table:style-name="ce33" office:value-type="float" office:value="3496" calcext:value-type="float">
            <text:p>3496</text:p>
          </table:table-cell>
          <table:table-cell table:style-name="ce37" office:value-type="float" office:value="6332" calcext:value-type="float">
            <text:p>6332</text:p>
          </table:table-cell>
          <table:table-cell table:style-name="ce41" office:value-type="float" office:value="316" calcext:value-type="float">
            <text:p>316</text:p>
          </table:table-cell>
          <table:table-cell table:style-name="ce45" office:value-type="float" office:value="270" calcext:value-type="float">
            <text:p>270</text:p>
          </table:table-cell>
          <table:table-cell table:style-name="ce53" table:formula="of:=SUM([.D346:.H346])" office:value-type="float" office:value="13502" calcext:value-type="float">
            <text:p>13502</text:p>
          </table:table-cell>
          <table:table-cell table:style-name="ce60" office:value-type="string" calcext:value-type="string">
            <text:p>Slacken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46]=126;70;IF([.T346]=112;70;IF([.T346]=98;70;IF([.T346]=96;60;IF([.T346]=84;60;IF([.T346]=108;60;IF([.T346]=90;50;IF([.T346]=72;40;IF([.T346]=80;40;IF([.T346]=100;50;IF([.T346]=54;30;IF([.T346]=36;20;IF([.T346]=18;10;IF([.T34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24930/defenderoftexel/images/8/8e/Avv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vva&quot;; &quot;Avva&quot;)" office:value-type="string" office:string-value="Avva" calcext:value-type="string">
            <text:p>Avva</text:p>
          </table:table-cell>
          <table:table-cell table:style-name="ce25"/>
          <table:table-cell table:style-name="ce28" office:value-type="float" office:value="1121" calcext:value-type="float">
            <text:p>1121</text:p>
          </table:table-cell>
          <table:table-cell table:style-name="ce33" office:value-type="float" office:value="788" calcext:value-type="float">
            <text:p>788</text:p>
          </table:table-cell>
          <table:table-cell table:style-name="ce37" office:value-type="float" office:value="507" calcext:value-type="float">
            <text:p>507</text:p>
          </table:table-cell>
          <table:table-cell table:style-name="ce41" office:value-type="float" office:value="3227" calcext:value-type="float">
            <text:p>3227</text:p>
          </table:table-cell>
          <table:table-cell table:style-name="ce45" office:value-type="float" office:value="3076" calcext:value-type="float">
            <text:p>3076</text:p>
          </table:table-cell>
          <table:table-cell table:style-name="ce53" table:formula="of:=SUM([.D347:.H347])" office:value-type="float" office:value="8719" calcext:value-type="float">
            <text:p>8719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47]=126;70;IF([.T347]=112;70;IF([.T347]=98;70;IF([.T347]=96;60;IF([.T347]=84;60;IF([.T347]=108;60;IF([.T347]=90;50;IF([.T347]=72;40;IF([.T347]=80;40;IF([.T347]=100;50;IF([.T347]=54;30;IF([.T347]=36;20;IF([.T347]=18;10;IF([.T34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924190711/defenderoftexel/images/thumb/8/80/Azuna_the_Amberling_Icon.png/50px-Azuna_the_Amberling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imka_-_Mitziya_-_Azuna_the_Amberling&quot;; &quot;Azuna the Amberling&quot;)" office:value-type="string" office:string-value="Azuna the Amberling" calcext:value-type="string">
            <text:p>Azuna the Amberling</text:p>
          </table:table-cell>
          <table:table-cell table:style-name="ce25"/>
          <table:table-cell table:style-name="ce28" office:value-type="float" office:value="5184" calcext:value-type="float">
            <text:p>5184</text:p>
          </table:table-cell>
          <table:table-cell table:style-name="ce33" office:value-type="float" office:value="7909" calcext:value-type="float">
            <text:p>7909</text:p>
          </table:table-cell>
          <table:table-cell table:style-name="ce37" office:value-type="float" office:value="2701" calcext:value-type="float">
            <text:p>2701</text:p>
          </table:table-cell>
          <table:table-cell table:style-name="ce41" office:value-type="float" office:value="1639" calcext:value-type="float">
            <text:p>1639</text:p>
          </table:table-cell>
          <table:table-cell table:style-name="ce45" office:value-type="float" office:value="8204" calcext:value-type="float">
            <text:p>8204</text:p>
          </table:table-cell>
          <table:table-cell table:style-name="ce53" table:formula="of:=SUM([.D348:.H348])" office:value-type="float" office:value="25637" calcext:value-type="float">
            <text:p>25637</text:p>
          </table:table-cell>
          <table:table-cell table:style-name="ce60" office:value-type="string" calcext:value-type="string">
            <text:p>Garlan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348]=126;70;IF([.T348]=112;70;IF([.T348]=98;70;IF([.T348]=96;60;IF([.T348]=84;60;IF([.T348]=108;60;IF([.T348]=90;50;IF([.T348]=72;40;IF([.T348]=80;40;IF([.T348]=100;50;IF([.T348]=54;30;IF([.T348]=36;20;IF([.T348]=18;10;IF([.T34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624130525/defenderoftexel/images/thumb/0/0a/Baarthok_Icon.png/50px-Baarthok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aarthok&quot;; &quot;Baarthok&quot;)" office:value-type="string" office:string-value="Baarthok" calcext:value-type="string">
            <text:p>Baartho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444" calcext:value-type="float">
            <text:p>3444</text:p>
          </table:table-cell>
          <table:table-cell table:style-name="ce32" office:value-type="float" office:value="5238" calcext:value-type="float">
            <text:p>5238</text:p>
          </table:table-cell>
          <table:table-cell table:style-name="ce36" office:value-type="float" office:value="1789" calcext:value-type="float">
            <text:p>1789</text:p>
          </table:table-cell>
          <table:table-cell table:style-name="ce40" office:value-type="float" office:value="1078" calcext:value-type="float">
            <text:p>1078</text:p>
          </table:table-cell>
          <table:table-cell table:style-name="ce44" office:value-type="float" office:value="5431" calcext:value-type="float">
            <text:p>5431</text:p>
          </table:table-cell>
          <table:table-cell table:style-name="ce52" table:formula="of:=SUM([.D349:.H349])" office:value-type="float" office:value="16980" calcext:value-type="float">
            <text:p>16980</text:p>
          </table:table-cell>
          <table:table-cell table:style-name="ce59" office:value-type="string" calcext:value-type="string">
            <text:p>Needl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49]=126;70;IF([.T349]=112;70;IF([.T349]=98;70;IF([.T349]=96;60;IF([.T349]=84;60;IF([.T349]=108;60;IF([.T349]=90;50;IF([.T349]=72;40;IF([.T349]=80;40;IF([.T349]=100;50;IF([.T349]=54;30;IF([.T349]=36;20;IF([.T349]=18;10;IF([.T349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126131457/defenderoftexel/images/thumb/0/06/Babil_Icon.png/50px-Babi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sr_-_Homera_-_Babil&quot;;&quot;Babil&quot;)" office:value-type="string" office:string-value="Babil" calcext:value-type="string">
            <text:p>Babil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2870" calcext:value-type="float">
            <text:p>2870</text:p>
          </table:table-cell>
          <table:table-cell table:style-name="ce33" office:value-type="float" office:value="4024" calcext:value-type="float">
            <text:p>4024</text:p>
          </table:table-cell>
          <table:table-cell table:style-name="ce37" office:value-type="float" office:value="876" calcext:value-type="float">
            <text:p>876</text:p>
          </table:table-cell>
          <table:table-cell table:style-name="ce41" office:value-type="float" office:value="2572" calcext:value-type="float">
            <text:p>2572</text:p>
          </table:table-cell>
          <table:table-cell table:style-name="ce45" office:value-type="float" office:value="1165" calcext:value-type="float">
            <text:p>1165</text:p>
          </table:table-cell>
          <table:table-cell table:style-name="ce53" table:formula="of:=SUM([.D350:.H350])" office:value-type="float" office:value="11507" calcext:value-type="float">
            <text:p>11507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0]=126;70;IF([.T350]=112;70;IF([.T350]=98;70;IF([.T350]=96;60;IF([.T350]=84;60;IF([.T350]=108;60;IF([.T350]=90;50;IF([.T350]=72;40;IF([.T350]=80;40;IF([.T350]=100;50;IF([.T350]=54;30;IF([.T350]=36;20;IF([.T350]=18;10;IF([.T35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a/af/Baraz_the_Lionhear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abur_-_Govad_-_Baraz_the_Lionheart&quot;; &quot;Baraz the Lionheart&quot;)" office:value-type="string" office:string-value="Baraz the Lionheart" calcext:value-type="string">
            <text:p>Baraz the Lionheart</text:p>
          </table:table-cell>
          <table:table-cell table:style-name="ce25"/>
          <table:table-cell table:style-name="ce28" office:value-type="float" office:value="5196" calcext:value-type="float">
            <text:p>5196</text:p>
          </table:table-cell>
          <table:table-cell table:style-name="ce33" office:value-type="float" office:value="5943" calcext:value-type="float">
            <text:p>5943</text:p>
          </table:table-cell>
          <table:table-cell table:style-name="ce37" office:value-type="float" office:value="3185" calcext:value-type="float">
            <text:p>3185</text:p>
          </table:table-cell>
          <table:table-cell table:style-name="ce41" office:value-type="float" office:value="750" calcext:value-type="float">
            <text:p>750</text:p>
          </table:table-cell>
          <table:table-cell table:style-name="ce45" office:value-type="float" office:value="997" calcext:value-type="float">
            <text:p>997</text:p>
          </table:table-cell>
          <table:table-cell table:style-name="ce53" table:formula="of:=SUM([.D351:.H351])" office:value-type="float" office:value="16071" calcext:value-type="float">
            <text:p>16071</text:p>
          </table:table-cell>
          <table:table-cell table:style-name="ce60" office:value-type="string" calcext:value-type="string">
            <text:p>Starstrik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1]=126;70;IF([.T351]=112;70;IF([.T351]=98;70;IF([.T351]=96;60;IF([.T351]=84;60;IF([.T351]=108;60;IF([.T351]=90;50;IF([.T351]=72;40;IF([.T351]=80;40;IF([.T351]=100;50;IF([.T351]=54;30;IF([.T351]=36;20;IF([.T351]=18;10;IF([.T35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3.wikia.nocookie.net/__cb20131225102226/defenderoftexel/images/thumb/8/87/Basqunk_Icon.png/50px-Basqunk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asqunk&quot;; &quot;Basqunk&quot;)" office:value-type="string" office:string-value="Basqunk" calcext:value-type="string">
            <text:p>Basqun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952" calcext:value-type="float">
            <text:p>1952</text:p>
          </table:table-cell>
          <table:table-cell table:style-name="ce32" office:value-type="float" office:value="4541" calcext:value-type="float">
            <text:p>4541</text:p>
          </table:table-cell>
          <table:table-cell table:style-name="ce36" office:value-type="float" office:value="990" calcext:value-type="float">
            <text:p>990</text:p>
          </table:table-cell>
          <table:table-cell table:style-name="ce40" office:value-type="float" office:value="4310" calcext:value-type="float">
            <text:p>4310</text:p>
          </table:table-cell>
          <table:table-cell table:style-name="ce44" office:value-type="float" office:value="1314" calcext:value-type="float">
            <text:p>1314</text:p>
          </table:table-cell>
          <table:table-cell table:style-name="ce52" table:formula="of:=SUM([.D352:.H352])" office:value-type="float" office:value="13107" calcext:value-type="float">
            <text:p>13107</text:p>
          </table:table-cell>
          <table:table-cell table:style-name="ce59" office:value-type="string" calcext:value-type="string">
            <text:p>Grim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52]=126;70;IF([.T352]=112;70;IF([.T352]=98;70;IF([.T352]=96;60;IF([.T352]=84;60;IF([.T352]=108;60;IF([.T352]=90;50;IF([.T352]=72;40;IF([.T352]=80;40;IF([.T352]=100;50;IF([.T352]=54;30;IF([.T352]=36;20;IF([.T352]=18;10;IF([.T35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defenderoftexel/images/thumb/5/57/Bel-Sum-Iscun_Icon.png/50px-Bel-Sum-Iscu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l-Sum-Iscun&quot;; &quot;Bel-Sum-Iscun&quot;)" office:value-type="string" office:string-value="Bel-Sum-Iscun" calcext:value-type="string">
            <text:p>Bel-Sum-Iscun</text:p>
          </table:table-cell>
          <table:table-cell table:style-name="ce25"/>
          <table:table-cell table:style-name="ce28" office:value-type="float" office:value="3774" calcext:value-type="float">
            <text:p>3774</text:p>
          </table:table-cell>
          <table:table-cell table:style-name="ce33" office:value-type="float" office:value="3218" calcext:value-type="float">
            <text:p>3218</text:p>
          </table:table-cell>
          <table:table-cell table:style-name="ce37" office:value-type="float" office:value="1695" calcext:value-type="float">
            <text:p>1695</text:p>
          </table:table-cell>
          <table:table-cell table:style-name="ce41" office:value-type="float" office:value="342" calcext:value-type="float">
            <text:p>342</text:p>
          </table:table-cell>
          <table:table-cell table:style-name="ce45" office:value-type="float" office:value="1275" calcext:value-type="float">
            <text:p>1275</text:p>
          </table:table-cell>
          <table:table-cell table:style-name="ce53" table:formula="of:=SUM([.D353:.H353])" office:value-type="float" office:value="10304" calcext:value-type="float">
            <text:p>10304</text:p>
          </table:table-cell>
          <table:table-cell table:style-name="ce60" office:value-type="string" calcext:value-type="string">
            <text:p>Unhinge</text:p>
          </table:table-cell>
          <table:table-cell table:style-name="ce60" office:value-type="string" calcext:value-type="string">
            <text:p>Self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3]=126;70;IF([.T353]=112;70;IF([.T353]=98;70;IF([.T353]=96;60;IF([.T353]=84;60;IF([.T353]=108;60;IF([.T353]=90;50;IF([.T353]=72;40;IF([.T353]=80;40;IF([.T353]=100;50;IF([.T353]=54;30;IF([.T353]=36;20;IF([.T353]=18;10;IF([.T35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44860/defenderoftexel/images/thumb/9/9b/Belili_Icon.png/50px-Belil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lili&quot;; &quot;Belili&quot;)" office:value-type="string" office:string-value="Belili" calcext:value-type="string">
            <text:p>Belili</text:p>
          </table:table-cell>
          <table:table-cell table:style-name="ce25"/>
          <table:table-cell table:style-name="ce28" office:value-type="float" office:value="4951" calcext:value-type="float">
            <text:p>4951</text:p>
          </table:table-cell>
          <table:table-cell table:style-name="ce33" office:value-type="float" office:value="3532" calcext:value-type="float">
            <text:p>3532</text:p>
          </table:table-cell>
          <table:table-cell table:style-name="ce37" office:value-type="float" office:value="4106" calcext:value-type="float">
            <text:p>4106</text:p>
          </table:table-cell>
          <table:table-cell table:style-name="ce41" office:value-type="float" office:value="422" calcext:value-type="float">
            <text:p>422</text:p>
          </table:table-cell>
          <table:table-cell table:style-name="ce45" office:value-type="float" office:value="525" calcext:value-type="float">
            <text:p>525</text:p>
          </table:table-cell>
          <table:table-cell table:style-name="ce53" table:formula="of:=SUM([.D354:.H354])" office:value-type="float" office:value="13536" calcext:value-type="float">
            <text:p>13536</text:p>
          </table:table-cell>
          <table:table-cell table:style-name="ce60" office:value-type="string" calcext:value-type="string">
            <text:p>Stamped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4]=126;70;IF([.T354]=112;70;IF([.T354]=98;70;IF([.T354]=96;60;IF([.T354]=84;60;IF([.T354]=108;60;IF([.T354]=90;50;IF([.T354]=72;40;IF([.T354]=80;40;IF([.T354]=100;50;IF([.T354]=54;30;IF([.T354]=36;20;IF([.T354]=18;10;IF([.T35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5/5b/Bellabarisru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libni_-_Nidaba_-_Bellabarisruk&quot;; &quot;Bellabarisruk&quot;)" office:value-type="string" office:string-value="Bellabarisruk" calcext:value-type="string">
            <text:p>Bellabarisruk</text:p>
          </table:table-cell>
          <table:table-cell table:style-name="ce25"/>
          <table:table-cell table:style-name="ce28" office:value-type="float" office:value="5187" calcext:value-type="float">
            <text:p>5187</text:p>
          </table:table-cell>
          <table:table-cell table:style-name="ce33" office:value-type="float" office:value="3703" calcext:value-type="float">
            <text:p>3703</text:p>
          </table:table-cell>
          <table:table-cell table:style-name="ce37" office:value-type="float" office:value="4306" calcext:value-type="float">
            <text:p>4306</text:p>
          </table:table-cell>
          <table:table-cell table:style-name="ce41" office:value-type="float" office:value="443" calcext:value-type="float">
            <text:p>443</text:p>
          </table:table-cell>
          <table:table-cell table:style-name="ce45" office:value-type="float" office:value="551" calcext:value-type="float">
            <text:p>551</text:p>
          </table:table-cell>
          <table:table-cell table:style-name="ce53" table:formula="of:=SUM([.D355:.H355])" office:value-type="float" office:value="14190" calcext:value-type="float">
            <text:p>14190</text:p>
          </table:table-cell>
          <table:table-cell table:style-name="ce60" office:value-type="string" calcext:value-type="string">
            <text:p>Repay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5]=126;70;IF([.T355]=112;70;IF([.T355]=98;70;IF([.T355]=96;60;IF([.T355]=84;60;IF([.T355]=108;60;IF([.T355]=90;50;IF([.T355]=72;40;IF([.T355]=80;40;IF([.T355]=100;50;IF([.T355]=54;30;IF([.T355]=36;20;IF([.T355]=18;10;IF([.T35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527140245/defenderoftexel/images/thumb/f/fc/Beltayne_Icon.png/50px-Beltay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ltayne&quot;; &quot;Beltayne&quot;)" office:value-type="string" office:string-value="Beltayne" calcext:value-type="string">
            <text:p>Beltayne</text:p>
          </table:table-cell>
          <table:table-cell table:style-name="ce25"/>
          <table:table-cell table:style-name="ce28" office:value-type="float" office:value="2682" calcext:value-type="float">
            <text:p>2682</text:p>
          </table:table-cell>
          <table:table-cell table:style-name="ce33" office:value-type="float" office:value="4378" calcext:value-type="float">
            <text:p>4378</text:p>
          </table:table-cell>
          <table:table-cell table:style-name="ce37" office:value-type="float" office:value="2227" calcext:value-type="float">
            <text:p>2227</text:p>
          </table:table-cell>
          <table:table-cell table:style-name="ce41" office:value-type="float" office:value="3501" calcext:value-type="float">
            <text:p>3501</text:p>
          </table:table-cell>
          <table:table-cell table:style-name="ce45" office:value-type="float" office:value="428" calcext:value-type="float">
            <text:p>428</text:p>
          </table:table-cell>
          <table:table-cell table:style-name="ce53" table:formula="of:=SUM([.D356:.H356])" office:value-type="float" office:value="13216" calcext:value-type="float">
            <text:p>13216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6]=126;70;IF([.T356]=112;70;IF([.T356]=98;70;IF([.T356]=96;60;IF([.T356]=84;60;IF([.T356]=108;60;IF([.T356]=90;50;IF([.T356]=72;40;IF([.T356]=80;40;IF([.T356]=100;50;IF([.T356]=54;30;IF([.T356]=36;20;IF([.T356]=18;10;IF([.T35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4933/defenderoftexel/images/thumb/e/e7/Benno_Icon.png/40px-Benn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nno&quot;; &quot;Benno&quot;)" office:value-type="string" office:string-value="Benno" calcext:value-type="string">
            <text:p>Benno</text:p>
          </table:table-cell>
          <table:table-cell table:style-name="ce25"/>
          <table:table-cell table:style-name="ce28" office:value-type="float" office:value="1053" calcext:value-type="float">
            <text:p>1053</text:p>
          </table:table-cell>
          <table:table-cell table:style-name="ce33" office:value-type="float" office:value="740" calcext:value-type="float">
            <text:p>740</text:p>
          </table:table-cell>
          <table:table-cell table:style-name="ce37" office:value-type="float" office:value="478" calcext:value-type="float">
            <text:p>478</text:p>
          </table:table-cell>
          <table:table-cell table:style-name="ce41" office:value-type="float" office:value="3032" calcext:value-type="float">
            <text:p>3032</text:p>
          </table:table-cell>
          <table:table-cell table:style-name="ce45" office:value-type="float" office:value="2888" calcext:value-type="float">
            <text:p>2888</text:p>
          </table:table-cell>
          <table:table-cell table:style-name="ce53" table:formula="of:=SUM([.D357:.H357])" office:value-type="float" office:value="8191" calcext:value-type="float">
            <text:p>8191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7]=126;70;IF([.T357]=112;70;IF([.T357]=98;70;IF([.T357]=96;60;IF([.T357]=84;60;IF([.T357]=108;60;IF([.T357]=90;50;IF([.T357]=72;40;IF([.T357]=80;40;IF([.T357]=100;50;IF([.T357]=54;30;IF([.T357]=36;20;IF([.T357]=18;10;IF([.T35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708123506/defenderoftexel/images/1/1d/Beowulf_Wyrmba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eowulf_Wyrmbane&quot;; &quot;Beowulf Wyrmbane&quot;)" office:value-type="string" office:string-value="Beowulf Wyrmbane" calcext:value-type="string">
            <text:p>Beowulf Wyrmbane</text:p>
          </table:table-cell>
          <table:table-cell table:style-name="ce25"/>
          <table:table-cell table:style-name="ce28" office:value-type="float" office:value="5139" calcext:value-type="float">
            <text:p>5139</text:p>
          </table:table-cell>
          <table:table-cell table:style-name="ce33" office:value-type="float" office:value="5874" calcext:value-type="float">
            <text:p>5874</text:p>
          </table:table-cell>
          <table:table-cell table:style-name="ce37" office:value-type="float" office:value="3150" calcext:value-type="float">
            <text:p>3150</text:p>
          </table:table-cell>
          <table:table-cell table:style-name="ce41" office:value-type="float" office:value="741" calcext:value-type="float">
            <text:p>741</text:p>
          </table:table-cell>
          <table:table-cell table:style-name="ce45" office:value-type="float" office:value="985" calcext:value-type="float">
            <text:p>985</text:p>
          </table:table-cell>
          <table:table-cell table:style-name="ce53" table:formula="of:=SUM([.D358:.H358])" office:value-type="float" office:value="15889" calcext:value-type="float">
            <text:p>15889</text:p>
          </table:table-cell>
          <table:table-cell table:style-name="ce60" office:value-type="string" calcext:value-type="string">
            <text:p>Marau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8]=126;70;IF([.T358]=112;70;IF([.T358]=98;70;IF([.T358]=96;60;IF([.T358]=84;60;IF([.T358]=108;60;IF([.T358]=90;50;IF([.T358]=72;40;IF([.T358]=80;40;IF([.T358]=100;50;IF([.T358]=54;30;IF([.T358]=36;20;IF([.T358]=18;10;IF([.T35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1001175741/defenderoftexel/images/thumb/a/a6/Birnam_Icon.png/50px-Birna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lvyll_-_Hangoak_-_Birnam&quot;; &quot;Birnam&quot;)" office:value-type="string" office:string-value="Birnam" calcext:value-type="string">
            <text:p>Birnam</text:p>
          </table:table-cell>
          <table:table-cell table:style-name="ce25"/>
          <table:table-cell table:style-name="ce28" office:value-type="float" office:value="2122" calcext:value-type="float">
            <text:p>2122</text:p>
          </table:table-cell>
          <table:table-cell table:style-name="ce33" office:value-type="float" office:value="2058" calcext:value-type="float">
            <text:p>2058</text:p>
          </table:table-cell>
          <table:table-cell table:style-name="ce37" office:value-type="float" office:value="1034" calcext:value-type="float">
            <text:p>1034</text:p>
          </table:table-cell>
          <table:table-cell table:style-name="ce41" office:value-type="float" office:value="2122" calcext:value-type="float">
            <text:p>2122</text:p>
          </table:table-cell>
          <table:table-cell table:style-name="ce45" office:value-type="float" office:value="5688" calcext:value-type="float">
            <text:p>5688</text:p>
          </table:table-cell>
          <table:table-cell table:style-name="ce53" table:formula="of:=SUM([.D359:.H359])" office:value-type="float" office:value="13024" calcext:value-type="float">
            <text:p>13024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59]=126;70;IF([.T359]=112;70;IF([.T359]=98;70;IF([.T359]=96;60;IF([.T359]=84;60;IF([.T359]=108;60;IF([.T359]=90;50;IF([.T359]=72;40;IF([.T359]=80;40;IF([.T359]=100;50;IF([.T359]=54;30;IF([.T359]=36;20;IF([.T359]=18;10;IF([.T35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502215340/defenderoftexel/images/0/08/Bit-Nu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it-Nur&quot;; &quot;Bit-Nur&quot;)" office:value-type="string" office:string-value="Bit-Nur" calcext:value-type="string">
            <text:p>Bit-Nur</text:p>
          </table:table-cell>
          <table:table-cell table:style-name="ce25"/>
          <table:table-cell table:style-name="ce28" office:value-type="float" office:value="3266" calcext:value-type="float">
            <text:p>3266</text:p>
          </table:table-cell>
          <table:table-cell table:style-name="ce33" office:value-type="float" office:value="3695" calcext:value-type="float">
            <text:p>3695</text:p>
          </table:table-cell>
          <table:table-cell table:style-name="ce37" office:value-type="float" office:value="6697" calcext:value-type="float">
            <text:p>6697</text:p>
          </table:table-cell>
          <table:table-cell table:style-name="ce41" office:value-type="float" office:value="335" calcext:value-type="float">
            <text:p>335</text:p>
          </table:table-cell>
          <table:table-cell table:style-name="ce45" office:value-type="float" office:value="287" calcext:value-type="float">
            <text:p>287</text:p>
          </table:table-cell>
          <table:table-cell table:style-name="ce53" table:formula="of:=SUM([.D360:.H360])" office:value-type="float" office:value="14280" calcext:value-type="float">
            <text:p>14280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60]=126;70;IF([.T360]=112;70;IF([.T360]=98;70;IF([.T360]=96;60;IF([.T360]=84;60;IF([.T360]=108;60;IF([.T360]=90;50;IF([.T360]=72;40;IF([.T360]=80;40;IF([.T360]=100;50;IF([.T360]=54;30;IF([.T360]=36;20;IF([.T360]=18;10;IF([.T36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429214925/defenderoftexel/images/8/88/Blacktide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lacktide&quot;; &quot;Blacktide&quot;)" office:value-type="string" office:string-value="Blacktide" calcext:value-type="string">
            <text:p>Blacktid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29" calcext:value-type="float">
            <text:p>1029</text:p>
          </table:table-cell>
          <table:table-cell table:style-name="ce32" office:value-type="float" office:value="723" calcext:value-type="float">
            <text:p>723</text:p>
          </table:table-cell>
          <table:table-cell table:style-name="ce36" office:value-type="float" office:value="466" calcext:value-type="float">
            <text:p>466</text:p>
          </table:table-cell>
          <table:table-cell table:style-name="ce40" office:value-type="float" office:value="2965" calcext:value-type="float">
            <text:p>2965</text:p>
          </table:table-cell>
          <table:table-cell table:style-name="ce44" office:value-type="float" office:value="2821" calcext:value-type="float">
            <text:p>2821</text:p>
          </table:table-cell>
          <table:table-cell table:style-name="ce52" table:formula="of:=SUM([.D361:.H361])" office:value-type="float" office:value="8004" calcext:value-type="float">
            <text:p>8004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1]=126;70;IF([.T361]=112;70;IF([.T361]=98;70;IF([.T361]=96;60;IF([.T361]=84;60;IF([.T361]=108;60;IF([.T361]=90;50;IF([.T361]=72;40;IF([.T361]=80;40;IF([.T361]=100;50;IF([.T361]=54;30;IF([.T361]=36;20;IF([.T361]=18;10;IF([.T36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701125559/defenderoftexel/images/b/b1/Blaster_Benny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laster_Benny&quot;; &quot;Blaster Benny&quot;)" office:value-type="string" office:string-value="Blaster Benny" calcext:value-type="string">
            <text:p>Blaster Benn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73" calcext:value-type="float">
            <text:p>2673</text:p>
          </table:table-cell>
          <table:table-cell table:style-name="ce32" office:value-type="float" office:value="2037" calcext:value-type="float">
            <text:p>2037</text:p>
          </table:table-cell>
          <table:table-cell table:style-name="ce36" office:value-type="float" office:value="1386" calcext:value-type="float">
            <text:p>1386</text:p>
          </table:table-cell>
          <table:table-cell table:style-name="ce40" office:value-type="float" office:value="1974" calcext:value-type="float">
            <text:p>1974</text:p>
          </table:table-cell>
          <table:table-cell table:style-name="ce44" office:value-type="float" office:value="4986" calcext:value-type="float">
            <text:p>4986</text:p>
          </table:table-cell>
          <table:table-cell table:style-name="ce52" table:formula="of:=SUM([.D362:.H362])" office:value-type="float" office:value="13056" calcext:value-type="float">
            <text:p>13056</text:p>
          </table:table-cell>
          <table:table-cell table:style-name="ce59" office:value-type="string" calcext:value-type="string">
            <text:p>Chutzpah</text:p>
          </table:table-cell>
          <table:table-cell table:style-name="ce59" office:value-type="string" calcext:value-type="string">
            <text:p>Double 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2]=126;70;IF([.T362]=112;70;IF([.T362]=98;70;IF([.T362]=96;60;IF([.T362]=84;60;IF([.T362]=108;60;IF([.T362]=90;50;IF([.T362]=72;40;IF([.T362]=80;40;IF([.T362]=100;50;IF([.T362]=54;30;IF([.T362]=36;20;IF([.T362]=18;10;IF([.T36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3.wikia.nocookie.net/__cb20131112130033/defenderoftexel/images/thumb/3/3b/Blasterion_Icon.png/50px-Blasterion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Okhrosanct_-_Irataurih_-_Blasterion&quot;;&quot;Blasterion&quot;)" office:value-type="string" office:string-value="Blasterion" calcext:value-type="string">
            <text:p>Blasterio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963" calcext:value-type="float">
            <text:p>3963</text:p>
          </table:table-cell>
          <table:table-cell table:style-name="ce32" office:value-type="float" office:value="5558" calcext:value-type="float">
            <text:p>5558</text:p>
          </table:table-cell>
          <table:table-cell table:style-name="ce36" office:value-type="float" office:value="1214" calcext:value-type="float">
            <text:p>1214</text:p>
          </table:table-cell>
          <table:table-cell table:style-name="ce40" office:value-type="float" office:value="3553" calcext:value-type="float">
            <text:p>3553</text:p>
          </table:table-cell>
          <table:table-cell table:style-name="ce44" office:value-type="float" office:value="1609" calcext:value-type="float">
            <text:p>1609</text:p>
          </table:table-cell>
          <table:table-cell table:style-name="ce52" table:formula="of:=SUM([.D363:.H363])" office:value-type="float" office:value="15897" calcext:value-type="float">
            <text:p>15897</text:p>
          </table:table-cell>
          <table:table-cell table:style-name="ce59" office:value-type="string" calcext:value-type="string">
            <text:p>Wisecra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3]=126;70;IF([.T363]=112;70;IF([.T363]=98;70;IF([.T363]=96;60;IF([.T363]=84;60;IF([.T363]=108;60;IF([.T363]=90;50;IF([.T363]=72;40;IF([.T363]=80;40;IF([.T363]=100;50;IF([.T363]=54;30;IF([.T363]=36;20;IF([.T363]=18;10;IF([.T36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32527/defenderoftexel/images/thumb/c/c3/Boldewin_Icon.png/50px-Boldew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oldewin&quot;; &quot;Boldewin&quot;)" office:value-type="string" office:string-value="Boldewin" calcext:value-type="string">
            <text:p>Boldewin</text:p>
          </table:table-cell>
          <table:table-cell table:style-name="ce25"/>
          <table:table-cell table:style-name="ce28" office:value-type="float" office:value="647" calcext:value-type="float">
            <text:p>647</text:p>
          </table:table-cell>
          <table:table-cell table:style-name="ce33" office:value-type="float" office:value="1137" calcext:value-type="float">
            <text:p>1137</text:p>
          </table:table-cell>
          <table:table-cell table:style-name="ce37" office:value-type="float" office:value="596" calcext:value-type="float">
            <text:p>596</text:p>
          </table:table-cell>
          <table:table-cell table:style-name="ce41" office:value-type="float" office:value="7031" calcext:value-type="float">
            <text:p>7031</text:p>
          </table:table-cell>
          <table:table-cell table:style-name="ce45" office:value-type="float" office:value="5203" calcext:value-type="float">
            <text:p>5203</text:p>
          </table:table-cell>
          <table:table-cell table:style-name="ce53" table:formula="of:=SUM([.D364:.H364])" office:value-type="float" office:value="14614" calcext:value-type="float">
            <text:p>14614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64]=126;70;IF([.T364]=112;70;IF([.T364]=98;70;IF([.T364]=96;60;IF([.T364]=84;60;IF([.T364]=108;60;IF([.T364]=90;50;IF([.T364]=72;40;IF([.T364]=80;40;IF([.T364]=100;50;IF([.T364]=54;30;IF([.T364]=36;20;IF([.T364]=18;10;IF([.T36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40114143122/defenderoftexel/images/thumb/3/30/Bombazhin_Icon.png/50px-Bombazh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ombazhin&quot;; &quot;Bombazhin&quot;)" office:value-type="string" office:string-value="Bombazhin" calcext:value-type="string">
            <text:p>Bombazhin</text:p>
          </table:table-cell>
          <table:table-cell table:style-name="ce25"/>
          <table:table-cell table:style-name="ce28" office:value-type="float" office:value="3258" calcext:value-type="float">
            <text:p>3258</text:p>
          </table:table-cell>
          <table:table-cell table:style-name="ce33" office:value-type="float" office:value="422" calcext:value-type="float">
            <text:p>422</text:p>
          </table:table-cell>
          <table:table-cell table:style-name="ce37" office:value-type="float" office:value="1158" calcext:value-type="float">
            <text:p>1158</text:p>
          </table:table-cell>
          <table:table-cell table:style-name="ce41" office:value-type="float" office:value="6630" calcext:value-type="float">
            <text:p>6630</text:p>
          </table:table-cell>
          <table:table-cell table:style-name="ce45" office:value-type="float" office:value="2209" calcext:value-type="float">
            <text:p>2209</text:p>
          </table:table-cell>
          <table:table-cell table:style-name="ce53" table:formula="of:=SUM([.D365:.H365])" office:value-type="float" office:value="13677" calcext:value-type="float">
            <text:p>13677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65]=126;70;IF([.T365]=112;70;IF([.T365]=98;70;IF([.T365]=96;60;IF([.T365]=84;60;IF([.T365]=108;60;IF([.T365]=90;50;IF([.T365]=72;40;IF([.T365]=80;40;IF([.T365]=100;50;IF([.T365]=54;30;IF([.T365]=36;20;IF([.T365]=18;10;IF([.T36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8/87/Brandensite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Shoestone_-_Greywacke_-_Brandensite&quot;; &quot;Brandensite&quot;)" office:value-type="string" office:string-value="Brandensite" calcext:value-type="string">
            <text:p>Brandensit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795" calcext:value-type="float">
            <text:p>4795</text:p>
          </table:table-cell>
          <table:table-cell table:style-name="ce32" office:value-type="float" office:value="2220" calcext:value-type="float">
            <text:p>2220</text:p>
          </table:table-cell>
          <table:table-cell table:style-name="ce36" office:value-type="float" office:value="2416" calcext:value-type="float">
            <text:p>2416</text:p>
          </table:table-cell>
          <table:table-cell table:style-name="ce40" office:value-type="float" office:value="416" calcext:value-type="float">
            <text:p>416</text:p>
          </table:table-cell>
          <table:table-cell table:style-name="ce44" office:value-type="float" office:value="453" calcext:value-type="float">
            <text:p>453</text:p>
          </table:table-cell>
          <table:table-cell table:style-name="ce52" table:formula="of:=SUM([.D366:.H366])" office:value-type="float" office:value="10300" calcext:value-type="float">
            <text:p>10300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6]=126;70;IF([.T366]=112;70;IF([.T366]=98;70;IF([.T366]=96;60;IF([.T366]=84;60;IF([.T366]=108;60;IF([.T366]=90;50;IF([.T366]=72;40;IF([.T366]=80;40;IF([.T366]=100;50;IF([.T366]=54;30;IF([.T366]=36;20;IF([.T366]=18;10;IF([.T36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3231/defenderoftexel/images/thumb/7/75/Braveburn_Icon.png/50px-Braveburn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raveburn&quot;; &quot;Braveburn&quot;)" office:value-type="string" office:string-value="Braveburn" calcext:value-type="string">
            <text:p>Braveburn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918" calcext:value-type="float">
            <text:p>1918</text:p>
          </table:table-cell>
          <table:table-cell table:style-name="ce32" office:value-type="float" office:value="2215" calcext:value-type="float">
            <text:p>2215</text:p>
          </table:table-cell>
          <table:table-cell table:style-name="ce36" office:value-type="float" office:value="1146" calcext:value-type="float">
            <text:p>1146</text:p>
          </table:table-cell>
          <table:table-cell table:style-name="ce40" office:value-type="float" office:value="255" calcext:value-type="float">
            <text:p>255</text:p>
          </table:table-cell>
          <table:table-cell table:style-name="ce44" office:value-type="float" office:value="341" calcext:value-type="float">
            <text:p>341</text:p>
          </table:table-cell>
          <table:table-cell table:style-name="ce52" table:formula="of:=SUM([.D367:.H367])" office:value-type="float" office:value="5875" calcext:value-type="float">
            <text:p>587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7]=126;70;IF([.T367]=112;70;IF([.T367]=98;70;IF([.T367]=96;60;IF([.T367]=84;60;IF([.T367]=108;60;IF([.T367]=90;50;IF([.T367]=72;40;IF([.T367]=80;40;IF([.T367]=100;50;IF([.T367]=54;30;IF([.T367]=36;20;IF([.T367]=18;10;IF([.T36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3557/defenderoftexel/images/thumb/3/3b/Burebista_Icon.png/40px-Burebist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urebista&quot;; &quot;Burebista&quot;)" office:value-type="string" office:string-value="Burebista" calcext:value-type="string">
            <text:p>Burebista</text:p>
          </table:table-cell>
          <table:table-cell table:style-name="ce25"/>
          <table:table-cell table:style-name="ce28" office:value-type="float" office:value="2944" calcext:value-type="float">
            <text:p>2944</text:p>
          </table:table-cell>
          <table:table-cell table:style-name="ce33" office:value-type="float" office:value="2489" calcext:value-type="float">
            <text:p>2489</text:p>
          </table:table-cell>
          <table:table-cell table:style-name="ce37" office:value-type="float" office:value="1277" calcext:value-type="float">
            <text:p>1277</text:p>
          </table:table-cell>
          <table:table-cell table:style-name="ce41" office:value-type="float" office:value="252" calcext:value-type="float">
            <text:p>252</text:p>
          </table:table-cell>
          <table:table-cell table:style-name="ce45" office:value-type="float" office:value="954" calcext:value-type="float">
            <text:p>954</text:p>
          </table:table-cell>
          <table:table-cell table:style-name="ce53" table:formula="of:=SUM([.D368:.H368])" office:value-type="float" office:value="7916" calcext:value-type="float">
            <text:p>7916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68]=126;70;IF([.T368]=112;70;IF([.T368]=98;70;IF([.T368]=96;60;IF([.T368]=84;60;IF([.T368]=108;60;IF([.T368]=90;50;IF([.T368]=72;40;IF([.T368]=80;40;IF([.T368]=100;50;IF([.T368]=54;30;IF([.T368]=36;20;IF([.T368]=18;10;IF([.T36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1001180457/defenderoftexel/images/thumb/d/d4/Caboccia_Icon.png/50px-Cabocci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Pattipan_-_Butternutt_-_Caboccia&quot;; &quot;Caboccia&quot;)" office:value-type="string" office:string-value="Caboccia" calcext:value-type="string">
            <text:p>Cabocc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289" calcext:value-type="float">
            <text:p>5289</text:p>
          </table:table-cell>
          <table:table-cell table:style-name="ce32" office:value-type="float" office:value="4473" calcext:value-type="float">
            <text:p>4473</text:p>
          </table:table-cell>
          <table:table-cell table:style-name="ce36" office:value-type="float" office:value="2296" calcext:value-type="float">
            <text:p>2296</text:p>
          </table:table-cell>
          <table:table-cell table:style-name="ce40" office:value-type="float" office:value="452" calcext:value-type="float">
            <text:p>452</text:p>
          </table:table-cell>
          <table:table-cell table:style-name="ce44" office:value-type="float" office:value="1716" calcext:value-type="float">
            <text:p>1716</text:p>
          </table:table-cell>
          <table:table-cell table:style-name="ce52" table:formula="of:=SUM([.D369:.H369])" office:value-type="float" office:value="14226" calcext:value-type="float">
            <text:p>14226</text:p>
          </table:table-cell>
          <table:table-cell table:style-name="ce59" office:value-type="string" calcext:value-type="string">
            <text:p>Repay</text:p>
          </table:table-cell>
          <table:table-cell table:style-name="ce59" office:value-type="string" calcext:value-type="string">
            <text:p>Retaliat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69]=126;70;IF([.T369]=112;70;IF([.T369]=98;70;IF([.T369]=96;60;IF([.T369]=84;60;IF([.T369]=108;60;IF([.T369]=90;50;IF([.T369]=72;40;IF([.T369]=80;40;IF([.T369]=100;50;IF([.T369]=54;30;IF([.T369]=36;20;IF([.T369]=18;10;IF([.T36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1011234344/defenderoftexel/images/thumb/5/50/Cadmian_Icon.png/50px-Cadmia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admian&quot;; &quot;Cadmian&quot;)" office:value-type="string" office:string-value="Cadmian" calcext:value-type="string">
            <text:p>Cadmian</text:p>
          </table:table-cell>
          <table:table-cell table:style-name="ce25"/>
          <table:table-cell table:style-name="ce28" office:value-type="float" office:value="5259" calcext:value-type="float">
            <text:p>5259</text:p>
          </table:table-cell>
          <table:table-cell table:style-name="ce33" office:value-type="float" office:value="6012" calcext:value-type="float">
            <text:p>6012</text:p>
          </table:table-cell>
          <table:table-cell table:style-name="ce37" office:value-type="float" office:value="3223" calcext:value-type="float">
            <text:p>3223</text:p>
          </table:table-cell>
          <table:table-cell table:style-name="ce41" office:value-type="float" office:value="759" calcext:value-type="float">
            <text:p>759</text:p>
          </table:table-cell>
          <table:table-cell table:style-name="ce45" office:value-type="float" office:value="1008" calcext:value-type="float">
            <text:p>1008</text:p>
          </table:table-cell>
          <table:table-cell table:style-name="ce53" table:formula="of:=SUM([.D370:.H370])" office:value-type="float" office:value="16261" calcext:value-type="float">
            <text:p>16261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70]=126;70;IF([.T370]=112;70;IF([.T370]=98;70;IF([.T370]=96;60;IF([.T370]=84;60;IF([.T370]=108;60;IF([.T370]=90;50;IF([.T370]=72;40;IF([.T370]=80;40;IF([.T370]=100;50;IF([.T370]=54;30;IF([.T370]=36;20;IF([.T370]=18;10;IF([.T37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static1.wikia.nocookie.net/__cb20140114142217/defenderoftexel/images/thumb/f/f9/Cantaranc_Icon.png/50px-Cantaranc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Cantaranc&quot;; &quot;Cantaranc&quot;)" office:value-type="string" office:string-value="Cantaranc" calcext:value-type="string">
            <text:p>Cantaranc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118" calcext:value-type="float">
            <text:p>3118</text:p>
          </table:table-cell>
          <table:table-cell table:style-name="ce32" office:value-type="float" office:value="4744" calcext:value-type="float">
            <text:p>4744</text:p>
          </table:table-cell>
          <table:table-cell table:style-name="ce36" office:value-type="float" office:value="1619" calcext:value-type="float">
            <text:p>1619</text:p>
          </table:table-cell>
          <table:table-cell table:style-name="ce40" office:value-type="float" office:value="977" calcext:value-type="float">
            <text:p>977</text:p>
          </table:table-cell>
          <table:table-cell table:style-name="ce44" office:value-type="float" office:value="4920" calcext:value-type="float">
            <text:p>4920</text:p>
          </table:table-cell>
          <table:table-cell table:style-name="ce52" table:formula="of:=SUM([.D371:.H371])" office:value-type="float" office:value="15378" calcext:value-type="float">
            <text:p>15378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1]=126;70;IF([.T371]=112;70;IF([.T371]=98;70;IF([.T371]=96;60;IF([.T371]=84;60;IF([.T371]=108;60;IF([.T371]=90;50;IF([.T371]=72;40;IF([.T371]=80;40;IF([.T371]=100;50;IF([.T371]=54;30;IF([.T371]=36;20;IF([.T371]=18;10;IF([.T37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defenderoftexel/images/thumb/8/8c/Cascalynd_Icon.png/50px-Cascalynd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Lapinia_-_Applebliss_-_Cascalynd&quot;; &quot;Cascalynd&quot;)" office:value-type="string" office:string-value="Cascalynd" calcext:value-type="string">
            <text:p>Cascalynd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682" calcext:value-type="float">
            <text:p>4682</text:p>
          </table:table-cell>
          <table:table-cell table:style-name="ce32" office:value-type="float" office:value="3572" calcext:value-type="float">
            <text:p>3572</text:p>
          </table:table-cell>
          <table:table-cell table:style-name="ce36" office:value-type="float" office:value="2439" calcext:value-type="float">
            <text:p>2439</text:p>
          </table:table-cell>
          <table:table-cell table:style-name="ce40" office:value-type="float" office:value="3466" calcext:value-type="float">
            <text:p>3466</text:p>
          </table:table-cell>
          <table:table-cell table:style-name="ce44" office:value-type="float" office:value="8784" calcext:value-type="float">
            <text:p>8784</text:p>
          </table:table-cell>
          <table:table-cell table:style-name="ce52" table:formula="of:=SUM([.D372:.H372])" office:value-type="float" office:value="22943" calcext:value-type="float">
            <text:p>22943</text:p>
          </table:table-cell>
          <table:table-cell table:style-name="ce59" office:value-type="string" calcext:value-type="string">
            <text:p>Gi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2" calcext:value-type="float">
            <text:p>2</text:p>
          </table:table-cell>
          <table:table-cell table:style-name="ce67" table:formula="of:=IF([.T372]=126;70;IF([.T372]=112;70;IF([.T372]=98;70;IF([.T372]=96;60;IF([.T372]=84;60;IF([.T372]=108;60;IF([.T372]=90;50;IF([.T372]=72;40;IF([.T372]=80;40;IF([.T372]=100;50;IF([.T372]=54;30;IF([.T372]=36;20;IF([.T372]=18;10;IF([.T372]=60;30))))))))))))))" office:value-type="float" office:value="60" calcext:value-type="float">
            <text:p>60</text:p>
          </table:table-cell>
          <table:table-cell table:style-name="ce67" office:value-type="float" office:value="84" calcext:value-type="float">
            <text:p>8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4121/defenderoftexel/images/thumb/9/96/Celestia_Icon.png/50px-Celesti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Celestia&quot;; &quot;Celestia&quot;)" office:value-type="string" office:string-value="Celestia" calcext:value-type="string">
            <text:p>Celesti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208" calcext:value-type="float">
            <text:p>1208</text:p>
          </table:table-cell>
          <table:table-cell table:style-name="ce32" office:value-type="float" office:value="1292" calcext:value-type="float">
            <text:p>1292</text:p>
          </table:table-cell>
          <table:table-cell table:style-name="ce36" office:value-type="float" office:value="622" calcext:value-type="float">
            <text:p>622</text:p>
          </table:table-cell>
          <table:table-cell table:style-name="ce40" office:value-type="float" office:value="1046" calcext:value-type="float">
            <text:p>1046</text:p>
          </table:table-cell>
          <table:table-cell table:style-name="ce44" office:value-type="float" office:value="964" calcext:value-type="float">
            <text:p>964</text:p>
          </table:table-cell>
          <table:table-cell table:style-name="ce52" table:formula="of:=SUM([.D373:.H373])" office:value-type="float" office:value="5132" calcext:value-type="float">
            <text:p>5132</text:p>
          </table:table-cell>
          <table:table-cell table:style-name="ce59" office:value-type="string" calcext:value-type="string">
            <text:p>Thwar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3]=126;70;IF([.T373]=112;70;IF([.T373]=98;70;IF([.T373]=96;60;IF([.T373]=84;60;IF([.T373]=108;60;IF([.T373]=90;50;IF([.T373]=72;40;IF([.T373]=80;40;IF([.T373]=100;50;IF([.T373]=54;30;IF([.T373]=36;20;IF([.T373]=18;10;IF([.T373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a/a6/Chryspina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Bluemidge_-_Pinkiebell_-_Chryspina&quot;; &quot;Chryspina&quot;)" office:value-type="string" office:string-value="Chryspina" calcext:value-type="string">
            <text:p>Chryspina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874" calcext:value-type="float">
            <text:p>874</text:p>
          </table:table-cell>
          <table:table-cell table:style-name="ce32" office:value-type="float" office:value="605" calcext:value-type="float">
            <text:p>605</text:p>
          </table:table-cell>
          <table:table-cell table:style-name="ce36" office:value-type="float" office:value="387" calcext:value-type="float">
            <text:p>387</text:p>
          </table:table-cell>
          <table:table-cell table:style-name="ce40" office:value-type="float" office:value="2670" calcext:value-type="float">
            <text:p>2670</text:p>
          </table:table-cell>
          <table:table-cell table:style-name="ce44" office:value-type="float" office:value="2536" calcext:value-type="float">
            <text:p>2536</text:p>
          </table:table-cell>
          <table:table-cell table:style-name="ce52" table:formula="of:=SUM([.D374:.H374])" office:value-type="float" office:value="7072" calcext:value-type="float">
            <text:p>7072</text:p>
          </table:table-cell>
          <table:table-cell table:style-name="ce59" office:value-type="string" calcext:value-type="string">
            <text:p>Myr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4]=126;70;IF([.T374]=112;70;IF([.T374]=98;70;IF([.T374]=96;60;IF([.T374]=84;60;IF([.T374]=108;60;IF([.T374]=90;50;IF([.T374]=72;40;IF([.T374]=80;40;IF([.T374]=100;50;IF([.T374]=54;30;IF([.T374]=36;20;IF([.T374]=18;10;IF([.T37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4102/defenderoftexel/images/thumb/4/41/Cinouboila_Icon.png/40px-Cinouboi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inouboila&quot;; &quot;Cinouboila&quot;)" office:value-type="string" office:string-value="Cinouboila" calcext:value-type="string">
            <text:p>Cinouboila</text:p>
          </table:table-cell>
          <table:table-cell table:style-name="ce25"/>
          <table:table-cell table:style-name="ce28" office:value-type="float" office:value="3173" calcext:value-type="float">
            <text:p>3173</text:p>
          </table:table-cell>
          <table:table-cell table:style-name="ce33" office:value-type="float" office:value="3627" calcext:value-type="float">
            <text:p>3627</text:p>
          </table:table-cell>
          <table:table-cell table:style-name="ce37" office:value-type="float" office:value="1946" calcext:value-type="float">
            <text:p>1946</text:p>
          </table:table-cell>
          <table:table-cell table:style-name="ce41" office:value-type="float" office:value="457" calcext:value-type="float">
            <text:p>457</text:p>
          </table:table-cell>
          <table:table-cell table:style-name="ce45" office:value-type="float" office:value="607" calcext:value-type="float">
            <text:p>607</text:p>
          </table:table-cell>
          <table:table-cell table:style-name="ce53" table:formula="of:=SUM([.D375:.H375])" office:value-type="float" office:value="9810" calcext:value-type="float">
            <text:p>9810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75]=126;70;IF([.T375]=112;70;IF([.T375]=98;70;IF([.T375]=96;60;IF([.T375]=84;60;IF([.T375]=108;60;IF([.T375]=90;50;IF([.T375]=72;40;IF([.T375]=80;40;IF([.T375]=100;50;IF([.T375]=54;30;IF([.T375]=36;20;IF([.T375]=18;10;IF([.T37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8/8e/Coenobetha_Icon.png/revision/latest?cb=20150502071831&quot;)" office:value-type="string" office:string-value="" calcext:value-type="error">
            <text:p>#NAME?</text:p>
          </table:table-cell>
          <table:table-cell table:style-name="ce11" table:formula="of:=HYPERLINK(&quot;http://defenderoftexel.wikia.com/wiki/Syzette_-_Lauthra_-_Coenobetha&quot;;&quot;Coenobetha&quot;)" office:value-type="string" office:string-value="Coenobetha" calcext:value-type="string">
            <text:p>Coenobeth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768" calcext:value-type="float">
            <text:p>4768</text:p>
          </table:table-cell>
          <table:table-cell table:style-name="ce32" office:value-type="float" office:value="622" calcext:value-type="float">
            <text:p>622</text:p>
          </table:table-cell>
          <table:table-cell table:style-name="ce36" office:value-type="float" office:value="1696" calcext:value-type="float">
            <text:p>1696</text:p>
          </table:table-cell>
          <table:table-cell table:style-name="ce40" office:value-type="float" office:value="9697" calcext:value-type="float">
            <text:p>9697</text:p>
          </table:table-cell>
          <table:table-cell table:style-name="ce44" office:value-type="float" office:value="3233" calcext:value-type="float">
            <text:p>3233</text:p>
          </table:table-cell>
          <table:table-cell table:style-name="ce52" table:formula="of:=SUM([.D376:.H376])" office:value-type="float" office:value="20016" calcext:value-type="float">
            <text:p>20016</text:p>
          </table:table-cell>
          <table:table-cell table:style-name="ce59" office:value-type="string" calcext:value-type="string">
            <text:p>Bedwetter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6]=126;70;IF([.T376]=112;70;IF([.T376]=98;70;IF([.T376]=96;60;IF([.T376]=84;60;IF([.T376]=108;60;IF([.T376]=90;50;IF([.T376]=72;40;IF([.T376]=80;40;IF([.T376]=100;50;IF([.T376]=54;30;IF([.T376]=36;20;IF([.T376]=18;10;IF([.T376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33452/defenderoftexel/images/thumb/4/4d/Comosicus_Icon.png/40px-Comosic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omosicus&quot;; &quot;Comosicus&quot;)" office:value-type="string" office:string-value="Comosicus" calcext:value-type="string">
            <text:p>Comosicus</text:p>
          </table:table-cell>
          <table:table-cell table:style-name="ce25"/>
          <table:table-cell table:style-name="ce28" office:value-type="float" office:value="4869" calcext:value-type="float">
            <text:p>4869</text:p>
          </table:table-cell>
          <table:table-cell table:style-name="ce33" office:value-type="float" office:value="417" calcext:value-type="float">
            <text:p>417</text:p>
          </table:table-cell>
          <table:table-cell table:style-name="ce37" office:value-type="float" office:value="2113" calcext:value-type="float">
            <text:p>2113</text:p>
          </table:table-cell>
          <table:table-cell table:style-name="ce41" office:value-type="float" office:value="4116" calcext:value-type="float">
            <text:p>4116</text:p>
          </table:table-cell>
          <table:table-cell table:style-name="ce45" office:value-type="float" office:value="1580" calcext:value-type="float">
            <text:p>1580</text:p>
          </table:table-cell>
          <table:table-cell table:style-name="ce53" table:formula="of:=SUM([.D377:.H377])" office:value-type="float" office:value="13095" calcext:value-type="float">
            <text:p>13095</text:p>
          </table:table-cell>
          <table:table-cell table:style-name="ce60" office:value-type="string" calcext:value-type="string">
            <text:p>Riposte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77]=126;70;IF([.T377]=112;70;IF([.T377]=98;70;IF([.T377]=96;60;IF([.T377]=84;60;IF([.T377]=108;60;IF([.T377]=90;50;IF([.T377]=72;40;IF([.T377]=80;40;IF([.T377]=100;50;IF([.T377]=54;30;IF([.T377]=36;20;IF([.T377]=18;10;IF([.T37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1225103554/defenderoftexel/images/thumb/4/46/Conifenius_Icon.png/50px-Conifenius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Conifenius&quot;; &quot;Conifenius&quot;)" office:value-type="string" office:string-value="Conifenius" calcext:value-type="string">
            <text:p>Conifeni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76" calcext:value-type="float">
            <text:p>1876</text:p>
          </table:table-cell>
          <table:table-cell table:style-name="ce32" office:value-type="float" office:value="1096" calcext:value-type="float">
            <text:p>1096</text:p>
          </table:table-cell>
          <table:table-cell table:style-name="ce36" office:value-type="float" office:value="1282" calcext:value-type="float">
            <text:p>1282</text:p>
          </table:table-cell>
          <table:table-cell table:style-name="ce40" office:value-type="float" office:value="5055" calcext:value-type="float">
            <text:p>5055</text:p>
          </table:table-cell>
          <table:table-cell table:style-name="ce44" office:value-type="float" office:value="6333" calcext:value-type="float">
            <text:p>6333</text:p>
          </table:table-cell>
          <table:table-cell table:style-name="ce52" table:formula="of:=SUM([.D378:.H378])" office:value-type="float" office:value="15642" calcext:value-type="float">
            <text:p>15642</text:p>
          </table:table-cell>
          <table:table-cell table:style-name="ce59" office:value-type="string" calcext:value-type="string">
            <text:p>Thwar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78]=126;70;IF([.T378]=112;70;IF([.T378]=98;70;IF([.T378]=96;60;IF([.T378]=84;60;IF([.T378]=108;60;IF([.T378]=90;50;IF([.T378]=72;40;IF([.T378]=80;40;IF([.T378]=100;50;IF([.T378]=54;30;IF([.T378]=36;20;IF([.T378]=18;10;IF([.T37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531135557/defenderoftexel/images/thumb/f/fb/Consoleda_Icon.png/50px-Consoled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onsoleda&quot;; &quot;Consoleda&quot;)" office:value-type="string" office:string-value="Consoleda" calcext:value-type="string">
            <text:p>Consoleda</text:p>
          </table:table-cell>
          <table:table-cell table:style-name="ce25"/>
          <table:table-cell table:style-name="ce28" office:value-type="float" office:value="2660" calcext:value-type="float">
            <text:p>2660</text:p>
          </table:table-cell>
          <table:table-cell table:style-name="ce33" office:value-type="float" office:value="2025" calcext:value-type="float">
            <text:p>2025</text:p>
          </table:table-cell>
          <table:table-cell table:style-name="ce37" office:value-type="float" office:value="1381" calcext:value-type="float">
            <text:p>1381</text:p>
          </table:table-cell>
          <table:table-cell table:style-name="ce41" office:value-type="float" office:value="1964" calcext:value-type="float">
            <text:p>1964</text:p>
          </table:table-cell>
          <table:table-cell table:style-name="ce45" office:value-type="float" office:value="4958" calcext:value-type="float">
            <text:p>4958</text:p>
          </table:table-cell>
          <table:table-cell table:style-name="ce53" table:formula="of:=SUM([.D379:.H379])" office:value-type="float" office:value="12988" calcext:value-type="float">
            <text:p>12988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79]=126;70;IF([.T379]=112;70;IF([.T379]=98;70;IF([.T379]=96;60;IF([.T379]=84;60;IF([.T379]=108;60;IF([.T379]=90;50;IF([.T379]=72;40;IF([.T379]=80;40;IF([.T379]=100;50;IF([.T379]=54;30;IF([.T379]=36;20;IF([.T379]=18;10;IF([.T37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509162659/defenderoftexel/images/thumb/8/8c/Dablosi_Icon.png/50px-Dablos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iegis&quot;; &quot;Dablosi&quot;)" office:value-type="string" office:string-value="Dablosi" calcext:value-type="string">
            <text:p>Dablosi</text:p>
          </table:table-cell>
          <table:table-cell table:style-name="ce25"/>
          <table:table-cell table:style-name="ce28" office:value-type="float" office:value="3203" calcext:value-type="float">
            <text:p>3203</text:p>
          </table:table-cell>
          <table:table-cell table:style-name="ce33" office:value-type="float" office:value="3662" calcext:value-type="float">
            <text:p>3662</text:p>
          </table:table-cell>
          <table:table-cell table:style-name="ce37" office:value-type="float" office:value="1965" calcext:value-type="float">
            <text:p>1965</text:p>
          </table:table-cell>
          <table:table-cell table:style-name="ce41" office:value-type="float" office:value="462" calcext:value-type="float">
            <text:p>462</text:p>
          </table:table-cell>
          <table:table-cell table:style-name="ce45" office:value-type="float" office:value="613" calcext:value-type="float">
            <text:p>613</text:p>
          </table:table-cell>
          <table:table-cell table:style-name="ce53" table:formula="of:=SUM([.D380:.H380])" office:value-type="float" office:value="9905" calcext:value-type="float">
            <text:p>9905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0]=126;70;IF([.T380]=112;70;IF([.T380]=98;70;IF([.T380]=96;60;IF([.T380]=84;60;IF([.T380]=108;60;IF([.T380]=90;50;IF([.T380]=72;40;IF([.T380]=80;40;IF([.T380]=100;50;IF([.T380]=54;30;IF([.T380]=36;20;IF([.T380]=18;10;IF([.T38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3449/defenderoftexel/images/thumb/3/33/Darrius_Icon.png/50px-Darri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arrius&quot;; &quot;Darrius&quot;)" office:value-type="string" office:string-value="Darrius" calcext:value-type="string">
            <text:p>Darrius</text:p>
          </table:table-cell>
          <table:table-cell table:style-name="ce25"/>
          <table:table-cell table:style-name="ce28" office:value-type="float" office:value="4484" calcext:value-type="float">
            <text:p>4484</text:p>
          </table:table-cell>
          <table:table-cell table:style-name="ce33" office:value-type="float" office:value="5129" calcext:value-type="float">
            <text:p>5129</text:p>
          </table:table-cell>
          <table:table-cell table:style-name="ce37" office:value-type="float" office:value="2749" calcext:value-type="float">
            <text:p>2749</text:p>
          </table:table-cell>
          <table:table-cell table:style-name="ce41" office:value-type="float" office:value="647" calcext:value-type="float">
            <text:p>647</text:p>
          </table:table-cell>
          <table:table-cell table:style-name="ce45" office:value-type="float" office:value="840" calcext:value-type="float">
            <text:p>840</text:p>
          </table:table-cell>
          <table:table-cell table:style-name="ce53" table:formula="of:=SUM([.D381:.H381])" office:value-type="float" office:value="13849" calcext:value-type="float">
            <text:p>13849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1]=126;70;IF([.T381]=112;70;IF([.T381]=98;70;IF([.T381]=96;60;IF([.T381]=84;60;IF([.T381]=108;60;IF([.T381]=90;50;IF([.T381]=72;40;IF([.T381]=80;40;IF([.T381]=100;50;IF([.T381]=54;30;IF([.T381]=36;20;IF([.T381]=18;10;IF([.T38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624142957/defenderoftexel/images/thumb/b/be/Darya_Icon.png/50px-Dary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Darya&quot;; &quot;Darya&quot;)" office:value-type="string" office:string-value="Darya" calcext:value-type="string">
            <text:p>Darya</text:p>
          </table:table-cell>
          <table:table-cell table:style-name="ce25"/>
          <table:table-cell table:style-name="ce28" office:value-type="float" office:value="3278" calcext:value-type="float">
            <text:p>3278</text:p>
          </table:table-cell>
          <table:table-cell table:style-name="ce33" office:value-type="float" office:value="426" calcext:value-type="float">
            <text:p>426</text:p>
          </table:table-cell>
          <table:table-cell table:style-name="ce37" office:value-type="float" office:value="1164" calcext:value-type="float">
            <text:p>1164</text:p>
          </table:table-cell>
          <table:table-cell table:style-name="ce41" office:value-type="float" office:value="6669" calcext:value-type="float">
            <text:p>6669</text:p>
          </table:table-cell>
          <table:table-cell table:style-name="ce45" office:value-type="float" office:value="2221" calcext:value-type="float">
            <text:p>2221</text:p>
          </table:table-cell>
          <table:table-cell table:style-name="ce53" table:formula="of:=SUM([.D382:.H382])" office:value-type="float" office:value="13758" calcext:value-type="float">
            <text:p>13758</text:p>
          </table:table-cell>
          <table:table-cell table:style-name="ce60" office:value-type="string" calcext:value-type="string">
            <text:p>Zhap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2]=126;70;IF([.T382]=112;70;IF([.T382]=98;70;IF([.T382]=96;60;IF([.T382]=84;60;IF([.T382]=108;60;IF([.T382]=90;50;IF([.T382]=72;40;IF([.T382]=80;40;IF([.T382]=100;50;IF([.T382]=54;30;IF([.T382]=36;20;IF([.T382]=18;10;IF([.T38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3560/defenderoftexel/images/thumb/9/9e/Decaeneus_Icon.png/50px-Decaene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ecaeneus&quot;; &quot;Decaeneus&quot;)" office:value-type="string" office:string-value="Decaeneus" calcext:value-type="string">
            <text:p>Decaeneus</text:p>
          </table:table-cell>
          <table:table-cell table:style-name="ce25"/>
          <table:table-cell table:style-name="ce28" office:value-type="float" office:value="3845" calcext:value-type="float">
            <text:p>3845</text:p>
          </table:table-cell>
          <table:table-cell table:style-name="ce33" office:value-type="float" office:value="3278" calcext:value-type="float">
            <text:p>3278</text:p>
          </table:table-cell>
          <table:table-cell table:style-name="ce37" office:value-type="float" office:value="1723" calcext:value-type="float">
            <text:p>1723</text:p>
          </table:table-cell>
          <table:table-cell table:style-name="ce41" office:value-type="float" office:value="351" calcext:value-type="float">
            <text:p>351</text:p>
          </table:table-cell>
          <table:table-cell table:style-name="ce45" office:value-type="float" office:value="1298" calcext:value-type="float">
            <text:p>1298</text:p>
          </table:table-cell>
          <table:table-cell table:style-name="ce53" table:formula="of:=SUM([.D383:.H383])" office:value-type="float" office:value="10495" calcext:value-type="float">
            <text:p>10495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3]=126;70;IF([.T383]=112;70;IF([.T383]=98;70;IF([.T383]=96;60;IF([.T383]=84;60;IF([.T383]=108;60;IF([.T383]=90;50;IF([.T383]=72;40;IF([.T383]=80;40;IF([.T383]=100;50;IF([.T383]=54;30;IF([.T383]=36;20;IF([.T383]=18;10;IF([.T38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128160053/defenderoftexel/images/thumb/0/08/Dee%27qiteesu_Icon.png/50px-Dee%27qitees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ee'qiteesu&quot;; &quot;Dee'qiteesu&quot;)" office:value-type="string" office:string-value="Dee'qiteesu" calcext:value-type="string">
            <text:p>Dee'qiteesu</text:p>
          </table:table-cell>
          <table:table-cell table:style-name="ce25"/>
          <table:table-cell table:style-name="ce28" office:value-type="float" office:value="4900" calcext:value-type="float">
            <text:p>4900</text:p>
          </table:table-cell>
          <table:table-cell table:style-name="ce33" office:value-type="float" office:value="5338" calcext:value-type="float">
            <text:p>5338</text:p>
          </table:table-cell>
          <table:table-cell table:style-name="ce37" office:value-type="float" office:value="4055" calcext:value-type="float">
            <text:p>4055</text:p>
          </table:table-cell>
          <table:table-cell table:style-name="ce41" office:value-type="float" office:value="855" calcext:value-type="float">
            <text:p>855</text:p>
          </table:table-cell>
          <table:table-cell table:style-name="ce45" office:value-type="float" office:value="558" calcext:value-type="float">
            <text:p>558</text:p>
          </table:table-cell>
          <table:table-cell table:style-name="ce53" table:formula="of:=SUM([.D384:.H384])" office:value-type="float" office:value="15706" calcext:value-type="float">
            <text:p>15706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4]=126;70;IF([.T384]=112;70;IF([.T384]=98;70;IF([.T384]=96;60;IF([.T384]=84;60;IF([.T384]=108;60;IF([.T384]=90;50;IF([.T384]=72;40;IF([.T384]=80;40;IF([.T384]=100;50;IF([.T384]=54;30;IF([.T384]=36;20;IF([.T384]=18;10;IF([.T38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45561/defenderoftexel/images/5/5d/Dilga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ilgan&quot;; &quot;Dilgan&quot;)" office:value-type="string" office:string-value="Dilgan" calcext:value-type="string">
            <text:p>Dilgan</text:p>
          </table:table-cell>
          <table:table-cell table:style-name="ce25"/>
          <table:table-cell table:style-name="ce28" office:value-type="float" office:value="2676" calcext:value-type="float">
            <text:p>2676</text:p>
          </table:table-cell>
          <table:table-cell table:style-name="ce33" office:value-type="float" office:value="2037" calcext:value-type="float">
            <text:p>2037</text:p>
          </table:table-cell>
          <table:table-cell table:style-name="ce37" office:value-type="float" office:value="1390" calcext:value-type="float">
            <text:p>1390</text:p>
          </table:table-cell>
          <table:table-cell table:style-name="ce41" office:value-type="float" office:value="1976" calcext:value-type="float">
            <text:p>1976</text:p>
          </table:table-cell>
          <table:table-cell table:style-name="ce45" office:value-type="float" office:value="4989" calcext:value-type="float">
            <text:p>4989</text:p>
          </table:table-cell>
          <table:table-cell table:style-name="ce53" table:formula="of:=SUM([.D385:.H385])" office:value-type="float" office:value="13068" calcext:value-type="float">
            <text:p>13068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5]=126;70;IF([.T385]=112;70;IF([.T385]=98;70;IF([.T385]=96;60;IF([.T385]=84;60;IF([.T385]=108;60;IF([.T385]=90;50;IF([.T385]=72;40;IF([.T385]=80;40;IF([.T385]=100;50;IF([.T385]=54;30;IF([.T385]=36;20;IF([.T385]=18;10;IF([.T38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03162015/defenderoftexel/images/thumb/d/d6/Dinupula_Icon.png/50px-Dinupu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inupula&quot;; &quot;Dinupula&quot;)" office:value-type="string" office:string-value="Dinupula" calcext:value-type="string">
            <text:p>Dinupula</text:p>
          </table:table-cell>
          <table:table-cell table:style-name="ce25"/>
          <table:table-cell table:style-name="ce28" office:value-type="float" office:value="1586" calcext:value-type="float">
            <text:p>1586</text:p>
          </table:table-cell>
          <table:table-cell table:style-name="ce33" office:value-type="float" office:value="926" calcext:value-type="float">
            <text:p>926</text:p>
          </table:table-cell>
          <table:table-cell table:style-name="ce37" office:value-type="float" office:value="1084" calcext:value-type="float">
            <text:p>1084</text:p>
          </table:table-cell>
          <table:table-cell table:style-name="ce41" office:value-type="float" office:value="4277" calcext:value-type="float">
            <text:p>4277</text:p>
          </table:table-cell>
          <table:table-cell table:style-name="ce45" office:value-type="float" office:value="5359" calcext:value-type="float">
            <text:p>5359</text:p>
          </table:table-cell>
          <table:table-cell table:style-name="ce53" table:formula="of:=SUM([.D386:.H386])" office:value-type="float" office:value="13232" calcext:value-type="float">
            <text:p>13232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6]=126;70;IF([.T386]=112;70;IF([.T386]=98;70;IF([.T386]=96;60;IF([.T386]=84;60;IF([.T386]=108;60;IF([.T386]=90;50;IF([.T386]=72;40;IF([.T386]=80;40;IF([.T386]=100;50;IF([.T386]=54;30;IF([.T386]=36;20;IF([.T386]=18;10;IF([.T38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617113328/defenderoftexel/images/thumb/1/19/Dioskouri_Icon.png/50px-Dioskouri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Dioskouri&quot;; &quot;Dioskouri&quot;)" office:value-type="string" office:string-value="Dioskouri" calcext:value-type="string">
            <text:p>Dioskouri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8490" calcext:value-type="float">
            <text:p>8490</text:p>
          </table:table-cell>
          <table:table-cell table:style-name="ce32" office:value-type="float" office:value="10706" calcext:value-type="float">
            <text:p>10706</text:p>
          </table:table-cell>
          <table:table-cell table:style-name="ce36" office:value-type="float" office:value="2825" calcext:value-type="float">
            <text:p>2825</text:p>
          </table:table-cell>
          <table:table-cell table:style-name="ce40" office:value-type="float" office:value="9754" calcext:value-type="float">
            <text:p>9754</text:p>
          </table:table-cell>
          <table:table-cell table:style-name="ce44" office:value-type="float" office:value="1879" calcext:value-type="float">
            <text:p>1879</text:p>
          </table:table-cell>
          <table:table-cell table:style-name="ce52" table:formula="of:=SUM([.D387:.H387])" office:value-type="float" office:value="33654" calcext:value-type="float">
            <text:p>33654</text:p>
          </table:table-cell>
          <table:table-cell table:style-name="ce59" office:value-type="string" calcext:value-type="string">
            <text:p>Twayn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387]=126;70;IF([.T387]=112;70;IF([.T387]=98;70;IF([.T387]=96;60;IF([.T387]=84;60;IF([.T387]=108;60;IF([.T387]=90;50;IF([.T387]=72;40;IF([.T387]=80;40;IF([.T387]=100;50;IF([.T387]=54;30;IF([.T387]=36;20;IF([.T387]=18;10;IF([.T387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24932/defenderoftexel/images/thumb/e/e2/Ditmar_Icon.png/40px-Ditm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itmar&quot;; &quot;Ditmar&quot;)" office:value-type="string" office:string-value="Ditmar" calcext:value-type="string">
            <text:p>Ditmar</text:p>
          </table:table-cell>
          <table:table-cell table:style-name="ce25"/>
          <table:table-cell table:style-name="ce28" office:value-type="float" office:value="1069" calcext:value-type="float">
            <text:p>1069</text:p>
          </table:table-cell>
          <table:table-cell table:style-name="ce33" office:value-type="float" office:value="749" calcext:value-type="float">
            <text:p>749</text:p>
          </table:table-cell>
          <table:table-cell table:style-name="ce37" office:value-type="float" office:value="483" calcext:value-type="float">
            <text:p>483</text:p>
          </table:table-cell>
          <table:table-cell table:style-name="ce41" office:value-type="float" office:value="3077" calcext:value-type="float">
            <text:p>3077</text:p>
          </table:table-cell>
          <table:table-cell table:style-name="ce45" office:value-type="float" office:value="2933" calcext:value-type="float">
            <text:p>2933</text:p>
          </table:table-cell>
          <table:table-cell table:style-name="ce53" table:formula="of:=SUM([.D388:.H388])" office:value-type="float" office:value="8311" calcext:value-type="float">
            <text:p>8311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8]=126;70;IF([.T388]=112;70;IF([.T388]=98;70;IF([.T388]=96;60;IF([.T388]=84;60;IF([.T388]=108;60;IF([.T388]=90;50;IF([.T388]=72;40;IF([.T388]=80;40;IF([.T388]=100;50;IF([.T388]=54;30;IF([.T388]=36;20;IF([.T388]=18;10;IF([.T38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d/d7/Diurpane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amanais_-_Drilgisa_-_Diurpaneus&quot;; &quot;Diurpaneus&quot;)" office:value-type="string" office:string-value="Diurpaneus" calcext:value-type="string">
            <text:p>Diurpaneus</text:p>
          </table:table-cell>
          <table:table-cell table:style-name="ce25"/>
          <table:table-cell table:style-name="ce28" office:value-type="float" office:value="2730" calcext:value-type="float">
            <text:p>2730</text:p>
          </table:table-cell>
          <table:table-cell table:style-name="ce33" office:value-type="float" office:value="2080" calcext:value-type="float">
            <text:p>2080</text:p>
          </table:table-cell>
          <table:table-cell table:style-name="ce37" office:value-type="float" office:value="1419" calcext:value-type="float">
            <text:p>1419</text:p>
          </table:table-cell>
          <table:table-cell table:style-name="ce41" office:value-type="float" office:value="2017" calcext:value-type="float">
            <text:p>2017</text:p>
          </table:table-cell>
          <table:table-cell table:style-name="ce45" office:value-type="float" office:value="5091" calcext:value-type="float">
            <text:p>5091</text:p>
          </table:table-cell>
          <table:table-cell table:style-name="ce53" table:formula="of:=SUM([.D389:.H389])" office:value-type="float" office:value="13337" calcext:value-type="float">
            <text:p>13337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89]=126;70;IF([.T389]=112;70;IF([.T389]=98;70;IF([.T389]=96;60;IF([.T389]=84;60;IF([.T389]=108;60;IF([.T389]=90;50;IF([.T389]=72;40;IF([.T389]=80;40;IF([.T389]=100;50;IF([.T389]=54;30;IF([.T389]=36;20;IF([.T389]=18;10;IF([.T38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1203135438/defenderoftexel/images/thumb/d/d8/Dread_Dysipius_Icon.png/50px-Dread_Dysipiu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Dread_Dysipius&quot;;&quot;Dread Dysipius&quot;)" office:value-type="string" office:string-value="Dread Dysipius" calcext:value-type="string">
            <text:p>Dread Dysipius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0035" calcext:value-type="float">
            <text:p>10035</text:p>
          </table:table-cell>
          <table:table-cell table:style-name="ce32" office:value-type="float" office:value="11699" calcext:value-type="float">
            <text:p>11699</text:p>
          </table:table-cell>
          <table:table-cell table:style-name="ce36" office:value-type="float" office:value="8121" calcext:value-type="float">
            <text:p>8121</text:p>
          </table:table-cell>
          <table:table-cell table:style-name="ce40" office:value-type="float" office:value="1152" calcext:value-type="float">
            <text:p>1152</text:p>
          </table:table-cell>
          <table:table-cell table:style-name="ce44" office:value-type="float" office:value="1393" calcext:value-type="float">
            <text:p>1393</text:p>
          </table:table-cell>
          <table:table-cell table:style-name="ce52" table:formula="of:=SUM([.D390:.H390])" office:value-type="float" office:value="32400" calcext:value-type="float">
            <text:p>32400</text:p>
          </table:table-cell>
          <table:table-cell table:style-name="ce59" office:value-type="string" calcext:value-type="string">
            <text:p>Jackboo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390]=126;70;IF([.T390]=112;70;IF([.T390]=98;70;IF([.T390]=96;60;IF([.T390]=84;60;IF([.T390]=108;60;IF([.T390]=90;50;IF([.T390]=72;40;IF([.T390]=80;40;IF([.T390]=100;50;IF([.T390]=54;30;IF([.T390]=36;20;IF([.T390]=18;10;IF([.T390]=60;30))))))))))))))" office:value-type="float" office:value="60" calcext:value-type="float">
            <text:p>60</text:p>
          </table:table-cell>
          <table:table-cell table:style-name="ce67" office:value-type="float" office:value="96" calcext:value-type="float">
            <text:p>9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c/cf/Dreamseer_Icon.png/revision/latest?cb=20140721125517&quot;)" office:value-type="string" office:string-value="" calcext:value-type="error">
            <text:p>#NAME?</text:p>
          </table:table-cell>
          <table:table-cell table:style-name="ce14" table:formula="of:=HYPERLINK(&quot;http://defenderoftexel.wikia.com/wiki/Dreamseer&quot;; &quot;Dreamseer&quot;)" office:value-type="string" office:string-value="Dreamseer" calcext:value-type="string">
            <text:p>Dreamse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121" calcext:value-type="float">
            <text:p>3121</text:p>
          </table:table-cell>
          <table:table-cell table:style-name="ce32" office:value-type="float" office:value="4747" calcext:value-type="float">
            <text:p>4747</text:p>
          </table:table-cell>
          <table:table-cell table:style-name="ce36" office:value-type="float" office:value="1623" calcext:value-type="float">
            <text:p>1623</text:p>
          </table:table-cell>
          <table:table-cell table:style-name="ce40" office:value-type="float" office:value="977" calcext:value-type="float">
            <text:p>977</text:p>
          </table:table-cell>
          <table:table-cell table:style-name="ce44" office:value-type="float" office:value="4923" calcext:value-type="float">
            <text:p>4923</text:p>
          </table:table-cell>
          <table:table-cell table:style-name="ce52" table:formula="of:=SUM([.D391:.H391])" office:value-type="float" office:value="15391" calcext:value-type="float">
            <text:p>15391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91]=126;70;IF([.T391]=112;70;IF([.T391]=98;70;IF([.T391]=96;60;IF([.T391]=84;60;IF([.T391]=108;60;IF([.T391]=90;50;IF([.T391]=72;40;IF([.T391]=80;40;IF([.T391]=100;50;IF([.T391]=54;30;IF([.T391]=36;20;IF([.T391]=18;10;IF([.T39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218110809/defenderoftexel/images/thumb/9/9d/Druaga_Icon.png/50px-Druag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ruaga&quot;;&quot;Druaga&quot;)" office:value-type="string" office:string-value="Druaga" calcext:value-type="string">
            <text:p>Druaga</text:p>
          </table:table-cell>
          <table:table-cell table:style-name="ce25"/>
          <table:table-cell table:style-name="ce28" office:value-type="float" office:value="10757" calcext:value-type="float">
            <text:p>10757</text:p>
          </table:table-cell>
          <table:table-cell table:style-name="ce33" office:value-type="float" office:value="12307" calcext:value-type="float">
            <text:p>12307</text:p>
          </table:table-cell>
          <table:table-cell table:style-name="ce37" office:value-type="float" office:value="6571" calcext:value-type="float">
            <text:p>6571</text:p>
          </table:table-cell>
          <table:table-cell table:style-name="ce41" office:value-type="float" office:value="1566" calcext:value-type="float">
            <text:p>1566</text:p>
          </table:table-cell>
          <table:table-cell table:style-name="ce45" office:value-type="float" office:value="2080" calcext:value-type="float">
            <text:p>2080</text:p>
          </table:table-cell>
          <table:table-cell table:style-name="ce53" table:formula="of:=SUM([.D392:.H392])" office:value-type="float" office:value="33281" calcext:value-type="float">
            <text:p>33281</text:p>
          </table:table-cell>
          <table:table-cell table:style-name="ce60" office:value-type="string" calcext:value-type="string">
            <text:p>Nightbloom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392]=126;70;IF([.T392]=112;70;IF([.T392]=98;70;IF([.T392]=96;60;IF([.T392]=84;60;IF([.T392]=108;60;IF([.T392]=90;50;IF([.T392]=72;40;IF([.T392]=80;40;IF([.T392]=100;50;IF([.T392]=54;30;IF([.T392]=36;20;IF([.T392]=18;10;IF([.T39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428041330/defenderoftexel/images/e/e8/Drymead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Drymead&quot;; &quot;Drymead&quot;)" office:value-type="string" office:string-value="Drymead" calcext:value-type="string">
            <text:p>Drymea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242" calcext:value-type="float">
            <text:p>3242</text:p>
          </table:table-cell>
          <table:table-cell table:style-name="ce32" office:value-type="float" office:value="2740" calcext:value-type="float">
            <text:p>2740</text:p>
          </table:table-cell>
          <table:table-cell table:style-name="ce36" office:value-type="float" office:value="1404" calcext:value-type="float">
            <text:p>1404</text:p>
          </table:table-cell>
          <table:table-cell table:style-name="ce40" office:value-type="float" office:value="277" calcext:value-type="float">
            <text:p>277</text:p>
          </table:table-cell>
          <table:table-cell table:style-name="ce44" office:value-type="float" office:value="1051" calcext:value-type="float">
            <text:p>1051</text:p>
          </table:table-cell>
          <table:table-cell table:style-name="ce52" table:formula="of:=SUM([.D393:.H393])" office:value-type="float" office:value="8714" calcext:value-type="float">
            <text:p>871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93]=126;70;IF([.T393]=112;70;IF([.T393]=98;70;IF([.T393]=96;60;IF([.T393]=84;60;IF([.T393]=108;60;IF([.T393]=90;50;IF([.T393]=72;40;IF([.T393]=80;40;IF([.T393]=100;50;IF([.T393]=54;30;IF([.T393]=36;20;IF([.T393]=18;10;IF([.T39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vignette2.wikia.nocookie.net/defenderoftexel/images/1/1b/Dub_Icon.png/revision/latest?cb=20150419131820&quot;)" office:value-type="string" office:string-value="" calcext:value-type="error">
            <text:p>#NAME?</text:p>
          </table:table-cell>
          <table:table-cell table:style-name="ce11" table:formula="of:=HYPERLINK(&quot;http://defenderoftexel.wikia.com/wiki/Dub_-_Anugia_-_Kibisegi&quot;;&quot;Dub&quot;)" office:value-type="string" office:string-value="Dub" calcext:value-type="string">
            <text:p>Dub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394:.H394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94]=126;70;IF([.T394]=112;70;IF([.T394]=98;70;IF([.T394]=96;60;IF([.T394]=84;60;IF([.T394]=108;60;IF([.T394]=90;50;IF([.T394]=72;40;IF([.T394]=80;40;IF([.T394]=100;50;IF([.T394]=54;30;IF([.T394]=36;20;IF([.T394]=18;10;IF([.T39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056/defenderoftexel/images/thumb/3/33/Ebbi_Icon.png/50px-Ebb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bbi&quot;; &quot;Ebbi&quot;)" office:value-type="string" office:string-value="Ebbi" calcext:value-type="string">
            <text:p>Ebbi</text:p>
          </table:table-cell>
          <table:table-cell table:style-name="ce25"/>
          <table:table-cell table:style-name="ce28" office:value-type="float" office:value="1718" calcext:value-type="float">
            <text:p>1718</text:p>
          </table:table-cell>
          <table:table-cell table:style-name="ce33" office:value-type="float" office:value="1206" calcext:value-type="float">
            <text:p>1206</text:p>
          </table:table-cell>
          <table:table-cell table:style-name="ce37" office:value-type="float" office:value="779" calcext:value-type="float">
            <text:p>779</text:p>
          </table:table-cell>
          <table:table-cell table:style-name="ce41" office:value-type="float" office:value="4941" calcext:value-type="float">
            <text:p>4941</text:p>
          </table:table-cell>
          <table:table-cell table:style-name="ce45" office:value-type="float" office:value="4706" calcext:value-type="float">
            <text:p>4706</text:p>
          </table:table-cell>
          <table:table-cell table:style-name="ce53" table:formula="of:=SUM([.D395:.H395])" office:value-type="float" office:value="13350" calcext:value-type="float">
            <text:p>13350</text:p>
          </table:table-cell>
          <table:table-cell table:style-name="ce60" office:value-type="string" calcext:value-type="string">
            <text:p>Zhap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95]=126;70;IF([.T395]=112;70;IF([.T395]=98;70;IF([.T395]=96;60;IF([.T395]=84;60;IF([.T395]=108;60;IF([.T395]=90;50;IF([.T395]=72;40;IF([.T395]=80;40;IF([.T395]=100;50;IF([.T395]=54;30;IF([.T395]=36;20;IF([.T395]=18;10;IF([.T39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806151248/defenderoftexel/images/thumb/2/28/Ebustrone_Icon.png/50px-Ebustro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bustrone&quot;; &quot;Ebustrone&quot;)" office:value-type="string" office:string-value="Ebustrone" calcext:value-type="string">
            <text:p>Ebustrone</text:p>
          </table:table-cell>
          <table:table-cell table:style-name="ce25"/>
          <table:table-cell table:style-name="ce28" office:value-type="float" office:value="349" calcext:value-type="float">
            <text:p>349</text:p>
          </table:table-cell>
          <table:table-cell table:style-name="ce33" office:value-type="float" office:value="609" calcext:value-type="float">
            <text:p>609</text:p>
          </table:table-cell>
          <table:table-cell table:style-name="ce37" office:value-type="float" office:value="321" calcext:value-type="float">
            <text:p>321</text:p>
          </table:table-cell>
          <table:table-cell table:style-name="ce41" office:value-type="float" office:value="3532" calcext:value-type="float">
            <text:p>3532</text:p>
          </table:table-cell>
          <table:table-cell table:style-name="ce45" office:value-type="float" office:value="2654" calcext:value-type="float">
            <text:p>2654</text:p>
          </table:table-cell>
          <table:table-cell table:style-name="ce53" table:formula="of:=SUM([.D396:.H396])" office:value-type="float" office:value="7465" calcext:value-type="float">
            <text:p>7465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96]=126;70;IF([.T396]=112;70;IF([.T396]=98;70;IF([.T396]=96;60;IF([.T396]=84;60;IF([.T396]=108;60;IF([.T396]=90;50;IF([.T396]=72;40;IF([.T396]=80;40;IF([.T396]=100;50;IF([.T396]=54;30;IF([.T396]=36;20;IF([.T396]=18;10;IF([.T39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121161205/defenderoftexel/images/thumb/0/07/Eirweard_Icon.png/50px-Eirweard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irweard&quot;; &quot;Eirweard&quot;)" office:value-type="string" office:string-value="Eirweard" calcext:value-type="string">
            <text:p>Eirweard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537" calcext:value-type="float">
            <text:p>4537</text:p>
          </table:table-cell>
          <table:table-cell table:style-name="ce32" office:value-type="float" office:value="10559" calcext:value-type="float">
            <text:p>10559</text:p>
          </table:table-cell>
          <table:table-cell table:style-name="ce36" office:value-type="float" office:value="2309" calcext:value-type="float">
            <text:p>2309</text:p>
          </table:table-cell>
          <table:table-cell table:style-name="ce40" office:value-type="float" office:value="10029" calcext:value-type="float">
            <text:p>10029</text:p>
          </table:table-cell>
          <table:table-cell table:style-name="ce44" office:value-type="float" office:value="3066" calcext:value-type="float">
            <text:p>3066</text:p>
          </table:table-cell>
          <table:table-cell table:style-name="ce52" table:formula="of:=SUM([.D397:.H397])" office:value-type="float" office:value="30500" calcext:value-type="float">
            <text:p>30500</text:p>
          </table:table-cell>
          <table:table-cell table:style-name="ce59" office:value-type="string" calcext:value-type="string">
            <text:p>Bamboozl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397]=126;70;IF([.T397]=112;70;IF([.T397]=98;70;IF([.T397]=96;60;IF([.T397]=84;60;IF([.T397]=108;60;IF([.T397]=90;50;IF([.T397]=72;40;IF([.T397]=80;40;IF([.T397]=100;50;IF([.T397]=54;30;IF([.T397]=36;20;IF([.T397]=18;10;IF([.T397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715134347/defenderoftexel/images/4/4d/Elel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lelu&quot;; &quot;Elelu&quot;)" office:value-type="string" office:string-value="Elelu" calcext:value-type="string">
            <text:p>Elelu</text:p>
          </table:table-cell>
          <table:table-cell table:style-name="ce25"/>
          <table:table-cell table:style-name="ce28" office:value-type="float" office:value="2628" calcext:value-type="float">
            <text:p>2628</text:p>
          </table:table-cell>
          <table:table-cell table:style-name="ce33" office:value-type="float" office:value="4287" calcext:value-type="float">
            <text:p>4287</text:p>
          </table:table-cell>
          <table:table-cell table:style-name="ce37" office:value-type="float" office:value="2183" calcext:value-type="float">
            <text:p>2183</text:p>
          </table:table-cell>
          <table:table-cell table:style-name="ce41" office:value-type="float" office:value="3430" calcext:value-type="float">
            <text:p>3430</text:p>
          </table:table-cell>
          <table:table-cell table:style-name="ce45" office:value-type="float" office:value="420" calcext:value-type="float">
            <text:p>420</text:p>
          </table:table-cell>
          <table:table-cell table:style-name="ce53" table:formula="of:=SUM([.D398:.H398])" office:value-type="float" office:value="12948" calcext:value-type="float">
            <text:p>12948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398]=126;70;IF([.T398]=112;70;IF([.T398]=98;70;IF([.T398]=96;60;IF([.T398]=84;60;IF([.T398]=108;60;IF([.T398]=90;50;IF([.T398]=72;40;IF([.T398]=80;40;IF([.T398]=100;50;IF([.T398]=54;30;IF([.T398]=36;20;IF([.T398]=18;10;IF([.T39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4/41/Elinei_Icon.png/revision/latest?cb=20150414160451&quot;)" office:value-type="string" office:string-value="" calcext:value-type="error">
            <text:p>#NAME?</text:p>
          </table:table-cell>
          <table:table-cell table:style-name="ce11" table:formula="of:=HYPERLINK(&quot;http://defenderoftexel.wikia.com/wiki/Thanusa_-_Palmithe_-_Elinei&quot;;&quot;Elinei&quot;)" office:value-type="string" office:string-value="Elinei" calcext:value-type="string">
            <text:p>Eline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030" calcext:value-type="float">
            <text:p>2030</text:p>
          </table:table-cell>
          <table:table-cell table:style-name="ce32" office:value-type="float" office:value="1186" calcext:value-type="float">
            <text:p>1186</text:p>
          </table:table-cell>
          <table:table-cell table:style-name="ce36" office:value-type="float" office:value="1388" calcext:value-type="float">
            <text:p>1388</text:p>
          </table:table-cell>
          <table:table-cell table:style-name="ce40" office:value-type="float" office:value="5475" calcext:value-type="float">
            <text:p>5475</text:p>
          </table:table-cell>
          <table:table-cell table:style-name="ce44" office:value-type="float" office:value="6860" calcext:value-type="float">
            <text:p>6860</text:p>
          </table:table-cell>
          <table:table-cell table:style-name="ce52" table:formula="of:=SUM([.D399:.H399])" office:value-type="float" office:value="16939" calcext:value-type="float">
            <text:p>16939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399]=126;70;IF([.T399]=112;70;IF([.T399]=98;70;IF([.T399]=96;60;IF([.T399]=84;60;IF([.T399]=108;60;IF([.T399]=90;50;IF([.T399]=72;40;IF([.T399]=80;40;IF([.T399]=100;50;IF([.T399]=54;30;IF([.T399]=36;20;IF([.T399]=18;10;IF([.T39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1001175742/defenderoftexel/images/thumb/9/9d/Ello_Icon.png/50px-Ell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llo&quot;; &quot;Ello&quot;)" office:value-type="string" office:string-value="Ello" calcext:value-type="string">
            <text:p>Ello</text:p>
          </table:table-cell>
          <table:table-cell table:style-name="ce25"/>
          <table:table-cell table:style-name="ce28" office:value-type="float" office:value="1494" calcext:value-type="float">
            <text:p>1494</text:p>
          </table:table-cell>
          <table:table-cell table:style-name="ce33" office:value-type="float" office:value="1049" calcext:value-type="float">
            <text:p>1049</text:p>
          </table:table-cell>
          <table:table-cell table:style-name="ce37" office:value-type="float" office:value="678" calcext:value-type="float">
            <text:p>678</text:p>
          </table:table-cell>
          <table:table-cell table:style-name="ce41" office:value-type="float" office:value="4301" calcext:value-type="float">
            <text:p>4301</text:p>
          </table:table-cell>
          <table:table-cell table:style-name="ce45" office:value-type="float" office:value="4098" calcext:value-type="float">
            <text:p>4098</text:p>
          </table:table-cell>
          <table:table-cell table:style-name="ce53" table:formula="of:=SUM([.D400:.H400])" office:value-type="float" office:value="11620" calcext:value-type="float">
            <text:p>11620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0]=126;70;IF([.T400]=112;70;IF([.T400]=98;70;IF([.T400]=96;60;IF([.T400]=84;60;IF([.T400]=108;60;IF([.T400]=90;50;IF([.T400]=72;40;IF([.T400]=80;40;IF([.T400]=100;50;IF([.T400]=54;30;IF([.T400]=36;20;IF([.T400]=18;10;IF([.T40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304150757/defenderoftexel/images/thumb/5/52/Elulu_Icon.png/50px-Elul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lulu&quot;; &quot;Elulu&quot;)" office:value-type="string" office:string-value="Elulu" calcext:value-type="string">
            <text:p>Elulu</text:p>
          </table:table-cell>
          <table:table-cell table:style-name="ce25"/>
          <table:table-cell table:style-name="ce28" office:value-type="float" office:value="1888" calcext:value-type="float">
            <text:p>1888</text:p>
          </table:table-cell>
          <table:table-cell table:style-name="ce33" office:value-type="float" office:value="5449" calcext:value-type="float">
            <text:p>5449</text:p>
          </table:table-cell>
          <table:table-cell table:style-name="ce37" office:value-type="float" office:value="1684" calcext:value-type="float">
            <text:p>1684</text:p>
          </table:table-cell>
          <table:table-cell table:style-name="ce41" office:value-type="float" office:value="3586" calcext:value-type="float">
            <text:p>3586</text:p>
          </table:table-cell>
          <table:table-cell table:style-name="ce45" office:value-type="float" office:value="2593" calcext:value-type="float">
            <text:p>2593</text:p>
          </table:table-cell>
          <table:table-cell table:style-name="ce53" table:formula="of:=SUM([.D401:.H401])" office:value-type="float" office:value="15200" calcext:value-type="float">
            <text:p>1520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1]=126;70;IF([.T401]=112;70;IF([.T401]=98;70;IF([.T401]=96;60;IF([.T401]=84;60;IF([.T401]=108;60;IF([.T401]=90;50;IF([.T401]=72;40;IF([.T401]=80;40;IF([.T401]=100;50;IF([.T401]=54;30;IF([.T401]=36;20;IF([.T401]=18;10;IF([.T40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2531/defenderoftexel/images/thumb/b/b1/Emeric_Icon.png/50px-Emeric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meric&quot;; &quot;Emeric&quot;)" office:value-type="string" office:string-value="Emeric" calcext:value-type="string">
            <text:p>Emeric</text:p>
          </table:table-cell>
          <table:table-cell table:style-name="ce25"/>
          <table:table-cell table:style-name="ce28" office:value-type="float" office:value="2659" calcext:value-type="float">
            <text:p>2659</text:p>
          </table:table-cell>
          <table:table-cell table:style-name="ce33" office:value-type="float" office:value="3924" calcext:value-type="float">
            <text:p>3924</text:p>
          </table:table-cell>
          <table:table-cell table:style-name="ce37" office:value-type="float" office:value="4451" calcext:value-type="float">
            <text:p>4451</text:p>
          </table:table-cell>
          <table:table-cell table:style-name="ce41" office:value-type="float" office:value="1593" calcext:value-type="float">
            <text:p>1593</text:p>
          </table:table-cell>
          <table:table-cell table:style-name="ce45" office:value-type="float" office:value="802" calcext:value-type="float">
            <text:p>802</text:p>
          </table:table-cell>
          <table:table-cell table:style-name="ce53" table:formula="of:=SUM([.D402:.H402])" office:value-type="float" office:value="13429" calcext:value-type="float">
            <text:p>13429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2]=126;70;IF([.T402]=112;70;IF([.T402]=98;70;IF([.T402]=96;60;IF([.T402]=84;60;IF([.T402]=108;60;IF([.T402]=90;50;IF([.T402]=72;40;IF([.T402]=80;40;IF([.T402]=100;50;IF([.T402]=54;30;IF([.T402]=36;20;IF([.T402]=18;10;IF([.T40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924164837/defenderoftexel/images/thumb/d/d7/Endursaga_Icon.png/50px-Endursag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dad_-_Damu_-_Endursaga&quot;;&quot;Endursaga&quot;)" office:value-type="string" office:string-value="Endursaga" calcext:value-type="string">
            <text:p>Endursaga</text:p>
          </table:table-cell>
          <table:table-cell table:style-name="ce25"/>
          <table:table-cell table:style-name="ce28" office:value-type="float" office:value="7485" calcext:value-type="float">
            <text:p>7485</text:p>
          </table:table-cell>
          <table:table-cell table:style-name="ce33" office:value-type="float" office:value="8565" calcext:value-type="float">
            <text:p>8565</text:p>
          </table:table-cell>
          <table:table-cell table:style-name="ce37" office:value-type="float" office:value="4567" calcext:value-type="float">
            <text:p>4567</text:p>
          </table:table-cell>
          <table:table-cell table:style-name="ce41" office:value-type="float" office:value="1086" calcext:value-type="float">
            <text:p>1086</text:p>
          </table:table-cell>
          <table:table-cell table:style-name="ce45" office:value-type="float" office:value="1443" calcext:value-type="float">
            <text:p>1443</text:p>
          </table:table-cell>
          <table:table-cell table:style-name="ce53" table:formula="of:=SUM([.D403:.H403])" office:value-type="float" office:value="23146" calcext:value-type="float">
            <text:p>23146</text:p>
          </table:table-cell>
          <table:table-cell table:style-name="ce60" office:value-type="string" calcext:value-type="string">
            <text:p>Bananas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403]=126;70;IF([.T403]=112;70;IF([.T403]=98;70;IF([.T403]=96;60;IF([.T403]=84;60;IF([.T403]=108;60;IF([.T403]=90;50;IF([.T403]=72;40;IF([.T403]=80;40;IF([.T403]=100;50;IF([.T403]=54;30;IF([.T403]=36;20;IF([.T403]=18;10;IF([.T40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72104/defenderoftexel/images/7/76/Enhedua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nheduana&quot;; &quot;Enheduana&quot;)" office:value-type="string" office:string-value="Enheduana" calcext:value-type="string">
            <text:p>Enheduana</text:p>
          </table:table-cell>
          <table:table-cell table:style-name="ce25"/>
          <table:table-cell table:style-name="ce28" office:value-type="float" office:value="2318" calcext:value-type="float">
            <text:p>2318</text:p>
          </table:table-cell>
          <table:table-cell table:style-name="ce33" office:value-type="float" office:value="2608" calcext:value-type="float">
            <text:p>2608</text:p>
          </table:table-cell>
          <table:table-cell table:style-name="ce37" office:value-type="float" office:value="4591" calcext:value-type="float">
            <text:p>4591</text:p>
          </table:table-cell>
          <table:table-cell table:style-name="ce41" office:value-type="float" office:value="247" calcext:value-type="float">
            <text:p>247</text:p>
          </table:table-cell>
          <table:table-cell table:style-name="ce45" office:value-type="float" office:value="210" calcext:value-type="float">
            <text:p>210</text:p>
          </table:table-cell>
          <table:table-cell table:style-name="ce53" table:formula="of:=SUM([.D404:.H404])" office:value-type="float" office:value="9974" calcext:value-type="float">
            <text:p>9974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4]=126;70;IF([.T404]=112;70;IF([.T404]=98;70;IF([.T404]=96;60;IF([.T404]=84;60;IF([.T404]=108;60;IF([.T404]=90;50;IF([.T404]=72;40;IF([.T404]=80;40;IF([.T404]=100;50;IF([.T404]=54;30;IF([.T404]=36;20;IF([.T404]=18;10;IF([.T40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304145703/defenderoftexel/images/thumb/8/85/Enmesarra_Icon.png/50px-Enmesar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nmesarra&quot;; &quot;Enmesarra&quot;)" office:value-type="string" office:string-value="Enmesarra" calcext:value-type="string">
            <text:p>Enmesarra</text:p>
          </table:table-cell>
          <table:table-cell table:style-name="ce25"/>
          <table:table-cell table:style-name="ce28" office:value-type="float" office:value="2351" calcext:value-type="float">
            <text:p>2351</text:p>
          </table:table-cell>
          <table:table-cell table:style-name="ce33" office:value-type="float" office:value="5470" calcext:value-type="float">
            <text:p>5470</text:p>
          </table:table-cell>
          <table:table-cell table:style-name="ce37" office:value-type="float" office:value="1192" calcext:value-type="float">
            <text:p>1192</text:p>
          </table:table-cell>
          <table:table-cell table:style-name="ce41" office:value-type="float" office:value="5193" calcext:value-type="float">
            <text:p>5193</text:p>
          </table:table-cell>
          <table:table-cell table:style-name="ce45" office:value-type="float" office:value="1583" calcext:value-type="float">
            <text:p>1583</text:p>
          </table:table-cell>
          <table:table-cell table:style-name="ce53" table:formula="of:=SUM([.D405:.H405])" office:value-type="float" office:value="15789" calcext:value-type="float">
            <text:p>15789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5]=126;70;IF([.T405]=112;70;IF([.T405]=98;70;IF([.T405]=96;60;IF([.T405]=84;60;IF([.T405]=108;60;IF([.T405]=90;50;IF([.T405]=72;40;IF([.T405]=80;40;IF([.T405]=100;50;IF([.T405]=54;30;IF([.T405]=36;20;IF([.T405]=18;10;IF([.T40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0/0b/Ente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ursin_-_Ilabrat_-_Enten&quot;; &quot;Enten&quot;)" office:value-type="string" office:string-value="Enten" calcext:value-type="string">
            <text:p>Enten</text:p>
          </table:table-cell>
          <table:table-cell table:style-name="ce25"/>
          <table:table-cell table:style-name="ce28" office:value-type="float" office:value="2673" calcext:value-type="float">
            <text:p>2673</text:p>
          </table:table-cell>
          <table:table-cell table:style-name="ce33" office:value-type="float" office:value="2037" calcext:value-type="float">
            <text:p>2037</text:p>
          </table:table-cell>
          <table:table-cell table:style-name="ce37" office:value-type="float" office:value="1390" calcext:value-type="float">
            <text:p>1390</text:p>
          </table:table-cell>
          <table:table-cell table:style-name="ce41" office:value-type="float" office:value="1974" calcext:value-type="float">
            <text:p>1974</text:p>
          </table:table-cell>
          <table:table-cell table:style-name="ce45" office:value-type="float" office:value="4986" calcext:value-type="float">
            <text:p>4986</text:p>
          </table:table-cell>
          <table:table-cell table:style-name="ce53" table:formula="of:=SUM([.D406:.H406])" office:value-type="float" office:value="13060" calcext:value-type="float">
            <text:p>13060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6]=126;70;IF([.T406]=112;70;IF([.T406]=98;70;IF([.T406]=96;60;IF([.T406]=84;60;IF([.T406]=108;60;IF([.T406]=90;50;IF([.T406]=72;40;IF([.T406]=80;40;IF([.T406]=100;50;IF([.T406]=54;30;IF([.T406]=36;20;IF([.T406]=18;10;IF([.T40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55235/defenderoftexel/images/d/d5/Enzu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nzuna&quot;;&quot;Enzuna&quot;)" office:value-type="string" office:string-value="Enzuna" calcext:value-type="string">
            <text:p>Enzuna</text:p>
          </table:table-cell>
          <table:table-cell table:style-name="ce25"/>
          <table:table-cell table:style-name="ce28" office:value-type="float" office:value="2688" calcext:value-type="float">
            <text:p>2688</text:p>
          </table:table-cell>
          <table:table-cell table:style-name="ce33" office:value-type="float" office:value="4089" calcext:value-type="float">
            <text:p>4089</text:p>
          </table:table-cell>
          <table:table-cell table:style-name="ce37" office:value-type="float" office:value="1395" calcext:value-type="float">
            <text:p>1395</text:p>
          </table:table-cell>
          <table:table-cell table:style-name="ce41" office:value-type="float" office:value="842" calcext:value-type="float">
            <text:p>842</text:p>
          </table:table-cell>
          <table:table-cell table:style-name="ce45" office:value-type="float" office:value="4239" calcext:value-type="float">
            <text:p>4239</text:p>
          </table:table-cell>
          <table:table-cell table:style-name="ce53" table:formula="of:=SUM([.D407:.H407])" office:value-type="float" office:value="13253" calcext:value-type="float">
            <text:p>13253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7]=126;70;IF([.T407]=112;70;IF([.T407]=98;70;IF([.T407]=96;60;IF([.T407]=84;60;IF([.T407]=108;60;IF([.T407]=90;50;IF([.T407]=72;40;IF([.T407]=80;40;IF([.T407]=100;50;IF([.T407]=54;30;IF([.T407]=36;20;IF([.T407]=18;10;IF([.T40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304144608/defenderoftexel/images/thumb/8/8c/Erascus_Icon.png/50px-Erascus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rascus&quot;;&quot;Erascus&quot;)" office:value-type="string" office:string-value="Erascus" calcext:value-type="string">
            <text:p>Erasc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501" calcext:value-type="float">
            <text:p>4501</text:p>
          </table:table-cell>
          <table:table-cell table:style-name="ce32" office:value-type="float" office:value="5150" calcext:value-type="float">
            <text:p>5150</text:p>
          </table:table-cell>
          <table:table-cell table:style-name="ce36" office:value-type="float" office:value="2761" calcext:value-type="float">
            <text:p>2761</text:p>
          </table:table-cell>
          <table:table-cell table:style-name="ce40" office:value-type="float" office:value="649" calcext:value-type="float">
            <text:p>649</text:p>
          </table:table-cell>
          <table:table-cell table:style-name="ce44" office:value-type="float" office:value="863" calcext:value-type="float">
            <text:p>863</text:p>
          </table:table-cell>
          <table:table-cell table:style-name="ce52" table:formula="of:=SUM([.D408:.H408])" office:value-type="float" office:value="13924" calcext:value-type="float">
            <text:p>1392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08]=126;70;IF([.T408]=112;70;IF([.T408]=98;70;IF([.T408]=96;60;IF([.T408]=84;60;IF([.T408]=108;60;IF([.T408]=90;50;IF([.T408]=72;40;IF([.T408]=80;40;IF([.T408]=100;50;IF([.T408]=54;30;IF([.T408]=36;20;IF([.T408]=18;10;IF([.T40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b/b8/Eriac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nnin_-_Nin-Dar_-_Eriacu&quot;;&quot;Eriacu&quot;)" office:value-type="string" office:string-value="Eriacu" calcext:value-type="string">
            <text:p>Eriacu</text:p>
          </table:table-cell>
          <table:table-cell table:style-name="ce25"/>
          <table:table-cell table:style-name="ce28" office:value-type="float" office:value="2085" calcext:value-type="float">
            <text:p>2085</text:p>
          </table:table-cell>
          <table:table-cell table:style-name="ce33" office:value-type="float" office:value="1588" calcext:value-type="float">
            <text:p>1588</text:p>
          </table:table-cell>
          <table:table-cell table:style-name="ce37" office:value-type="float" office:value="1085" calcext:value-type="float">
            <text:p>1085</text:p>
          </table:table-cell>
          <table:table-cell table:style-name="ce41" office:value-type="float" office:value="1541" calcext:value-type="float">
            <text:p>1541</text:p>
          </table:table-cell>
          <table:table-cell table:style-name="ce45" office:value-type="float" office:value="3891" calcext:value-type="float">
            <text:p>3891</text:p>
          </table:table-cell>
          <table:table-cell table:style-name="ce53" table:formula="of:=SUM([.D409:.H409])" office:value-type="float" office:value="10190" calcext:value-type="float">
            <text:p>10190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09]=126;70;IF([.T409]=112;70;IF([.T409]=98;70;IF([.T409]=96;60;IF([.T409]=84;60;IF([.T409]=108;60;IF([.T409]=90;50;IF([.T409]=72;40;IF([.T409]=80;40;IF([.T409]=100;50;IF([.T409]=54;30;IF([.T409]=36;20;IF([.T409]=18;10;IF([.T40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1/16/Esfandiy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sfandiyar&quot;; &quot;Esfandiyar&quot;)" office:value-type="string" office:string-value="Esfandiyar" calcext:value-type="string">
            <text:p>Esfandiyar</text:p>
          </table:table-cell>
          <table:table-cell table:style-name="ce25"/>
          <table:table-cell table:style-name="ce28" office:value-type="float" office:value="3723" calcext:value-type="float">
            <text:p>3723</text:p>
          </table:table-cell>
          <table:table-cell table:style-name="ce33" office:value-type="float" office:value="4257" calcext:value-type="float">
            <text:p>4257</text:p>
          </table:table-cell>
          <table:table-cell table:style-name="ce37" office:value-type="float" office:value="2280" calcext:value-type="float">
            <text:p>2280</text:p>
          </table:table-cell>
          <table:table-cell table:style-name="ce41" office:value-type="float" office:value="537" calcext:value-type="float">
            <text:p>537</text:p>
          </table:table-cell>
          <table:table-cell table:style-name="ce45" office:value-type="float" office:value="715" calcext:value-type="float">
            <text:p>715</text:p>
          </table:table-cell>
          <table:table-cell table:style-name="ce53" table:formula="of:=SUM([.D410:.H410])" office:value-type="float" office:value="11512" calcext:value-type="float">
            <text:p>11512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10]=126;70;IF([.T410]=112;70;IF([.T410]=98;70;IF([.T410]=96;60;IF([.T410]=84;60;IF([.T410]=108;60;IF([.T410]=90;50;IF([.T410]=72;40;IF([.T410]=80;40;IF([.T410]=100;50;IF([.T410]=54;30;IF([.T410]=36;20;IF([.T410]=18;10;IF([.T41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428042455/defenderoftexel/images/c/c5/Esmellion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smellion&quot;; &quot;Esmellion&quot;)" office:value-type="string" office:string-value="Esmellion" calcext:value-type="string">
            <text:p>Esmellio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22" calcext:value-type="float">
            <text:p>2622</text:p>
          </table:table-cell>
          <table:table-cell table:style-name="ce32" office:value-type="float" office:value="3989" calcext:value-type="float">
            <text:p>3989</text:p>
          </table:table-cell>
          <table:table-cell table:style-name="ce36" office:value-type="float" office:value="1363" calcext:value-type="float">
            <text:p>1363</text:p>
          </table:table-cell>
          <table:table-cell table:style-name="ce40" office:value-type="float" office:value="822" calcext:value-type="float">
            <text:p>822</text:p>
          </table:table-cell>
          <table:table-cell table:style-name="ce44" office:value-type="float" office:value="4136" calcext:value-type="float">
            <text:p>4136</text:p>
          </table:table-cell>
          <table:table-cell table:style-name="ce52" table:formula="of:=SUM([.D411:.H411])" office:value-type="float" office:value="12932" calcext:value-type="float">
            <text:p>12932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1]=126;70;IF([.T411]=112;70;IF([.T411]=98;70;IF([.T411]=96;60;IF([.T411]=84;60;IF([.T411]=108;60;IF([.T411]=90;50;IF([.T411]=72;40;IF([.T411]=80;40;IF([.T411]=100;50;IF([.T411]=54;30;IF([.T411]=36;20;IF([.T411]=18;10;IF([.T41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325114821/defenderoftexel/images/thumb/c/c1/Eurymedon_Icon.png/50px-Eurymedo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urymedon&quot;; &quot;Eurymedon&quot;)" office:value-type="string" office:string-value="Eurymedon" calcext:value-type="string">
            <text:p>Eurymedon</text:p>
          </table:table-cell>
          <table:table-cell table:style-name="ce25"/>
          <table:table-cell table:style-name="ce28" office:value-type="float" office:value="3169" calcext:value-type="float">
            <text:p>3169</text:p>
          </table:table-cell>
          <table:table-cell table:style-name="ce33" office:value-type="float" office:value="4820" calcext:value-type="float">
            <text:p>4820</text:p>
          </table:table-cell>
          <table:table-cell table:style-name="ce37" office:value-type="float" office:value="1646" calcext:value-type="float">
            <text:p>1646</text:p>
          </table:table-cell>
          <table:table-cell table:style-name="ce41" office:value-type="float" office:value="991" calcext:value-type="float">
            <text:p>991</text:p>
          </table:table-cell>
          <table:table-cell table:style-name="ce45" office:value-type="float" office:value="4997" calcext:value-type="float">
            <text:p>4997</text:p>
          </table:table-cell>
          <table:table-cell table:style-name="ce53" table:formula="of:=SUM([.D412:.H412])" office:value-type="float" office:value="15623" calcext:value-type="float">
            <text:p>15623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12]=126;70;IF([.T412]=112;70;IF([.T412]=98;70;IF([.T412]=96;60;IF([.T412]=84;60;IF([.T412]=108;60;IF([.T412]=90;50;IF([.T412]=72;40;IF([.T412]=80;40;IF([.T412]=100;50;IF([.T412]=54;30;IF([.T412]=36;20;IF([.T412]=18;10;IF([.T41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318134902/defenderoftexel/images/thumb/c/c5/Evenclove_Icon.png/50px-Evenclov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venclove&quot;; &quot;Evenclove&quot;)" office:value-type="string" office:string-value="Evenclove" calcext:value-type="string">
            <text:p>Evenclove</text:p>
          </table:table-cell>
          <table:table-cell table:style-name="ce25"/>
          <table:table-cell table:style-name="ce28" office:value-type="float" office:value="4895" calcext:value-type="float">
            <text:p>4895</text:p>
          </table:table-cell>
          <table:table-cell table:style-name="ce33" office:value-type="float" office:value="11389" calcext:value-type="float">
            <text:p>11389</text:p>
          </table:table-cell>
          <table:table-cell table:style-name="ce37" office:value-type="float" office:value="2490" calcext:value-type="float">
            <text:p>2490</text:p>
          </table:table-cell>
          <table:table-cell table:style-name="ce41" office:value-type="float" office:value="10817" calcext:value-type="float">
            <text:p>10817</text:p>
          </table:table-cell>
          <table:table-cell table:style-name="ce45" office:value-type="float" office:value="3305" calcext:value-type="float">
            <text:p>3305</text:p>
          </table:table-cell>
          <table:table-cell table:style-name="ce53" table:formula="of:=SUM([.D413:.H413])" office:value-type="float" office:value="32896" calcext:value-type="float">
            <text:p>32896</text:p>
          </table:table-cell>
          <table:table-cell table:style-name="ce60" office:value-type="string" calcext:value-type="string">
            <text:p>Sideswip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13]=126;70;IF([.T413]=112;70;IF([.T413]=98;70;IF([.T413]=96;60;IF([.T413]=84;60;IF([.T413]=108;60;IF([.T413]=90;50;IF([.T413]=72;40;IF([.T413]=80;40;IF([.T413]=100;50;IF([.T413]=54;30;IF([.T413]=36;20;IF([.T413]=18;10;IF([.T41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2456/defenderoftexel/images/a/a5/Evengloom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vengloom&quot;; &quot;Evengloom&quot;)" office:value-type="string" office:string-value="Evengloom" calcext:value-type="string">
            <text:p>Evengloom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275" calcext:value-type="float">
            <text:p>1275</text:p>
          </table:table-cell>
          <table:table-cell table:style-name="ce32" office:value-type="float" office:value="1360" calcext:value-type="float">
            <text:p>1360</text:p>
          </table:table-cell>
          <table:table-cell table:style-name="ce36" office:value-type="float" office:value="657" calcext:value-type="float">
            <text:p>657</text:p>
          </table:table-cell>
          <table:table-cell table:style-name="ce40" office:value-type="float" office:value="1103" calcext:value-type="float">
            <text:p>1103</text:p>
          </table:table-cell>
          <table:table-cell table:style-name="ce44" office:value-type="float" office:value="1015" calcext:value-type="float">
            <text:p>1015</text:p>
          </table:table-cell>
          <table:table-cell table:style-name="ce52" table:formula="of:=SUM([.D414:.H414])" office:value-type="float" office:value="5410" calcext:value-type="float">
            <text:p>5410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4]=126;70;IF([.T414]=112;70;IF([.T414]=98;70;IF([.T414]=96;60;IF([.T414]=84;60;IF([.T414]=108;60;IF([.T414]=90;50;IF([.T414]=72;40;IF([.T414]=80;40;IF([.T414]=100;50;IF([.T414]=54;30;IF([.T414]=36;20;IF([.T414]=18;10;IF([.T414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5/50/Wallflower_Icon.png/revision/latest?cb=201304280424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Evenglory&quot;;&quot;Wallflower&quot;)" office:value-type="string" office:string-value="Wallflower" calcext:value-type="string">
            <text:p>Wallflowe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88" calcext:value-type="float">
            <text:p>288</text:p>
          </table:table-cell>
          <table:table-cell table:style-name="ce32" office:value-type="float" office:value="219" calcext:value-type="float">
            <text:p>219</text:p>
          </table:table-cell>
          <table:table-cell table:style-name="ce36" office:value-type="float" office:value="151" calcext:value-type="float">
            <text:p>151</text:p>
          </table:table-cell>
          <table:table-cell table:style-name="ce40" office:value-type="float" office:value="215" calcext:value-type="float">
            <text:p>215</text:p>
          </table:table-cell>
          <table:table-cell table:style-name="ce44" office:value-type="float" office:value="521" calcext:value-type="float">
            <text:p>521</text:p>
          </table:table-cell>
          <table:table-cell table:style-name="ce52" table:formula="of:=SUM([.D415:.H415])" office:value-type="float" office:value="1394" calcext:value-type="float">
            <text:p>1394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5]=126;70;IF([.T415]=112;70;IF([.T415]=98;70;IF([.T415]=96;60;IF([.T415]=84;60;IF([.T415]=108;60;IF([.T415]=90;50;IF([.T415]=72;40;IF([.T415]=80;40;IF([.T415]=100;50;IF([.T415]=54;30;IF([.T415]=36;20;IF([.T415]=18;10;IF([.T41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5/Bloomhoof_Icon.png/revision/latest?cb=201304280424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Evenglory&quot;;&quot;Bloomhoof&quot;)" office:value-type="string" office:string-value="Bloomhoof" calcext:value-type="string">
            <text:p>Bloomhoof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480" calcext:value-type="float">
            <text:p>480</text:p>
          </table:table-cell>
          <table:table-cell table:style-name="ce32" office:value-type="float" office:value="347" calcext:value-type="float">
            <text:p>347</text:p>
          </table:table-cell>
          <table:table-cell table:style-name="ce36" office:value-type="float" office:value="223" calcext:value-type="float">
            <text:p>223</text:p>
          </table:table-cell>
          <table:table-cell table:style-name="ce40" office:value-type="float" office:value="333" calcext:value-type="float">
            <text:p>333</text:p>
          </table:table-cell>
          <table:table-cell table:style-name="ce44" office:value-type="float" office:value="1029" calcext:value-type="float">
            <text:p>1029</text:p>
          </table:table-cell>
          <table:table-cell table:style-name="ce52" table:formula="of:=SUM([.D416:.H416])" office:value-type="float" office:value="2412" calcext:value-type="float">
            <text:p>2412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e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6]=126;70;IF([.T416]=112;70;IF([.T416]=98;70;IF([.T416]=96;60;IF([.T416]=84;60;IF([.T416]=108;60;IF([.T416]=90;50;IF([.T416]=72;40;IF([.T416]=80;40;IF([.T416]=100;50;IF([.T416]=54;30;IF([.T416]=36;20;IF([.T416]=18;10;IF([.T41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2459/defenderoftexel/images/2/25/Evenglory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venglory&quot;; &quot;Evenglory&quot;)" office:value-type="string" office:string-value="Evenglory" calcext:value-type="string">
            <text:p>Evenglory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267" calcext:value-type="float">
            <text:p>1267</text:p>
          </table:table-cell>
          <table:table-cell table:style-name="ce32" office:value-type="float" office:value="954" calcext:value-type="float">
            <text:p>954</text:p>
          </table:table-cell>
          <table:table-cell table:style-name="ce36" office:value-type="float" office:value="640" calcext:value-type="float">
            <text:p>640</text:p>
          </table:table-cell>
          <table:table-cell table:style-name="ce40" office:value-type="float" office:value="921" calcext:value-type="float">
            <text:p>921</text:p>
          </table:table-cell>
          <table:table-cell table:style-name="ce44" office:value-type="float" office:value="2456" calcext:value-type="float">
            <text:p>2456</text:p>
          </table:table-cell>
          <table:table-cell table:style-name="ce52" table:formula="of:=SUM([.D417:.H417])" office:value-type="float" office:value="6238" calcext:value-type="float">
            <text:p>6238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7]=126;70;IF([.T417]=112;70;IF([.T417]=98;70;IF([.T417]=96;60;IF([.T417]=84;60;IF([.T417]=108;60;IF([.T417]=90;50;IF([.T417]=72;40;IF([.T417]=80;40;IF([.T417]=100;50;IF([.T417]=54;30;IF([.T417]=36;20;IF([.T417]=18;10;IF([.T41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813225529/defenderoftexel/images/6/6f/Everflower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Everflower&quot;; &quot;Everflower&quot;)" office:value-type="string" office:string-value="Everflower" calcext:value-type="string">
            <text:p>Everflowe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493" calcext:value-type="float">
            <text:p>3493</text:p>
          </table:table-cell>
          <table:table-cell table:style-name="ce32" office:value-type="float" office:value="1480" calcext:value-type="float">
            <text:p>1480</text:p>
          </table:table-cell>
          <table:table-cell table:style-name="ce36" office:value-type="float" office:value="1623" calcext:value-type="float">
            <text:p>1623</text:p>
          </table:table-cell>
          <table:table-cell table:style-name="ce40" office:value-type="float" office:value="250" calcext:value-type="float">
            <text:p>250</text:p>
          </table:table-cell>
          <table:table-cell table:style-name="ce44" office:value-type="float" office:value="276" calcext:value-type="float">
            <text:p>276</text:p>
          </table:table-cell>
          <table:table-cell table:style-name="ce52" table:formula="of:=SUM([.D418:.H418])" office:value-type="float" office:value="7122" calcext:value-type="float">
            <text:p>7122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18]=126;70;IF([.T418]=112;70;IF([.T418]=98;70;IF([.T418]=96;60;IF([.T418]=84;60;IF([.T418]=108;60;IF([.T418]=90;50;IF([.T418]=72;40;IF([.T418]=80;40;IF([.T418]=100;50;IF([.T418]=54;30;IF([.T418]=36;20;IF([.T418]=18;10;IF([.T418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722153300/defenderoftexel/images/thumb/0/0f/Evreux_Icon.png/50px-Evreux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vreux&quot;; &quot;Evreux&quot;)" office:value-type="string" office:string-value="Evreux" calcext:value-type="string">
            <text:p>Evreux</text:p>
          </table:table-cell>
          <table:table-cell table:style-name="ce25"/>
          <table:table-cell table:style-name="ce28" office:value-type="float" office:value="2760" calcext:value-type="float">
            <text:p>2760</text:p>
          </table:table-cell>
          <table:table-cell table:style-name="ce33" office:value-type="float" office:value="2679" calcext:value-type="float">
            <text:p>2679</text:p>
          </table:table-cell>
          <table:table-cell table:style-name="ce37" office:value-type="float" office:value="1346" calcext:value-type="float">
            <text:p>1346</text:p>
          </table:table-cell>
          <table:table-cell table:style-name="ce41" office:value-type="float" office:value="2760" calcext:value-type="float">
            <text:p>2760</text:p>
          </table:table-cell>
          <table:table-cell table:style-name="ce45" office:value-type="float" office:value="7400" calcext:value-type="float">
            <text:p>7400</text:p>
          </table:table-cell>
          <table:table-cell table:style-name="ce53" table:formula="of:=SUM([.D419:.H419])" office:value-type="float" office:value="16945" calcext:value-type="float">
            <text:p>16945</text:p>
          </table:table-cell>
          <table:table-cell table:style-name="ce60" office:value-type="string" calcext:value-type="string">
            <text:p>Swarm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19]=126;70;IF([.T419]=112;70;IF([.T419]=98;70;IF([.T419]=96;60;IF([.T419]=84;60;IF([.T419]=108;60;IF([.T419]=90;50;IF([.T419]=72;40;IF([.T419]=80;40;IF([.T419]=100;50;IF([.T419]=54;30;IF([.T419]=36;20;IF([.T419]=18;10;IF([.T419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9/9f/Evtucle_Icon.png/revision/latest?cb=20150423181234&quot;)" office:value-type="string" office:string-value="" calcext:value-type="error">
            <text:p>#NAME?</text:p>
          </table:table-cell>
          <table:table-cell table:style-name="ce11" table:formula="of:=HYPERLINK(&quot;http://defenderoftexel.wikia.com/wiki/Tuntle_-_Evtucle_-_Meleacr&quot;;&quot;Evtucle&quot;)" office:value-type="string" office:string-value="Evtucle" calcext:value-type="string">
            <text:p>Evtucl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0]=126;70;IF([.T420]=112;70;IF([.T420]=98;70;IF([.T420]=96;60;IF([.T420]=84;60;IF([.T420]=108;60;IF([.T420]=90;50;IF([.T420]=72;40;IF([.T420]=80;40;IF([.T420]=100;50;IF([.T420]=54;30;IF([.T420]=36;20;IF([.T420]=18;10;IF([.T42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3231/defenderoftexel/images/thumb/b/bd/Fainglory_Icon.png/50px-Fainglory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Fainglory&quot;; &quot;Fainglory&quot;)" office:value-type="string" office:string-value="Fainglory" calcext:value-type="string">
            <text:p>Fainglory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2358" calcext:value-type="float">
            <text:p>2358</text:p>
          </table:table-cell>
          <table:table-cell table:style-name="ce32" office:value-type="float" office:value="2723" calcext:value-type="float">
            <text:p>2723</text:p>
          </table:table-cell>
          <table:table-cell table:style-name="ce36" office:value-type="float" office:value="1406" calcext:value-type="float">
            <text:p>1406</text:p>
          </table:table-cell>
          <table:table-cell table:style-name="ce40" office:value-type="float" office:value="312" calcext:value-type="float">
            <text:p>312</text:p>
          </table:table-cell>
          <table:table-cell table:style-name="ce44" office:value-type="float" office:value="421" calcext:value-type="float">
            <text:p>421</text:p>
          </table:table-cell>
          <table:table-cell table:style-name="ce52" table:formula="of:=SUM([.D421:.H421])" office:value-type="float" office:value="7220" calcext:value-type="float">
            <text:p>7220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1]=126;70;IF([.T421]=112;70;IF([.T421]=98;70;IF([.T421]=96;60;IF([.T421]=84;60;IF([.T421]=108;60;IF([.T421]=90;50;IF([.T421]=72;40;IF([.T421]=80;40;IF([.T421]=100;50;IF([.T421]=54;30;IF([.T421]=36;20;IF([.T421]=18;10;IF([.T421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813225813/defenderoftexel/images/e/ea/Falk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Falko&quot;; &quot;Falko&quot;)" office:value-type="string" office:string-value="Falko" calcext:value-type="string">
            <text:p>Falko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4047" calcext:value-type="float">
            <text:p>4047</text:p>
          </table:table-cell>
          <table:table-cell table:style-name="ce33" office:value-type="float" office:value="5104" calcext:value-type="float">
            <text:p>5104</text:p>
          </table:table-cell>
          <table:table-cell table:style-name="ce37" office:value-type="float" office:value="1338" calcext:value-type="float">
            <text:p>1338</text:p>
          </table:table-cell>
          <table:table-cell table:style-name="ce41" office:value-type="float" office:value="4653" calcext:value-type="float">
            <text:p>4653</text:p>
          </table:table-cell>
          <table:table-cell table:style-name="ce45" office:value-type="float" office:value="890" calcext:value-type="float">
            <text:p>890</text:p>
          </table:table-cell>
          <table:table-cell table:style-name="ce53" table:formula="of:=SUM([.D422:.H422])" office:value-type="float" office:value="16032" calcext:value-type="float">
            <text:p>16032</text:p>
          </table:table-cell>
          <table:table-cell table:style-name="ce62" office:value-type="string" calcext:value-type="string">
            <text:p>Plasma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22]=126;70;IF([.T422]=112;70;IF([.T422]=98;70;IF([.T422]=96;60;IF([.T422]=84;60;IF([.T422]=108;60;IF([.T422]=90;50;IF([.T422]=72;40;IF([.T422]=80;40;IF([.T422]=100;50;IF([.T422]=54;30;IF([.T422]=36;20;IF([.T422]=18;10;IF([.T42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2947/defenderoftexel/images/thumb/7/7b/Faridoon_Icon.png/50px-Faridoo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Faridoon&quot;; &quot;Faridoon&quot;)" office:value-type="string" office:string-value="Faridoon" calcext:value-type="string">
            <text:p>Faridoon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083" calcext:value-type="float">
            <text:p>1083</text:p>
          </table:table-cell>
          <table:table-cell table:style-name="ce33" office:value-type="float" office:value="1159" calcext:value-type="float">
            <text:p>1159</text:p>
          </table:table-cell>
          <table:table-cell table:style-name="ce37" office:value-type="float" office:value="546" calcext:value-type="float">
            <text:p>546</text:p>
          </table:table-cell>
          <table:table-cell table:style-name="ce41" office:value-type="float" office:value="931" calcext:value-type="float">
            <text:p>931</text:p>
          </table:table-cell>
          <table:table-cell table:style-name="ce45" office:value-type="float" office:value="859" calcext:value-type="float">
            <text:p>859</text:p>
          </table:table-cell>
          <table:table-cell table:style-name="ce53" table:formula="of:=SUM([.D423:.H423])" office:value-type="float" office:value="4578" calcext:value-type="float">
            <text:p>4578</text:p>
          </table:table-cell>
          <table:table-cell table:style-name="ce60" office:value-type="string" calcext:value-type="string">
            <text:p>Illu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23]=126;70;IF([.T423]=112;70;IF([.T423]=98;70;IF([.T423]=96;60;IF([.T423]=84;60;IF([.T423]=108;60;IF([.T423]=90;50;IF([.T423]=72;40;IF([.T423]=80;40;IF([.T423]=100;50;IF([.T423]=54;30;IF([.T423]=36;20;IF([.T423]=18;10;IF([.T42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725155335/defenderoftexel/images/7/7e/Flakkenbury_Icon.png&quot;)" office:value-type="string" office:string-value="" calcext:value-type="error">
            <text:p>#NAME?</text:p>
          </table:table-cell>
          <table:table-cell table:style-name="ce14" table:formula="of:=HYPERLINK(&quot;http://defenderoftexel.wikia.com/wiki/Lewdekin_-_Vanguard_-_Flakkenbury&quot;; &quot;Flakkenbury&quot;)" office:value-type="string" office:string-value="Flakkenbury" calcext:value-type="string">
            <text:p>Flakkenbury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170" calcext:value-type="float">
            <text:p>5170</text:p>
          </table:table-cell>
          <table:table-cell table:style-name="ce32" office:value-type="float" office:value="4372" calcext:value-type="float">
            <text:p>4372</text:p>
          </table:table-cell>
          <table:table-cell table:style-name="ce36" office:value-type="float" office:value="2243" calcext:value-type="float">
            <text:p>2243</text:p>
          </table:table-cell>
          <table:table-cell table:style-name="ce40" office:value-type="float" office:value="443" calcext:value-type="float">
            <text:p>443</text:p>
          </table:table-cell>
          <table:table-cell table:style-name="ce44" office:value-type="float" office:value="1677" calcext:value-type="float">
            <text:p>1677</text:p>
          </table:table-cell>
          <table:table-cell table:style-name="ce52" table:formula="of:=SUM([.D424:.H424])" office:value-type="float" office:value="13905" calcext:value-type="float">
            <text:p>13905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4]=126;70;IF([.T424]=112;70;IF([.T424]=98;70;IF([.T424]=96;60;IF([.T424]=84;60;IF([.T424]=108;60;IF([.T424]=90;50;IF([.T424]=72;40;IF([.T424]=80;40;IF([.T424]=100;50;IF([.T424]=54;30;IF([.T424]=36;20;IF([.T424]=18;10;IF([.T42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502215140/defenderoftexel/images/thumb/1/16/Flamewinder_Icon.png/50px-Flamewinder_Icon.png&quot;)" office:value-type="string" office:string-value="" calcext:value-type="error">
            <text:p>#NAME?</text:p>
          </table:table-cell>
          <table:table-cell table:style-name="ce15" table:formula="of:=HYPERLINK(&quot;http://defenderoftexel.wikia.com/wiki/Flamewinder&quot;; &quot;Flamewinder&quot;)" office:value-type="string" office:string-value="Flamewinder" calcext:value-type="string">
            <text:p>Flamewinder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386" calcext:value-type="float">
            <text:p>1386</text:p>
          </table:table-cell>
          <table:table-cell table:style-name="ce32" office:value-type="float" office:value="1485" calcext:value-type="float">
            <text:p>1485</text:p>
          </table:table-cell>
          <table:table-cell table:style-name="ce36" office:value-type="float" office:value="701" calcext:value-type="float">
            <text:p>701</text:p>
          </table:table-cell>
          <table:table-cell table:style-name="ce40" office:value-type="float" office:value="1195" calcext:value-type="float">
            <text:p>1195</text:p>
          </table:table-cell>
          <table:table-cell table:style-name="ce44" office:value-type="float" office:value="1099" calcext:value-type="float">
            <text:p>1099</text:p>
          </table:table-cell>
          <table:table-cell table:style-name="ce52" table:formula="of:=SUM([.D425:.H425])" office:value-type="float" office:value="5866" calcext:value-type="float">
            <text:p>5866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5]=126;70;IF([.T425]=112;70;IF([.T425]=98;70;IF([.T425]=96;60;IF([.T425]=84;60;IF([.T425]=108;60;IF([.T425]=90;50;IF([.T425]=72;40;IF([.T425]=80;40;IF([.T425]=100;50;IF([.T425]=54;30;IF([.T425]=36;20;IF([.T425]=18;10;IF([.T425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4.wikia.nocookie.net/__cb20140121162219/defenderoftexel/images/thumb/b/b5/Flauntenblom_Icon.png/50px-Flauntenblom_Icon.png&quot;)" office:value-type="string" office:string-value="" calcext:value-type="error">
            <text:p>#NAME?</text:p>
          </table:table-cell>
          <table:table-cell table:style-name="ce15" table:formula="of:=HYPERLINK(&quot;http://defenderoftexel.wikia.com/wiki/Flauntenblom&quot;; &quot;Flauntenblom&quot;)" office:value-type="string" office:string-value="Flauntenblom" calcext:value-type="string">
            <text:p>Flauntenblo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751" calcext:value-type="float">
            <text:p>2751</text:p>
          </table:table-cell>
          <table:table-cell table:style-name="ce32" office:value-type="float" office:value="2096" calcext:value-type="float">
            <text:p>2096</text:p>
          </table:table-cell>
          <table:table-cell table:style-name="ce36" office:value-type="float" office:value="1428" calcext:value-type="float">
            <text:p>1428</text:p>
          </table:table-cell>
          <table:table-cell table:style-name="ce40" office:value-type="float" office:value="2032" calcext:value-type="float">
            <text:p>2032</text:p>
          </table:table-cell>
          <table:table-cell table:style-name="ce44" office:value-type="float" office:value="5132" calcext:value-type="float">
            <text:p>5132</text:p>
          </table:table-cell>
          <table:table-cell table:style-name="ce52" table:formula="of:=SUM([.D426:.H426])" office:value-type="float" office:value="13439" calcext:value-type="float">
            <text:p>13439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6]=126;70;IF([.T426]=112;70;IF([.T426]=98;70;IF([.T426]=96;60;IF([.T426]=84;60;IF([.T426]=108;60;IF([.T426]=90;50;IF([.T426]=72;40;IF([.T426]=80;40;IF([.T426]=100;50;IF([.T426]=54;30;IF([.T426]=36;20;IF([.T426]=18;10;IF([.T42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6/62/Fohncros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Fohncross&quot;; &quot;Fohncross&quot;)" office:value-type="string" office:string-value="Fohncross" calcext:value-type="string">
            <text:p>Fohncros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88" calcext:value-type="float">
            <text:p>2688</text:p>
          </table:table-cell>
          <table:table-cell table:style-name="ce32" office:value-type="float" office:value="3963" calcext:value-type="float">
            <text:p>3963</text:p>
          </table:table-cell>
          <table:table-cell table:style-name="ce36" office:value-type="float" office:value="4494" calcext:value-type="float">
            <text:p>4494</text:p>
          </table:table-cell>
          <table:table-cell table:style-name="ce40" office:value-type="float" office:value="1612" calcext:value-type="float">
            <text:p>1612</text:p>
          </table:table-cell>
          <table:table-cell table:style-name="ce44" office:value-type="float" office:value="811" calcext:value-type="float">
            <text:p>811</text:p>
          </table:table-cell>
          <table:table-cell table:style-name="ce52" table:formula="of:=SUM([.D427:.H427])" office:value-type="float" office:value="13568" calcext:value-type="float">
            <text:p>13568</text:p>
          </table:table-cell>
          <table:table-cell table:style-name="ce59" office:value-type="string" calcext:value-type="string">
            <text:p>Dispiri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7]=126;70;IF([.T427]=112;70;IF([.T427]=98;70;IF([.T427]=96;60;IF([.T427]=84;60;IF([.T427]=108;60;IF([.T427]=90;50;IF([.T427]=72;40;IF([.T427]=80;40;IF([.T427]=100;50;IF([.T427]=54;30;IF([.T427]=36;20;IF([.T427]=18;10;IF([.T427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1.wikia.nocookie.net/__cb20131029130022/defenderoftexel/images/thumb/a/ae/Fortunato_Icon.png/50px-Fortunato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Cicatri_-_Adzen_-_Fortunato&quot;;&quot;Fortunato&quot;)" office:value-type="string" office:string-value="Fortunato" calcext:value-type="string">
            <text:p>Fortunat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206" calcext:value-type="float">
            <text:p>4206</text:p>
          </table:table-cell>
          <table:table-cell table:style-name="ce32" office:value-type="float" office:value="3558" calcext:value-type="float">
            <text:p>3558</text:p>
          </table:table-cell>
          <table:table-cell table:style-name="ce36" office:value-type="float" office:value="1825" calcext:value-type="float">
            <text:p>1825</text:p>
          </table:table-cell>
          <table:table-cell table:style-name="ce40" office:value-type="float" office:value="360" calcext:value-type="float">
            <text:p>360</text:p>
          </table:table-cell>
          <table:table-cell table:style-name="ce44" office:value-type="float" office:value="1365" calcext:value-type="float">
            <text:p>1365</text:p>
          </table:table-cell>
          <table:table-cell table:style-name="ce52" table:formula="of:=SUM([.D428:.H428])" office:value-type="float" office:value="11314" calcext:value-type="float">
            <text:p>11314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28]=126;70;IF([.T428]=112;70;IF([.T428]=98;70;IF([.T428]=96;60;IF([.T428]=84;60;IF([.T428]=108;60;IF([.T428]=90;50;IF([.T428]=72;40;IF([.T428]=80;40;IF([.T428]=100;50;IF([.T428]=54;30;IF([.T428]=36;20;IF([.T428]=18;10;IF([.T42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3/32/Fravard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di_-_Melqart_-_Fravardin&quot;; &quot;Fravardin&quot;)" office:value-type="string" office:string-value="Fravardin" calcext:value-type="string">
            <text:p>Fravardin</text:p>
          </table:table-cell>
          <table:table-cell table:style-name="ce25"/>
          <table:table-cell table:style-name="ce28" office:value-type="float" office:value="3352" calcext:value-type="float">
            <text:p>3352</text:p>
          </table:table-cell>
          <table:table-cell table:style-name="ce33" office:value-type="float" office:value="4703" calcext:value-type="float">
            <text:p>4703</text:p>
          </table:table-cell>
          <table:table-cell table:style-name="ce37" office:value-type="float" office:value="1025" calcext:value-type="float">
            <text:p>1025</text:p>
          </table:table-cell>
          <table:table-cell table:style-name="ce41" office:value-type="float" office:value="3007" calcext:value-type="float">
            <text:p>3007</text:p>
          </table:table-cell>
          <table:table-cell table:style-name="ce45" office:value-type="float" office:value="1362" calcext:value-type="float">
            <text:p>1362</text:p>
          </table:table-cell>
          <table:table-cell table:style-name="ce53" table:formula="of:=SUM([.D429:.H429])" office:value-type="float" office:value="13449" calcext:value-type="float">
            <text:p>13449</text:p>
          </table:table-cell>
          <table:table-cell table:style-name="ce60" office:value-type="string" calcext:value-type="string">
            <text:p>Hazar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29]=126;70;IF([.T429]=112;70;IF([.T429]=98;70;IF([.T429]=96;60;IF([.T429]=84;60;IF([.T429]=108;60;IF([.T429]=90;50;IF([.T429]=72;40;IF([.T429]=80;40;IF([.T429]=100;50;IF([.T429]=54;30;IF([.T429]=36;20;IF([.T429]=18;10;IF([.T42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617102900/defenderoftexel/images/thumb/0/06/Freyja_Icon.png/50px-Freyj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Freyja&quot;; &quot;Freyja&quot;)" office:value-type="string" office:string-value="Freyja" calcext:value-type="string">
            <text:p>Freyja</text:p>
          </table:table-cell>
          <table:table-cell table:style-name="ce25"/>
          <table:table-cell table:style-name="ce28" office:value-type="float" office:value="1946" calcext:value-type="float">
            <text:p>1946</text:p>
          </table:table-cell>
          <table:table-cell table:style-name="ce33" office:value-type="float" office:value="1366" calcext:value-type="float">
            <text:p>1366</text:p>
          </table:table-cell>
          <table:table-cell table:style-name="ce37" office:value-type="float" office:value="881" calcext:value-type="float">
            <text:p>881</text:p>
          </table:table-cell>
          <table:table-cell table:style-name="ce41" office:value-type="float" office:value="5597" calcext:value-type="float">
            <text:p>5597</text:p>
          </table:table-cell>
          <table:table-cell table:style-name="ce45" office:value-type="float" office:value="5330" calcext:value-type="float">
            <text:p>5330</text:p>
          </table:table-cell>
          <table:table-cell table:style-name="ce53" table:formula="of:=SUM([.D430:.H430])" office:value-type="float" office:value="15120" calcext:value-type="float">
            <text:p>15120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0]=126;70;IF([.T430]=112;70;IF([.T430]=98;70;IF([.T430]=96;60;IF([.T430]=84;60;IF([.T430]=108;60;IF([.T430]=90;50;IF([.T430]=72;40;IF([.T430]=80;40;IF([.T430]=100;50;IF([.T430]=54;30;IF([.T430]=36;20;IF([.T430]=18;10;IF([.T43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701123343/defenderoftexel/images/thumb/7/75/Fulminir_Icon.png/50px-Fulmini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Fulminir&quot;; &quot;Fulminir&quot;)" office:value-type="string" office:string-value="Fulminir" calcext:value-type="string">
            <text:p>Fulminir</text:p>
          </table:table-cell>
          <table:table-cell table:style-name="ce25"/>
          <table:table-cell table:style-name="ce28" office:value-type="float" office:value="3682" calcext:value-type="float">
            <text:p>3682</text:p>
          </table:table-cell>
          <table:table-cell table:style-name="ce33" office:value-type="float" office:value="6647" calcext:value-type="float">
            <text:p>6647</text:p>
          </table:table-cell>
          <table:table-cell table:style-name="ce37" office:value-type="float" office:value="2226" calcext:value-type="float">
            <text:p>2226</text:p>
          </table:table-cell>
          <table:table-cell table:style-name="ce41" office:value-type="float" office:value="2518" calcext:value-type="float">
            <text:p>2518</text:p>
          </table:table-cell>
          <table:table-cell table:style-name="ce45" office:value-type="float" office:value="881" calcext:value-type="float">
            <text:p>881</text:p>
          </table:table-cell>
          <table:table-cell table:style-name="ce53" table:formula="of:=SUM([.D431:.H431])" office:value-type="float" office:value="15954" calcext:value-type="float">
            <text:p>15954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1]=126;70;IF([.T431]=112;70;IF([.T431]=98;70;IF([.T431]=96;60;IF([.T431]=84;60;IF([.T431]=108;60;IF([.T431]=90;50;IF([.T431]=72;40;IF([.T431]=80;40;IF([.T431]=100;50;IF([.T431]=54;30;IF([.T431]=36;20;IF([.T431]=18;10;IF([.T43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813225134/defenderoftexel/images/b/b7/Gag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aga&quot;; &quot;Gaga&quot;)" office:value-type="string" office:string-value="Gaga" calcext:value-type="string">
            <text:p>Gaga</text:p>
          </table:table-cell>
          <table:table-cell table:style-name="ce25"/>
          <table:table-cell table:style-name="ce28" office:value-type="float" office:value="5201" calcext:value-type="float">
            <text:p>5201</text:p>
          </table:table-cell>
          <table:table-cell table:style-name="ce33" office:value-type="float" office:value="3716" calcext:value-type="float">
            <text:p>3716</text:p>
          </table:table-cell>
          <table:table-cell table:style-name="ce37" office:value-type="float" office:value="4316" calcext:value-type="float">
            <text:p>4316</text:p>
          </table:table-cell>
          <table:table-cell table:style-name="ce41" office:value-type="float" office:value="446" calcext:value-type="float">
            <text:p>446</text:p>
          </table:table-cell>
          <table:table-cell table:style-name="ce45" office:value-type="float" office:value="554" calcext:value-type="float">
            <text:p>554</text:p>
          </table:table-cell>
          <table:table-cell table:style-name="ce53" table:formula="of:=SUM([.D432:.H432])" office:value-type="float" office:value="14233" calcext:value-type="float">
            <text:p>14233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2]=126;70;IF([.T432]=112;70;IF([.T432]=98;70;IF([.T432]=96;60;IF([.T432]=84;60;IF([.T432]=108;60;IF([.T432]=90;50;IF([.T432]=72;40;IF([.T432]=80;40;IF([.T432]=100;50;IF([.T432]=54;30;IF([.T432]=36;20;IF([.T432]=18;10;IF([.T43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422125624/defenderoftexel/images/thumb/f/fc/Gaia_Mater_Icon.png/50px-Gaia_Mat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aia_Mater&quot;; &quot;Gaia Mater&quot;)" office:value-type="string" office:string-value="Gaia Mater" calcext:value-type="string">
            <text:p>Gaia Mater</text:p>
          </table:table-cell>
          <table:table-cell table:style-name="ce25"/>
          <table:table-cell table:style-name="ce28" office:value-type="float" office:value="8157" calcext:value-type="float">
            <text:p>8157</text:p>
          </table:table-cell>
          <table:table-cell table:style-name="ce33" office:value-type="float" office:value="1081" calcext:value-type="float">
            <text:p>1081</text:p>
          </table:table-cell>
          <table:table-cell table:style-name="ce37" office:value-type="float" office:value="2912" calcext:value-type="float">
            <text:p>2912</text:p>
          </table:table-cell>
          <table:table-cell table:style-name="ce41" office:value-type="float" office:value="16747" calcext:value-type="float">
            <text:p>16747</text:p>
          </table:table-cell>
          <table:table-cell table:style-name="ce45" office:value-type="float" office:value="5537" calcext:value-type="float">
            <text:p>5537</text:p>
          </table:table-cell>
          <table:table-cell table:style-name="ce53" table:formula="of:=SUM([.D433:.H433])" office:value-type="float" office:value="34434" calcext:value-type="float">
            <text:p>34434</text:p>
          </table:table-cell>
          <table:table-cell table:style-name="ce60" office:value-type="string" calcext:value-type="string">
            <text:p>Nova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33]=126;70;IF([.T433]=112;70;IF([.T433]=98;70;IF([.T433]=96;60;IF([.T433]=84;60;IF([.T433]=108;60;IF([.T433]=90;50;IF([.T433]=72;40;IF([.T433]=80;40;IF([.T433]=100;50;IF([.T433]=54;30;IF([.T433]=36;20;IF([.T433]=18;10;IF([.T43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2948/defenderoftexel/images/f/f7/Gath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atha&quot;; &quot;Gatha&quot;)" office:value-type="string" office:string-value="Gatha" calcext:value-type="string">
            <text:p>Gatha</text:p>
          </table:table-cell>
          <table:table-cell table:style-name="ce25"/>
          <table:table-cell table:style-name="ce28" office:value-type="float" office:value="974" calcext:value-type="float">
            <text:p>974</text:p>
          </table:table-cell>
          <table:table-cell table:style-name="ce33" office:value-type="float" office:value="1045" calcext:value-type="float">
            <text:p>1045</text:p>
          </table:table-cell>
          <table:table-cell table:style-name="ce37" office:value-type="float" office:value="492" calcext:value-type="float">
            <text:p>492</text:p>
          </table:table-cell>
          <table:table-cell table:style-name="ce41" office:value-type="float" office:value="837" calcext:value-type="float">
            <text:p>837</text:p>
          </table:table-cell>
          <table:table-cell table:style-name="ce45" office:value-type="float" office:value="773" calcext:value-type="float">
            <text:p>773</text:p>
          </table:table-cell>
          <table:table-cell table:style-name="ce53" table:formula="of:=SUM([.D434:.H434])" office:value-type="float" office:value="4121" calcext:value-type="float">
            <text:p>4121</text:p>
          </table:table-cell>
          <table:table-cell table:style-name="ce60" office:value-type="string" calcext:value-type="string">
            <text:p>Shiel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4]=126;70;IF([.T434]=112;70;IF([.T434]=98;70;IF([.T434]=96;60;IF([.T434]=84;60;IF([.T434]=108;60;IF([.T434]=90;50;IF([.T434]=72;40;IF([.T434]=80;40;IF([.T434]=100;50;IF([.T434]=54;30;IF([.T434]=36;20;IF([.T434]=18;10;IF([.T43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c/c2/Gatumdug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i_-_Ninissina_-_Gatumdug&quot;; &quot;Gatumdug&quot;)" office:value-type="string" office:string-value="Gatumdug" calcext:value-type="string">
            <text:p>Gatumdug</text:p>
          </table:table-cell>
          <table:table-cell table:style-name="ce25"/>
          <table:table-cell table:style-name="ce28" office:value-type="float" office:value="2803" calcext:value-type="float">
            <text:p>2803</text:p>
          </table:table-cell>
          <table:table-cell table:style-name="ce33" office:value-type="float" office:value="3929" calcext:value-type="float">
            <text:p>3929</text:p>
          </table:table-cell>
          <table:table-cell table:style-name="ce37" office:value-type="float" office:value="855" calcext:value-type="float">
            <text:p>855</text:p>
          </table:table-cell>
          <table:table-cell table:style-name="ce41" office:value-type="float" office:value="2512" calcext:value-type="float">
            <text:p>2512</text:p>
          </table:table-cell>
          <table:table-cell table:style-name="ce45" office:value-type="float" office:value="1135" calcext:value-type="float">
            <text:p>1135</text:p>
          </table:table-cell>
          <table:table-cell table:style-name="ce53" table:formula="of:=SUM([.D435:.H435])" office:value-type="float" office:value="11234" calcext:value-type="float">
            <text:p>11234</text:p>
          </table:table-cell>
          <table:table-cell table:style-name="ce60" office:value-type="string" calcext:value-type="string">
            <text:p>Squir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5]=126;70;IF([.T435]=112;70;IF([.T435]=98;70;IF([.T435]=96;60;IF([.T435]=84;60;IF([.T435]=108;60;IF([.T435]=90;50;IF([.T435]=72;40;IF([.T435]=80;40;IF([.T435]=100;50;IF([.T435]=54;30;IF([.T435]=36;20;IF([.T435]=18;10;IF([.T43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1001180457/defenderoftexel/images/thumb/d/db/Gazaar_Icon.png/50px-Gaza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odden_-_Woolsey_-_Gazaar&quot;; &quot;Gazaar&quot;)" office:value-type="string" office:string-value="Gazaar" calcext:value-type="string">
            <text:p>Gazaar</text:p>
          </table:table-cell>
          <table:table-cell table:style-name="ce25"/>
          <table:table-cell table:style-name="ce28" office:value-type="float" office:value="1673" calcext:value-type="float">
            <text:p>1673</text:p>
          </table:table-cell>
          <table:table-cell table:style-name="ce33" office:value-type="float" office:value="979" calcext:value-type="float">
            <text:p>979</text:p>
          </table:table-cell>
          <table:table-cell table:style-name="ce37" office:value-type="float" office:value="1146" calcext:value-type="float">
            <text:p>1146</text:p>
          </table:table-cell>
          <table:table-cell table:style-name="ce41" office:value-type="float" office:value="4515" calcext:value-type="float">
            <text:p>4515</text:p>
          </table:table-cell>
          <table:table-cell table:style-name="ce45" office:value-type="float" office:value="5656" calcext:value-type="float">
            <text:p>5656</text:p>
          </table:table-cell>
          <table:table-cell table:style-name="ce53" table:formula="of:=SUM([.D436:.H436])" office:value-type="float" office:value="13969" calcext:value-type="float">
            <text:p>13969</text:p>
          </table:table-cell>
          <table:table-cell table:style-name="ce60" office:value-type="string" calcext:value-type="string">
            <text:p>Siphon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6]=126;70;IF([.T436]=112;70;IF([.T436]=98;70;IF([.T436]=96;60;IF([.T436]=84;60;IF([.T436]=108;60;IF([.T436]=90;50;IF([.T436]=72;40;IF([.T436]=80;40;IF([.T436]=100;50;IF([.T436]=54;30;IF([.T436]=36;20;IF([.T436]=18;10;IF([.T43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4934/defenderoftexel/images/1/19/Ge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ela&quot;; &quot;Gela&quot;)" office:value-type="string" office:string-value="Gela" calcext:value-type="string">
            <text:p>Gela</text:p>
          </table:table-cell>
          <table:table-cell table:style-name="ce25"/>
          <table:table-cell table:style-name="ce28" office:value-type="float" office:value="2128" calcext:value-type="float">
            <text:p>2128</text:p>
          </table:table-cell>
          <table:table-cell table:style-name="ce33" office:value-type="float" office:value="172" calcext:value-type="float">
            <text:p>172</text:p>
          </table:table-cell>
          <table:table-cell table:style-name="ce37" office:value-type="float" office:value="907" calcext:value-type="float">
            <text:p>907</text:p>
          </table:table-cell>
          <table:table-cell table:style-name="ce41" office:value-type="float" office:value="1788" calcext:value-type="float">
            <text:p>1788</text:p>
          </table:table-cell>
          <table:table-cell table:style-name="ce45" office:value-type="float" office:value="673" calcext:value-type="float">
            <text:p>673</text:p>
          </table:table-cell>
          <table:table-cell table:style-name="ce53" table:formula="of:=SUM([.D437:.H437])" office:value-type="float" office:value="5668" calcext:value-type="float">
            <text:p>5668</text:p>
          </table:table-cell>
          <table:table-cell table:style-name="ce60" office:value-type="string" calcext:value-type="string">
            <text:p>Riposte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7]=126;70;IF([.T437]=112;70;IF([.T437]=98;70;IF([.T437]=96;60;IF([.T437]=84;60;IF([.T437]=108;60;IF([.T437]=90;50;IF([.T437]=72;40;IF([.T437]=80;40;IF([.T437]=100;50;IF([.T437]=54;30;IF([.T437]=36;20;IF([.T437]=18;10;IF([.T43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3905/defenderoftexel/images/8/8d/Gemet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emeti&quot;; &quot;Gemeti&quot;)" office:value-type="string" office:string-value="Gemeti" calcext:value-type="string">
            <text:p>Gemeti</text:p>
          </table:table-cell>
          <table:table-cell table:style-name="ce25"/>
          <table:table-cell table:style-name="ce28" office:value-type="float" office:value="4260" calcext:value-type="float">
            <text:p>4260</text:p>
          </table:table-cell>
          <table:table-cell table:style-name="ce33" office:value-type="float" office:value="4869" calcext:value-type="float">
            <text:p>4869</text:p>
          </table:table-cell>
          <table:table-cell table:style-name="ce37" office:value-type="float" office:value="2609" calcext:value-type="float">
            <text:p>2609</text:p>
          </table:table-cell>
          <table:table-cell table:style-name="ce41" office:value-type="float" office:value="615" calcext:value-type="float">
            <text:p>615</text:p>
          </table:table-cell>
          <table:table-cell table:style-name="ce45" office:value-type="float" office:value="816" calcext:value-type="float">
            <text:p>816</text:p>
          </table:table-cell>
          <table:table-cell table:style-name="ce53" table:formula="of:=SUM([.D438:.H438])" office:value-type="float" office:value="13169" calcext:value-type="float">
            <text:p>13169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8]=126;70;IF([.T438]=112;70;IF([.T438]=98;70;IF([.T438]=96;60;IF([.T438]=84;60;IF([.T438]=108;60;IF([.T438]=90;50;IF([.T438]=72;40;IF([.T438]=80;40;IF([.T438]=100;50;IF([.T438]=54;30;IF([.T438]=36;20;IF([.T438]=18;10;IF([.T43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924181507/defenderoftexel/images/thumb/e/e8/Gerra_Icon.png/50px-Ger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urtak_-_Lahar_-_Gerra&quot;; &quot;Gerra&quot;)" office:value-type="string" office:string-value="Gerra" calcext:value-type="string">
            <text:p>Gerra</text:p>
          </table:table-cell>
          <table:table-cell table:style-name="ce25"/>
          <table:table-cell table:style-name="ce28" office:value-type="float" office:value="3500" calcext:value-type="float">
            <text:p>3500</text:p>
          </table:table-cell>
          <table:table-cell table:style-name="ce33" office:value-type="float" office:value="5712" calcext:value-type="float">
            <text:p>5712</text:p>
          </table:table-cell>
          <table:table-cell table:style-name="ce37" office:value-type="float" office:value="2910" calcext:value-type="float">
            <text:p>2910</text:p>
          </table:table-cell>
          <table:table-cell table:style-name="ce41" office:value-type="float" office:value="4569" calcext:value-type="float">
            <text:p>4569</text:p>
          </table:table-cell>
          <table:table-cell table:style-name="ce45" office:value-type="float" office:value="559" calcext:value-type="float">
            <text:p>559</text:p>
          </table:table-cell>
          <table:table-cell table:style-name="ce53" table:formula="of:=SUM([.D439:.H439])" office:value-type="float" office:value="17250" calcext:value-type="float">
            <text:p>17250</text:p>
          </table:table-cell>
          <table:table-cell table:style-name="ce60" office:value-type="string" calcext:value-type="string">
            <text:p>Impal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39]=126;70;IF([.T439]=112;70;IF([.T439]=98;70;IF([.T439]=96;60;IF([.T439]=84;60;IF([.T439]=108;60;IF([.T439]=90;50;IF([.T439]=72;40;IF([.T439]=80;40;IF([.T439]=100;50;IF([.T439]=54;30;IF([.T439]=36;20;IF([.T439]=18;10;IF([.T43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9/92/Gherar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lem_-_Walfrid_-_Gherard&quot;; &quot;Gherard&quot;)" office:value-type="string" office:string-value="Gherard" calcext:value-type="string">
            <text:p>Gherard</text:p>
          </table:table-cell>
          <table:table-cell table:style-name="ce25"/>
          <table:table-cell table:style-name="ce28" office:value-type="float" office:value="2362" calcext:value-type="float">
            <text:p>2362</text:p>
          </table:table-cell>
          <table:table-cell table:style-name="ce33" office:value-type="float" office:value="307" calcext:value-type="float">
            <text:p>307</text:p>
          </table:table-cell>
          <table:table-cell table:style-name="ce37" office:value-type="float" office:value="839" calcext:value-type="float">
            <text:p>839</text:p>
          </table:table-cell>
          <table:table-cell table:style-name="ce41" office:value-type="float" office:value="4807" calcext:value-type="float">
            <text:p>4807</text:p>
          </table:table-cell>
          <table:table-cell table:style-name="ce45" office:value-type="float" office:value="1601" calcext:value-type="float">
            <text:p>1601</text:p>
          </table:table-cell>
          <table:table-cell table:style-name="ce53" table:formula="of:=SUM([.D440:.H440])" office:value-type="float" office:value="9916" calcext:value-type="float">
            <text:p>9916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40]=126;70;IF([.T440]=112;70;IF([.T440]=98;70;IF([.T440]=96;60;IF([.T440]=84;60;IF([.T440]=108;60;IF([.T440]=90;50;IF([.T440]=72;40;IF([.T440]=80;40;IF([.T440]=100;50;IF([.T440]=54;30;IF([.T440]=36;20;IF([.T440]=18;10;IF([.T44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506122112/defenderoftexel/images/thumb/1/12/Ghoncheh_Icon.png/50px-Ghonche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honcheh&quot;; &quot;Ghoncheh&quot;)" office:value-type="string" office:string-value="Ghoncheh" calcext:value-type="string">
            <text:p>Ghoncheh</text:p>
          </table:table-cell>
          <table:table-cell table:style-name="ce25"/>
          <table:table-cell table:style-name="ce28" office:value-type="float" office:value="7741" calcext:value-type="float">
            <text:p>7741</text:p>
          </table:table-cell>
          <table:table-cell table:style-name="ce33" office:value-type="float" office:value="3460" calcext:value-type="float">
            <text:p>3460</text:p>
          </table:table-cell>
          <table:table-cell table:style-name="ce37" office:value-type="float" office:value="3776" calcext:value-type="float">
            <text:p>3776</text:p>
          </table:table-cell>
          <table:table-cell table:style-name="ce41" office:value-type="float" office:value="626" calcext:value-type="float">
            <text:p>626</text:p>
          </table:table-cell>
          <table:table-cell table:style-name="ce45" office:value-type="float" office:value="682" calcext:value-type="float">
            <text:p>682</text:p>
          </table:table-cell>
          <table:table-cell table:style-name="ce53" table:formula="of:=SUM([.D441:.H441])" office:value-type="float" office:value="16285" calcext:value-type="float">
            <text:p>16285</text:p>
          </table:table-cell>
          <table:table-cell table:style-name="ce60" office:value-type="string" calcext:value-type="string">
            <text:p>Repay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41]=126;70;IF([.T441]=112;70;IF([.T441]=98;70;IF([.T441]=96;60;IF([.T441]=84;60;IF([.T441]=108;60;IF([.T441]=90;50;IF([.T441]=72;40;IF([.T441]=80;40;IF([.T441]=100;50;IF([.T441]=54;30;IF([.T441]=36;20;IF([.T441]=18;10;IF([.T44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1/10/Gigi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ubu_-_Sisit_-_Gigim&quot;;&quot;Gigim&quot;)" office:value-type="string" office:string-value="Gigim" calcext:value-type="string">
            <text:p>Gigim</text:p>
          </table:table-cell>
          <table:table-cell table:style-name="ce25"/>
          <table:table-cell table:style-name="ce28" office:value-type="float" office:value="1522" calcext:value-type="float">
            <text:p>1522</text:p>
          </table:table-cell>
          <table:table-cell table:style-name="ce33" office:value-type="float" office:value="3544" calcext:value-type="float">
            <text:p>3544</text:p>
          </table:table-cell>
          <table:table-cell table:style-name="ce37" office:value-type="float" office:value="774" calcext:value-type="float">
            <text:p>774</text:p>
          </table:table-cell>
          <table:table-cell table:style-name="ce41" office:value-type="float" office:value="3364" calcext:value-type="float">
            <text:p>3364</text:p>
          </table:table-cell>
          <table:table-cell table:style-name="ce45" office:value-type="float" office:value="1024" calcext:value-type="float">
            <text:p>1024</text:p>
          </table:table-cell>
          <table:table-cell table:style-name="ce53" table:formula="of:=SUM([.D442:.H442])" office:value-type="float" office:value="10228" calcext:value-type="float">
            <text:p>10228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42]=126;70;IF([.T442]=112;70;IF([.T442]=98;70;IF([.T442]=96;60;IF([.T442]=84;60;IF([.T442]=108;60;IF([.T442]=90;50;IF([.T442]=72;40;IF([.T442]=80;40;IF([.T442]=100;50;IF([.T442]=54;30;IF([.T442]=36;20;IF([.T442]=18;10;IF([.T44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0/08/Girrabun_Icon.png/revision/latest?cb=20150502071522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l_-_Girrabun_-_Kudurru&quot;;&quot;Girrabun&quot;)" office:value-type="string" office:string-value="Girrabun" calcext:value-type="string">
            <text:p>Girrabu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43:.H443])" office:value-type="float" office:value="5" calcext:value-type="float">
            <text:p>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3]=126;70;IF([.T443]=112;70;IF([.T443]=98;70;IF([.T443]=96;60;IF([.T443]=84;60;IF([.T443]=108;60;IF([.T443]=90;50;IF([.T443]=72;40;IF([.T443]=80;40;IF([.T443]=100;50;IF([.T443]=54;30;IF([.T443]=36;20;IF([.T443]=18;10;IF([.T443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607193922/defenderoftexel/images/thumb/4/4e/Glacierwalker_Ijiraq_Icon.png/50px-Glacierwalker_Ijiraq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jiraq_-_Ijiraq_Icetouch_-_Glacierwalker_Ijiraq&quot;; &quot;Glacierwalker Ijiraq&quot;)" office:value-type="string" office:string-value="Glacierwalker Ijiraq" calcext:value-type="string">
            <text:p>Glacierwalker Ijiraq</text:p>
          </table:table-cell>
          <table:table-cell table:style-name="ce25"/>
          <table:table-cell table:style-name="ce28" office:value-type="float" office:value="1807" calcext:value-type="float">
            <text:p>1807</text:p>
          </table:table-cell>
          <table:table-cell table:style-name="ce33" office:value-type="float" office:value="1268" calcext:value-type="float">
            <text:p>1268</text:p>
          </table:table-cell>
          <table:table-cell table:style-name="ce37" office:value-type="float" office:value="820" calcext:value-type="float">
            <text:p>820</text:p>
          </table:table-cell>
          <table:table-cell table:style-name="ce41" office:value-type="float" office:value="5194" calcext:value-type="float">
            <text:p>5194</text:p>
          </table:table-cell>
          <table:table-cell table:style-name="ce45" office:value-type="float" office:value="4946" calcext:value-type="float">
            <text:p>4946</text:p>
          </table:table-cell>
          <table:table-cell table:style-name="ce53" table:formula="of:=SUM([.D444:.H444])" office:value-type="float" office:value="14035" calcext:value-type="float">
            <text:p>14035</text:p>
          </table:table-cell>
          <table:table-cell table:style-name="ce60" office:value-type="string" calcext:value-type="string">
            <text:p>Frost and Ic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44]=126;70;IF([.T444]=112;70;IF([.T444]=98;70;IF([.T444]=96;60;IF([.T444]=84;60;IF([.T444]=108;60;IF([.T444]=90;50;IF([.T444]=72;40;IF([.T444]=80;40;IF([.T444]=100;50;IF([.T444]=54;30;IF([.T444]=36;20;IF([.T444]=18;10;IF([.T44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e/e7/Knotwood_Icon.png/revision/latest?cb=20130428042455&quot;)" office:value-type="string" office:string-value="" calcext:value-type="error">
            <text:p>#NAME?</text:p>
          </table:table-cell>
          <table:table-cell table:style-name="ce11" table:formula="of:=HYPERLINK(&quot;http://defenderoftexel.wikia.com/wiki/Goldfleece&quot;;&quot;Knotwood&quot;)" office:value-type="string" office:string-value="Knotwood" calcext:value-type="string">
            <text:p>Knotwood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314" calcext:value-type="float">
            <text:p>314</text:p>
          </table:table-cell>
          <table:table-cell table:style-name="ce32" office:value-type="float" office:value="466" calcext:value-type="float">
            <text:p>466</text:p>
          </table:table-cell>
          <table:table-cell table:style-name="ce36" office:value-type="float" office:value="163" calcext:value-type="float">
            <text:p>163</text:p>
          </table:table-cell>
          <table:table-cell table:style-name="ce40" office:value-type="float" office:value="99" calcext:value-type="float">
            <text:p>99</text:p>
          </table:table-cell>
          <table:table-cell table:style-name="ce44" office:value-type="float" office:value="482" calcext:value-type="float">
            <text:p>482</text:p>
          </table:table-cell>
          <table:table-cell table:style-name="ce52" table:formula="of:=SUM([.D445:.H445])" office:value-type="float" office:value="1524" calcext:value-type="float">
            <text:p>1524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C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5]=126;70;IF([.T445]=112;70;IF([.T445]=98;70;IF([.T445]=96;60;IF([.T445]=84;60;IF([.T445]=108;60;IF([.T445]=90;50;IF([.T445]=72;40;IF([.T445]=80;40;IF([.T445]=100;50;IF([.T445]=54;30;IF([.T445]=36;20;IF([.T445]=18;10;IF([.T445]=60;30))))))))))))))" office:value-type="float" office:value="10" calcext:value-type="float">
            <text:p>10</text:p>
          </table:table-cell>
          <table:table-cell table:style-name="ce67" office:value-type="float" office:value="18" calcext:value-type="float">
            <text:p>18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4/49/Cyannis_Icon.png/revision/latest?cb=20130428042456&quot;)" office:value-type="string" office:string-value="" calcext:value-type="error">
            <text:p>#NAME?</text:p>
          </table:table-cell>
          <table:table-cell table:style-name="ce11" table:formula="of:=HYPERLINK(&quot;http://defenderoftexel.wikia.com/wiki/Goldfleece&quot;;&quot;Cyannis&quot;)" office:value-type="string" office:string-value="Cyannis" calcext:value-type="string">
            <text:p>Cyannis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530" calcext:value-type="float">
            <text:p>530</text:p>
          </table:table-cell>
          <table:table-cell table:style-name="ce32" office:value-type="float" office:value="884" calcext:value-type="float">
            <text:p>884</text:p>
          </table:table-cell>
          <table:table-cell table:style-name="ce36" office:value-type="float" office:value="248" calcext:value-type="float">
            <text:p>248</text:p>
          </table:table-cell>
          <table:table-cell table:style-name="ce40" office:value-type="float" office:value="138" calcext:value-type="float">
            <text:p>138</text:p>
          </table:table-cell>
          <table:table-cell table:style-name="ce44" office:value-type="float" office:value="926" calcext:value-type="float">
            <text:p>926</text:p>
          </table:table-cell>
          <table:table-cell table:style-name="ce52" table:formula="of:=SUM([.D446:.H446])" office:value-type="float" office:value="2726" calcext:value-type="float">
            <text:p>2726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6]=126;70;IF([.T446]=112;70;IF([.T446]=98;70;IF([.T446]=96;60;IF([.T446]=84;60;IF([.T446]=108;60;IF([.T446]=90;50;IF([.T446]=72;40;IF([.T446]=80;40;IF([.T446]=100;50;IF([.T446]=54;30;IF([.T446]=36;20;IF([.T446]=18;10;IF([.T446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4.wikia.nocookie.net/__cb20130428042458/defenderoftexel/images/c/c5/Goldfleec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Goldfleece&quot;; &quot;Goldfleece&quot;)" office:value-type="string" office:string-value="Goldfleece" calcext:value-type="string">
            <text:p>Goldfleec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1417" calcext:value-type="float">
            <text:p>1417</text:p>
          </table:table-cell>
          <table:table-cell table:style-name="ce32" office:value-type="float" office:value="2203" calcext:value-type="float">
            <text:p>2203</text:p>
          </table:table-cell>
          <table:table-cell table:style-name="ce36" office:value-type="float" office:value="715" calcext:value-type="float">
            <text:p>715</text:p>
          </table:table-cell>
          <table:table-cell table:style-name="ce40" office:value-type="float" office:value="421" calcext:value-type="float">
            <text:p>421</text:p>
          </table:table-cell>
          <table:table-cell table:style-name="ce44" office:value-type="float" office:value="2291" calcext:value-type="float">
            <text:p>2291</text:p>
          </table:table-cell>
          <table:table-cell table:style-name="ce52" table:formula="of:=SUM([.D447:.H447])" office:value-type="float" office:value="7047" calcext:value-type="float">
            <text:p>7047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7]=126;70;IF([.T447]=112;70;IF([.T447]=98;70;IF([.T447]=96;60;IF([.T447]=84;60;IF([.T447]=108;60;IF([.T447]=90;50;IF([.T447]=72;40;IF([.T447]=80;40;IF([.T447]=100;50;IF([.T447]=54;30;IF([.T447]=36;20;IF([.T447]=18;10;IF([.T44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26132107/defenderoftexel/images/thumb/8/8d/Gratia_Icon.png/50px-Grat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esia_-_Thana_-_Gratia&quot;;&quot;Gratia&quot;)" office:value-type="string" office:string-value="Gratia" calcext:value-type="string">
            <text:p>Gratia</text:p>
          </table:table-cell>
          <table:table-cell table:style-name="ce25"/>
          <table:table-cell table:style-name="ce28" office:value-type="float" office:value="2806" calcext:value-type="float">
            <text:p>2806</text:p>
          </table:table-cell>
          <table:table-cell table:style-name="ce33" office:value-type="float" office:value="4265" calcext:value-type="float">
            <text:p>4265</text:p>
          </table:table-cell>
          <table:table-cell table:style-name="ce37" office:value-type="float" office:value="1458" calcext:value-type="float">
            <text:p>1458</text:p>
          </table:table-cell>
          <table:table-cell table:style-name="ce41" office:value-type="float" office:value="877" calcext:value-type="float">
            <text:p>877</text:p>
          </table:table-cell>
          <table:table-cell table:style-name="ce45" office:value-type="float" office:value="4423" calcext:value-type="float">
            <text:p>4423</text:p>
          </table:table-cell>
          <table:table-cell table:style-name="ce53" table:formula="of:=SUM([.D448:.H448])" office:value-type="float" office:value="13829" calcext:value-type="float">
            <text:p>13829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48]=126;70;IF([.T448]=112;70;IF([.T448]=98;70;IF([.T448]=96;60;IF([.T448]=84;60;IF([.T448]=108;60;IF([.T448]=90;50;IF([.T448]=72;40;IF([.T448]=80;40;IF([.T448]=100;50;IF([.T448]=54;30;IF([.T448]=36;20;IF([.T448]=18;10;IF([.T44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b/b9/Grimpeniu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idlewild_-_Holterren_-_Grimpenius&quot;; &quot;Grimpenius&quot;)" office:value-type="string" office:string-value="Grimpenius" calcext:value-type="string">
            <text:p>Grimpeni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854" calcext:value-type="float">
            <text:p>5854</text:p>
          </table:table-cell>
          <table:table-cell table:style-name="ce32" office:value-type="float" office:value="4950" calcext:value-type="float">
            <text:p>4950</text:p>
          </table:table-cell>
          <table:table-cell table:style-name="ce36" office:value-type="float" office:value="2540" calcext:value-type="float">
            <text:p>2540</text:p>
          </table:table-cell>
          <table:table-cell table:style-name="ce40" office:value-type="float" office:value="499" calcext:value-type="float">
            <text:p>499</text:p>
          </table:table-cell>
          <table:table-cell table:style-name="ce44" office:value-type="float" office:value="1900" calcext:value-type="float">
            <text:p>1900</text:p>
          </table:table-cell>
          <table:table-cell table:style-name="ce52" table:formula="of:=SUM([.D449:.H449])" office:value-type="float" office:value="15743" calcext:value-type="float">
            <text:p>15743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49]=126;70;IF([.T449]=112;70;IF([.T449]=98;70;IF([.T449]=96;60;IF([.T449]=84;60;IF([.T449]=108;60;IF([.T449]=90;50;IF([.T449]=72;40;IF([.T449]=80;40;IF([.T449]=100;50;IF([.T449]=54;30;IF([.T449]=36;20;IF([.T449]=18;10;IF([.T44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031175534/defenderoftexel/images/thumb/5/58/Gulbahar_Icon.png/50px-Gulbah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elshad_-_Khorvash_-_Gulbahar&quot;;&quot;Gulbahar&quot;)" office:value-type="string" office:string-value="Gulbahar" calcext:value-type="string">
            <text:p>Gulbahar</text:p>
          </table:table-cell>
          <table:table-cell table:style-name="ce25"/>
          <table:table-cell table:style-name="ce28" office:value-type="float" office:value="4233" calcext:value-type="float">
            <text:p>4233</text:p>
          </table:table-cell>
          <table:table-cell table:style-name="ce33" office:value-type="float" office:value="4838" calcext:value-type="float">
            <text:p>4838</text:p>
          </table:table-cell>
          <table:table-cell table:style-name="ce37" office:value-type="float" office:value="2593" calcext:value-type="float">
            <text:p>2593</text:p>
          </table:table-cell>
          <table:table-cell table:style-name="ce41" office:value-type="float" office:value="612" calcext:value-type="float">
            <text:p>612</text:p>
          </table:table-cell>
          <table:table-cell table:style-name="ce45" office:value-type="float" office:value="811" calcext:value-type="float">
            <text:p>811</text:p>
          </table:table-cell>
          <table:table-cell table:style-name="ce53" table:formula="of:=SUM([.D450:.H450])" office:value-type="float" office:value="13087" calcext:value-type="float">
            <text:p>13087</text:p>
          </table:table-cell>
          <table:table-cell table:style-name="ce60" office:value-type="string" calcext:value-type="string">
            <text:p>Squal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0]=126;70;IF([.T450]=112;70;IF([.T450]=98;70;IF([.T450]=96;60;IF([.T450]=84;60;IF([.T450]=108;60;IF([.T450]=90;50;IF([.T450]=72;40;IF([.T450]=80;40;IF([.T450]=100;50;IF([.T450]=54;30;IF([.T450]=36;20;IF([.T450]=18;10;IF([.T45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701130923/defenderoftexel/images/1/12/Guth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Guthar&quot;; &quot;Guthar&quot;)" office:value-type="string" office:string-value="Guthar" calcext:value-type="string">
            <text:p>Guthar</text:p>
          </table:table-cell>
          <table:table-cell table:style-name="ce25"/>
          <table:table-cell table:style-name="ce28" office:value-type="float" office:value="10711" calcext:value-type="float">
            <text:p>10711</text:p>
          </table:table-cell>
          <table:table-cell table:style-name="ce33" office:value-type="float" office:value="12255" calcext:value-type="float">
            <text:p>12255</text:p>
          </table:table-cell>
          <table:table-cell table:style-name="ce37" office:value-type="float" office:value="6541" calcext:value-type="float">
            <text:p>6541</text:p>
          </table:table-cell>
          <table:table-cell table:style-name="ce41" office:value-type="float" office:value="1561" calcext:value-type="float">
            <text:p>1561</text:p>
          </table:table-cell>
          <table:table-cell table:style-name="ce45" office:value-type="float" office:value="2071" calcext:value-type="float">
            <text:p>2071</text:p>
          </table:table-cell>
          <table:table-cell table:style-name="ce53" table:formula="of:=SUM([.D451:.H451])" office:value-type="float" office:value="33139" calcext:value-type="float">
            <text:p>33139</text:p>
          </table:table-cell>
          <table:table-cell table:style-name="ce60" office:value-type="string" calcext:value-type="string">
            <text:p>Gungho</text:p>
          </table:table-cell>
          <table:table-cell table:style-name="ce60" office:value-type="string" calcext:value-type="string">
            <text:p>Retaliate 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51]=126;70;IF([.T451]=112;70;IF([.T451]=98;70;IF([.T451]=96;60;IF([.T451]=84;60;IF([.T451]=108;60;IF([.T451]=90;50;IF([.T451]=72;40;IF([.T451]=80;40;IF([.T451]=100;50;IF([.T451]=54;30;IF([.T451]=36;20;IF([.T451]=18;10;IF([.T45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029141848/defenderoftexel/images/thumb/6/6e/Hanunia_Icon.png/50px-Hanun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ethra_-_Velia_-_Hanunia&quot;;&quot;Hanunia&quot;)" office:value-type="string" office:string-value="Hanunia" calcext:value-type="string">
            <text:p>Hanunia</text:p>
          </table:table-cell>
          <table:table-cell table:style-name="ce25"/>
          <table:table-cell table:style-name="ce28" office:value-type="float" office:value="3381" calcext:value-type="float">
            <text:p>3381</text:p>
          </table:table-cell>
          <table:table-cell table:style-name="ce33" office:value-type="float" office:value="4740" calcext:value-type="float">
            <text:p>4740</text:p>
          </table:table-cell>
          <table:table-cell table:style-name="ce37" office:value-type="float" office:value="1034" calcext:value-type="float">
            <text:p>1034</text:p>
          </table:table-cell>
          <table:table-cell table:style-name="ce41" office:value-type="float" office:value="3032" calcext:value-type="float">
            <text:p>3032</text:p>
          </table:table-cell>
          <table:table-cell table:style-name="ce45" office:value-type="float" office:value="1371" calcext:value-type="float">
            <text:p>1371</text:p>
          </table:table-cell>
          <table:table-cell table:style-name="ce53" table:formula="of:=SUM([.D452:.H452])" office:value-type="float" office:value="13558" calcext:value-type="float">
            <text:p>13558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2]=126;70;IF([.T452]=112;70;IF([.T452]=98;70;IF([.T452]=96;60;IF([.T452]=84;60;IF([.T452]=108;60;IF([.T452]=90;50;IF([.T452]=72;40;IF([.T452]=80;40;IF([.T452]=100;50;IF([.T452]=54;30;IF([.T452]=36;20;IF([.T452]=18;10;IF([.T45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defenderoftexel/images/a/a8/Heliotroope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Heliotrooper&quot;; &quot;Heliotrooper&quot;)" office:value-type="string" office:string-value="Heliotrooper" calcext:value-type="string">
            <text:p>Heliotroop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414" calcext:value-type="float">
            <text:p>3414</text:p>
          </table:table-cell>
          <table:table-cell table:style-name="ce32" office:value-type="float" office:value="4788" calcext:value-type="float">
            <text:p>4788</text:p>
          </table:table-cell>
          <table:table-cell table:style-name="ce36" office:value-type="float" office:value="1043" calcext:value-type="float">
            <text:p>1043</text:p>
          </table:table-cell>
          <table:table-cell table:style-name="ce40" office:value-type="float" office:value="3060" calcext:value-type="float">
            <text:p>3060</text:p>
          </table:table-cell>
          <table:table-cell table:style-name="ce44" office:value-type="float" office:value="1386" calcext:value-type="float">
            <text:p>1386</text:p>
          </table:table-cell>
          <table:table-cell table:style-name="ce52" table:formula="of:=SUM([.D453:.H453])" office:value-type="float" office:value="13691" calcext:value-type="float">
            <text:p>13691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53]=126;70;IF([.T453]=112;70;IF([.T453]=98;70;IF([.T453]=96;60;IF([.T453]=84;60;IF([.T453]=108;60;IF([.T453]=90;50;IF([.T453]=72;40;IF([.T453]=80;40;IF([.T453]=100;50;IF([.T453]=54;30;IF([.T453]=36;20;IF([.T453]=18;10;IF([.T45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24935/defenderoftexel/images/thumb/8/84/Hera_Icon.png/50px-He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ra&quot;; &quot;Hera&quot;)" office:value-type="string" office:string-value="Hera" calcext:value-type="string">
            <text:p>Hera</text:p>
          </table:table-cell>
          <table:table-cell table:style-name="ce25"/>
          <table:table-cell table:style-name="ce28" office:value-type="float" office:value="2396" calcext:value-type="float">
            <text:p>2396</text:p>
          </table:table-cell>
          <table:table-cell table:style-name="ce33" office:value-type="float" office:value="2005" calcext:value-type="float">
            <text:p>2005</text:p>
          </table:table-cell>
          <table:table-cell table:style-name="ce37" office:value-type="float" office:value="993" calcext:value-type="float">
            <text:p>993</text:p>
          </table:table-cell>
          <table:table-cell table:style-name="ce41" office:value-type="float" office:value="183" calcext:value-type="float">
            <text:p>183</text:p>
          </table:table-cell>
          <table:table-cell table:style-name="ce45" office:value-type="float" office:value="730" calcext:value-type="float">
            <text:p>730</text:p>
          </table:table-cell>
          <table:table-cell table:style-name="ce53" table:formula="of:=SUM([.D454:.H454])" office:value-type="float" office:value="6307" calcext:value-type="float">
            <text:p>6307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Self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4]=126;70;IF([.T454]=112;70;IF([.T454]=98;70;IF([.T454]=96;60;IF([.T454]=84;60;IF([.T454]=108;60;IF([.T454]=90;50;IF([.T454]=72;40;IF([.T454]=80;40;IF([.T454]=100;50;IF([.T454]=54;30;IF([.T454]=36;20;IF([.T454]=18;10;IF([.T45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2530/defenderoftexel/images/thumb/6/63/Herard_Icon.png/50px-Herar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rard&quot;; &quot;Herard&quot;)" office:value-type="string" office:string-value="Herard" calcext:value-type="string">
            <text:p>Herard</text:p>
          </table:table-cell>
          <table:table-cell table:style-name="ce25"/>
          <table:table-cell table:style-name="ce28" office:value-type="float" office:value="479" calcext:value-type="float">
            <text:p>479</text:p>
          </table:table-cell>
          <table:table-cell table:style-name="ce33" office:value-type="float" office:value="843" calcext:value-type="float">
            <text:p>843</text:p>
          </table:table-cell>
          <table:table-cell table:style-name="ce37" office:value-type="float" office:value="441" calcext:value-type="float">
            <text:p>441</text:p>
          </table:table-cell>
          <table:table-cell table:style-name="ce41" office:value-type="float" office:value="5210" calcext:value-type="float">
            <text:p>5210</text:p>
          </table:table-cell>
          <table:table-cell table:style-name="ce45" office:value-type="float" office:value="3856" calcext:value-type="float">
            <text:p>3856</text:p>
          </table:table-cell>
          <table:table-cell table:style-name="ce53" table:formula="of:=SUM([.D455:.H455])" office:value-type="float" office:value="10829" calcext:value-type="float">
            <text:p>10829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5]=126;70;IF([.T455]=112;70;IF([.T455]=98;70;IF([.T455]=96;60;IF([.T455]=84;60;IF([.T455]=108;60;IF([.T455]=90;50;IF([.T455]=72;40;IF([.T455]=80;40;IF([.T455]=100;50;IF([.T455]=54;30;IF([.T455]=36;20;IF([.T455]=18;10;IF([.T45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225185810/defenderoftexel/images/thumb/2/22/Hereward_Icon.png/50px-Herewar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reward&quot;; &quot;Hereward&quot;)" office:value-type="string" office:string-value="Hereward" calcext:value-type="string">
            <text:p>Hereward</text:p>
          </table:table-cell>
          <table:table-cell table:style-name="ce25"/>
          <table:table-cell table:style-name="ce28" office:value-type="float" office:value="5139" calcext:value-type="float">
            <text:p>5139</text:p>
          </table:table-cell>
          <table:table-cell table:style-name="ce33" office:value-type="float" office:value="5874" calcext:value-type="float">
            <text:p>5874</text:p>
          </table:table-cell>
          <table:table-cell table:style-name="ce37" office:value-type="float" office:value="3150" calcext:value-type="float">
            <text:p>3150</text:p>
          </table:table-cell>
          <table:table-cell table:style-name="ce41" office:value-type="float" office:value="741" calcext:value-type="float">
            <text:p>741</text:p>
          </table:table-cell>
          <table:table-cell table:style-name="ce45" office:value-type="float" office:value="985" calcext:value-type="float">
            <text:p>985</text:p>
          </table:table-cell>
          <table:table-cell table:style-name="ce53" table:formula="of:=SUM([.D456:.H456])" office:value-type="float" office:value="15889" calcext:value-type="float">
            <text:p>15889</text:p>
          </table:table-cell>
          <table:table-cell table:style-name="ce60" office:value-type="string" calcext:value-type="string">
            <text:p>Galo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6]=126;70;IF([.T456]=112;70;IF([.T456]=98;70;IF([.T456]=96;60;IF([.T456]=84;60;IF([.T456]=108;60;IF([.T456]=90;50;IF([.T456]=72;40;IF([.T456]=80;40;IF([.T456]=100;50;IF([.T456]=54;30;IF([.T456]=36;20;IF([.T456]=18;10;IF([.T45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17110607/defenderoftexel/images/thumb/3/36/Hermes_Wayfarer_Icon.png/50px-Hermes_Wayfar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rmes_Wayfarer&quot;; &quot;Hermes Wayfarer&quot;)" office:value-type="string" office:string-value="Hermes Wayfarer" calcext:value-type="string">
            <text:p>Hermes Wayfarer</text:p>
          </table:table-cell>
          <table:table-cell table:style-name="ce25"/>
          <table:table-cell table:style-name="ce28" office:value-type="float" office:value="6698" calcext:value-type="float">
            <text:p>6698</text:p>
          </table:table-cell>
          <table:table-cell table:style-name="ce33" office:value-type="float" office:value="10208" calcext:value-type="float">
            <text:p>10208</text:p>
          </table:table-cell>
          <table:table-cell table:style-name="ce37" office:value-type="float" office:value="3493" calcext:value-type="float">
            <text:p>3493</text:p>
          </table:table-cell>
          <table:table-cell table:style-name="ce41" office:value-type="float" office:value="2122" calcext:value-type="float">
            <text:p>2122</text:p>
          </table:table-cell>
          <table:table-cell table:style-name="ce45" office:value-type="float" office:value="10588" calcext:value-type="float">
            <text:p>10588</text:p>
          </table:table-cell>
          <table:table-cell table:style-name="ce53" table:formula="of:=SUM([.D457:.H457])" office:value-type="float" office:value="33109" calcext:value-type="float">
            <text:p>33109</text:p>
          </table:table-cell>
          <table:table-cell table:style-name="ce60" office:value-type="string" calcext:value-type="string">
            <text:p>Karykeion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57]=126;70;IF([.T457]=112;70;IF([.T457]=98;70;IF([.T457]=96;60;IF([.T457]=84;60;IF([.T457]=108;60;IF([.T457]=90;50;IF([.T457]=72;40;IF([.T457]=80;40;IF([.T457]=100;50;IF([.T457]=54;30;IF([.T457]=36;20;IF([.T457]=18;10;IF([.T45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33448/defenderoftexel/images/thumb/6/65/Heydar_Icon.png/40px-Heyd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ydar&quot;; &quot;Heydar&quot;)" office:value-type="string" office:string-value="Heydar" calcext:value-type="string">
            <text:p>Heydar</text:p>
          </table:table-cell>
          <table:table-cell table:style-name="ce25"/>
          <table:table-cell table:style-name="ce28" office:value-type="float" office:value="4571" calcext:value-type="float">
            <text:p>4571</text:p>
          </table:table-cell>
          <table:table-cell table:style-name="ce33" office:value-type="float" office:value="3862" calcext:value-type="float">
            <text:p>3862</text:p>
          </table:table-cell>
          <table:table-cell table:style-name="ce37" office:value-type="float" office:value="1983" calcext:value-type="float">
            <text:p>1983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office:value-type="float" office:value="1483" calcext:value-type="float">
            <text:p>1483</text:p>
          </table:table-cell>
          <table:table-cell table:style-name="ce53" table:formula="of:=SUM([.D458:.H458])" office:value-type="float" office:value="12291" calcext:value-type="float">
            <text:p>12291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8]=126;70;IF([.T458]=112;70;IF([.T458]=98;70;IF([.T458]=96;60;IF([.T458]=84;60;IF([.T458]=108;60;IF([.T458]=90;50;IF([.T458]=72;40;IF([.T458]=80;40;IF([.T458]=100;50;IF([.T458]=54;30;IF([.T458]=36;20;IF([.T458]=18;10;IF([.T45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401122930/defenderoftexel/images/thumb/0/04/Heyoka_Takini_Icon.png/50px-Heyoka_Takin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eyoka_Takini&quot;; &quot;Heyoka Takini&quot;)" office:value-type="string" office:string-value="Heyoka Takini" calcext:value-type="string">
            <text:p>Heyoka Takini</text:p>
          </table:table-cell>
          <table:table-cell table:style-name="ce25"/>
          <table:table-cell table:style-name="ce28" office:value-type="float" office:value="6458" calcext:value-type="float">
            <text:p>6458</text:p>
          </table:table-cell>
          <table:table-cell table:style-name="ce33" office:value-type="float" office:value="2885" calcext:value-type="float">
            <text:p>2885</text:p>
          </table:table-cell>
          <table:table-cell table:style-name="ce37" office:value-type="float" office:value="3150" calcext:value-type="float">
            <text:p>3150</text:p>
          </table:table-cell>
          <table:table-cell table:style-name="ce41" office:value-type="float" office:value="519" calcext:value-type="float">
            <text:p>519</text:p>
          </table:table-cell>
          <table:table-cell table:style-name="ce45" office:value-type="float" office:value="570" calcext:value-type="float">
            <text:p>570</text:p>
          </table:table-cell>
          <table:table-cell table:style-name="ce53" table:formula="of:=SUM([.D459:.H459])" office:value-type="float" office:value="13582" calcext:value-type="float">
            <text:p>13582</text:p>
          </table:table-cell>
          <table:table-cell table:style-name="ce60" office:value-type="string" calcext:value-type="string">
            <text:p>Vent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59]=126;70;IF([.T459]=112;70;IF([.T459]=98;70;IF([.T459]=96;60;IF([.T459]=84;60;IF([.T459]=108;60;IF([.T459]=90;50;IF([.T459]=72;40;IF([.T459]=80;40;IF([.T459]=100;50;IF([.T459]=54;30;IF([.T459]=36;20;IF([.T459]=18;10;IF([.T45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1.wikia.nocookie.net/defenderoftexel/images/9/9c/Hieros_Icon.png/revision/latest?cb=20150506135859&quot;)" office:value-type="string" office:string-value="" calcext:value-type="error">
            <text:p>#NAME?</text:p>
          </table:table-cell>
          <table:table-cell table:style-name="ce13" table:formula="of:=HYPERLINK(&quot;http://defenderoftexel.wikia.com/wiki/Irax_-_Hieros_-_Aistra&quot;;&quot;Hieros&quot;)" office:value-type="string" office:string-value="Hieros" calcext:value-type="string">
            <text:p>Hieros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5"/>
          <table:table-cell table:style-name="ce61" office:value-type="string" calcext:value-type="string">
            <text:p>Stampede</text:p>
          </table:table-cell>
          <table:table-cell table:style-name="ce61" office:value-type="string" calcext:value-type="string">
            <text:p>Single</text:p>
          </table:table-cell>
          <table:table-cell table:style-name="ce61" office:value-type="string" calcext:value-type="string">
            <text:p>Adept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R</text:p>
          </table:table-cell>
          <table:table-cell table:style-name="ce66" office:value-type="float" office:value="5" calcext:value-type="float">
            <text:p>5</text:p>
          </table:table-cell>
          <table:table-cell table:style-name="ce67" table:formula="of:=IF([.T460]=126;70;IF([.T460]=112;70;IF([.T460]=98;70;IF([.T460]=96;60;IF([.T460]=84;60;IF([.T460]=108;60;IF([.T460]=90;50;IF([.T460]=72;40;IF([.T460]=80;40;IF([.T460]=100;50;IF([.T460]=54;30;IF([.T460]=36;20;IF([.T460]=18;10;IF([.T460]=60;30))))))))))))))" office:value-type="float" office:value="0" calcext:value-type="float">
            <text:p>0</text:p>
          </table:table-cell>
          <table:table-cell table:style-name="ce69" office:value-type="float" office:value="64" calcext:value-type="float">
            <text:p>6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3233/defenderoftexel/images/9/92/Highsaddl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Highsaddle&quot;; &quot;Highsaddle&quot;)" office:value-type="string" office:string-value="Highsaddle" calcext:value-type="string">
            <text:p>Highsaddl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482" calcext:value-type="float">
            <text:p>1482</text:p>
          </table:table-cell>
          <table:table-cell table:style-name="ce32" office:value-type="float" office:value="3340" calcext:value-type="float">
            <text:p>3340</text:p>
          </table:table-cell>
          <table:table-cell table:style-name="ce36" office:value-type="float" office:value="763" calcext:value-type="float">
            <text:p>763</text:p>
          </table:table-cell>
          <table:table-cell table:style-name="ce40" office:value-type="float" office:value="3178" calcext:value-type="float">
            <text:p>3178</text:p>
          </table:table-cell>
          <table:table-cell table:style-name="ce44" office:value-type="float" office:value="1008" calcext:value-type="float">
            <text:p>1008</text:p>
          </table:table-cell>
          <table:table-cell table:style-name="ce52" table:formula="of:=SUM([.D461:.H461])" office:value-type="float" office:value="9771" calcext:value-type="float">
            <text:p>9771</text:p>
          </table:table-cell>
          <table:table-cell table:style-name="ce59" office:value-type="string" calcext:value-type="string">
            <text:p>Pyro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1]=126;70;IF([.T461]=112;70;IF([.T461]=98;70;IF([.T461]=96;60;IF([.T461]=84;60;IF([.T461]=108;60;IF([.T461]=90;50;IF([.T461]=72;40;IF([.T461]=80;40;IF([.T461]=100;50;IF([.T461]=54;30;IF([.T461]=36;20;IF([.T461]=18;10;IF([.T46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527142249/defenderoftexel/images/thumb/b/b6/Hightagel_Icon.png/50px-Hightage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ightagel&quot;; &quot;Hightagel&quot;)" office:value-type="string" office:string-value="Hightagel" calcext:value-type="string">
            <text:p>Hightagel</text:p>
          </table:table-cell>
          <table:table-cell table:style-name="ce25"/>
          <table:table-cell table:style-name="ce28" office:value-type="float" office:value="3418" calcext:value-type="float">
            <text:p>3418</text:p>
          </table:table-cell>
          <table:table-cell table:style-name="ce33" office:value-type="float" office:value="5198" calcext:value-type="float">
            <text:p>5198</text:p>
          </table:table-cell>
          <table:table-cell table:style-name="ce37" office:value-type="float" office:value="1775" calcext:value-type="float">
            <text:p>1775</text:p>
          </table:table-cell>
          <table:table-cell table:style-name="ce41" office:value-type="float" office:value="4069" calcext:value-type="float">
            <text:p>4069</text:p>
          </table:table-cell>
          <table:table-cell table:style-name="ce45" office:value-type="float" office:value="5388" calcext:value-type="float">
            <text:p>5388</text:p>
          </table:table-cell>
          <table:table-cell table:style-name="ce53" table:formula="of:=SUM([.D462:.H462])" office:value-type="float" office:value="19848" calcext:value-type="float">
            <text:p>19848</text:p>
          </table:table-cell>
          <table:table-cell table:style-name="ce60" office:value-type="string" calcext:value-type="string">
            <text:p>Speedfrea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62]=126;70;IF([.T462]=112;70;IF([.T462]=98;70;IF([.T462]=96;60;IF([.T462]=84;60;IF([.T462]=108;60;IF([.T462]=90;50;IF([.T462]=72;40;IF([.T462]=80;40;IF([.T462]=100;50;IF([.T462]=54;30;IF([.T462]=36;20;IF([.T462]=18;10;IF([.T46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013013405/defenderoftexel/images/thumb/3/36/Hinkypunk_Icon.png/50px-Hinkypun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inkypunk&quot;;&quot;Hinkypunk&quot;)" office:value-type="string" office:string-value="Hinkypunk" calcext:value-type="string">
            <text:p>Hinkypunk</text:p>
          </table:table-cell>
          <table:table-cell table:style-name="ce25"/>
          <table:table-cell table:style-name="ce28" office:value-type="float" office:value="5739" calcext:value-type="float">
            <text:p>5739</text:p>
          </table:table-cell>
          <table:table-cell table:style-name="ce33" office:value-type="float" office:value="6562" calcext:value-type="float">
            <text:p>6562</text:p>
          </table:table-cell>
          <table:table-cell table:style-name="ce37" office:value-type="float" office:value="3519" calcext:value-type="float">
            <text:p>3519</text:p>
          </table:table-cell>
          <table:table-cell table:style-name="ce41" office:value-type="float" office:value="828" calcext:value-type="float">
            <text:p>828</text:p>
          </table:table-cell>
          <table:table-cell table:style-name="ce45" office:value-type="float" office:value="1101" calcext:value-type="float">
            <text:p>1101</text:p>
          </table:table-cell>
          <table:table-cell table:style-name="ce53" table:formula="of:=SUM([.D463:.H463])" office:value-type="float" office:value="17749" calcext:value-type="float">
            <text:p>17749</text:p>
          </table:table-cell>
          <table:table-cell table:style-name="ce60" office:value-type="string" calcext:value-type="string">
            <text:p>Bo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63]=126;70;IF([.T463]=112;70;IF([.T463]=98;70;IF([.T463]=96;60;IF([.T463]=84;60;IF([.T463]=108;60;IF([.T463]=90;50;IF([.T463]=72;40;IF([.T463]=80;40;IF([.T463]=100;50;IF([.T463]=54;30;IF([.T463]=36;20;IF([.T463]=18;10;IF([.T46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e/ec/Hoxha_Icon.png/revision/latest?cb=20141111143931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xha_-_Afandi_-_Nasreddin&quot;;&quot;Hoxha&quot;)" office:value-type="string" office:string-value="Hoxha" calcext:value-type="string">
            <text:p>Hoxh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464:.H464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4]=126;70;IF([.T464]=112;70;IF([.T464]=98;70;IF([.T464]=96;60;IF([.T464]=84;60;IF([.T464]=108;60;IF([.T464]=90;50;IF([.T464]=72;40;IF([.T464]=80;40;IF([.T464]=100;50;IF([.T464]=54;30;IF([.T464]=36;20;IF([.T464]=18;10;IF([.T464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40107153444/defenderoftexel/images/thumb/4/4b/Hsalvia_Icon.png/50px-Hsalv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Hsalvia&quot;; &quot;Hsalvia&quot;)" office:value-type="string" office:string-value="Hsalvia" calcext:value-type="string">
            <text:p>Hsalv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88" calcext:value-type="float">
            <text:p>1888</text:p>
          </table:table-cell>
          <table:table-cell table:style-name="ce32" office:value-type="float" office:value="1101" calcext:value-type="float">
            <text:p>1101</text:p>
          </table:table-cell>
          <table:table-cell table:style-name="ce36" office:value-type="float" office:value="1291" calcext:value-type="float">
            <text:p>1291</text:p>
          </table:table-cell>
          <table:table-cell table:style-name="ce40" office:value-type="float" office:value="5088" calcext:value-type="float">
            <text:p>5088</text:p>
          </table:table-cell>
          <table:table-cell table:style-name="ce44" office:value-type="float" office:value="6374" calcext:value-type="float">
            <text:p>6374</text:p>
          </table:table-cell>
          <table:table-cell table:style-name="ce52" table:formula="of:=SUM([.D465:.H465])" office:value-type="float" office:value="15742" calcext:value-type="float">
            <text:p>15742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5]=126;70;IF([.T465]=112;70;IF([.T465]=98;70;IF([.T465]=96;60;IF([.T465]=84;60;IF([.T465]=108;60;IF([.T465]=90;50;IF([.T465]=72;40;IF([.T465]=80;40;IF([.T465]=100;50;IF([.T465]=54;30;IF([.T465]=36;20;IF([.T465]=18;10;IF([.T46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1436/defenderoftexel/images/8/85/Humus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umusi&quot;; &quot;Humusi&quot;)" office:value-type="string" office:string-value="Humusi" calcext:value-type="string">
            <text:p>Humusi</text:p>
          </table:table-cell>
          <table:table-cell table:style-name="ce25"/>
          <table:table-cell table:style-name="ce28" office:value-type="float" office:value="917" calcext:value-type="float">
            <text:p>917</text:p>
          </table:table-cell>
          <table:table-cell table:style-name="ce33" office:value-type="float" office:value="690" calcext:value-type="float">
            <text:p>690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float" office:value="668" calcext:value-type="float">
            <text:p>668</text:p>
          </table:table-cell>
          <table:table-cell table:style-name="ce45" office:value-type="float" office:value="1779" calcext:value-type="float">
            <text:p>1779</text:p>
          </table:table-cell>
          <table:table-cell table:style-name="ce53" table:formula="of:=SUM([.D466:.H466])" office:value-type="float" office:value="4517" calcext:value-type="float">
            <text:p>4517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66]=126;70;IF([.T466]=112;70;IF([.T466]=98;70;IF([.T466]=96;60;IF([.T466]=84;60;IF([.T466]=108;60;IF([.T466]=90;50;IF([.T466]=72;40;IF([.T466]=80;40;IF([.T466]=100;50;IF([.T466]=54;30;IF([.T466]=36;20;IF([.T466]=18;10;IF([.T46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1/17/Hunter_Gatherer_Icon.png/revision/latest?cb=20150506135758&quot;)" office:value-type="string" office:string-value="" calcext:value-type="error">
            <text:p>#NAME?</text:p>
          </table:table-cell>
          <table:table-cell table:style-name="ce11" table:formula="of:=HYPERLINK(&quot;http://defenderoftexel.wikia.com/wiki/Hunter_Gatherer_-_Hunter_Seeker_-_Hunter_Victor&quot;;&quot;Hunter Gatherer&quot;)" office:value-type="string" office:string-value="Hunter Gatherer" calcext:value-type="string">
            <text:p>Hunter Gather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7]=126;70;IF([.T467]=112;70;IF([.T467]=98;70;IF([.T467]=96;60;IF([.T467]=84;60;IF([.T467]=108;60;IF([.T467]=90;50;IF([.T467]=72;40;IF([.T467]=80;40;IF([.T467]=100;50;IF([.T467]=54;30;IF([.T467]=36;20;IF([.T467]=18;10;IF([.T467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a/a8/Hunter_Seeker_Icon.png/revision/latest?cb=20150506135809&quot;)" office:value-type="string" office:string-value="" calcext:value-type="error">
            <text:p>#NAME?</text:p>
          </table:table-cell>
          <table:table-cell table:style-name="ce11" table:formula="of:=HYPERLINK(&quot;http://defenderoftexel.wikia.com/wiki/Hunter_Gatherer_-_Hunter_Seeker_-_Hunter_Victor&quot;;&quot;Hunter Seeker&quot;)" office:value-type="string" office:string-value="Hunter Seeker" calcext:value-type="string">
            <text:p>Hunter Seek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8]=126;70;IF([.T468]=112;70;IF([.T468]=98;70;IF([.T468]=96;60;IF([.T468]=84;60;IF([.T468]=108;60;IF([.T468]=90;50;IF([.T468]=72;40;IF([.T468]=80;40;IF([.T468]=100;50;IF([.T468]=54;30;IF([.T468]=36;20;IF([.T468]=18;10;IF([.T468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0/Hunter_Victor_Icon.png/revision/latest?cb=20150506135821&quot;)" office:value-type="string" office:string-value="" calcext:value-type="error">
            <text:p>#NAME?</text:p>
          </table:table-cell>
          <table:table-cell table:style-name="ce11" table:formula="of:=HYPERLINK(&quot;http://defenderoftexel.wikia.com/wiki/Hunter_Gatherer_-_Hunter_Seeker_-_Hunter_Victor&quot;;&quot;Hunter Victor&quot;)" office:value-type="string" office:string-value="Hunter Victor" calcext:value-type="string">
            <text:p>Hunter Victo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5268" calcext:value-type="float">
            <text:p>5268</text:p>
          </table:table-cell>
          <table:table-cell table:style-name="ce32" office:value-type="float" office:value="6130" calcext:value-type="float">
            <text:p>6130</text:p>
          </table:table-cell>
          <table:table-cell table:style-name="ce36" office:value-type="float" office:value="4265" calcext:value-type="float">
            <text:p>4265</text:p>
          </table:table-cell>
          <table:table-cell table:style-name="ce40" office:value-type="float" office:value="601" calcext:value-type="float">
            <text:p>601</text:p>
          </table:table-cell>
          <table:table-cell table:style-name="ce44" office:value-type="float" office:value="725" calcext:value-type="float">
            <text:p>725</text:p>
          </table:table-cell>
          <table:table-cell table:style-name="ce52" table:formula="of:=SUM([.D469:.H469])" office:value-type="float" office:value="16989" calcext:value-type="float">
            <text:p>16989</text:p>
          </table:table-cell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69]=126;70;IF([.T469]=112;70;IF([.T469]=98;70;IF([.T469]=96;60;IF([.T469]=84;60;IF([.T469]=108;60;IF([.T469]=90;50;IF([.T469]=72;40;IF([.T469]=80;40;IF([.T469]=100;50;IF([.T469]=54;30;IF([.T469]=36;20;IF([.T469]=18;10;IF([.T46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3906/defenderoftexel/images/thumb/1/12/Iaazipaa_Icon.png/50px-Iaazipa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aazipaa&quot;; &quot;Iaazipaa&quot;)" office:value-type="string" office:string-value="Iaazipaa" calcext:value-type="string">
            <text:p>Iaazipaa</text:p>
          </table:table-cell>
          <table:table-cell table:style-name="ce25"/>
          <table:table-cell table:style-name="ce28" office:value-type="float" office:value="4414" calcext:value-type="float">
            <text:p>4414</text:p>
          </table:table-cell>
          <table:table-cell table:style-name="ce33" office:value-type="float" office:value="5047" calcext:value-type="float">
            <text:p>5047</text:p>
          </table:table-cell>
          <table:table-cell table:style-name="ce37" office:value-type="float" office:value="2707" calcext:value-type="float">
            <text:p>2707</text:p>
          </table:table-cell>
          <table:table-cell table:style-name="ce41" office:value-type="float" office:value="848" calcext:value-type="float">
            <text:p>848</text:p>
          </table:table-cell>
          <table:table-cell table:style-name="ce45" office:value-type="float" office:value="638" calcext:value-type="float">
            <text:p>638</text:p>
          </table:table-cell>
          <table:table-cell table:style-name="ce53" table:formula="of:=SUM([.D470:.H470])" office:value-type="float" office:value="13654" calcext:value-type="float">
            <text:p>13654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0]=126;70;IF([.T470]=112;70;IF([.T470]=98;70;IF([.T470]=96;60;IF([.T470]=84;60;IF([.T470]=108;60;IF([.T470]=90;50;IF([.T470]=72;40;IF([.T470]=80;40;IF([.T470]=100;50;IF([.T470]=54;30;IF([.T470]=36;20;IF([.T470]=18;10;IF([.T47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924180043/defenderoftexel/images/thumb/1/11/Igo_Icon.png/50px-Ig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enzo_-_Getti_-_Igo&quot;; &quot;Igo&quot;)" office:value-type="string" office:string-value="Igo" calcext:value-type="string">
            <text:p>Igo</text:p>
          </table:table-cell>
          <table:table-cell table:style-name="ce25"/>
          <table:table-cell table:style-name="ce28" office:value-type="float" office:value="3085" calcext:value-type="float">
            <text:p>3085</text:p>
          </table:table-cell>
          <table:table-cell table:style-name="ce33" office:value-type="float" office:value="3529" calcext:value-type="float">
            <text:p>3529</text:p>
          </table:table-cell>
          <table:table-cell table:style-name="ce37" office:value-type="float" office:value="1892" calcext:value-type="float">
            <text:p>1892</text:p>
          </table:table-cell>
          <table:table-cell table:style-name="ce41" office:value-type="float" office:value="445" calcext:value-type="float">
            <text:p>445</text:p>
          </table:table-cell>
          <table:table-cell table:style-name="ce45" office:value-type="float" office:value="593" calcext:value-type="float">
            <text:p>593</text:p>
          </table:table-cell>
          <table:table-cell table:style-name="ce53" table:formula="of:=SUM([.D471:.H471])" office:value-type="float" office:value="9544" calcext:value-type="float">
            <text:p>9544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1]=126;70;IF([.T471]=112;70;IF([.T471]=98;70;IF([.T471]=96;60;IF([.T471]=84;60;IF([.T471]=108;60;IF([.T471]=90;50;IF([.T471]=72;40;IF([.T471]=80;40;IF([.T471]=100;50;IF([.T471]=54;30;IF([.T471]=36;20;IF([.T471]=18;10;IF([.T47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1/10/Inksparrow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mbertross_-_Sprucewing_-_Inksparrow&quot;; &quot;Inksparrow&quot;)" office:value-type="string" office:string-value="Inksparrow" calcext:value-type="string">
            <text:p>Inksparrow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620" calcext:value-type="float">
            <text:p>620</text:p>
          </table:table-cell>
          <table:table-cell table:style-name="ce32" office:value-type="float" office:value="433" calcext:value-type="float">
            <text:p>433</text:p>
          </table:table-cell>
          <table:table-cell table:style-name="ce36" office:value-type="float" office:value="276" calcext:value-type="float">
            <text:p>276</text:p>
          </table:table-cell>
          <table:table-cell table:style-name="ce40" office:value-type="float" office:value="1829" calcext:value-type="float">
            <text:p>1829</text:p>
          </table:table-cell>
          <table:table-cell table:style-name="ce44" office:value-type="float" office:value="1739" calcext:value-type="float">
            <text:p>1739</text:p>
          </table:table-cell>
          <table:table-cell table:style-name="ce52" table:formula="of:=SUM([.D472:.H472])" office:value-type="float" office:value="4897" calcext:value-type="float">
            <text:p>4897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72]=126;70;IF([.T472]=112;70;IF([.T472]=98;70;IF([.T472]=96;60;IF([.T472]=84;60;IF([.T472]=108;60;IF([.T472]=90;50;IF([.T472]=72;40;IF([.T472]=80;40;IF([.T472]=100;50;IF([.T472]=54;30;IF([.T472]=36;20;IF([.T472]=18;10;IF([.T472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604034231/defenderoftexel/images/thumb/f/fa/Ira%2C_Hypnotic_Specter_Icon.png/50px-Ira%2C_Hypnotic_Specte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Ira%2C_Specter_-_Azure-Haired_Ira_-_Ira%2C_Hypnotic_Specter&quot;; &quot;Ira, Hypnotic Specter&quot;)" office:value-type="string" office:string-value="Ira, Hypnotic Specter" calcext:value-type="string">
            <text:p>Ira, Hypnotic Spect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408" calcext:value-type="float">
            <text:p>4408</text:p>
          </table:table-cell>
          <table:table-cell table:style-name="ce32" office:value-type="float" office:value="5040" calcext:value-type="float">
            <text:p>5040</text:p>
          </table:table-cell>
          <table:table-cell table:style-name="ce36" office:value-type="float" office:value="2701" calcext:value-type="float">
            <text:p>2701</text:p>
          </table:table-cell>
          <table:table-cell table:style-name="ce40" office:value-type="float" office:value="634" calcext:value-type="float">
            <text:p>634</text:p>
          </table:table-cell>
          <table:table-cell table:style-name="ce44" office:value-type="float" office:value="846" calcext:value-type="float">
            <text:p>846</text:p>
          </table:table-cell>
          <table:table-cell table:style-name="ce52" table:formula="of:=SUM([.D473:.H473])" office:value-type="float" office:value="13629" calcext:value-type="float">
            <text:p>13629</text:p>
          </table:table-cell>
          <table:table-cell table:style-name="ce59" office:value-type="string" calcext:value-type="string">
            <text:p>Head B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73]=126;70;IF([.T473]=112;70;IF([.T473]=98;70;IF([.T473]=96;60;IF([.T473]=84;60;IF([.T473]=108;60;IF([.T473]=90;50;IF([.T473]=72;40;IF([.T473]=80;40;IF([.T473]=100;50;IF([.T473]=54;30;IF([.T473]=36;20;IF([.T473]=18;10;IF([.T47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7" table:formula="of:=image(&quot;http://vignette2.wikia.nocookie.net/defenderoftexel/images/c/c0/Irax_Icon.png/revision/latest?cb=20150506135927&quot;)" office:value-type="string" office:string-value="" calcext:value-type="error">
            <text:p>#NAME?</text:p>
          </table:table-cell>
          <table:table-cell table:style-name="ce13" table:formula="of:=HYPERLINK(&quot;http://defenderoftexel.wikia.com/wiki/Irax_-_Hieros_-_Aistra&quot;;&quot;Irax&quot;)" office:value-type="string" office:string-value="Irax" calcext:value-type="string">
            <text:p>Irax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5"/>
          <table:table-cell table:style-name="ce7" table:number-columns-repeated="4"/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Water</text:p>
          </table:table-cell>
          <table:table-cell table:style-name="ce69" office:value-type="string" calcext:value-type="string">
            <text:p>Hemi</text:p>
          </table:table-cell>
          <table:table-cell table:style-name="ce72" office:value-type="string" calcext:value-type="string">
            <text:p>U</text:p>
          </table:table-cell>
          <table:table-cell table:style-name="ce66" office:value-type="float" office:value="5" calcext:value-type="float">
            <text:p>5</text:p>
          </table:table-cell>
          <table:table-cell table:style-name="ce67" table:formula="of:=IF([.T474]=126;70;IF([.T474]=112;70;IF([.T474]=98;70;IF([.T474]=96;60;IF([.T474]=84;60;IF([.T474]=108;60;IF([.T474]=90;50;IF([.T474]=72;40;IF([.T474]=80;40;IF([.T474]=100;50;IF([.T474]=54;30;IF([.T474]=36;20;IF([.T474]=18;10;IF([.T474]=60;30))))))))))))))" office:value-type="float" office:value="20" calcext:value-type="float">
            <text:p>20</text:p>
          </table:table-cell>
          <table:table-cell table:style-name="ce69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4117/defenderoftexel/images/thumb/4/47/Ironclad_Icon.png/50px-Ironclad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Ironclad&quot;; &quot;Ironclad&quot;)" office:value-type="string" office:string-value="Ironclad" calcext:value-type="string">
            <text:p>Ironclad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85" calcext:value-type="float">
            <text:p>2685</text:p>
          </table:table-cell>
          <table:table-cell table:style-name="ce32" office:value-type="float" office:value="2046" calcext:value-type="float">
            <text:p>2046</text:p>
          </table:table-cell>
          <table:table-cell table:style-name="ce36" office:value-type="float" office:value="1395" calcext:value-type="float">
            <text:p>1395</text:p>
          </table:table-cell>
          <table:table-cell table:style-name="ce40" office:value-type="float" office:value="1983" calcext:value-type="float">
            <text:p>1983</text:p>
          </table:table-cell>
          <table:table-cell table:style-name="ce44" office:value-type="float" office:value="5006" calcext:value-type="float">
            <text:p>5006</text:p>
          </table:table-cell>
          <table:table-cell table:style-name="ce52" table:formula="of:=SUM([.D475:.H475])" office:value-type="float" office:value="13115" calcext:value-type="float">
            <text:p>13115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75]=126;70;IF([.T475]=112;70;IF([.T475]=98;70;IF([.T475]=96;60;IF([.T475]=84;60;IF([.T475]=108;60;IF([.T475]=90;50;IF([.T475]=72;40;IF([.T475]=80;40;IF([.T475]=100;50;IF([.T475]=54;30;IF([.T475]=36;20;IF([.T475]=18;10;IF([.T47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225102939/defenderoftexel/images/thumb/0/09/Isa_Icon.png/50px-Is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sa&quot;; &quot;Isa&quot;)" office:value-type="string" office:string-value="Isa" calcext:value-type="string">
            <text:p>Isa</text:p>
          </table:table-cell>
          <table:table-cell table:style-name="ce25"/>
          <table:table-cell table:style-name="ce28" office:value-type="float" office:value="3358" calcext:value-type="float">
            <text:p>3358</text:p>
          </table:table-cell>
          <table:table-cell table:style-name="ce33" office:value-type="float" office:value="4710" calcext:value-type="float">
            <text:p>4710</text:p>
          </table:table-cell>
          <table:table-cell table:style-name="ce37" office:value-type="float" office:value="1029" calcext:value-type="float">
            <text:p>1029</text:p>
          </table:table-cell>
          <table:table-cell table:style-name="ce41" office:value-type="float" office:value="3013" calcext:value-type="float">
            <text:p>3013</text:p>
          </table:table-cell>
          <table:table-cell table:style-name="ce45" office:value-type="float" office:value="1362" calcext:value-type="float">
            <text:p>1362</text:p>
          </table:table-cell>
          <table:table-cell table:style-name="ce53" table:formula="of:=SUM([.D476:.H476])" office:value-type="float" office:value="13472" calcext:value-type="float">
            <text:p>13472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6]=126;70;IF([.T476]=112;70;IF([.T476]=98;70;IF([.T476]=96;60;IF([.T476]=84;60;IF([.T476]=108;60;IF([.T476]=90;50;IF([.T476]=72;40;IF([.T476]=80;40;IF([.T476]=100;50;IF([.T476]=54;30;IF([.T476]=36;20;IF([.T476]=18;10;IF([.T47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924192236/defenderoftexel/images/thumb/6/63/Ishpah_Icon.png/50px-Ishpa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agan_-_Lambu_-_Ishpah&quot;; &quot;Ishpah&quot;)" office:value-type="string" office:string-value="Ishpah" calcext:value-type="string">
            <text:p>Ishpah</text:p>
          </table:table-cell>
          <table:table-cell table:style-name="ce25"/>
          <table:table-cell table:style-name="ce28" office:value-type="float" office:value="3581" calcext:value-type="float">
            <text:p>3581</text:p>
          </table:table-cell>
          <table:table-cell table:style-name="ce33" office:value-type="float" office:value="4513" calcext:value-type="float">
            <text:p>4513</text:p>
          </table:table-cell>
          <table:table-cell table:style-name="ce37" office:value-type="float" office:value="1185" calcext:value-type="float">
            <text:p>1185</text:p>
          </table:table-cell>
          <table:table-cell table:style-name="ce41" office:value-type="float" office:value="4118" calcext:value-type="float">
            <text:p>4118</text:p>
          </table:table-cell>
          <table:table-cell table:style-name="ce45" office:value-type="float" office:value="785" calcext:value-type="float">
            <text:p>785</text:p>
          </table:table-cell>
          <table:table-cell table:style-name="ce53" table:formula="of:=SUM([.D477:.H477])" office:value-type="float" office:value="14182" calcext:value-type="float">
            <text:p>14182</text:p>
          </table:table-cell>
          <table:table-cell table:style-name="ce60" office:value-type="string" calcext:value-type="string">
            <text:p>Broadsid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7]=126;70;IF([.T477]=112;70;IF([.T477]=98;70;IF([.T477]=96;60;IF([.T477]=84;60;IF([.T477]=108;60;IF([.T477]=90;50;IF([.T477]=72;40;IF([.T477]=80;40;IF([.T477]=100;50;IF([.T477]=54;30;IF([.T477]=36;20;IF([.T477]=18;10;IF([.T47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217143853/defenderoftexel/images/thumb/c/c7/Ishum_Icon.png/50px-Ishu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udu_-_Nanum_-_Ishum&quot;;&quot;Ishum&quot;)" office:value-type="string" office:string-value="Ishum" calcext:value-type="string">
            <text:p>Ishum</text:p>
          </table:table-cell>
          <table:table-cell table:style-name="ce25"/>
          <table:table-cell table:style-name="ce28" office:value-type="float" office:value="1866" calcext:value-type="float">
            <text:p>1866</text:p>
          </table:table-cell>
          <table:table-cell table:style-name="ce33" office:value-type="float" office:value="4338" calcext:value-type="float">
            <text:p>4338</text:p>
          </table:table-cell>
          <table:table-cell table:style-name="ce37" office:value-type="float" office:value="946" calcext:value-type="float">
            <text:p>946</text:p>
          </table:table-cell>
          <table:table-cell table:style-name="ce41" office:value-type="float" office:value="4119" calcext:value-type="float">
            <text:p>4119</text:p>
          </table:table-cell>
          <table:table-cell table:style-name="ce45" office:value-type="float" office:value="1254" calcext:value-type="float">
            <text:p>1254</text:p>
          </table:table-cell>
          <table:table-cell table:style-name="ce53" table:formula="of:=SUM([.D478:.H478])" office:value-type="float" office:value="12523" calcext:value-type="float">
            <text:p>12523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8]=126;70;IF([.T478]=112;70;IF([.T478]=98;70;IF([.T478]=96;60;IF([.T478]=84;60;IF([.T478]=108;60;IF([.T478]=90;50;IF([.T478]=72;40;IF([.T478]=80;40;IF([.T478]=100;50;IF([.T478]=54;30;IF([.T478]=36;20;IF([.T478]=18;10;IF([.T47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3907/defenderoftexel/images/thumb/2/2b/Isiratuu_Icon.png/50px-Isiratu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siratuu&quot;; &quot;Isiratuu&quot;)" office:value-type="string" office:string-value="Isiratuu" calcext:value-type="string">
            <text:p>Isiratuu</text:p>
          </table:table-cell>
          <table:table-cell table:style-name="ce25"/>
          <table:table-cell table:style-name="ce28" office:value-type="float" office:value="1097" calcext:value-type="float">
            <text:p>1097</text:p>
          </table:table-cell>
          <table:table-cell table:style-name="ce33" office:value-type="float" office:value="1176" calcext:value-type="float">
            <text:p>1176</text:p>
          </table:table-cell>
          <table:table-cell table:style-name="ce37" office:value-type="float" office:value="556" calcext:value-type="float">
            <text:p>556</text:p>
          </table:table-cell>
          <table:table-cell table:style-name="ce41" office:value-type="float" office:value="945" calcext:value-type="float">
            <text:p>945</text:p>
          </table:table-cell>
          <table:table-cell table:style-name="ce45" office:value-type="float" office:value="872" calcext:value-type="float">
            <text:p>872</text:p>
          </table:table-cell>
          <table:table-cell table:style-name="ce53" table:formula="of:=SUM([.D479:.H479])" office:value-type="float" office:value="4646" calcext:value-type="float">
            <text:p>4646</text:p>
          </table:table-cell>
          <table:table-cell table:style-name="ce60" office:value-type="string" calcext:value-type="string">
            <text:p>Illu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79]=126;70;IF([.T479]=112;70;IF([.T479]=98;70;IF([.T479]=96;60;IF([.T479]=84;60;IF([.T479]=108;60;IF([.T479]=90;50;IF([.T479]=72;40;IF([.T479]=80;40;IF([.T479]=100;50;IF([.T479]=54;30;IF([.T479]=36;20;IF([.T479]=18;10;IF([.T47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32534/defenderoftexel/images/thumb/e/e6/Iudith_Icon.png/40px-Iudit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udith&quot;; &quot;Iudith&quot;)" office:value-type="string" office:string-value="Iudith" calcext:value-type="string">
            <text:p>Iudith</text:p>
          </table:table-cell>
          <table:table-cell table:style-name="ce25"/>
          <table:table-cell table:style-name="ce28" office:value-type="float" office:value="1531" calcext:value-type="float">
            <text:p>1531</text:p>
          </table:table-cell>
          <table:table-cell table:style-name="ce33" office:value-type="float" office:value="1076" calcext:value-type="float">
            <text:p>1076</text:p>
          </table:table-cell>
          <table:table-cell table:style-name="ce37" office:value-type="float" office:value="696" calcext:value-type="float">
            <text:p>696</text:p>
          </table:table-cell>
          <table:table-cell table:style-name="ce41" office:value-type="float" office:value="4407" calcext:value-type="float">
            <text:p>4407</text:p>
          </table:table-cell>
          <table:table-cell table:style-name="ce45" office:value-type="float" office:value="4196" calcext:value-type="float">
            <text:p>4196</text:p>
          </table:table-cell>
          <table:table-cell table:style-name="ce53" table:formula="of:=SUM([.D480:.H480])" office:value-type="float" office:value="11906" calcext:value-type="float">
            <text:p>11906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0]=126;70;IF([.T480]=112;70;IF([.T480]=98;70;IF([.T480]=96;60;IF([.T480]=84;60;IF([.T480]=108;60;IF([.T480]=90;50;IF([.T480]=72;40;IF([.T480]=80;40;IF([.T480]=100;50;IF([.T480]=54;30;IF([.T480]=36;20;IF([.T480]=18;10;IF([.T48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506125011/defenderoftexel/images/thumb/8/81/Izanagi_Illflame_Icon.png/50px-Izanagi_Illflam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zanagi_Illflame&quot;; &quot;Izanagi Illflame&quot;)" office:value-type="string" office:string-value="Izanagi Illflame" calcext:value-type="string">
            <text:p>Izanagi Illflame</text:p>
          </table:table-cell>
          <table:table-cell table:style-name="ce25"/>
          <table:table-cell table:style-name="ce28" office:value-type="float" office:value="4766" calcext:value-type="float">
            <text:p>4766</text:p>
          </table:table-cell>
          <table:table-cell table:style-name="ce33" office:value-type="float" office:value="11092" calcext:value-type="float">
            <text:p>11092</text:p>
          </table:table-cell>
          <table:table-cell table:style-name="ce37" office:value-type="float" office:value="2424" calcext:value-type="float">
            <text:p>2424</text:p>
          </table:table-cell>
          <table:table-cell table:style-name="ce41" office:value-type="float" office:value="10534" calcext:value-type="float">
            <text:p>10534</text:p>
          </table:table-cell>
          <table:table-cell table:style-name="ce45" office:value-type="float" office:value="3219" calcext:value-type="float">
            <text:p>3219</text:p>
          </table:table-cell>
          <table:table-cell table:style-name="ce53" table:formula="of:=SUM([.D481:.H481])" office:value-type="float" office:value="32035" calcext:value-type="float">
            <text:p>32035</text:p>
          </table:table-cell>
          <table:table-cell table:style-name="ce60" office:value-type="string" calcext:value-type="string">
            <text:p>Starcross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81]=126;70;IF([.T481]=112;70;IF([.T481]=98;70;IF([.T481]=96;60;IF([.T481]=84;60;IF([.T481]=108;60;IF([.T481]=90;50;IF([.T481]=72;40;IF([.T481]=80;40;IF([.T481]=100;50;IF([.T481]=54;30;IF([.T481]=36;20;IF([.T481]=18;10;IF([.T48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4.wikia.nocookie.net/__cb20140506121108/defenderoftexel/images/thumb/a/a4/Izanami_Everwroth_Icon.png/50px-Izanami_Everwroth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Izanami_Everwroth&quot;; &quot;Izanami Everwroth&quot;)" office:value-type="string" office:string-value="Izanami Everwroth" calcext:value-type="string">
            <text:p>Izanami Everwroth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307" calcext:value-type="float">
            <text:p>4307</text:p>
          </table:table-cell>
          <table:table-cell table:style-name="ce32" office:value-type="float" office:value="3029" calcext:value-type="float">
            <text:p>3029</text:p>
          </table:table-cell>
          <table:table-cell table:style-name="ce36" office:value-type="float" office:value="1961" calcext:value-type="float">
            <text:p>1961</text:p>
          </table:table-cell>
          <table:table-cell table:style-name="ce40" office:value-type="float" office:value="12388" calcext:value-type="float">
            <text:p>12388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52" table:formula="of:=SUM([.D482:.H482])" office:value-type="float" office:value="33477" calcext:value-type="float">
            <text:p>33477</text:p>
          </table:table-cell>
          <table:table-cell table:style-name="ce59" office:value-type="string" calcext:value-type="string">
            <text:p>Hagrid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482]=126;70;IF([.T482]=112;70;IF([.T482]=98;70;IF([.T482]=96;60;IF([.T482]=84;60;IF([.T482]=108;60;IF([.T482]=90;50;IF([.T482]=72;40;IF([.T482]=80;40;IF([.T482]=100;50;IF([.T482]=54;30;IF([.T482]=36;20;IF([.T482]=18;10;IF([.T482]=60;30))))))))))))))" office:value-type="float" office:value="60" calcext:value-type="float">
            <text:p>60</text:p>
          </table:table-cell>
          <table:table-cell table:style-name="ce67" office:value-type="float" office:value="96" calcext:value-type="float">
            <text:p>9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5234/defenderoftexel/images/thumb/3/3f/Izdubar_Icon.png/50px-Izdub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zdubar&quot;; &quot;Izdubar&quot;)" office:value-type="string" office:string-value="Izdubar" calcext:value-type="string">
            <text:p>Izdubar</text:p>
          </table:table-cell>
          <table:table-cell table:style-name="ce25"/>
          <table:table-cell table:style-name="ce28" office:value-type="float" office:value="6579" calcext:value-type="float">
            <text:p>6579</text:p>
          </table:table-cell>
          <table:table-cell table:style-name="ce33" office:value-type="float" office:value="2940" calcext:value-type="float">
            <text:p>2940</text:p>
          </table:table-cell>
          <table:table-cell table:style-name="ce37" office:value-type="float" office:value="3212" calcext:value-type="float">
            <text:p>3212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office:value-type="float" office:value="578" calcext:value-type="float">
            <text:p>578</text:p>
          </table:table-cell>
          <table:table-cell table:style-name="ce53" table:formula="of:=SUM([.D483:.H483])" office:value-type="float" office:value="13840" calcext:value-type="float">
            <text:p>13840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3]=126;70;IF([.T483]=112;70;IF([.T483]=98;70;IF([.T483]=96;60;IF([.T483]=84;60;IF([.T483]=108;60;IF([.T483]=90;50;IF([.T483]=72;40;IF([.T483]=80;40;IF([.T483]=100;50;IF([.T483]=54;30;IF([.T483]=36;20;IF([.T483]=18;10;IF([.T48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3/3b/Izisoob_Icon.png/revision/latest?cb=20141028110426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nu_-_Izisoob_-_Tak-Tak&quot;;&quot;Izisoob&quot;)" office:value-type="string" office:string-value="Izisoob" calcext:value-type="string">
            <text:p>Izisoob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Hotrock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84]=126;70;IF([.T484]=112;70;IF([.T484]=98;70;IF([.T484]=96;60;IF([.T484]=84;60;IF([.T484]=108;60;IF([.T484]=90;50;IF([.T484]=72;40;IF([.T484]=80;40;IF([.T484]=100;50;IF([.T484]=54;30;IF([.T484]=36;20;IF([.T484]=18;10;IF([.T48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128155555/defenderoftexel/images/thumb/5/5c/Jairakan_Icon.png/50px-Jairaka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airakan&quot;; &quot;Jairakan&quot;)" office:value-type="string" office:string-value="Jairakan" calcext:value-type="string">
            <text:p>Jairakan</text:p>
          </table:table-cell>
          <table:table-cell table:style-name="ce25"/>
          <table:table-cell table:style-name="ce28" office:value-type="float" office:value="3824" calcext:value-type="float">
            <text:p>3824</text:p>
          </table:table-cell>
          <table:table-cell table:style-name="ce33" office:value-type="float" office:value="5362" calcext:value-type="float">
            <text:p>5362</text:p>
          </table:table-cell>
          <table:table-cell table:style-name="ce37" office:value-type="float" office:value="1170" calcext:value-type="float">
            <text:p>1170</text:p>
          </table:table-cell>
          <table:table-cell table:style-name="ce41" office:value-type="float" office:value="3428" calcext:value-type="float">
            <text:p>3428</text:p>
          </table:table-cell>
          <table:table-cell table:style-name="ce45" office:value-type="float" office:value="1552" calcext:value-type="float">
            <text:p>1552</text:p>
          </table:table-cell>
          <table:table-cell table:style-name="ce53" table:formula="of:=SUM([.D485:.H485])" office:value-type="float" office:value="15336" calcext:value-type="float">
            <text:p>15336</text:p>
          </table:table-cell>
          <table:table-cell table:style-name="ce60" office:value-type="string" calcext:value-type="string">
            <text:p>Stamped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5]=126;70;IF([.T485]=112;70;IF([.T485]=98;70;IF([.T485]=96;60;IF([.T485]=84;60;IF([.T485]=108;60;IF([.T485]=90;50;IF([.T485]=72;40;IF([.T485]=80;40;IF([.T485]=100;50;IF([.T485]=54;30;IF([.T485]=36;20;IF([.T485]=18;10;IF([.T48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6/60/Jale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aleh&quot;; &quot;Jaleh&quot;)" office:value-type="string" office:string-value="Jaleh" calcext:value-type="string">
            <text:p>Jaleh</text:p>
          </table:table-cell>
          <table:table-cell table:style-name="ce25"/>
          <table:table-cell table:style-name="ce28" office:value-type="float" office:value="3292" calcext:value-type="float">
            <text:p>3292</text:p>
          </table:table-cell>
          <table:table-cell table:style-name="ce33" office:value-type="float" office:value="3725" calcext:value-type="float">
            <text:p>3725</text:p>
          </table:table-cell>
          <table:table-cell table:style-name="ce37" office:value-type="float" office:value="6747" calcext:value-type="float">
            <text:p>6747</text:p>
          </table:table-cell>
          <table:table-cell table:style-name="ce41" office:value-type="float" office:value="339" calcext:value-type="float">
            <text:p>339</text:p>
          </table:table-cell>
          <table:table-cell table:style-name="ce45" office:value-type="float" office:value="290" calcext:value-type="float">
            <text:p>290</text:p>
          </table:table-cell>
          <table:table-cell table:style-name="ce53" table:formula="of:=SUM([.D486:.H486])" office:value-type="float" office:value="14393" calcext:value-type="float">
            <text:p>14393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6]=126;70;IF([.T486]=112;70;IF([.T486]=98;70;IF([.T486]=96;60;IF([.T486]=84;60;IF([.T486]=108;60;IF([.T486]=90;50;IF([.T486]=72;40;IF([.T486]=80;40;IF([.T486]=100;50;IF([.T486]=54;30;IF([.T486]=36;20;IF([.T486]=18;10;IF([.T48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422140345/defenderoftexel/images/thumb/9/9e/Jambaque_Icon.png/50px-Jambaqu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ambaque&quot;; &quot;Jambaque&quot;)" office:value-type="string" office:string-value="Jambaque" calcext:value-type="string">
            <text:p>Jambaque</text:p>
          </table:table-cell>
          <table:table-cell table:style-name="ce25"/>
          <table:table-cell table:style-name="ce28" office:value-type="float" office:value="2076" calcext:value-type="float">
            <text:p>2076</text:p>
          </table:table-cell>
          <table:table-cell table:style-name="ce33" office:value-type="float" office:value="2018" calcext:value-type="float">
            <text:p>2018</text:p>
          </table:table-cell>
          <table:table-cell table:style-name="ce37" office:value-type="float" office:value="1010" calcext:value-type="float">
            <text:p>1010</text:p>
          </table:table-cell>
          <table:table-cell table:style-name="ce41" office:value-type="float" office:value="2076" calcext:value-type="float">
            <text:p>2076</text:p>
          </table:table-cell>
          <table:table-cell table:style-name="ce45" office:value-type="float" office:value="5573" calcext:value-type="float">
            <text:p>5573</text:p>
          </table:table-cell>
          <table:table-cell table:style-name="ce53" table:formula="of:=SUM([.D487:.H487])" office:value-type="float" office:value="12753" calcext:value-type="float">
            <text:p>12753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7]=126;70;IF([.T487]=112;70;IF([.T487]=98;70;IF([.T487]=96;60;IF([.T487]=84;60;IF([.T487]=108;60;IF([.T487]=90;50;IF([.T487]=72;40;IF([.T487]=80;40;IF([.T487]=100;50;IF([.T487]=54;30;IF([.T487]=36;20;IF([.T487]=18;10;IF([.T48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2955/defenderoftexel/images/thumb/6/69/Jamshad_Icon.png/50px-Jamsha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amshad&quot;; &quot;Jamshad&quot;)" office:value-type="string" office:string-value="Jamshad" calcext:value-type="string">
            <text:p>Jamshad</text:p>
          </table:table-cell>
          <table:table-cell table:style-name="ce25"/>
          <table:table-cell table:style-name="ce28" office:value-type="float" office:value="2592" calcext:value-type="float">
            <text:p>2592</text:p>
          </table:table-cell>
          <table:table-cell table:style-name="ce33" office:value-type="float" office:value="2965" calcext:value-type="float">
            <text:p>2965</text:p>
          </table:table-cell>
          <table:table-cell table:style-name="ce37" office:value-type="float" office:value="1588" calcext:value-type="float">
            <text:p>1588</text:p>
          </table:table-cell>
          <table:table-cell table:style-name="ce41" office:value-type="float" office:value="373" calcext:value-type="float">
            <text:p>373</text:p>
          </table:table-cell>
          <table:table-cell table:style-name="ce45" office:value-type="float" office:value="497" calcext:value-type="float">
            <text:p>497</text:p>
          </table:table-cell>
          <table:table-cell table:style-name="ce53" table:formula="of:=SUM([.D488:.H488])" office:value-type="float" office:value="8015" calcext:value-type="float">
            <text:p>8015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8]=126;70;IF([.T488]=112;70;IF([.T488]=98;70;IF([.T488]=96;60;IF([.T488]=84;60;IF([.T488]=108;60;IF([.T488]=90;50;IF([.T488]=72;40;IF([.T488]=80;40;IF([.T488]=100;50;IF([.T488]=54;30;IF([.T488]=36;20;IF([.T488]=18;10;IF([.T48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401123256/defenderoftexel/images/thumb/c/cc/Jester_Bangs_Icon.png/50px-Jester_Bang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ester_Bangs&quot;; &quot;Jester Bangs&quot;)" office:value-type="string" office:string-value="Jester Bangs" calcext:value-type="string">
            <text:p>Jester Bangs</text:p>
          </table:table-cell>
          <table:table-cell table:style-name="ce25"/>
          <table:table-cell table:style-name="ce28" office:value-type="float" office:value="3914" calcext:value-type="float">
            <text:p>3914</text:p>
          </table:table-cell>
          <table:table-cell table:style-name="ce33" office:value-type="float" office:value="511" calcext:value-type="float">
            <text:p>511</text:p>
          </table:table-cell>
          <table:table-cell table:style-name="ce37" office:value-type="float" office:value="1392" calcext:value-type="float">
            <text:p>1392</text:p>
          </table:table-cell>
          <table:table-cell table:style-name="ce41" office:value-type="float" office:value="7959" calcext:value-type="float">
            <text:p>7959</text:p>
          </table:table-cell>
          <table:table-cell table:style-name="ce45" office:value-type="float" office:value="2653" calcext:value-type="float">
            <text:p>2653</text:p>
          </table:table-cell>
          <table:table-cell table:style-name="ce53" table:formula="of:=SUM([.D489:.H489])" office:value-type="float" office:value="16429" calcext:value-type="float">
            <text:p>16429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89]=126;70;IF([.T489]=112;70;IF([.T489]=98;70;IF([.T489]=96;60;IF([.T489]=84;60;IF([.T489]=108;60;IF([.T489]=90;50;IF([.T489]=72;40;IF([.T489]=80;40;IF([.T489]=100;50;IF([.T489]=54;30;IF([.T489]=36;20;IF([.T489]=18;10;IF([.T48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4.wikia.nocookie.net/__cb20140513124229/defenderoftexel/images/thumb/7/72/Jetsam_the_Jinn_Icon.png/50px-Jetsam_the_Jin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Jetsam_the_Jinn&quot;; &quot;Jetsam the Jinn&quot;)" office:value-type="string" office:string-value="Jetsam the Jinn" calcext:value-type="string">
            <text:p>Jetsam the Jin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249" calcext:value-type="float">
            <text:p>4249</text:p>
          </table:table-cell>
          <table:table-cell table:style-name="ce32" office:value-type="float" office:value="5354" calcext:value-type="float">
            <text:p>5354</text:p>
          </table:table-cell>
          <table:table-cell table:style-name="ce36" office:value-type="float" office:value="1406" calcext:value-type="float">
            <text:p>1406</text:p>
          </table:table-cell>
          <table:table-cell table:style-name="ce40" office:value-type="float" office:value="4883" calcext:value-type="float">
            <text:p>4883</text:p>
          </table:table-cell>
          <table:table-cell table:style-name="ce44" office:value-type="float" office:value="933" calcext:value-type="float">
            <text:p>933</text:p>
          </table:table-cell>
          <table:table-cell table:style-name="ce52" table:formula="of:=SUM([.D490:.H490])" office:value-type="float" office:value="16825" calcext:value-type="float">
            <text:p>16825</text:p>
          </table:table-cell>
          <table:table-cell table:style-name="ce59" office:value-type="string" calcext:value-type="string">
            <text:p>Endjin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90]=126;70;IF([.T490]=112;70;IF([.T490]=98;70;IF([.T490]=96;60;IF([.T490]=84;60;IF([.T490]=108;60;IF([.T490]=90;50;IF([.T490]=72;40;IF([.T490]=80;40;IF([.T490]=100;50;IF([.T490]=54;30;IF([.T490]=36;20;IF([.T490]=18;10;IF([.T49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40107155317/defenderoftexel/images/thumb/d/d0/Kagar_Icon.png/50px-Kag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gar&quot;; &quot;Kagar&quot;)" office:value-type="string" office:string-value="Kagar" calcext:value-type="string">
            <text:p>Kagar</text:p>
          </table:table-cell>
          <table:table-cell table:style-name="ce25"/>
          <table:table-cell table:style-name="ce28" office:value-type="float" office:value="4512" calcext:value-type="float">
            <text:p>4512</text:p>
          </table:table-cell>
          <table:table-cell table:style-name="ce33" office:value-type="float" office:value="10502" calcext:value-type="float">
            <text:p>10502</text:p>
          </table:table-cell>
          <table:table-cell table:style-name="ce37" office:value-type="float" office:value="2296" calcext:value-type="float">
            <text:p>2296</text:p>
          </table:table-cell>
          <table:table-cell table:style-name="ce41" office:value-type="float" office:value="9976" calcext:value-type="float">
            <text:p>9976</text:p>
          </table:table-cell>
          <table:table-cell table:style-name="ce45" office:value-type="float" office:value="3048" calcext:value-type="float">
            <text:p>3048</text:p>
          </table:table-cell>
          <table:table-cell table:style-name="ce53" table:formula="of:=SUM([.D491:.H491])" office:value-type="float" office:value="30334" calcext:value-type="float">
            <text:p>30334</text:p>
          </table:table-cell>
          <table:table-cell table:style-name="ce60" office:value-type="string" calcext:value-type="string">
            <text:p>Entwin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491]=126;70;IF([.T491]=112;70;IF([.T491]=98;70;IF([.T491]=96;60;IF([.T491]=84;60;IF([.T491]=108;60;IF([.T491]=90;50;IF([.T491]=72;40;IF([.T491]=80;40;IF([.T491]=100;50;IF([.T491]=54;30;IF([.T491]=36;20;IF([.T491]=18;10;IF([.T49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23553/defenderoftexel/images/thumb/a/a4/Kansbar_Icon.png/50px-Kansb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nsbar&quot;; &quot;Kansbar&quot;)" office:value-type="string" office:string-value="Kansbar" calcext:value-type="string">
            <text:p>Kansbar</text:p>
          </table:table-cell>
          <table:table-cell table:style-name="ce25"/>
          <table:table-cell table:style-name="ce28" office:value-type="float" office:value="3075" calcext:value-type="float">
            <text:p>3075</text:p>
          </table:table-cell>
          <table:table-cell table:style-name="ce33" office:value-type="float" office:value="3494" calcext:value-type="float">
            <text:p>3494</text:p>
          </table:table-cell>
          <table:table-cell table:style-name="ce37" office:value-type="float" office:value="1683" calcext:value-type="float">
            <text:p>1683</text:p>
          </table:table-cell>
          <table:table-cell table:style-name="ce41" office:value-type="float" office:value="396" calcext:value-type="float">
            <text:p>396</text:p>
          </table:table-cell>
          <table:table-cell table:style-name="ce45" office:value-type="float" office:value="526" calcext:value-type="float">
            <text:p>526</text:p>
          </table:table-cell>
          <table:table-cell table:style-name="ce53" table:formula="of:=SUM([.D492:.H492])" office:value-type="float" office:value="9174" calcext:value-type="float">
            <text:p>9174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92]=126;70;IF([.T492]=112;70;IF([.T492]=98;70;IF([.T492]=96;60;IF([.T492]=84;60;IF([.T492]=108;60;IF([.T492]=90;50;IF([.T492]=72;40;IF([.T492]=80;40;IF([.T492]=100;50;IF([.T492]=54;30;IF([.T492]=36;20;IF([.T492]=18;10;IF([.T49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715141906/defenderoftexel/images/8/89/Kan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nu&quot;; &quot;Kanu&quot;)" office:value-type="string" office:string-value="Kanu" calcext:value-type="string">
            <text:p>Kanu</text:p>
          </table:table-cell>
          <table:table-cell table:style-name="ce25"/>
          <table:table-cell table:style-name="ce28" office:value-type="float" office:value="4924" calcext:value-type="float">
            <text:p>4924</text:p>
          </table:table-cell>
          <table:table-cell table:style-name="ce33" office:value-type="float" office:value="5632" calcext:value-type="float">
            <text:p>5632</text:p>
          </table:table-cell>
          <table:table-cell table:style-name="ce37" office:value-type="float" office:value="3020" calcext:value-type="float">
            <text:p>3020</text:p>
          </table:table-cell>
          <table:table-cell table:style-name="ce41" office:value-type="float" office:value="709" calcext:value-type="float">
            <text:p>709</text:p>
          </table:table-cell>
          <table:table-cell table:style-name="ce45" office:value-type="float" office:value="944" calcext:value-type="float">
            <text:p>944</text:p>
          </table:table-cell>
          <table:table-cell table:style-name="ce53" table:formula="of:=SUM([.D493:.H493])" office:value-type="float" office:value="15229" calcext:value-type="float">
            <text:p>15229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93]=126;70;IF([.T493]=112;70;IF([.T493]=98;70;IF([.T493]=96;60;IF([.T493]=84;60;IF([.T493]=108;60;IF([.T493]=90;50;IF([.T493]=72;40;IF([.T493]=80;40;IF([.T493]=100;50;IF([.T493]=54;30;IF([.T493]=36;20;IF([.T493]=18;10;IF([.T49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33450/defenderoftexel/images/thumb/e/ed/Karopithla_Icon.png/50px-Karopith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ropithla&quot;; &quot;Karopithla&quot;)" office:value-type="string" office:string-value="Karopithla" calcext:value-type="string">
            <text:p>Karopithla</text:p>
          </table:table-cell>
          <table:table-cell table:style-name="ce25"/>
          <table:table-cell table:style-name="ce28" office:value-type="float" office:value="1582" calcext:value-type="float">
            <text:p>1582</text:p>
          </table:table-cell>
          <table:table-cell table:style-name="ce33" office:value-type="float" office:value="3562" calcext:value-type="float">
            <text:p>3562</text:p>
          </table:table-cell>
          <table:table-cell table:style-name="ce37" office:value-type="float" office:value="814" calcext:value-type="float">
            <text:p>814</text:p>
          </table:table-cell>
          <table:table-cell table:style-name="ce41" office:value-type="float" office:value="3389" calcext:value-type="float">
            <text:p>3389</text:p>
          </table:table-cell>
          <table:table-cell table:style-name="ce45" office:value-type="float" office:value="1073" calcext:value-type="float">
            <text:p>1073</text:p>
          </table:table-cell>
          <table:table-cell table:style-name="ce53" table:formula="of:=SUM([.D494:.H494])" office:value-type="float" office:value="10420" calcext:value-type="float">
            <text:p>10420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94]=126;70;IF([.T494]=112;70;IF([.T494]=98;70;IF([.T494]=96;60;IF([.T494]=84;60;IF([.T494]=108;60;IF([.T494]=90;50;IF([.T494]=72;40;IF([.T494]=80;40;IF([.T494]=100;50;IF([.T494]=54;30;IF([.T494]=36;20;IF([.T494]=18;10;IF([.T49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2650/defenderoftexel/images/thumb/a/ab/Kastubili_Icon.png/50px-Kastubil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stubili&quot;; &quot;Kastubili&quot;)" office:value-type="string" office:string-value="Kastubili" calcext:value-type="string">
            <text:p>Kastubili</text:p>
          </table:table-cell>
          <table:table-cell table:style-name="ce25"/>
          <table:table-cell table:style-name="ce28" office:value-type="float" office:value="3412" calcext:value-type="float">
            <text:p>3412</text:p>
          </table:table-cell>
          <table:table-cell table:style-name="ce33" office:value-type="float" office:value="2884" calcext:value-type="float">
            <text:p>2884</text:p>
          </table:table-cell>
          <table:table-cell table:style-name="ce37" office:value-type="float" office:value="1479" calcext:value-type="float">
            <text:p>1479</text:p>
          </table:table-cell>
          <table:table-cell table:style-name="ce41" office:value-type="float" office:value="292" calcext:value-type="float">
            <text:p>292</text:p>
          </table:table-cell>
          <table:table-cell table:style-name="ce45" office:value-type="float" office:value="1106" calcext:value-type="float">
            <text:p>1106</text:p>
          </table:table-cell>
          <table:table-cell table:style-name="ce53" table:formula="of:=SUM([.D495:.H495])" office:value-type="float" office:value="9173" calcext:value-type="float">
            <text:p>9173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95]=126;70;IF([.T495]=112;70;IF([.T495]=98;70;IF([.T495]=96;60;IF([.T495]=84;60;IF([.T495]=108;60;IF([.T495]=90;50;IF([.T495]=72;40;IF([.T495]=80;40;IF([.T495]=100;50;IF([.T495]=54;30;IF([.T495]=36;20;IF([.T495]=18;10;IF([.T49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4.wikia.nocookie.net/__cb20140708192527/defenderoftexel/images/thumb/7/71/Kaverinikola_Icon.png/50px-Kaverinikol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osale_-_Pilea_-_Kaverinikola&quot;;&quot;Kaverinikola&quot;)" office:value-type="string" office:string-value="Kaverinikola" calcext:value-type="string">
            <text:p>Kaverinikol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688" calcext:value-type="float">
            <text:p>1688</text:p>
          </table:table-cell>
          <table:table-cell table:style-name="ce32" office:value-type="float" office:value="1185" calcext:value-type="float">
            <text:p>1185</text:p>
          </table:table-cell>
          <table:table-cell table:style-name="ce36" office:value-type="float" office:value="765" calcext:value-type="float">
            <text:p>765</text:p>
          </table:table-cell>
          <table:table-cell table:style-name="ce40" office:value-type="float" office:value="4855" calcext:value-type="float">
            <text:p>4855</text:p>
          </table:table-cell>
          <table:table-cell table:style-name="ce44" office:value-type="float" office:value="4624" calcext:value-type="float">
            <text:p>4624</text:p>
          </table:table-cell>
          <table:table-cell table:style-name="ce52" table:formula="of:=SUM([.D496:.H496])" office:value-type="float" office:value="13117" calcext:value-type="float">
            <text:p>13117</text:p>
          </table:table-cell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96]=126;70;IF([.T496]=112;70;IF([.T496]=98;70;IF([.T496]=96;60;IF([.T496]=84;60;IF([.T496]=108;60;IF([.T496]=90;50;IF([.T496]=72;40;IF([.T496]=80;40;IF([.T496]=100;50;IF([.T496]=54;30;IF([.T496]=36;20;IF([.T496]=18;10;IF([.T49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701153004/defenderoftexel/images/thumb/a/a3/Kavie_Icon.png/50px-Kavi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avie&quot;; &quot;Kavie&quot;)" office:value-type="string" office:string-value="Kavie" calcext:value-type="string">
            <text:p>Kavie</text:p>
          </table:table-cell>
          <table:table-cell table:style-name="ce25"/>
          <table:table-cell table:style-name="ce28" office:value-type="float" office:value="2087" calcext:value-type="float">
            <text:p>2087</text:p>
          </table:table-cell>
          <table:table-cell table:style-name="ce33" office:value-type="float" office:value="4856" calcext:value-type="float">
            <text:p>4856</text:p>
          </table:table-cell>
          <table:table-cell table:style-name="ce37" office:value-type="float" office:value="1058" calcext:value-type="float">
            <text:p>1058</text:p>
          </table:table-cell>
          <table:table-cell table:style-name="ce41" office:value-type="float" office:value="4609" calcext:value-type="float">
            <text:p>4609</text:p>
          </table:table-cell>
          <table:table-cell table:style-name="ce45" office:value-type="float" office:value="1406" calcext:value-type="float">
            <text:p>1406</text:p>
          </table:table-cell>
          <table:table-cell table:style-name="ce53" table:formula="of:=SUM([.D497:.H497])" office:value-type="float" office:value="14016" calcext:value-type="float">
            <text:p>14016</text:p>
          </table:table-cell>
          <table:table-cell table:style-name="ce60" office:value-type="string" calcext:value-type="string">
            <text:p>Nit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497]=126;70;IF([.T497]=112;70;IF([.T497]=98;70;IF([.T497]=96;60;IF([.T497]=84;60;IF([.T497]=108;60;IF([.T497]=90;50;IF([.T497]=72;40;IF([.T497]=80;40;IF([.T497]=100;50;IF([.T497]=54;30;IF([.T497]=36;20;IF([.T497]=18;10;IF([.T49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318133636/defenderoftexel/images/thumb/4/4a/Kaytifo_Icon.png/50px-Kaytifo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Kaytifo&quot;; &quot;Kaytifo&quot;)" office:value-type="string" office:string-value="Kaytifo" calcext:value-type="string">
            <text:p>Kaytifo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01" calcext:value-type="float">
            <text:p>2401</text:p>
          </table:table-cell>
          <table:table-cell table:style-name="ce32" office:value-type="float" office:value="2329" calcext:value-type="float">
            <text:p>2329</text:p>
          </table:table-cell>
          <table:table-cell table:style-name="ce36" office:value-type="float" office:value="1169" calcext:value-type="float">
            <text:p>1169</text:p>
          </table:table-cell>
          <table:table-cell table:style-name="ce40" office:value-type="float" office:value="2401" calcext:value-type="float">
            <text:p>2401</text:p>
          </table:table-cell>
          <table:table-cell table:style-name="ce44" office:value-type="float" office:value="6438" calcext:value-type="float">
            <text:p>6438</text:p>
          </table:table-cell>
          <table:table-cell table:style-name="ce52" table:formula="of:=SUM([.D498:.H498])" office:value-type="float" office:value="14738" calcext:value-type="float">
            <text:p>14738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98]=126;70;IF([.T498]=112;70;IF([.T498]=98;70;IF([.T498]=96;60;IF([.T498]=84;60;IF([.T498]=108;60;IF([.T498]=90;50;IF([.T498]=72;40;IF([.T498]=80;40;IF([.T498]=100;50;IF([.T498]=54;30;IF([.T498]=36;20;IF([.T498]=18;10;IF([.T49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1126125843/defenderoftexel/images/thumb/4/42/Keekeval_Icon.png/50px-Keekeva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Keekeval&quot;;&quot;Keekeval&quot;)" office:value-type="string" office:string-value="Keekeval" calcext:value-type="string">
            <text:p>Keekeva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315" calcext:value-type="float">
            <text:p>2315</text:p>
          </table:table-cell>
          <table:table-cell table:style-name="ce32" office:value-type="float" office:value="1764" calcext:value-type="float">
            <text:p>1764</text:p>
          </table:table-cell>
          <table:table-cell table:style-name="ce36" office:value-type="float" office:value="1201" calcext:value-type="float">
            <text:p>1201</text:p>
          </table:table-cell>
          <table:table-cell table:style-name="ce40" office:value-type="float" office:value="1709" calcext:value-type="float">
            <text:p>1709</text:p>
          </table:table-cell>
          <table:table-cell table:style-name="ce44" office:value-type="float" office:value="4319" calcext:value-type="float">
            <text:p>4319</text:p>
          </table:table-cell>
          <table:table-cell table:style-name="ce52" table:formula="of:=SUM([.D499:.H499])" office:value-type="float" office:value="11308" calcext:value-type="float">
            <text:p>11308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499]=126;70;IF([.T499]=112;70;IF([.T499]=98;70;IF([.T499]=96;60;IF([.T499]=84;60;IF([.T499]=108;60;IF([.T499]=90;50;IF([.T499]=72;40;IF([.T499]=80;40;IF([.T499]=100;50;IF([.T499]=54;30;IF([.T499]=36;20;IF([.T499]=18;10;IF([.T49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5/5e/Keratalio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Keratalios&quot;; &quot;Keratalios&quot;)" office:value-type="string" office:string-value="Keratalios" calcext:value-type="string">
            <text:p>Keratalio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491" calcext:value-type="float">
            <text:p>3491</text:p>
          </table:table-cell>
          <table:table-cell table:style-name="ce32" office:value-type="float" office:value="2950" calcext:value-type="float">
            <text:p>2950</text:p>
          </table:table-cell>
          <table:table-cell table:style-name="ce36" office:value-type="float" office:value="1513" calcext:value-type="float">
            <text:p>1513</text:p>
          </table:table-cell>
          <table:table-cell table:style-name="ce40" office:value-type="float" office:value="298" calcext:value-type="float">
            <text:p>298</text:p>
          </table:table-cell>
          <table:table-cell table:style-name="ce44" office:value-type="float" office:value="1133" calcext:value-type="float">
            <text:p>1133</text:p>
          </table:table-cell>
          <table:table-cell table:style-name="ce52" table:formula="of:=SUM([.D500:.H500])" office:value-type="float" office:value="9385" calcext:value-type="float">
            <text:p>9385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00]=126;70;IF([.T500]=112;70;IF([.T500]=98;70;IF([.T500]=96;60;IF([.T500]=84;60;IF([.T500]=108;60;IF([.T500]=90;50;IF([.T500]=72;40;IF([.T500]=80;40;IF([.T500]=100;50;IF([.T500]=54;30;IF([.T500]=36;20;IF([.T500]=18;10;IF([.T500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15144305/defenderoftexel/images/thumb/9/96/Kerecacpa_Icon.png/50px-Kerecacp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erecacpa&quot;;&quot;Kerecacpa&quot;)" office:value-type="string" office:string-value="Kerecacpa" calcext:value-type="string">
            <text:p>Kerecacpa</text:p>
          </table:table-cell>
          <table:table-cell table:style-name="ce25"/>
          <table:table-cell table:style-name="ce28" office:value-type="float" office:value="4630" calcext:value-type="float">
            <text:p>4630</text:p>
          </table:table-cell>
          <table:table-cell table:style-name="ce33" office:value-type="float" office:value="5386" calcext:value-type="float">
            <text:p>5386</text:p>
          </table:table-cell>
          <table:table-cell table:style-name="ce37" office:value-type="float" office:value="3749" calcext:value-type="float">
            <text:p>3749</text:p>
          </table:table-cell>
          <table:table-cell table:style-name="ce41" office:value-type="float" office:value="526" calcext:value-type="float">
            <text:p>526</text:p>
          </table:table-cell>
          <table:table-cell table:style-name="ce45" office:value-type="float" office:value="636" calcext:value-type="float">
            <text:p>636</text:p>
          </table:table-cell>
          <table:table-cell table:style-name="ce53" table:formula="of:=SUM([.D501:.H501])" office:value-type="float" office:value="14927" calcext:value-type="float">
            <text:p>14927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1]=126;70;IF([.T501]=112;70;IF([.T501]=98;70;IF([.T501]=96;60;IF([.T501]=84;60;IF([.T501]=108;60;IF([.T501]=90;50;IF([.T501]=72;40;IF([.T501]=80;40;IF([.T501]=100;50;IF([.T501]=54;30;IF([.T501]=36;20;IF([.T501]=18;10;IF([.T50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225100523/defenderoftexel/images/thumb/7/79/Khiddo_Icon.png/50px-Khidd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hiddo&quot;; &quot;Khiddo&quot;)" office:value-type="string" office:string-value="Khiddo" calcext:value-type="string">
            <text:p>Khiddo</text:p>
          </table:table-cell>
          <table:table-cell table:style-name="ce25"/>
          <table:table-cell table:style-name="ce28" office:value-type="float" office:value="2657" calcext:value-type="float">
            <text:p>2657</text:p>
          </table:table-cell>
          <table:table-cell table:style-name="ce33" office:value-type="float" office:value="4039" calcext:value-type="float">
            <text:p>4039</text:p>
          </table:table-cell>
          <table:table-cell table:style-name="ce37" office:value-type="float" office:value="1381" calcext:value-type="float">
            <text:p>1381</text:p>
          </table:table-cell>
          <table:table-cell table:style-name="ce41" office:value-type="float" office:value="831" calcext:value-type="float">
            <text:p>831</text:p>
          </table:table-cell>
          <table:table-cell table:style-name="ce45" office:value-type="float" office:value="4189" calcext:value-type="float">
            <text:p>4189</text:p>
          </table:table-cell>
          <table:table-cell table:style-name="ce53" table:formula="of:=SUM([.D502:.H502])" office:value-type="float" office:value="13097" calcext:value-type="float">
            <text:p>13097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2]=126;70;IF([.T502]=112;70;IF([.T502]=98;70;IF([.T502]=96;60;IF([.T502]=84;60;IF([.T502]=108;60;IF([.T502]=90;50;IF([.T502]=72;40;IF([.T502]=80;40;IF([.T502]=100;50;IF([.T502]=54;30;IF([.T502]=36;20;IF([.T502]=18;10;IF([.T50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17111906/defenderoftexel/images/thumb/4/4b/Khodadad_Bornfree_Icon.png/50px-Khodadad_Bornfre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hodadad_Bornfree&quot;; &quot;Khodadad Bornfree&quot;)" office:value-type="string" office:string-value="Khodadad Bornfree" calcext:value-type="string">
            <text:p>Khodadad Bornfree</text:p>
          </table:table-cell>
          <table:table-cell table:style-name="ce25"/>
          <table:table-cell table:style-name="ce28" office:value-type="float" office:value="4310" calcext:value-type="float">
            <text:p>4310</text:p>
          </table:table-cell>
          <table:table-cell table:style-name="ce33" office:value-type="float" office:value="4927" calcext:value-type="float">
            <text:p>4927</text:p>
          </table:table-cell>
          <table:table-cell table:style-name="ce37" office:value-type="float" office:value="2641" calcext:value-type="float">
            <text:p>2641</text:p>
          </table:table-cell>
          <table:table-cell table:style-name="ce41" office:value-type="float" office:value="621" calcext:value-type="float">
            <text:p>621</text:p>
          </table:table-cell>
          <table:table-cell table:style-name="ce45" office:value-type="float" office:value="825" calcext:value-type="float">
            <text:p>825</text:p>
          </table:table-cell>
          <table:table-cell table:style-name="ce53" table:formula="of:=SUM([.D503:.H503])" office:value-type="float" office:value="13324" calcext:value-type="float">
            <text:p>13324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3]=126;70;IF([.T503]=112;70;IF([.T503]=98;70;IF([.T503]=96;60;IF([.T503]=84;60;IF([.T503]=108;60;IF([.T503]=90;50;IF([.T503]=72;40;IF([.T503]=80;40;IF([.T503]=100;50;IF([.T503]=54;30;IF([.T503]=36;20;IF([.T503]=18;10;IF([.T50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722163330/defenderoftexel/images/thumb/e/e8/Khshayarsha_Icon.png/50px-Khshayarsh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hshayarsha&quot;; &quot;Khshayarsha&quot;)" office:value-type="string" office:string-value="Khshayarsha" calcext:value-type="string">
            <text:p>Khshayarsha</text:p>
          </table:table-cell>
          <table:table-cell table:style-name="ce25"/>
          <table:table-cell table:style-name="ce28" office:value-type="float" office:value="1989" calcext:value-type="float">
            <text:p>1989</text:p>
          </table:table-cell>
          <table:table-cell table:style-name="ce33" office:value-type="float" office:value="4628" calcext:value-type="float">
            <text:p>4628</text:p>
          </table:table-cell>
          <table:table-cell table:style-name="ce37" office:value-type="float" office:value="1008" calcext:value-type="float">
            <text:p>1008</text:p>
          </table:table-cell>
          <table:table-cell table:style-name="ce41" office:value-type="float" office:value="4394" calcext:value-type="float">
            <text:p>4394</text:p>
          </table:table-cell>
          <table:table-cell table:style-name="ce45" office:value-type="float" office:value="1337" calcext:value-type="float">
            <text:p>1337</text:p>
          </table:table-cell>
          <table:table-cell table:style-name="ce53" table:formula="of:=SUM([.D504:.H504])" office:value-type="float" office:value="13356" calcext:value-type="float">
            <text:p>13356</text:p>
          </table:table-cell>
          <table:table-cell table:style-name="ce60" office:value-type="string" calcext:value-type="string">
            <text:p>Doublefry</text:p>
          </table:table-cell>
          <table:table-cell table:style-name="ce60" office:value-type="string" calcext:value-type="string">
            <text:p>Double 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4]=126;70;IF([.T504]=112;70;IF([.T504]=98;70;IF([.T504]=96;60;IF([.T504]=84;60;IF([.T504]=108;60;IF([.T504]=90;50;IF([.T504]=72;40;IF([.T504]=80;40;IF([.T504]=100;50;IF([.T504]=54;30;IF([.T504]=36;20;IF([.T504]=18;10;IF([.T504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9/9b/Kibisegi_Icon.png/revision/latest?cb=20150419131840&quot;)" office:value-type="string" office:string-value="" calcext:value-type="error">
            <text:p>#NAME?</text:p>
          </table:table-cell>
          <table:table-cell table:style-name="ce11" table:formula="of:=HYPERLINK(&quot;http://defenderoftexel.wikia.com/wiki/Dub_-_Anugia_-_Kibisegi&quot;;&quot;Kibisegi&quot;)" office:value-type="string" office:string-value="Kibisegi" calcext:value-type="string">
            <text:p>Kibisegi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34" calcext:value-type="float">
            <text:p>2434</text:p>
          </table:table-cell>
          <table:table-cell table:style-name="ce32" office:value-type="float" office:value="5659" calcext:value-type="float">
            <text:p>5659</text:p>
          </table:table-cell>
          <table:table-cell table:style-name="ce36" office:value-type="float" office:value="1234" calcext:value-type="float">
            <text:p>1234</text:p>
          </table:table-cell>
          <table:table-cell table:style-name="ce40" office:value-type="float" office:value="5374" calcext:value-type="float">
            <text:p>5374</text:p>
          </table:table-cell>
          <table:table-cell table:style-name="ce44" office:value-type="float" office:value="1639" calcext:value-type="float">
            <text:p>1639</text:p>
          </table:table-cell>
          <table:table-cell table:style-name="ce52" table:formula="of:=SUM([.D505:.H505])" office:value-type="float" office:value="16340" calcext:value-type="float">
            <text:p>16340</text:p>
          </table:table-cell>
          <table:table-cell table:style-name="ce59" office:value-type="string" calcext:value-type="string">
            <text:p>Smi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05]=126;70;IF([.T505]=112;70;IF([.T505]=98;70;IF([.T505]=96;60;IF([.T505]=84;60;IF([.T505]=108;60;IF([.T505]=90;50;IF([.T505]=72;40;IF([.T505]=80;40;IF([.T505]=100;50;IF([.T505]=54;30;IF([.T505]=36;20;IF([.T505]=18;10;IF([.T50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128154513/defenderoftexel/images/thumb/f/fe/Kir_Icon.png/50px-Ki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ir&quot;; &quot;Kir&quot;)" office:value-type="string" office:string-value="Kir" calcext:value-type="string">
            <text:p>Kir</text:p>
          </table:table-cell>
          <table:table-cell table:style-name="ce25"/>
          <table:table-cell table:style-name="ce28" office:value-type="float" office:value="5125" calcext:value-type="float">
            <text:p>5125</text:p>
          </table:table-cell>
          <table:table-cell table:style-name="ce33" office:value-type="float" office:value="5861" calcext:value-type="float">
            <text:p>5861</text:p>
          </table:table-cell>
          <table:table-cell table:style-name="ce37" office:value-type="float" office:value="3140" calcext:value-type="float">
            <text:p>3140</text:p>
          </table:table-cell>
          <table:table-cell table:style-name="ce41" office:value-type="float" office:value="738" calcext:value-type="float">
            <text:p>738</text:p>
          </table:table-cell>
          <table:table-cell table:style-name="ce45" office:value-type="float" office:value="982" calcext:value-type="float">
            <text:p>982</text:p>
          </table:table-cell>
          <table:table-cell table:style-name="ce53" table:formula="of:=SUM([.D506:.H506])" office:value-type="float" office:value="15846" calcext:value-type="float">
            <text:p>15846</text:p>
          </table:table-cell>
          <table:table-cell table:style-name="ce60" office:value-type="string" calcext:value-type="string">
            <text:p>Ven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6]=126;70;IF([.T506]=112;70;IF([.T506]=98;70;IF([.T506]=96;60;IF([.T506]=84;60;IF([.T506]=108;60;IF([.T506]=90;50;IF([.T506]=72;40;IF([.T506]=80;40;IF([.T506]=100;50;IF([.T506]=54;30;IF([.T506]=36;20;IF([.T506]=18;10;IF([.T50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701153144/defenderoftexel/images/e/e2/Kohinoo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mira_-_Mahnaz_-_Kohinoor&quot;; &quot;Kohinoor&quot;)" office:value-type="string" office:string-value="Kohinoor" calcext:value-type="string">
            <text:p>Kohinoor</text:p>
          </table:table-cell>
          <table:table-cell table:style-name="ce25"/>
          <table:table-cell table:style-name="ce28" office:value-type="float" office:value="2865" calcext:value-type="float">
            <text:p>2865</text:p>
          </table:table-cell>
          <table:table-cell table:style-name="ce33" office:value-type="float" office:value="4358" calcext:value-type="float">
            <text:p>4358</text:p>
          </table:table-cell>
          <table:table-cell table:style-name="ce37" office:value-type="float" office:value="1488" calcext:value-type="float">
            <text:p>1488</text:p>
          </table:table-cell>
          <table:table-cell table:style-name="ce41" office:value-type="float" office:value="898" calcext:value-type="float">
            <text:p>898</text:p>
          </table:table-cell>
          <table:table-cell table:style-name="ce45" office:value-type="float" office:value="4520" calcext:value-type="float">
            <text:p>4520</text:p>
          </table:table-cell>
          <table:table-cell table:style-name="ce53" table:formula="of:=SUM([.D507:.H507])" office:value-type="float" office:value="14129" calcext:value-type="float">
            <text:p>14129</text:p>
          </table:table-cell>
          <table:table-cell table:style-name="ce60" office:value-type="string" calcext:value-type="string">
            <text:p>Nit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7]=126;70;IF([.T507]=112;70;IF([.T507]=98;70;IF([.T507]=96;60;IF([.T507]=84;60;IF([.T507]=108;60;IF([.T507]=90;50;IF([.T507]=72;40;IF([.T507]=80;40;IF([.T507]=100;50;IF([.T507]=54;30;IF([.T507]=36;20;IF([.T507]=18;10;IF([.T50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057/defenderoftexel/images/thumb/4/4b/Koikolida_Icon.png/50px-Koikolid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oikolida&quot;; &quot;Koikolida&quot;)" office:value-type="string" office:string-value="Koikolida" calcext:value-type="string">
            <text:p>Koikolida</text:p>
          </table:table-cell>
          <table:table-cell table:style-name="ce25"/>
          <table:table-cell table:style-name="ce28" office:value-type="float" office:value="1544" calcext:value-type="float">
            <text:p>1544</text:p>
          </table:table-cell>
          <table:table-cell table:style-name="ce33" office:value-type="float" office:value="1652" calcext:value-type="float">
            <text:p>1652</text:p>
          </table:table-cell>
          <table:table-cell table:style-name="ce37" office:value-type="float" office:value="780" calcext:value-type="float">
            <text:p>780</text:p>
          </table:table-cell>
          <table:table-cell table:style-name="ce41" office:value-type="float" office:value="1330" calcext:value-type="float">
            <text:p>1330</text:p>
          </table:table-cell>
          <table:table-cell table:style-name="ce48" office:value-type="float" office:value="1223" calcext:value-type="float">
            <text:p>1223</text:p>
          </table:table-cell>
          <table:table-cell table:style-name="ce53" table:formula="of:=SUM([.D508:.H508])" office:value-type="float" office:value="6529" calcext:value-type="float">
            <text:p>6529</text:p>
          </table:table-cell>
          <table:table-cell table:style-name="ce60" office:value-type="string" calcext:value-type="string">
            <text:p>Smit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8]=126;70;IF([.T508]=112;70;IF([.T508]=98;70;IF([.T508]=96;60;IF([.T508]=84;60;IF([.T508]=108;60;IF([.T508]=90;50;IF([.T508]=72;40;IF([.T508]=80;40;IF([.T508]=100;50;IF([.T508]=54;30;IF([.T508]=36;20;IF([.T508]=18;10;IF([.T50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3558/defenderoftexel/images/thumb/5/50/Komozoi_Icon.png/40px-Komozo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omozoi&quot;; &quot;Komozoi&quot;)" office:value-type="string" office:string-value="Komozoi" calcext:value-type="string">
            <text:p>Komozoi</text:p>
          </table:table-cell>
          <table:table-cell table:style-name="ce25"/>
          <table:table-cell table:style-name="ce28" office:value-type="float" office:value="3111" calcext:value-type="float">
            <text:p>3111</text:p>
          </table:table-cell>
          <table:table-cell table:style-name="ce33" office:value-type="float" office:value="3055" calcext:value-type="float">
            <text:p>3055</text:p>
          </table:table-cell>
          <table:table-cell table:style-name="ce37" office:value-type="float" office:value="1349" calcext:value-type="float">
            <text:p>1349</text:p>
          </table:table-cell>
          <table:table-cell table:style-name="ce41" office:value-type="float" office:value="266" calcext:value-type="float">
            <text:p>266</text:p>
          </table:table-cell>
          <table:table-cell table:style-name="ce48" office:value-type="float" office:value="1506" calcext:value-type="float">
            <text:p>1506</text:p>
          </table:table-cell>
          <table:table-cell table:style-name="ce53" table:formula="of:=SUM([.D509:.H509])" office:value-type="float" office:value="9287" calcext:value-type="float">
            <text:p>9287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09]=126;70;IF([.T509]=112;70;IF([.T509]=98;70;IF([.T509]=96;60;IF([.T509]=84;60;IF([.T509]=108;60;IF([.T509]=90;50;IF([.T509]=72;40;IF([.T509]=80;40;IF([.T509]=100;50;IF([.T509]=54;30;IF([.T509]=36;20;IF([.T509]=18;10;IF([.T50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3.wikia.nocookie.net/__cb20140610143243/defenderoftexel/images/thumb/e/e2/Krisa_Icon.png/50px-Kris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Krisa&quot;; &quot;Krisa&quot;)" office:value-type="string" office:string-value="Krisa" calcext:value-type="string">
            <text:p>Kris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00" calcext:value-type="float">
            <text:p>1800</text:p>
          </table:table-cell>
          <table:table-cell table:style-name="ce32" office:value-type="float" office:value="1052" calcext:value-type="float">
            <text:p>1052</text:p>
          </table:table-cell>
          <table:table-cell table:style-name="ce36" office:value-type="float" office:value="1232" calcext:value-type="float">
            <text:p>1232</text:p>
          </table:table-cell>
          <table:table-cell table:style-name="ce40" office:value-type="float" office:value="4857" calcext:value-type="float">
            <text:p>4857</text:p>
          </table:table-cell>
          <table:table-cell table:style-name="ce49" office:value-type="float" office:value="6083" calcext:value-type="float">
            <text:p>6083</text:p>
          </table:table-cell>
          <table:table-cell table:style-name="ce52" table:formula="of:=SUM([.D510:.H510])" office:value-type="float" office:value="15024" calcext:value-type="float">
            <text:p>15024</text:p>
          </table:table-cell>
          <table:table-cell table:style-name="ce59" office:value-type="string" calcext:value-type="string">
            <text:p>Zhap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10]=126;70;IF([.T510]=112;70;IF([.T510]=98;70;IF([.T510]=96;60;IF([.T510]=84;60;IF([.T510]=108;60;IF([.T510]=90;50;IF([.T510]=72;40;IF([.T510]=80;40;IF([.T510]=100;50;IF([.T510]=54;30;IF([.T510]=36;20;IF([.T510]=18;10;IF([.T51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608172236/defenderoftexel/images/thumb/5/52/Ksathra_Icon.png/50px-Ksath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avash_-_Naseem_-_Ksathra&quot;; &quot;Ksathra&quot;)" office:value-type="string" office:string-value="Ksathra" calcext:value-type="string">
            <text:p>Ksathra</text:p>
          </table:table-cell>
          <table:table-cell table:style-name="ce25"/>
          <table:table-cell table:style-name="ce28" office:value-type="float" office:value="4433" calcext:value-type="float">
            <text:p>4433</text:p>
          </table:table-cell>
          <table:table-cell table:style-name="ce33" office:value-type="float" office:value="4828" calcext:value-type="float">
            <text:p>4828</text:p>
          </table:table-cell>
          <table:table-cell table:style-name="ce37" office:value-type="float" office:value="3667" calcext:value-type="float">
            <text:p>3667</text:p>
          </table:table-cell>
          <table:table-cell table:style-name="ce41" office:value-type="float" office:value="772" calcext:value-type="float">
            <text:p>772</text:p>
          </table:table-cell>
          <table:table-cell table:style-name="ce48" office:value-type="float" office:value="507" calcext:value-type="float">
            <text:p>507</text:p>
          </table:table-cell>
          <table:table-cell table:style-name="ce53" table:formula="of:=SUM([.D511:.H511])" office:value-type="float" office:value="14207" calcext:value-type="float">
            <text:p>14207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1]=126;70;IF([.T511]=112;70;IF([.T511]=98;70;IF([.T511]=96;60;IF([.T511]=84;60;IF([.T511]=108;60;IF([.T511]=90;50;IF([.T511]=72;40;IF([.T511]=80;40;IF([.T511]=100;50;IF([.T511]=54;30;IF([.T511]=36;20;IF([.T511]=18;10;IF([.T51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52649/defenderoftexel/images/3/31/Ku-Ay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u-Aya&quot;; &quot;Ku-Aya&quot;)" office:value-type="string" office:string-value="Ku-Aya" calcext:value-type="string">
            <text:p>Ku-Aya</text:p>
          </table:table-cell>
          <table:table-cell table:style-name="ce25"/>
          <table:table-cell table:style-name="ce28" office:value-type="float" office:value="1911" calcext:value-type="float">
            <text:p>1911</text:p>
          </table:table-cell>
          <table:table-cell table:style-name="ce33" office:value-type="float" office:value="1597" calcext:value-type="float">
            <text:p>1597</text:p>
          </table:table-cell>
          <table:table-cell table:style-name="ce37" office:value-type="float" office:value="788" calcext:value-type="float">
            <text:p>788</text:p>
          </table:table-cell>
          <table:table-cell table:style-name="ce41" office:value-type="float" office:value="146" calcext:value-type="float">
            <text:p>146</text:p>
          </table:table-cell>
          <table:table-cell table:style-name="ce48" office:value-type="float" office:value="580" calcext:value-type="float">
            <text:p>580</text:p>
          </table:table-cell>
          <table:table-cell table:style-name="ce53" table:formula="of:=SUM([.D512:.H512])" office:value-type="float" office:value="5022" calcext:value-type="float">
            <text:p>5022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2]=126;70;IF([.T512]=112;70;IF([.T512]=98;70;IF([.T512]=96;60;IF([.T512]=84;60;IF([.T512]=108;60;IF([.T512]=90;50;IF([.T512]=72;40;IF([.T512]=80;40;IF([.T512]=100;50;IF([.T512]=54;30;IF([.T512]=36;20;IF([.T512]=18;10;IF([.T51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722160652/defenderoftexel/images/thumb/7/71/Kudur_Icon.png/50px-Kudu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udur&quot;; &quot;Kudur&quot;)" office:value-type="string" office:string-value="Kudur" calcext:value-type="string">
            <text:p>Kudur</text:p>
          </table:table-cell>
          <table:table-cell table:style-name="ce25"/>
          <table:table-cell table:style-name="ce28" office:value-type="float" office:value="2692" calcext:value-type="float">
            <text:p>2692</text:p>
          </table:table-cell>
          <table:table-cell table:style-name="ce33" office:value-type="float" office:value="4092" calcext:value-type="float">
            <text:p>4092</text:p>
          </table:table-cell>
          <table:table-cell table:style-name="ce37" office:value-type="float" office:value="1399" calcext:value-type="float">
            <text:p>1399</text:p>
          </table:table-cell>
          <table:table-cell table:style-name="ce41" office:value-type="float" office:value="842" calcext:value-type="float">
            <text:p>842</text:p>
          </table:table-cell>
          <table:table-cell table:style-name="ce48" office:value-type="float" office:value="4246" calcext:value-type="float">
            <text:p>4246</text:p>
          </table:table-cell>
          <table:table-cell table:style-name="ce53" table:formula="of:=SUM([.D513:.H513])" office:value-type="float" office:value="13271" calcext:value-type="float">
            <text:p>13271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3]=126;70;IF([.T513]=112;70;IF([.T513]=98;70;IF([.T513]=96;60;IF([.T513]=84;60;IF([.T513]=108;60;IF([.T513]=90;50;IF([.T513]=72;40;IF([.T513]=80;40;IF([.T513]=100;50;IF([.T513]=54;30;IF([.T513]=36;20;IF([.T513]=18;10;IF([.T513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5/51/Kudurru_Icon.png/revision/latest?cb=20150502071533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l_-_Girrabun_-_Kudurru&quot;;&quot;Kudurru&quot;)" office:value-type="string" office:string-value="Kudurru" calcext:value-type="string">
            <text:p>Kudurr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514:.H514])" office:value-type="float" office:value="5" calcext:value-type="float">
            <text:p>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14]=126;70;IF([.T514]=112;70;IF([.T514]=98;70;IF([.T514]=96;60;IF([.T514]=84;60;IF([.T514]=108;60;IF([.T514]=90;50;IF([.T514]=72;40;IF([.T514]=80;40;IF([.T514]=100;50;IF([.T514]=54;30;IF([.T514]=36;20;IF([.T514]=18;10;IF([.T514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44861/defenderoftexel/images/6/6a/Kur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uri&quot;; &quot;Kuri&quot;)" office:value-type="string" office:string-value="Kuri" calcext:value-type="string">
            <text:p>Kuri</text:p>
          </table:table-cell>
          <table:table-cell table:style-name="ce25"/>
          <table:table-cell table:style-name="ce28" office:value-type="float" office:value="5094" calcext:value-type="float">
            <text:p>5094</text:p>
          </table:table-cell>
          <table:table-cell table:style-name="ce33" office:value-type="float" office:value="4306" calcext:value-type="float">
            <text:p>4306</text:p>
          </table:table-cell>
          <table:table-cell table:style-name="ce37" office:value-type="float" office:value="2209" calcext:value-type="float">
            <text:p>2209</text:p>
          </table:table-cell>
          <table:table-cell table:style-name="ce41" office:value-type="float" office:value="435" calcext:value-type="float">
            <text:p>435</text:p>
          </table:table-cell>
          <table:table-cell table:style-name="ce45" office:value-type="float" office:value="1652" calcext:value-type="float">
            <text:p>1652</text:p>
          </table:table-cell>
          <table:table-cell table:style-name="ce53" table:formula="of:=SUM([.D515:.H515])" office:value-type="float" office:value="13696" calcext:value-type="float">
            <text:p>13696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5]=126;70;IF([.T515]=112;70;IF([.T515]=98;70;IF([.T515]=96;60;IF([.T515]=84;60;IF([.T515]=108;60;IF([.T515]=90;50;IF([.T515]=72;40;IF([.T515]=80;40;IF([.T515]=100;50;IF([.T515]=54;30;IF([.T515]=36;20;IF([.T515]=18;10;IF([.T51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2651/defenderoftexel/images/thumb/6/60/Labashi_Icon.png/50px-Labash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abashi&quot;; &quot;Labashi&quot;)" office:value-type="string" office:string-value="Labashi" calcext:value-type="string">
            <text:p>Labashi</text:p>
          </table:table-cell>
          <table:table-cell table:style-name="ce25"/>
          <table:table-cell table:style-name="ce28" office:value-type="float" office:value="3647" calcext:value-type="float">
            <text:p>3647</text:p>
          </table:table-cell>
          <table:table-cell table:style-name="ce33" office:value-type="float" office:value="3108" calcext:value-type="float">
            <text:p>3108</text:p>
          </table:table-cell>
          <table:table-cell table:style-name="ce37" office:value-type="float" office:value="1638" calcext:value-type="float">
            <text:p>1638</text:p>
          </table:table-cell>
          <table:table-cell table:style-name="ce41" office:value-type="float" office:value="333" calcext:value-type="float">
            <text:p>333</text:p>
          </table:table-cell>
          <table:table-cell table:style-name="ce45" office:value-type="float" office:value="1233" calcext:value-type="float">
            <text:p>1233</text:p>
          </table:table-cell>
          <table:table-cell table:style-name="ce53" table:formula="of:=SUM([.D516:.H516])" office:value-type="float" office:value="9959" calcext:value-type="float">
            <text:p>9959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6]=126;70;IF([.T516]=112;70;IF([.T516]=98;70;IF([.T516]=96;60;IF([.T516]=84;60;IF([.T516]=108;60;IF([.T516]=90;50;IF([.T516]=72;40;IF([.T516]=80;40;IF([.T516]=100;50;IF([.T516]=54;30;IF([.T516]=36;20;IF([.T516]=18;10;IF([.T51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520110419/defenderoftexel/images/3/31/Lady_of_the_Lak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dy_of_the_Lake&quot;; &quot;Lady of the Lake&quot;)" office:value-type="string" office:string-value="Lady of the Lake" calcext:value-type="string">
            <text:p>Lady of the Lake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8245" calcext:value-type="float">
            <text:p>8245</text:p>
          </table:table-cell>
          <table:table-cell table:style-name="ce32" office:value-type="float" office:value="1093" calcext:value-type="float">
            <text:p>1093</text:p>
          </table:table-cell>
          <table:table-cell table:style-name="ce36" office:value-type="float" office:value="2944" calcext:value-type="float">
            <text:p>2944</text:p>
          </table:table-cell>
          <table:table-cell table:style-name="ce40" office:value-type="float" office:value="16930" calcext:value-type="float">
            <text:p>16930</text:p>
          </table:table-cell>
          <table:table-cell table:style-name="ce44" office:value-type="float" office:value="5597" calcext:value-type="float">
            <text:p>5597</text:p>
          </table:table-cell>
          <table:table-cell table:style-name="ce52" table:formula="of:=SUM([.D517:.H517])" office:value-type="float" office:value="34809" calcext:value-type="float">
            <text:p>34809</text:p>
          </table:table-cell>
          <table:table-cell table:style-name="ce59" office:value-type="string" calcext:value-type="string">
            <text:p>Afanc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517]=126;70;IF([.T517]=112;70;IF([.T517]=98;70;IF([.T517]=96;60;IF([.T517]=84;60;IF([.T517]=108;60;IF([.T517]=90;50;IF([.T517]=72;40;IF([.T517]=80;40;IF([.T517]=100;50;IF([.T517]=54;30;IF([.T517]=36;20;IF([.T517]=18;10;IF([.T517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0181955/defenderoftexel/images/thumb/f/f2/Lagashe_Icon.png/50px-Lagash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agashe&quot;;&quot;Lagashe&quot;)" office:value-type="string" office:string-value="Lagashe" calcext:value-type="string">
            <text:p>Lagashe</text:p>
          </table:table-cell>
          <table:table-cell table:style-name="ce25"/>
          <table:table-cell table:style-name="ce28" office:value-type="float" office:value="11437" calcext:value-type="float">
            <text:p>11437</text:p>
          </table:table-cell>
          <table:table-cell table:style-name="ce33" office:value-type="float" office:value="8135" calcext:value-type="float">
            <text:p>8135</text:p>
          </table:table-cell>
          <table:table-cell table:style-name="ce37" office:value-type="float" office:value="9475" calcext:value-type="float">
            <text:p>9475</text:p>
          </table:table-cell>
          <table:table-cell table:style-name="ce41" office:value-type="float" office:value="993" calcext:value-type="float">
            <text:p>993</text:p>
          </table:table-cell>
          <table:table-cell table:style-name="ce45" office:value-type="float" office:value="1221" calcext:value-type="float">
            <text:p>1221</text:p>
          </table:table-cell>
          <table:table-cell table:style-name="ce53" table:formula="of:=SUM([.D518:.H518])" office:value-type="float" office:value="31261" calcext:value-type="float">
            <text:p>31261</text:p>
          </table:table-cell>
          <table:table-cell table:style-name="ce60" office:value-type="string" calcext:value-type="string">
            <text:p>Headga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518]=126;70;IF([.T518]=112;70;IF([.T518]=98;70;IF([.T518]=96;60;IF([.T518]=84;60;IF([.T518]=108;60;IF([.T518]=90;50;IF([.T518]=72;40;IF([.T518]=80;40;IF([.T518]=100;50;IF([.T518]=54;30;IF([.T518]=36;20;IF([.T518]=18;10;IF([.T51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401124948/defenderoftexel/images/thumb/c/c0/Lamcua_Icon.png/50px-Lamcu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amcua&quot;;&quot;Lamcua&quot;)" office:value-type="string" office:string-value="Lamcua" calcext:value-type="string">
            <text:p>Lamcua</text:p>
          </table:table-cell>
          <table:table-cell table:style-name="ce25"/>
          <table:table-cell table:style-name="ce28" office:value-type="float" office:value="2685" calcext:value-type="float">
            <text:p>2685</text:p>
          </table:table-cell>
          <table:table-cell table:style-name="ce33" office:value-type="float" office:value="4086" calcext:value-type="float">
            <text:p>4086</text:p>
          </table:table-cell>
          <table:table-cell table:style-name="ce37" office:value-type="float" office:value="1395" calcext:value-type="float">
            <text:p>1395</text:p>
          </table:table-cell>
          <table:table-cell table:style-name="ce41" office:value-type="float" office:value="840" calcext:value-type="float">
            <text:p>840</text:p>
          </table:table-cell>
          <table:table-cell table:style-name="ce45" office:value-type="float" office:value="4236" calcext:value-type="float">
            <text:p>4236</text:p>
          </table:table-cell>
          <table:table-cell table:style-name="ce53" table:formula="of:=SUM([.D519:.H519])" office:value-type="float" office:value="13242" calcext:value-type="float">
            <text:p>13242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19]=126;70;IF([.T519]=112;70;IF([.T519]=98;70;IF([.T519]=96;60;IF([.T519]=84;60;IF([.T519]=108;60;IF([.T519]=90;50;IF([.T519]=72;40;IF([.T519]=80;40;IF([.T519]=100;50;IF([.T519]=54;30;IF([.T519]=36;20;IF([.T519]=18;10;IF([.T51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3/3d/Lamenkhau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amenkhaur&quot;; &quot;Lamenkhaur&quot;)" office:value-type="string" office:string-value="Lamenkhaur" calcext:value-type="string">
            <text:p>Lamenkhau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159" calcext:value-type="float">
            <text:p>2159</text:p>
          </table:table-cell>
          <table:table-cell table:style-name="ce32" office:value-type="float" office:value="3900" calcext:value-type="float">
            <text:p>3900</text:p>
          </table:table-cell>
          <table:table-cell table:style-name="ce36" office:value-type="float" office:value="1303" calcext:value-type="float">
            <text:p>1303</text:p>
          </table:table-cell>
          <table:table-cell table:style-name="ce40" office:value-type="float" office:value="1475" calcext:value-type="float">
            <text:p>1475</text:p>
          </table:table-cell>
          <table:table-cell table:style-name="ce44" office:value-type="float" office:value="516" calcext:value-type="float">
            <text:p>516</text:p>
          </table:table-cell>
          <table:table-cell table:style-name="ce52" table:formula="of:=SUM([.D520:.H520])" office:value-type="float" office:value="9353" calcext:value-type="float">
            <text:p>9353</text:p>
          </table:table-cell>
          <table:table-cell table:style-name="ce59" office:value-type="string" calcext:value-type="string">
            <text:p>Kibos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20]=126;70;IF([.T520]=112;70;IF([.T520]=98;70;IF([.T520]=96;60;IF([.T520]=84;60;IF([.T520]=108;60;IF([.T520]=90;50;IF([.T520]=72;40;IF([.T520]=80;40;IF([.T520]=100;50;IF([.T520]=54;30;IF([.T520]=36;20;IF([.T520]=18;10;IF([.T52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5/52/Lauthra_Icon.png/revision/latest?cb=20150502071844&quot;)" office:value-type="string" office:string-value="" calcext:value-type="error">
            <text:p>#NAME?</text:p>
          </table:table-cell>
          <table:table-cell table:style-name="ce11" table:formula="of:=HYPERLINK(&quot;http://defenderoftexel.wikia.com/wiki/Syzette_-_Lauthra_-_Coenobetha&quot;;&quot;Lauthra&quot;)" office:value-type="string" office:string-value="Lauthra" calcext:value-type="string">
            <text:p>Lauthr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521:.H521])" office:value-type="float" office:value="5" calcext:value-type="float">
            <text:p>5</text:p>
          </table:table-cell>
          <table:table-cell table:style-name="ce59" office:value-type="string" calcext:value-type="string">
            <text:p>Bedwetter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21]=126;70;IF([.T521]=112;70;IF([.T521]=98;70;IF([.T521]=96;60;IF([.T521]=84;60;IF([.T521]=108;60;IF([.T521]=90;50;IF([.T521]=72;40;IF([.T521]=80;40;IF([.T521]=100;50;IF([.T521]=54;30;IF([.T521]=36;20;IF([.T521]=18;10;IF([.T521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40107154247/defenderoftexel/images/thumb/2/2f/Lazarre_Icon.png/50px-Lazarr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azarre&quot;; &quot;Lazarre&quot;)" office:value-type="string" office:string-value="Lazarre" calcext:value-type="string">
            <text:p>Lazarre</text:p>
          </table:table-cell>
          <table:table-cell table:style-name="ce25"/>
          <table:table-cell table:style-name="ce28" office:value-type="float" office:value="10028" calcext:value-type="float">
            <text:p>10028</text:p>
          </table:table-cell>
          <table:table-cell table:style-name="ce33" office:value-type="float" office:value="10934" calcext:value-type="float">
            <text:p>10934</text:p>
          </table:table-cell>
          <table:table-cell table:style-name="ce37" office:value-type="float" office:value="8287" calcext:value-type="float">
            <text:p>8287</text:p>
          </table:table-cell>
          <table:table-cell table:style-name="ce41" office:value-type="float" office:value="1758" calcext:value-type="float">
            <text:p>1758</text:p>
          </table:table-cell>
          <table:table-cell table:style-name="ce45" office:value-type="float" office:value="1150" calcext:value-type="float">
            <text:p>1150</text:p>
          </table:table-cell>
          <table:table-cell table:style-name="ce53" table:formula="of:=SUM([.D522:.H522])" office:value-type="float" office:value="32157" calcext:value-type="float">
            <text:p>32157</text:p>
          </table:table-cell>
          <table:table-cell table:style-name="ce60" office:value-type="string" calcext:value-type="string">
            <text:p>Nai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522]=126;70;IF([.T522]=112;70;IF([.T522]=98;70;IF([.T522]=96;60;IF([.T522]=84;60;IF([.T522]=108;60;IF([.T522]=90;50;IF([.T522]=72;40;IF([.T522]=80;40;IF([.T522]=100;50;IF([.T522]=54;30;IF([.T522]=36;20;IF([.T522]=18;10;IF([.T52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4255/defenderoftexel/images/thumb/2/27/Lecne_Icon.png/40px-Lec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ecne&quot;; &quot;Lecne&quot;)" office:value-type="string" office:string-value="Lecne" calcext:value-type="string">
            <text:p>Lecne</text:p>
          </table:table-cell>
          <table:table-cell table:style-name="ce25"/>
          <table:table-cell table:style-name="ce28" office:value-type="float" office:value="1645" calcext:value-type="float">
            <text:p>1645</text:p>
          </table:table-cell>
          <table:table-cell table:style-name="ce33" office:value-type="float" office:value="1252" calcext:value-type="float">
            <text:p>1252</text:p>
          </table:table-cell>
          <table:table-cell table:style-name="ce37" office:value-type="float" office:value="854" calcext:value-type="float">
            <text:p>854</text:p>
          </table:table-cell>
          <table:table-cell table:style-name="ce41" office:value-type="float" office:value="1215" calcext:value-type="float">
            <text:p>1215</text:p>
          </table:table-cell>
          <table:table-cell table:style-name="ce45" office:value-type="float" office:value="3070" calcext:value-type="float">
            <text:p>3070</text:p>
          </table:table-cell>
          <table:table-cell table:style-name="ce53" table:formula="of:=SUM([.D523:.H523])" office:value-type="float" office:value="8036" calcext:value-type="float">
            <text:p>8036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23]=126;70;IF([.T523]=112;70;IF([.T523]=98;70;IF([.T523]=96;60;IF([.T523]=84;60;IF([.T523]=108;60;IF([.T523]=90;50;IF([.T523]=72;40;IF([.T523]=80;40;IF([.T523]=100;50;IF([.T523]=54;30;IF([.T523]=36;20;IF([.T523]=18;10;IF([.T52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e/e7/Leguminiu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eguminius&quot;; &quot;Leguminius&quot;)" office:value-type="string" office:string-value="Leguminius" calcext:value-type="string">
            <text:p>Legumini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341" calcext:value-type="float">
            <text:p>2341</text:p>
          </table:table-cell>
          <table:table-cell table:style-name="ce32" office:value-type="float" office:value="2647" calcext:value-type="float">
            <text:p>2647</text:p>
          </table:table-cell>
          <table:table-cell table:style-name="ce36" office:value-type="float" office:value="4796" calcext:value-type="float">
            <text:p>4796</text:p>
          </table:table-cell>
          <table:table-cell table:style-name="ce40" office:value-type="float" office:value="239" calcext:value-type="float">
            <text:p>239</text:p>
          </table:table-cell>
          <table:table-cell table:style-name="ce44" office:value-type="float" office:value="205" calcext:value-type="float">
            <text:p>205</text:p>
          </table:table-cell>
          <table:table-cell table:style-name="ce52" table:formula="of:=SUM([.D524:.H524])" office:value-type="float" office:value="10228" calcext:value-type="float">
            <text:p>10228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24]=126;70;IF([.T524]=112;70;IF([.T524]=98;70;IF([.T524]=96;60;IF([.T524]=84;60;IF([.T524]=108;60;IF([.T524]=90;50;IF([.T524]=72;40;IF([.T524]=80;40;IF([.T524]=100;50;IF([.T524]=54;30;IF([.T524]=36;20;IF([.T524]=18;10;IF([.T52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705172231/defenderoftexel/images/5/5a/Levithan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evithania&quot;; &quot;Levithania&quot;)" office:value-type="string" office:string-value="Levithania" calcext:value-type="string">
            <text:p>Levithan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62" calcext:value-type="float">
            <text:p>1862</text:p>
          </table:table-cell>
          <table:table-cell table:style-name="ce32" office:value-type="float" office:value="1307" calcext:value-type="float">
            <text:p>1307</text:p>
          </table:table-cell>
          <table:table-cell table:style-name="ce36" office:value-type="float" office:value="843" calcext:value-type="float">
            <text:p>843</text:p>
          </table:table-cell>
          <table:table-cell table:style-name="ce40" office:value-type="float" office:value="5358" calcext:value-type="float">
            <text:p>5358</text:p>
          </table:table-cell>
          <table:table-cell table:style-name="ce44" office:value-type="float" office:value="5103" calcext:value-type="float">
            <text:p>5103</text:p>
          </table:table-cell>
          <table:table-cell table:style-name="ce52" table:formula="of:=SUM([.D525:.H525])" office:value-type="float" office:value="14473" calcext:value-type="float">
            <text:p>14473</text:p>
          </table:table-cell>
          <table:table-cell table:style-name="ce59" office:value-type="string" calcext:value-type="string">
            <text:p>Sipho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25]=126;70;IF([.T525]=112;70;IF([.T525]=98;70;IF([.T525]=96;60;IF([.T525]=84;60;IF([.T525]=108;60;IF([.T525]=90;50;IF([.T525]=72;40;IF([.T525]=80;40;IF([.T525]=100;50;IF([.T525]=54;30;IF([.T525]=36;20;IF([.T525]=18;10;IF([.T525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624160419/defenderoftexel/images/8/89/Lidan-Gu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r-Utur_-_Ul-Khum-Khum_-_Lidan-Gula&quot;; &quot;Lidan-Gula&quot;)" office:value-type="string" office:string-value="Lidan-Gula" calcext:value-type="string">
            <text:p>Lidan-Gula</text:p>
          </table:table-cell>
          <table:table-cell table:style-name="ce25"/>
          <table:table-cell table:style-name="ce28" office:value-type="float" office:value="3960" calcext:value-type="float">
            <text:p>3960</text:p>
          </table:table-cell>
          <table:table-cell table:style-name="ce33" office:value-type="float" office:value="5555" calcext:value-type="float">
            <text:p>5555</text:p>
          </table:table-cell>
          <table:table-cell table:style-name="ce37" office:value-type="float" office:value="1210" calcext:value-type="float">
            <text:p>1210</text:p>
          </table:table-cell>
          <table:table-cell table:style-name="ce41" office:value-type="float" office:value="3553" calcext:value-type="float">
            <text:p>3553</text:p>
          </table:table-cell>
          <table:table-cell table:style-name="ce45" office:value-type="float" office:value="1606" calcext:value-type="float">
            <text:p>1606</text:p>
          </table:table-cell>
          <table:table-cell table:style-name="ce53" table:formula="of:=SUM([.D526:.H526])" office:value-type="float" office:value="15884" calcext:value-type="float">
            <text:p>15884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26]=126;70;IF([.T526]=112;70;IF([.T526]=98;70;IF([.T526]=96;60;IF([.T526]=84;60;IF([.T526]=108;60;IF([.T526]=90;50;IF([.T526]=72;40;IF([.T526]=80;40;IF([.T526]=100;50;IF([.T526]=54;30;IF([.T526]=36;20;IF([.T526]=18;10;IF([.T52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527141122/defenderoftexel/images/thumb/b/b7/Liddo_Icon.png/50px-Lidd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iddo&quot;; &quot;Liddo&quot;)" office:value-type="string" office:string-value="Liddo" calcext:value-type="string">
            <text:p>Liddo</text:p>
          </table:table-cell>
          <table:table-cell table:style-name="ce25"/>
          <table:table-cell table:style-name="ce28" office:value-type="float" office:value="4602" calcext:value-type="float">
            <text:p>4602</text:p>
          </table:table-cell>
          <table:table-cell table:style-name="ce33" office:value-type="float" office:value="5263" calcext:value-type="float">
            <text:p>5263</text:p>
          </table:table-cell>
          <table:table-cell table:style-name="ce37" office:value-type="float" office:value="2821" calcext:value-type="float">
            <text:p>2821</text:p>
          </table:table-cell>
          <table:table-cell table:style-name="ce41" office:value-type="float" office:value="664" calcext:value-type="float">
            <text:p>664</text:p>
          </table:table-cell>
          <table:table-cell table:style-name="ce45" office:value-type="float" office:value="883" calcext:value-type="float">
            <text:p>883</text:p>
          </table:table-cell>
          <table:table-cell table:style-name="ce53" table:formula="of:=SUM([.D527:.H527])" office:value-type="float" office:value="14233" calcext:value-type="float">
            <text:p>14233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27]=126;70;IF([.T527]=112;70;IF([.T527]=98;70;IF([.T527]=96;60;IF([.T527]=84;60;IF([.T527]=108;60;IF([.T527]=90;50;IF([.T527]=72;40;IF([.T527]=80;40;IF([.T527]=100;50;IF([.T527]=54;30;IF([.T527]=36;20;IF([.T527]=18;10;IF([.T52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4/41/Lidunnam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idunnamu&quot;; &quot;Lidunnamu&quot;)" office:value-type="string" office:string-value="Lidunnamu" calcext:value-type="string">
            <text:p>Lidunnamu</text:p>
          </table:table-cell>
          <table:table-cell table:style-name="ce25"/>
          <table:table-cell table:style-name="ce28" office:value-type="float" office:value="4491" calcext:value-type="float">
            <text:p>4491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 office:value-type="float" office:value="2754" calcext:value-type="float">
            <text:p>2754</text:p>
          </table:table-cell>
          <table:table-cell table:style-name="ce41" office:value-type="float" office:value="649" calcext:value-type="float">
            <text:p>649</text:p>
          </table:table-cell>
          <table:table-cell table:style-name="ce45" office:value-type="float" office:value="863" calcext:value-type="float">
            <text:p>863</text:p>
          </table:table-cell>
          <table:table-cell table:style-name="ce53" table:formula="of:=SUM([.D528:.H528])" office:value-type="float" office:value="13892" calcext:value-type="float">
            <text:p>13892</text:p>
          </table:table-cell>
          <table:table-cell table:style-name="ce60" office:value-type="string" calcext:value-type="string">
            <text:p>Stamped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28]=126;70;IF([.T528]=112;70;IF([.T528]=98;70;IF([.T528]=96;60;IF([.T528]=84;60;IF([.T528]=108;60;IF([.T528]=90;50;IF([.T528]=72;40;IF([.T528]=80;40;IF([.T528]=100;50;IF([.T528]=54;30;IF([.T528]=36;20;IF([.T528]=18;10;IF([.T52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2952/defenderoftexel/images/0/0a/Li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ila&quot;; &quot;Lila&quot;)" office:value-type="string" office:string-value="Lila" calcext:value-type="string">
            <text:p>Lila</text:p>
          </table:table-cell>
          <table:table-cell table:style-name="ce25"/>
          <table:table-cell table:style-name="ce28" office:value-type="float" office:value="963" calcext:value-type="float">
            <text:p>963</text:p>
          </table:table-cell>
          <table:table-cell table:style-name="ce33" office:value-type="float" office:value="1031" calcext:value-type="float">
            <text:p>1031</text:p>
          </table:table-cell>
          <table:table-cell table:style-name="ce37" office:value-type="float" office:value="486" calcext:value-type="float">
            <text:p>486</text:p>
          </table:table-cell>
          <table:table-cell table:style-name="ce41" office:value-type="float" office:value="831" calcext:value-type="float">
            <text:p>831</text:p>
          </table:table-cell>
          <table:table-cell table:style-name="ce45" office:value-type="float" office:value="766" calcext:value-type="float">
            <text:p>766</text:p>
          </table:table-cell>
          <table:table-cell table:style-name="ce53" table:formula="of:=SUM([.D529:.H529])" office:value-type="float" office:value="4077" calcext:value-type="float">
            <text:p>4077</text:p>
          </table:table-cell>
          <table:table-cell table:style-name="ce60" office:value-type="string" calcext:value-type="string">
            <text:p>Quicken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29]=126;70;IF([.T529]=112;70;IF([.T529]=98;70;IF([.T529]=96;60;IF([.T529]=84;60;IF([.T529]=108;60;IF([.T529]=90;50;IF([.T529]=72;40;IF([.T529]=80;40;IF([.T529]=100;50;IF([.T529]=54;30;IF([.T529]=36;20;IF([.T529]=18;10;IF([.T52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9/9d/Limmo_Icon.png/revision/latest?cb=20150423180935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mmo_-_Nandino_-_Liopold&quot;;&quot;Limmo&quot;)" office:value-type="string" office:string-value="Limmo" calcext:value-type="string">
            <text:p>Limmo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3532" calcext:value-type="float">
            <text:p>3532</text:p>
          </table:table-cell>
          <table:table-cell table:style-name="ce32" office:value-type="float" office:value="4077" calcext:value-type="float">
            <text:p>4077</text:p>
          </table:table-cell>
          <table:table-cell table:style-name="ce36" office:value-type="float" office:value="2110" calcext:value-type="float">
            <text:p>2110</text:p>
          </table:table-cell>
          <table:table-cell table:style-name="ce40" office:value-type="float" office:value="473" calcext:value-type="float">
            <text:p>473</text:p>
          </table:table-cell>
          <table:table-cell table:style-name="ce44" office:value-type="float" office:value="631" calcext:value-type="float">
            <text:p>631</text:p>
          </table:table-cell>
          <table:table-cell table:style-name="ce52" table:formula="of:=SUM([.D530:.H530])" office:value-type="float" office:value="10823" calcext:value-type="float">
            <text:p>10823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30]=126;70;IF([.T530]=112;70;IF([.T530]=98;70;IF([.T530]=96;60;IF([.T530]=84;60;IF([.T530]=108;60;IF([.T530]=90;50;IF([.T530]=72;40;IF([.T530]=80;40;IF([.T530]=100;50;IF([.T530]=54;30;IF([.T530]=36;20;IF([.T530]=18;10;IF([.T530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2/2f/Liopold_Icon.png/revision/latest?cb=20150423180944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mmo_-_Nandino_-_Liopold&quot;;&quot;Liopold&quot;)" office:value-type="string" office:string-value="Liopold" calcext:value-type="string">
            <text:p>Liopold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4427" calcext:value-type="float">
            <text:p>14427</text:p>
          </table:table-cell>
          <table:table-cell table:style-name="ce32" office:value-type="float" office:value="16501" calcext:value-type="float">
            <text:p>16501</text:p>
          </table:table-cell>
          <table:table-cell table:style-name="ce36" office:value-type="float" office:value="8819" calcext:value-type="float">
            <text:p>8819</text:p>
          </table:table-cell>
          <table:table-cell table:style-name="ce40" office:value-type="float" office:value="2106" calcext:value-type="float">
            <text:p>2106</text:p>
          </table:table-cell>
          <table:table-cell table:style-name="ce44" office:value-type="float" office:value="2798" calcext:value-type="float">
            <text:p>2798</text:p>
          </table:table-cell>
          <table:table-cell table:style-name="ce52" table:formula="of:=SUM([.D531:.H531])" office:value-type="float" office:value="44651" calcext:value-type="float">
            <text:p>44651</text:p>
          </table:table-cell>
          <table:table-cell table:style-name="ce59" office:value-type="string" calcext:value-type="string">
            <text:p>Displod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531]=126;70;IF([.T531]=112;70;IF([.T531]=98;70;IF([.T531]=96;60;IF([.T531]=84;60;IF([.T531]=108;60;IF([.T531]=90;50;IF([.T531]=72;40;IF([.T531]=80;40;IF([.T531]=100;50;IF([.T531]=54;30;IF([.T531]=36;20;IF([.T531]=18;10;IF([.T531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722162500/defenderoftexel/images/thumb/3/3b/Lithaline_Icon.png/50px-Lithalin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thaline&quot;; &quot;Lithaline&quot;)" office:value-type="string" office:string-value="Lithaline" calcext:value-type="string">
            <text:p>Lithali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105" calcext:value-type="float">
            <text:p>2105</text:p>
          </table:table-cell>
          <table:table-cell table:style-name="ce32" office:value-type="float" office:value="4896" calcext:value-type="float">
            <text:p>4896</text:p>
          </table:table-cell>
          <table:table-cell table:style-name="ce36" office:value-type="float" office:value="1067" calcext:value-type="float">
            <text:p>1067</text:p>
          </table:table-cell>
          <table:table-cell table:style-name="ce40" office:value-type="float" office:value="4649" calcext:value-type="float">
            <text:p>4649</text:p>
          </table:table-cell>
          <table:table-cell table:style-name="ce44" office:value-type="float" office:value="1415" calcext:value-type="float">
            <text:p>1415</text:p>
          </table:table-cell>
          <table:table-cell table:style-name="ce52" table:formula="of:=SUM([.D532:.H532])" office:value-type="float" office:value="14132" calcext:value-type="float">
            <text:p>14132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32]=126;70;IF([.T532]=112;70;IF([.T532]=98;70;IF([.T532]=96;60;IF([.T532]=84;60;IF([.T532]=108;60;IF([.T532]=90;50;IF([.T532]=72;40;IF([.T532]=80;40;IF([.T532]=100;50;IF([.T532]=54;30;IF([.T532]=36;20;IF([.T532]=18;10;IF([.T53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929225254/defenderoftexel/images/thumb/2/23/Llewnosk_Icon.png/50px-Llewnos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thom_-_Tanghol_-_Llewnosk&quot;; &quot;Llewnosk&quot;)" office:value-type="string" office:string-value="Llewnosk" calcext:value-type="string">
            <text:p>Llewnosk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5349" calcext:value-type="float">
            <text:p>5349</text:p>
          </table:table-cell>
          <table:table-cell table:style-name="ce34" office:value-type="float" office:value="9729" calcext:value-type="float">
            <text:p>9729</text:p>
          </table:table-cell>
          <table:table-cell table:style-name="ce38" office:value-type="float" office:value="3231" calcext:value-type="float">
            <text:p>3231</text:p>
          </table:table-cell>
          <table:table-cell table:style-name="ce42" office:value-type="float" office:value="3655" calcext:value-type="float">
            <text:p>3655</text:p>
          </table:table-cell>
          <table:table-cell table:style-name="ce46" office:value-type="float" office:value="1286" calcext:value-type="float">
            <text:p>1286</text:p>
          </table:table-cell>
          <table:table-cell table:style-name="ce54" table:formula="of:=SUM([.D533:.H533])" office:value-type="float" office:value="23250" calcext:value-type="float">
            <text:p>23250</text:p>
          </table:table-cell>
          <table:table-cell table:style-name="ce61" office:value-type="string" calcext:value-type="string">
            <text:p>Enlighten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Adept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Champ</text:p>
          </table:table-cell>
          <table:table-cell table:style-name="ce69" office:value-type="string" calcext:value-type="string">
            <text:p>Lightning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L</text:p>
          </table:table-cell>
          <table:table-cell table:style-name="ce66" office:value-type="float" office:value="2" calcext:value-type="float">
            <text:p>2</text:p>
          </table:table-cell>
          <table:table-cell table:style-name="ce67" table:formula="of:=IF([.T533]=126;70;IF([.T533]=112;70;IF([.T533]=98;70;IF([.T533]=96;60;IF([.T533]=84;60;IF([.T533]=108;60;IF([.T533]=90;50;IF([.T533]=72;40;IF([.T533]=80;40;IF([.T533]=100;50;IF([.T533]=54;30;IF([.T533]=36;20;IF([.T533]=18;10;IF([.T533]=60;30))))))))))))))" office:value-type="float" office:value="70" calcext:value-type="float">
            <text:p>70</text:p>
          </table:table-cell>
          <table:table-cell table:style-name="ce69" office:value-type="float" office:value="98" calcext:value-type="float">
            <text:p>9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708140737/defenderoftexel/images/a/a7/Loki_Hellrais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oki_Hellraiser&quot;; &quot;Loki Hellraiser&quot;)" office:value-type="string" office:string-value="Loki Hellraiser" calcext:value-type="string">
            <text:p>Loki Hellraiser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7330" calcext:value-type="float">
            <text:p>7330</text:p>
          </table:table-cell>
          <table:table-cell table:style-name="ce34" office:value-type="float" office:value="11172" calcext:value-type="float">
            <text:p>11172</text:p>
          </table:table-cell>
          <table:table-cell table:style-name="ce38" office:value-type="float" office:value="3824" calcext:value-type="float">
            <text:p>3824</text:p>
          </table:table-cell>
          <table:table-cell table:style-name="ce42" office:value-type="float" office:value="2322" calcext:value-type="float">
            <text:p>2322</text:p>
          </table:table-cell>
          <table:table-cell table:style-name="ce46" office:value-type="float" office:value="11588" calcext:value-type="float">
            <text:p>11588</text:p>
          </table:table-cell>
          <table:table-cell table:style-name="ce54" table:formula="of:=SUM([.D534:.H534])" office:value-type="float" office:value="36236" calcext:value-type="float">
            <text:p>36236</text:p>
          </table:table-cell>
          <table:table-cell table:style-name="ce61" office:value-type="string" calcext:value-type="string">
            <text:p>Muspelheim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Elite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Rogue</text:p>
          </table:table-cell>
          <table:table-cell table:style-name="ce69" office:value-type="string" calcext:value-type="string">
            <text:p>Fire</text:p>
          </table:table-cell>
          <table:table-cell table:style-name="ce69" office:value-type="string" calcext:value-type="string">
            <text:p>Xana</text:p>
          </table:table-cell>
          <table:table-cell table:style-name="ce72" office:value-type="string" calcext:value-type="string">
            <text:p>L</text:p>
          </table:table-cell>
          <table:table-cell table:style-name="ce66" office:value-type="float" office:value="3" calcext:value-type="float">
            <text:p>3</text:p>
          </table:table-cell>
          <table:table-cell table:style-name="ce67" table:formula="of:=IF([.T534]=126;70;IF([.T534]=112;70;IF([.T534]=98;70;IF([.T534]=96;60;IF([.T534]=84;60;IF([.T534]=108;60;IF([.T534]=90;50;IF([.T534]=72;40;IF([.T534]=80;40;IF([.T534]=100;50;IF([.T534]=54;30;IF([.T534]=36;20;IF([.T534]=18;10;IF([.T534]=60;30))))))))))))))" office:value-type="float" office:value="70" calcext:value-type="float">
            <text:p>70</text:p>
          </table:table-cell>
          <table:table-cell table:style-name="ce69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1/12/Lophidian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ophidiana&quot;; &quot;Lophidiana&quot;)" office:value-type="string" office:string-value="Lophidiana" calcext:value-type="string">
            <text:p>Lophidian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3440" calcext:value-type="float">
            <text:p>3440</text:p>
          </table:table-cell>
          <table:table-cell table:style-name="ce32" office:value-type="float" office:value="8022" calcext:value-type="float">
            <text:p>8022</text:p>
          </table:table-cell>
          <table:table-cell table:style-name="ce36" office:value-type="float" office:value="1748" calcext:value-type="float">
            <text:p>1748</text:p>
          </table:table-cell>
          <table:table-cell table:style-name="ce40" office:value-type="float" office:value="7618" calcext:value-type="float">
            <text:p>7618</text:p>
          </table:table-cell>
          <table:table-cell table:style-name="ce44" office:value-type="float" office:value="2322" calcext:value-type="float">
            <text:p>2322</text:p>
          </table:table-cell>
          <table:table-cell table:style-name="ce52" table:formula="of:=SUM([.D535:.H535])" office:value-type="float" office:value="23150" calcext:value-type="float">
            <text:p>23150</text:p>
          </table:table-cell>
          <table:table-cell table:style-name="ce59" office:value-type="string" calcext:value-type="string">
            <text:p>Thwar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2" calcext:value-type="float">
            <text:p>2</text:p>
          </table:table-cell>
          <table:table-cell table:style-name="ce67" table:formula="of:=IF([.T535]=126;70;IF([.T535]=112;70;IF([.T535]=98;70;IF([.T535]=96;60;IF([.T535]=84;60;IF([.T535]=108;60;IF([.T535]=90;50;IF([.T535]=72;40;IF([.T535]=80;40;IF([.T535]=100;50;IF([.T535]=54;30;IF([.T535]=36;20;IF([.T535]=18;10;IF([.T535]=60;30))))))))))))))" office:value-type="float" office:value="70" calcext:value-type="float">
            <text:p>70</text:p>
          </table:table-cell>
          <table:table-cell table:style-name="ce67" office:value-type="float" office:value="98" calcext:value-type="float">
            <text:p>9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4119/defenderoftexel/images/thumb/c/c3/Luckdraw_Icon.png/50px-Luckdraw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Luckdraw&quot;; &quot;Luckdraw&quot;)" office:value-type="string" office:string-value="Luckdraw" calcext:value-type="string">
            <text:p>Luckdraw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619" calcext:value-type="float">
            <text:p>1619</text:p>
          </table:table-cell>
          <table:table-cell table:style-name="ce32" office:value-type="float" office:value="4674" calcext:value-type="float">
            <text:p>4674</text:p>
          </table:table-cell>
          <table:table-cell table:style-name="ce36" office:value-type="float" office:value="1444" calcext:value-type="float">
            <text:p>1444</text:p>
          </table:table-cell>
          <table:table-cell table:style-name="ce40" office:value-type="float" office:value="3076" calcext:value-type="float">
            <text:p>3076</text:p>
          </table:table-cell>
          <table:table-cell table:style-name="ce44" office:value-type="float" office:value="2224" calcext:value-type="float">
            <text:p>2224</text:p>
          </table:table-cell>
          <table:table-cell table:style-name="ce52" table:formula="of:=SUM([.D536:.H536])" office:value-type="float" office:value="13037" calcext:value-type="float">
            <text:p>13037</text:p>
          </table:table-cell>
          <table:table-cell table:style-name="ce59" office:value-type="string" calcext:value-type="string">
            <text:p>Gus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36]=126;70;IF([.T536]=112;70;IF([.T536]=98;70;IF([.T536]=96;60;IF([.T536]=84;60;IF([.T536]=108;60;IF([.T536]=90;50;IF([.T536]=72;40;IF([.T536]=80;40;IF([.T536]=100;50;IF([.T536]=54;30;IF([.T536]=36;20;IF([.T536]=18;10;IF([.T53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2528/defenderoftexel/images/thumb/7/73/Ludbert_Icon.png/40px-Ludber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udbert&quot;; &quot;Ludbert&quot;)" office:value-type="string" office:string-value="Ludbert" calcext:value-type="string">
            <text:p>Ludbert</text:p>
          </table:table-cell>
          <table:table-cell table:style-name="ce25"/>
          <table:table-cell table:style-name="ce28" office:value-type="float" office:value="1786" calcext:value-type="float">
            <text:p>1786</text:p>
          </table:table-cell>
          <table:table-cell table:style-name="ce33" office:value-type="float" office:value="1254" calcext:value-type="float">
            <text:p>1254</text:p>
          </table:table-cell>
          <table:table-cell table:style-name="ce37" office:value-type="float" office:value="809" calcext:value-type="float">
            <text:p>809</text:p>
          </table:table-cell>
          <table:table-cell table:style-name="ce41" office:value-type="float" office:value="5140" calcext:value-type="float">
            <text:p>5140</text:p>
          </table:table-cell>
          <table:table-cell table:style-name="ce45" office:value-type="float" office:value="4892" calcext:value-type="float">
            <text:p>4892</text:p>
          </table:table-cell>
          <table:table-cell table:style-name="ce53" table:formula="of:=SUM([.D537:.H537])" office:value-type="float" office:value="13881" calcext:value-type="float">
            <text:p>13881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37]=126;70;IF([.T537]=112;70;IF([.T537]=98;70;IF([.T537]=96;60;IF([.T537]=84;60;IF([.T537]=108;60;IF([.T537]=90;50;IF([.T537]=72;40;IF([.T537]=80;40;IF([.T537]=100;50;IF([.T537]=54;30;IF([.T537]=36;20;IF([.T537]=18;10;IF([.T53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32533/defenderoftexel/images/thumb/5/53/Machtild_Icon.png/40px-Machtil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achtild&quot;; &quot;Machtild&quot;)" office:value-type="string" office:string-value="Machtild" calcext:value-type="string">
            <text:p>Machtild</text:p>
          </table:table-cell>
          <table:table-cell table:style-name="ce25"/>
          <table:table-cell table:style-name="ce28" office:value-type="float" office:value="1430" calcext:value-type="float">
            <text:p>1430</text:p>
          </table:table-cell>
          <table:table-cell table:style-name="ce33" office:value-type="float" office:value="1005" calcext:value-type="float">
            <text:p>1005</text:p>
          </table:table-cell>
          <table:table-cell table:style-name="ce37" office:value-type="float" office:value="648" calcext:value-type="float">
            <text:p>648</text:p>
          </table:table-cell>
          <table:table-cell table:style-name="ce41" office:value-type="float" office:value="4114" calcext:value-type="float">
            <text:p>4114</text:p>
          </table:table-cell>
          <table:table-cell table:style-name="ce45" office:value-type="float" office:value="3917" calcext:value-type="float">
            <text:p>3917</text:p>
          </table:table-cell>
          <table:table-cell table:style-name="ce53" table:formula="of:=SUM([.D538:.H538])" office:value-type="float" office:value="11114" calcext:value-type="float">
            <text:p>11114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38]=126;70;IF([.T538]=112;70;IF([.T538]=98;70;IF([.T538]=96;60;IF([.T538]=84;60;IF([.T538]=108;60;IF([.T538]=90;50;IF([.T538]=72;40;IF([.T538]=80;40;IF([.T538]=100;50;IF([.T538]=54;30;IF([.T538]=36;20;IF([.T538]=18;10;IF([.T53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c/c2/Magaru_Icon.png/revision/latest?cb=20141014145319&quot;)" office:value-type="string" office:string-value="" calcext:value-type="error">
            <text:p>#NAME?</text:p>
          </table:table-cell>
          <table:table-cell table:style-name="ce11" table:formula="of:=HYPERLINK(&quot;http://defenderoftexel.wikia.com/wiki/Wardu_-_Magaru_-_Apputtu&quot;;&quot;Magaru&quot;)" office:value-type="string" office:string-value="Magaru" calcext:value-type="string">
            <text:p>Magar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539:.H539])" office:value-type="float" office:value="5" calcext:value-type="float">
            <text:p>5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39]=126;70;IF([.T539]=112;70;IF([.T539]=98;70;IF([.T539]=96;60;IF([.T539]=84;60;IF([.T539]=108;60;IF([.T539]=90;50;IF([.T539]=72;40;IF([.T539]=80;40;IF([.T539]=100;50;IF([.T539]=54;30;IF([.T539]=36;20;IF([.T539]=18;10;IF([.T53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527142712/defenderoftexel/images/thumb/1/1c/Maidie_Icon.png/50px-Maidi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idie&quot;; &quot;Maidie&quot;)" office:value-type="string" office:string-value="Maidie" calcext:value-type="string">
            <text:p>Maidi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190" calcext:value-type="float">
            <text:p>4190</text:p>
          </table:table-cell>
          <table:table-cell table:style-name="ce32" office:value-type="float" office:value="5875" calcext:value-type="float">
            <text:p>5875</text:p>
          </table:table-cell>
          <table:table-cell table:style-name="ce36" office:value-type="float" office:value="1280" calcext:value-type="float">
            <text:p>1280</text:p>
          </table:table-cell>
          <table:table-cell table:style-name="ce40" office:value-type="float" office:value="3757" calcext:value-type="float">
            <text:p>3757</text:p>
          </table:table-cell>
          <table:table-cell table:style-name="ce44" office:value-type="float" office:value="1701" calcext:value-type="float">
            <text:p>1701</text:p>
          </table:table-cell>
          <table:table-cell table:style-name="ce52" table:formula="of:=SUM([.D540:.H540])" office:value-type="float" office:value="16803" calcext:value-type="float">
            <text:p>16803</text:p>
          </table:table-cell>
          <table:table-cell table:style-name="ce59" office:value-type="string" calcext:value-type="string">
            <text:p>Pasodoble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40]=126;70;IF([.T540]=112;70;IF([.T540]=98;70;IF([.T540]=96;60;IF([.T540]=84;60;IF([.T540]=108;60;IF([.T540]=90;50;IF([.T540]=72;40;IF([.T540]=80;40;IF([.T540]=100;50;IF([.T540]=54;30;IF([.T540]=36;20;IF([.T540]=18;10;IF([.T540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4.wikia.nocookie.net/__cb20130428044118/defenderoftexel/images/thumb/6/69/Malakhloros_Icon.png/50px-Malakhloro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lakhloros&quot;; &quot;Malakhloros&quot;)" office:value-type="string" office:string-value="Malakhloros" calcext:value-type="string">
            <text:p>Malakhloro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535" calcext:value-type="float">
            <text:p>4535</text:p>
          </table:table-cell>
          <table:table-cell table:style-name="ce32" office:value-type="float" office:value="5187" calcext:value-type="float">
            <text:p>5187</text:p>
          </table:table-cell>
          <table:table-cell table:style-name="ce36" office:value-type="float" office:value="2780" calcext:value-type="float">
            <text:p>2780</text:p>
          </table:table-cell>
          <table:table-cell table:style-name="ce40" office:value-type="float" office:value="655" calcext:value-type="float">
            <text:p>655</text:p>
          </table:table-cell>
          <table:table-cell table:style-name="ce44" office:value-type="float" office:value="868" calcext:value-type="float">
            <text:p>868</text:p>
          </table:table-cell>
          <table:table-cell table:style-name="ce52" table:formula="of:=SUM([.D541:.H541])" office:value-type="float" office:value="14025" calcext:value-type="float">
            <text:p>1402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41]=126;70;IF([.T541]=112;70;IF([.T541]=98;70;IF([.T541]=96;60;IF([.T541]=84;60;IF([.T541]=108;60;IF([.T541]=90;50;IF([.T541]=72;40;IF([.T541]=80;40;IF([.T541]=100;50;IF([.T541]=54;30;IF([.T541]=36;20;IF([.T541]=18;10;IF([.T54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6/6c/Mamarc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mi_-_Cneve_-_Mamarce&quot;;&quot;Mamarce&quot;)" office:value-type="string" office:string-value="Mamarce" calcext:value-type="string">
            <text:p>Mamarce</text:p>
          </table:table-cell>
          <table:table-cell table:style-name="ce25"/>
          <table:table-cell table:style-name="ce28" office:value-type="float" office:value="2754" calcext:value-type="float">
            <text:p>2754</text:p>
          </table:table-cell>
          <table:table-cell table:style-name="ce33" office:value-type="float" office:value="4189" calcext:value-type="float">
            <text:p>4189</text:p>
          </table:table-cell>
          <table:table-cell table:style-name="ce37" office:value-type="float" office:value="1431" calcext:value-type="float">
            <text:p>1431</text:p>
          </table:table-cell>
          <table:table-cell table:style-name="ce41" office:value-type="float" office:value="863" calcext:value-type="float">
            <text:p>863</text:p>
          </table:table-cell>
          <table:table-cell table:style-name="ce45" office:value-type="float" office:value="4342" calcext:value-type="float">
            <text:p>4342</text:p>
          </table:table-cell>
          <table:table-cell table:style-name="ce53" table:formula="of:=SUM([.D542:.H542])" office:value-type="float" office:value="13579" calcext:value-type="float">
            <text:p>13579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42]=126;70;IF([.T542]=112;70;IF([.T542]=98;70;IF([.T542]=96;60;IF([.T542]=84;60;IF([.T542]=108;60;IF([.T542]=90;50;IF([.T542]=72;40;IF([.T542]=80;40;IF([.T542]=100;50;IF([.T542]=54;30;IF([.T542]=36;20;IF([.T542]=18;10;IF([.T54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1001175743/defenderoftexel/images/thumb/4/46/Mammetun_Icon.png/50px-Mammetu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nanna_-_Nineha_-_Mammetun&quot;; &quot;Mammetun&quot;)" office:value-type="string" office:string-value="Mammetun" calcext:value-type="string">
            <text:p>Mammetun</text:p>
          </table:table-cell>
          <table:table-cell table:style-name="ce25"/>
          <table:table-cell table:style-name="ce28" office:value-type="float" office:value="5614" calcext:value-type="float">
            <text:p>5614</text:p>
          </table:table-cell>
          <table:table-cell table:style-name="ce33" office:value-type="float" office:value="2509" calcext:value-type="float">
            <text:p>2509</text:p>
          </table:table-cell>
          <table:table-cell table:style-name="ce37" office:value-type="float" office:value="2740" calcext:value-type="float">
            <text:p>2740</text:p>
          </table:table-cell>
          <table:table-cell table:style-name="ce41" office:value-type="float" office:value="451" calcext:value-type="float">
            <text:p>451</text:p>
          </table:table-cell>
          <table:table-cell table:style-name="ce45" office:value-type="float" office:value="495" calcext:value-type="float">
            <text:p>495</text:p>
          </table:table-cell>
          <table:table-cell table:style-name="ce53" table:formula="of:=SUM([.D543:.H543])" office:value-type="float" office:value="11809" calcext:value-type="float">
            <text:p>11809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43]=126;70;IF([.T543]=112;70;IF([.T543]=98;70;IF([.T543]=96;60;IF([.T543]=84;60;IF([.T543]=108;60;IF([.T543]=90;50;IF([.T543]=72;40;IF([.T543]=80;40;IF([.T543]=100;50;IF([.T543]=54;30;IF([.T543]=36;20;IF([.T543]=18;10;IF([.T54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1438/defenderoftexel/images/thumb/a/aa/Manishtusu_Icon.png/50px-Manishtus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anishtusu&quot;; &quot;Manishtusu&quot;)" office:value-type="string" office:string-value="Manishtusu" calcext:value-type="string">
            <text:p>Manishtusu</text:p>
          </table:table-cell>
          <table:table-cell table:style-name="ce25"/>
          <table:table-cell table:style-name="ce28" office:value-type="float" office:value="942" calcext:value-type="float">
            <text:p>942</text:p>
          </table:table-cell>
          <table:table-cell table:style-name="ce33" office:value-type="float" office:value="1006" calcext:value-type="float">
            <text:p>1006</text:p>
          </table:table-cell>
          <table:table-cell table:style-name="ce37" office:value-type="float" office:value="476" calcext:value-type="float">
            <text:p>476</text:p>
          </table:table-cell>
          <table:table-cell table:style-name="ce41" office:value-type="float" office:value="810" calcext:value-type="float">
            <text:p>810</text:p>
          </table:table-cell>
          <table:table-cell table:style-name="ce45" office:value-type="float" office:value="745" calcext:value-type="float">
            <text:p>745</text:p>
          </table:table-cell>
          <table:table-cell table:style-name="ce53" table:formula="of:=SUM([.D544:.H544])" office:value-type="float" office:value="3979" calcext:value-type="float">
            <text:p>3979</text:p>
          </table:table-cell>
          <table:table-cell table:style-name="ce60" office:value-type="string" calcext:value-type="string">
            <text:p>Shiel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44]=126;70;IF([.T544]=112;70;IF([.T544]=98;70;IF([.T544]=96;60;IF([.T544]=84;60;IF([.T544]=108;60;IF([.T544]=90;50;IF([.T544]=72;40;IF([.T544]=80;40;IF([.T544]=100;50;IF([.T544]=54;30;IF([.T544]=36;20;IF([.T544]=18;10;IF([.T54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g3.wikia.nocookie.net/__cb20140218111123/defenderoftexel/images/thumb/9/94/Mannatar_Icon.png/50px-Mannata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nnatar&quot;; &quot;Mannatar&quot;)" office:value-type="string" office:string-value="Mannatar" calcext:value-type="string">
            <text:p>Mannatar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6132" calcext:value-type="float">
            <text:p>6132</text:p>
          </table:table-cell>
          <table:table-cell table:style-name="ce32" office:value-type="float" office:value="10038" calcext:value-type="float">
            <text:p>10038</text:p>
          </table:table-cell>
          <table:table-cell table:style-name="ce36" office:value-type="float" office:value="5108" calcext:value-type="float">
            <text:p>5108</text:p>
          </table:table-cell>
          <table:table-cell table:style-name="ce40" office:value-type="float" office:value="8011" calcext:value-type="float">
            <text:p>8011</text:p>
          </table:table-cell>
          <table:table-cell table:style-name="ce44" office:value-type="float" office:value="997" calcext:value-type="float">
            <text:p>997</text:p>
          </table:table-cell>
          <table:table-cell table:style-name="ce52" table:formula="of:=SUM([.D545:.H545])" office:value-type="float" office:value="30286" calcext:value-type="float">
            <text:p>30286</text:p>
          </table:table-cell>
          <table:table-cell table:style-name="ce59" office:value-type="string" calcext:value-type="string">
            <text:p>Clamor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545]=126;70;IF([.T545]=112;70;IF([.T545]=98;70;IF([.T545]=96;60;IF([.T545]=84;60;IF([.T545]=108;60;IF([.T545]=90;50;IF([.T545]=72;40;IF([.T545]=80;40;IF([.T545]=100;50;IF([.T545]=54;30;IF([.T545]=36;20;IF([.T545]=18;10;IF([.T545]=60;30))))))))))))))" office:value-type="float" office:value="60" calcext:value-type="float">
            <text:p>60</text:p>
          </table:table-cell>
          <table:table-cell table:style-name="ce67" office:value-type="float" office:value="96" calcext:value-type="float">
            <text:p>9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b/b4/Mann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anno&quot;; &quot;Manno&quot;)" office:value-type="string" office:string-value="Manno" calcext:value-type="string">
            <text:p>Manno</text:p>
          </table:table-cell>
          <table:table-cell table:style-name="ce25"/>
          <table:table-cell table:style-name="ce28" office:value-type="float" office:value="3809" calcext:value-type="float">
            <text:p>3809</text:p>
          </table:table-cell>
          <table:table-cell table:style-name="ce33" office:value-type="float" office:value="3221" calcext:value-type="float">
            <text:p>3221</text:p>
          </table:table-cell>
          <table:table-cell table:style-name="ce37" office:value-type="float" office:value="1652" calcext:value-type="float">
            <text:p>1652</text:p>
          </table:table-cell>
          <table:table-cell table:style-name="ce41" office:value-type="float" office:value="326" calcext:value-type="float">
            <text:p>326</text:p>
          </table:table-cell>
          <table:table-cell table:style-name="ce45" office:value-type="float" office:value="1235" calcext:value-type="float">
            <text:p>1235</text:p>
          </table:table-cell>
          <table:table-cell table:style-name="ce53" table:formula="of:=SUM([.D546:.H546])" office:value-type="float" office:value="10243" calcext:value-type="float">
            <text:p>10243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46]=126;70;IF([.T546]=112;70;IF([.T546]=98;70;IF([.T546]=96;60;IF([.T546]=84;60;IF([.T546]=108;60;IF([.T546]=90;50;IF([.T546]=72;40;IF([.T546]=80;40;IF([.T546]=100;50;IF([.T546]=54;30;IF([.T546]=36;20;IF([.T546]=18;10;IF([.T54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1.wikia.nocookie.net/__cb20131126125451/defenderoftexel/images/thumb/f/f8/Marglint_Icon.png/50px-Marglint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rglint&quot;;&quot;Marglint&quot;)" office:value-type="string" office:string-value="Marglint" calcext:value-type="string">
            <text:p>Marglint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066" calcext:value-type="float">
            <text:p>2066</text:p>
          </table:table-cell>
          <table:table-cell table:style-name="ce32" office:value-type="float" office:value="4805" calcext:value-type="float">
            <text:p>4805</text:p>
          </table:table-cell>
          <table:table-cell table:style-name="ce36" office:value-type="float" office:value="1049" calcext:value-type="float">
            <text:p>1049</text:p>
          </table:table-cell>
          <table:table-cell table:style-name="ce40" office:value-type="float" office:value="4562" calcext:value-type="float">
            <text:p>4562</text:p>
          </table:table-cell>
          <table:table-cell table:style-name="ce44" office:value-type="float" office:value="1391" calcext:value-type="float">
            <text:p>1391</text:p>
          </table:table-cell>
          <table:table-cell table:style-name="ce52" table:formula="of:=SUM([.D547:.H547])" office:value-type="float" office:value="13873" calcext:value-type="float">
            <text:p>13873</text:p>
          </table:table-cell>
          <table:table-cell table:style-name="ce59" office:value-type="string" calcext:value-type="string">
            <text:p>Thwar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47]=126;70;IF([.T547]=112;70;IF([.T547]=98;70;IF([.T547]=96;60;IF([.T547]=84;60;IF([.T547]=108;60;IF([.T547]=90;50;IF([.T547]=72;40;IF([.T547]=80;40;IF([.T547]=100;50;IF([.T547]=54;30;IF([.T547]=36;20;IF([.T547]=18;10;IF([.T54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422160023/defenderoftexel/images/thumb/f/f5/Maruduk_Icon.png/50px-Maruduk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Maruduk&quot;;&quot;Maruduk&quot;)" office:value-type="string" office:string-value="Maruduk" calcext:value-type="string">
            <text:p>Marudu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817" calcext:value-type="float">
            <text:p>3817</text:p>
          </table:table-cell>
          <table:table-cell table:style-name="ce32" office:value-type="float" office:value="4316" calcext:value-type="float">
            <text:p>4316</text:p>
          </table:table-cell>
          <table:table-cell table:style-name="ce36" office:value-type="float" office:value="7823" calcext:value-type="float">
            <text:p>7823</text:p>
          </table:table-cell>
          <table:table-cell table:style-name="ce40" office:value-type="float" office:value="392" calcext:value-type="float">
            <text:p>392</text:p>
          </table:table-cell>
          <table:table-cell table:style-name="ce44" office:value-type="float" office:value="334" calcext:value-type="float">
            <text:p>334</text:p>
          </table:table-cell>
          <table:table-cell table:style-name="ce52" table:formula="of:=SUM([.D548:.H548])" office:value-type="float" office:value="16682" calcext:value-type="float">
            <text:p>16682</text:p>
          </table:table-cell>
          <table:table-cell table:style-name="ce59" office:value-type="string" calcext:value-type="string">
            <text:p>Repay</text:p>
          </table:table-cell>
          <table:table-cell table:style-name="ce59" office:value-type="string" calcext:value-type="string">
            <text:p>Retaliat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48]=126;70;IF([.T548]=112;70;IF([.T548]=98;70;IF([.T548]=96;60;IF([.T548]=84;60;IF([.T548]=108;60;IF([.T548]=90;50;IF([.T548]=72;40;IF([.T548]=80;40;IF([.T548]=100;50;IF([.T548]=54;30;IF([.T548]=36;20;IF([.T548]=18;10;IF([.T54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c/c2/Mehrda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ahram&quot;; &quot;Mehrdad&quot;)" office:value-type="string" office:string-value="Mehrdad" calcext:value-type="string">
            <text:p>Mehrdad</text:p>
          </table:table-cell>
          <table:table-cell table:style-name="ce25"/>
          <table:table-cell table:style-name="ce28" office:value-type="float" office:value="1631" calcext:value-type="float">
            <text:p>1631</text:p>
          </table:table-cell>
          <table:table-cell table:style-name="ce33" office:value-type="float" office:value="4708" calcext:value-type="float">
            <text:p>4708</text:p>
          </table:table-cell>
          <table:table-cell table:style-name="ce37" office:value-type="float" office:value="1456" calcext:value-type="float">
            <text:p>1456</text:p>
          </table:table-cell>
          <table:table-cell table:style-name="ce41" office:value-type="float" office:value="3099" calcext:value-type="float">
            <text:p>3099</text:p>
          </table:table-cell>
          <table:table-cell table:style-name="ce45" office:value-type="float" office:value="2239" calcext:value-type="float">
            <text:p>2239</text:p>
          </table:table-cell>
          <table:table-cell table:style-name="ce53" table:formula="of:=SUM([.D549:.H549])" office:value-type="float" office:value="13133" calcext:value-type="float">
            <text:p>13133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49]=126;70;IF([.T549]=112;70;IF([.T549]=98;70;IF([.T549]=96;60;IF([.T549]=84;60;IF([.T549]=108;60;IF([.T549]=90;50;IF([.T549]=72;40;IF([.T549]=80;40;IF([.T549]=100;50;IF([.T549]=54;30;IF([.T549]=36;20;IF([.T549]=18;10;IF([.T54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2/20/Meleacr_Icon.png/revision/latest?cb=20150423181253&quot;)" office:value-type="string" office:string-value="" calcext:value-type="error">
            <text:p>#NAME?</text:p>
          </table:table-cell>
          <table:table-cell table:style-name="ce11" table:formula="of:=HYPERLINK(&quot;http://defenderoftexel.wikia.com/wiki/Tuntle_-_Evtucle_-_Meleacr&quot;;&quot;Meleacr&quot;)" office:value-type="string" office:string-value="Meleacr" calcext:value-type="string">
            <text:p>Meleac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239" calcext:value-type="float">
            <text:p>2239</text:p>
          </table:table-cell>
          <table:table-cell table:style-name="ce57"/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50]=126;70;IF([.T550]=112;70;IF([.T550]=98;70;IF([.T550]=96;60;IF([.T550]=84;60;IF([.T550]=108;60;IF([.T550]=90;50;IF([.T550]=72;40;IF([.T550]=80;40;IF([.T550]=100;50;IF([.T550]=54;30;IF([.T550]=36;20;IF([.T550]=18;10;IF([.T55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f/fb/Melpome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rinys_-_Nemesis_-_Melpomene&quot;; &quot;Melpomene&quot;)" office:value-type="string" office:string-value="Melpomene" calcext:value-type="string">
            <text:p>Melpomene</text:p>
          </table:table-cell>
          <table:table-cell table:style-name="ce21" office:value-type="float" office:value="3" calcext:value-type="float">
            <text:p>3</text:p>
          </table:table-cell>
          <table:table-cell table:style-name="ce28" office:value-type="float" office:value="5263" calcext:value-type="float">
            <text:p>5263</text:p>
          </table:table-cell>
          <table:table-cell table:style-name="ce33" office:value-type="float" office:value="6018" calcext:value-type="float">
            <text:p>6018</text:p>
          </table:table-cell>
          <table:table-cell table:style-name="ce37" office:value-type="float" office:value="3225" calcext:value-type="float">
            <text:p>3225</text:p>
          </table:table-cell>
          <table:table-cell table:style-name="ce41" office:value-type="float" office:value="759" calcext:value-type="float">
            <text:p>759</text:p>
          </table:table-cell>
          <table:table-cell table:style-name="ce45" office:value-type="float" office:value="1012" calcext:value-type="float">
            <text:p>1012</text:p>
          </table:table-cell>
          <table:table-cell table:style-name="ce53" table:formula="of:=SUM([.D551:.H551])" office:value-type="float" office:value="16277" calcext:value-type="float">
            <text:p>16277</text:p>
          </table:table-cell>
          <table:table-cell table:style-name="ce60" office:value-type="string" calcext:value-type="string">
            <text:p>Grim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1]=126;70;IF([.T551]=112;70;IF([.T551]=98;70;IF([.T551]=96;60;IF([.T551]=84;60;IF([.T551]=108;60;IF([.T551]=90;50;IF([.T551]=72;40;IF([.T551]=80;40;IF([.T551]=100;50;IF([.T551]=54;30;IF([.T551]=36;20;IF([.T551]=18;10;IF([.T55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defenderoftexel/images/thumb/c/c2/Menika_Icon.png/50px-Menik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enika&quot;; &quot;Menika&quot;)" office:value-type="string" office:string-value="Menika" calcext:value-type="string">
            <text:p>Menika</text:p>
          </table:table-cell>
          <table:table-cell table:style-name="ce25"/>
          <table:table-cell table:style-name="ce28" office:value-type="float" office:value="1427" calcext:value-type="float">
            <text:p>1427</text:p>
          </table:table-cell>
          <table:table-cell table:style-name="ce33" office:value-type="float" office:value="3318" calcext:value-type="float">
            <text:p>3318</text:p>
          </table:table-cell>
          <table:table-cell table:style-name="ce37" office:value-type="float" office:value="724" calcext:value-type="float">
            <text:p>724</text:p>
          </table:table-cell>
          <table:table-cell table:style-name="ce41" office:value-type="float" office:value="3150" calcext:value-type="float">
            <text:p>3150</text:p>
          </table:table-cell>
          <table:table-cell table:style-name="ce45" office:value-type="float" office:value="959" calcext:value-type="float">
            <text:p>959</text:p>
          </table:table-cell>
          <table:table-cell table:style-name="ce53" table:formula="of:=SUM([.D552:.H552])" office:value-type="float" office:value="9578" calcext:value-type="float">
            <text:p>9578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2]=126;70;IF([.T552]=112;70;IF([.T552]=98;70;IF([.T552]=96;60;IF([.T552]=84;60;IF([.T552]=108;60;IF([.T552]=90;50;IF([.T552]=72;40;IF([.T552]=80;40;IF([.T552]=100;50;IF([.T552]=54;30;IF([.T552]=36;20;IF([.T552]=18;10;IF([.T55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119152113/defenderoftexel/images/thumb/0/01/Merodak_Icon.png/50px-Meroda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u_-_Basa_-_Merodak&quot;;&quot;Merodak&quot;)" office:value-type="string" office:string-value="Merodak" calcext:value-type="string">
            <text:p>Merodak</text:p>
          </table:table-cell>
          <table:table-cell table:style-name="ce25"/>
          <table:table-cell table:style-name="ce28" office:value-type="float" office:value="2676" calcext:value-type="float">
            <text:p>2676</text:p>
          </table:table-cell>
          <table:table-cell table:style-name="ce33" office:value-type="float" office:value="4069" calcext:value-type="float">
            <text:p>4069</text:p>
          </table:table-cell>
          <table:table-cell table:style-name="ce37" office:value-type="float" office:value="1390" calcext:value-type="float">
            <text:p>1390</text:p>
          </table:table-cell>
          <table:table-cell table:style-name="ce41" office:value-type="float" office:value="837" calcext:value-type="float">
            <text:p>837</text:p>
          </table:table-cell>
          <table:table-cell table:style-name="ce45" office:value-type="float" office:value="4219" calcext:value-type="float">
            <text:p>4219</text:p>
          </table:table-cell>
          <table:table-cell table:style-name="ce53" table:formula="of:=SUM([.D553:.H553])" office:value-type="float" office:value="13191" calcext:value-type="float">
            <text:p>13191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3]=126;70;IF([.T553]=112;70;IF([.T553]=98;70;IF([.T553]=96;60;IF([.T553]=84;60;IF([.T553]=108;60;IF([.T553]=90;50;IF([.T553]=72;40;IF([.T553]=80;40;IF([.T553]=100;50;IF([.T553]=54;30;IF([.T553]=36;20;IF([.T553]=18;10;IF([.T55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429124854/defenderoftexel/images/thumb/9/92/Meroe_Icon.png/50px-Mero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eroe&quot;; &quot;Meroe&quot;)" office:value-type="string" office:string-value="Meroe" calcext:value-type="string">
            <text:p>Meroe</text:p>
          </table:table-cell>
          <table:table-cell table:style-name="ce25"/>
          <table:table-cell table:style-name="ce28" office:value-type="float" office:value="3173" calcext:value-type="float">
            <text:p>3173</text:p>
          </table:table-cell>
          <table:table-cell table:style-name="ce33" office:value-type="float" office:value="3587" calcext:value-type="float">
            <text:p>3587</text:p>
          </table:table-cell>
          <table:table-cell table:style-name="ce37" office:value-type="float" office:value="6504" calcext:value-type="float">
            <text:p>6504</text:p>
          </table:table-cell>
          <table:table-cell table:style-name="ce41" office:value-type="float" office:value="324" calcext:value-type="float">
            <text:p>324</text:p>
          </table:table-cell>
          <table:table-cell table:style-name="ce45" office:value-type="float" office:value="279" calcext:value-type="float">
            <text:p>279</text:p>
          </table:table-cell>
          <table:table-cell table:style-name="ce53" table:formula="of:=SUM([.D554:.H554])" office:value-type="float" office:value="13867" calcext:value-type="float">
            <text:p>13867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4]=126;70;IF([.T554]=112;70;IF([.T554]=98;70;IF([.T554]=96;60;IF([.T554]=84;60;IF([.T554]=108;60;IF([.T554]=90;50;IF([.T554]=72;40;IF([.T554]=80;40;IF([.T554]=100;50;IF([.T554]=54;30;IF([.T554]=36;20;IF([.T554]=18;10;IF([.T55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4257/defenderoftexel/images/0/0f/Mess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essia&quot;; &quot;Messia&quot;)" office:value-type="string" office:string-value="Messia" calcext:value-type="string">
            <text:p>Messia</text:p>
          </table:table-cell>
          <table:table-cell table:style-name="ce25"/>
          <table:table-cell table:style-name="ce28" office:value-type="float" office:value="896" calcext:value-type="float">
            <text:p>896</text:p>
          </table:table-cell>
          <table:table-cell table:style-name="ce33" office:value-type="float" office:value="673" calcext:value-type="float">
            <text:p>673</text:p>
          </table:table-cell>
          <table:table-cell table:style-name="ce37" office:value-type="float" office:value="453" calcext:value-type="float">
            <text:p>453</text:p>
          </table:table-cell>
          <table:table-cell table:style-name="ce41" office:value-type="float" office:value="650" calcext:value-type="float">
            <text:p>650</text:p>
          </table:table-cell>
          <table:table-cell table:style-name="ce45" office:value-type="float" office:value="1738" calcext:value-type="float">
            <text:p>1738</text:p>
          </table:table-cell>
          <table:table-cell table:style-name="ce53" table:formula="of:=SUM([.D555:.H555])" office:value-type="float" office:value="4410" calcext:value-type="float">
            <text:p>441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5]=126;70;IF([.T555]=112;70;IF([.T555]=98;70;IF([.T555]=96;60;IF([.T555]=84;60;IF([.T555]=108;60;IF([.T555]=90;50;IF([.T555]=72;40;IF([.T555]=80;40;IF([.T555]=100;50;IF([.T555]=54;30;IF([.T555]=36;20;IF([.T555]=18;10;IF([.T55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3555/defenderoftexel/images/thumb/2/21/Mirza_Icon.png/40px-Mirz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irza&quot;; &quot;Mirza&quot;)" office:value-type="string" office:string-value="Mirza" calcext:value-type="string">
            <text:p>Mirza</text:p>
          </table:table-cell>
          <table:table-cell table:style-name="ce25"/>
          <table:table-cell table:style-name="ce28" office:value-type="float" office:value="2881" calcext:value-type="float">
            <text:p>2881</text:p>
          </table:table-cell>
          <table:table-cell table:style-name="ce33" office:value-type="float" office:value="3293" calcext:value-type="float">
            <text:p>3293</text:p>
          </table:table-cell>
          <table:table-cell table:style-name="ce37" office:value-type="float" office:value="1766" calcext:value-type="float">
            <text:p>1766</text:p>
          </table:table-cell>
          <table:table-cell table:style-name="ce41" office:value-type="float" office:value="416" calcext:value-type="float">
            <text:p>416</text:p>
          </table:table-cell>
          <table:table-cell table:style-name="ce45" office:value-type="float" office:value="552" calcext:value-type="float">
            <text:p>552</text:p>
          </table:table-cell>
          <table:table-cell table:style-name="ce53" table:formula="of:=SUM([.D556:.H556])" office:value-type="float" office:value="8908" calcext:value-type="float">
            <text:p>8908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6]=126;70;IF([.T556]=112;70;IF([.T556]=98;70;IF([.T556]=96;60;IF([.T556]=84;60;IF([.T556]=108;60;IF([.T556]=90;50;IF([.T556]=72;40;IF([.T556]=80;40;IF([.T556]=100;50;IF([.T556]=54;30;IF([.T556]=36;20;IF([.T556]=18;10;IF([.T55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527135104/defenderoftexel/images/thumb/b/bd/Moloch_Icon.png/50px-Moloc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oloch&quot;; &quot;Moloch&quot;)" office:value-type="string" office:string-value="Moloch" calcext:value-type="string">
            <text:p>Moloch</text:p>
          </table:table-cell>
          <table:table-cell table:style-name="ce25"/>
          <table:table-cell table:style-name="ce28" office:value-type="float" office:value="5371" calcext:value-type="float">
            <text:p>5371</text:p>
          </table:table-cell>
          <table:table-cell table:style-name="ce33" office:value-type="float" office:value="6246" calcext:value-type="float">
            <text:p>6246</text:p>
          </table:table-cell>
          <table:table-cell table:style-name="ce37" office:value-type="float" office:value="4347" calcext:value-type="float">
            <text:p>4347</text:p>
          </table:table-cell>
          <table:table-cell table:style-name="ce41" office:value-type="float" office:value="612" calcext:value-type="float">
            <text:p>612</text:p>
          </table:table-cell>
          <table:table-cell table:style-name="ce45" office:value-type="float" office:value="739" calcext:value-type="float">
            <text:p>739</text:p>
          </table:table-cell>
          <table:table-cell table:style-name="ce53" table:formula="of:=SUM([.D557:.H557])" office:value-type="float" office:value="17315" calcext:value-type="float">
            <text:p>17315</text:p>
          </table:table-cell>
          <table:table-cell table:style-name="ce60" office:value-type="string" calcext:value-type="string">
            <text:p>Bullwhip</text:p>
          </table:table-cell>
          <table:table-cell table:style-name="ce60" office:value-type="string" calcext:value-type="string">
            <text:p>Double 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7]=126;70;IF([.T557]=112;70;IF([.T557]=98;70;IF([.T557]=96;60;IF([.T557]=84;60;IF([.T557]=108;60;IF([.T557]=90;50;IF([.T557]=72;40;IF([.T557]=80;40;IF([.T557]=100;50;IF([.T557]=54;30;IF([.T557]=36;20;IF([.T557]=18;10;IF([.T55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722154412/defenderoftexel/images/thumb/e/eb/Momahk_Icon.png/50px-Momah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omahk&quot;; &quot;Momahk&quot;)" office:value-type="string" office:string-value="Momahk" calcext:value-type="string">
            <text:p>Momahk</text:p>
          </table:table-cell>
          <table:table-cell table:style-name="ce25"/>
          <table:table-cell table:style-name="ce28" office:value-type="float" office:value="4212" calcext:value-type="float">
            <text:p>4212</text:p>
          </table:table-cell>
          <table:table-cell table:style-name="ce33" office:value-type="float" office:value="548" calcext:value-type="float">
            <text:p>548</text:p>
          </table:table-cell>
          <table:table-cell table:style-name="ce37" office:value-type="float" office:value="1495" calcext:value-type="float">
            <text:p>1495</text:p>
          </table:table-cell>
          <table:table-cell table:style-name="ce41" office:value-type="float" office:value="8565" calcext:value-type="float">
            <text:p>8565</text:p>
          </table:table-cell>
          <table:table-cell table:style-name="ce48" office:value-type="float" office:value="2854" calcext:value-type="float">
            <text:p>2854</text:p>
          </table:table-cell>
          <table:table-cell table:style-name="ce53" table:formula="of:=SUM([.D558:.H558])" office:value-type="float" office:value="17674" calcext:value-type="float">
            <text:p>17674</text:p>
          </table:table-cell>
          <table:table-cell table:style-name="ce60" office:value-type="string" calcext:value-type="string">
            <text:p>Thwa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8]=126;70;IF([.T558]=112;70;IF([.T558]=98;70;IF([.T558]=96;60;IF([.T558]=84;60;IF([.T558]=108;60;IF([.T558]=90;50;IF([.T558]=72;40;IF([.T558]=80;40;IF([.T558]=100;50;IF([.T558]=54;30;IF([.T558]=36;20;IF([.T558]=18;10;IF([.T558]=60;30))))))))))))))" office:value-type="float" office:value="50" calcext:value-type="float">
            <text:p>50</text:p>
          </table:table-cell>
          <table:table-cell table:style-name="ce68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722155655/defenderoftexel/images/thumb/a/af/Montelepre_Icon.png/50px-Montelepr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ontelepre&quot;; &quot;Montelepre&quot;)" office:value-type="string" office:string-value="Montelepre" calcext:value-type="string">
            <text:p>Montelepre</text:p>
          </table:table-cell>
          <table:table-cell table:style-name="ce25"/>
          <table:table-cell table:style-name="ce28" office:value-type="float" office:value="3923" calcext:value-type="float">
            <text:p>3923</text:p>
          </table:table-cell>
          <table:table-cell table:style-name="ce33" office:value-type="float" office:value="7085" calcext:value-type="float">
            <text:p>7085</text:p>
          </table:table-cell>
          <table:table-cell table:style-name="ce37" office:value-type="float" office:value="2369" calcext:value-type="float">
            <text:p>2369</text:p>
          </table:table-cell>
          <table:table-cell table:style-name="ce41" office:value-type="float" office:value="2681" calcext:value-type="float">
            <text:p>2681</text:p>
          </table:table-cell>
          <table:table-cell table:style-name="ce45" office:value-type="float" office:value="939" calcext:value-type="float">
            <text:p>939</text:p>
          </table:table-cell>
          <table:table-cell table:style-name="ce53" table:formula="of:=SUM([.D559:.H559])" office:value-type="float" office:value="16997" calcext:value-type="float">
            <text:p>16997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59]=126;70;IF([.T559]=112;70;IF([.T559]=98;70;IF([.T559]=96;60;IF([.T559]=84;60;IF([.T559]=108;60;IF([.T559]=90;50;IF([.T559]=72;40;IF([.T559]=80;40;IF([.T559]=100;50;IF([.T559]=54;30;IF([.T559]=36;20;IF([.T559]=18;10;IF([.T559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601195936/defenderoftexel/images/thumb/b/b1/Montu%2C_God_of_War_Icon.png/50px-Montu%2C_God_of_W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ontu_-_Weaponmaster_Montu_-_Montu,_God_of_War&quot;; &quot;Montu, God of War&quot;)" office:value-type="string" office:string-value="Montu, God of War" calcext:value-type="string">
            <text:p>Montu, God of War</text:p>
          </table:table-cell>
          <table:table-cell table:style-name="ce25"/>
          <table:table-cell table:style-name="ce28" office:value-type="float" office:value="3469" calcext:value-type="float">
            <text:p>3469</text:p>
          </table:table-cell>
          <table:table-cell table:style-name="ce33" office:value-type="float" office:value="5275" calcext:value-type="float">
            <text:p>5275</text:p>
          </table:table-cell>
          <table:table-cell table:style-name="ce37" office:value-type="float" office:value="1802" calcext:value-type="float">
            <text:p>1802</text:p>
          </table:table-cell>
          <table:table-cell table:style-name="ce41" office:value-type="float" office:value="1086" calcext:value-type="float">
            <text:p>1086</text:p>
          </table:table-cell>
          <table:table-cell table:style-name="ce45" office:value-type="float" office:value="5468" calcext:value-type="float">
            <text:p>5468</text:p>
          </table:table-cell>
          <table:table-cell table:style-name="ce53" table:formula="of:=SUM([.D560:.H560])" office:value-type="float" office:value="17100" calcext:value-type="float">
            <text:p>17100</text:p>
          </table:table-cell>
          <table:table-cell table:style-name="ce60" office:value-type="string" calcext:value-type="string">
            <text:p>War Danc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0]=126;70;IF([.T560]=112;70;IF([.T560]=98;70;IF([.T560]=96;60;IF([.T560]=84;60;IF([.T560]=108;60;IF([.T560]=90;50;IF([.T560]=72;40;IF([.T560]=80;40;IF([.T560]=100;50;IF([.T560]=54;30;IF([.T560]=36;20;IF([.T560]=18;10;IF([.T56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d/d9/Munat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athli_-_Cilni_-_Munati&quot;; &quot;Munati&quot;)" office:value-type="string" office:string-value="Munati" calcext:value-type="string">
            <text:p>Munati</text:p>
          </table:table-cell>
          <table:table-cell table:style-name="ce25"/>
          <table:table-cell table:style-name="ce28" office:value-type="float" office:value="1361" calcext:value-type="float">
            <text:p>1361</text:p>
          </table:table-cell>
          <table:table-cell table:style-name="ce33" office:value-type="float" office:value="2119" calcext:value-type="float">
            <text:p>2119</text:p>
          </table:table-cell>
          <table:table-cell table:style-name="ce37" office:value-type="float" office:value="689" calcext:value-type="float">
            <text:p>689</text:p>
          </table:table-cell>
          <table:table-cell table:style-name="ce41" office:value-type="float" office:value="405" calcext:value-type="float">
            <text:p>405</text:p>
          </table:table-cell>
          <table:table-cell table:style-name="ce45" office:value-type="float" office:value="2206" calcext:value-type="float">
            <text:p>2206</text:p>
          </table:table-cell>
          <table:table-cell table:style-name="ce53" table:formula="of:=SUM([.D561:.H561])" office:value-type="float" office:value="6780" calcext:value-type="float">
            <text:p>678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1]=126;70;IF([.T561]=112;70;IF([.T561]=98;70;IF([.T561]=96;60;IF([.T561]=84;60;IF([.T561]=108;60;IF([.T561]=90;50;IF([.T561]=72;40;IF([.T561]=80;40;IF([.T561]=100;50;IF([.T561]=54;30;IF([.T561]=36;20;IF([.T561]=18;10;IF([.T56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52648/defenderoftexel/images/thumb/2/26/Munawwirtum_Icon.png/50px-Munawwirtu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unawwirtum&quot;; &quot;Munawwirtum&quot;)" office:value-type="string" office:string-value="Munawwirtum" calcext:value-type="string">
            <text:p>Munawwirtum</text:p>
          </table:table-cell>
          <table:table-cell table:style-name="ce25"/>
          <table:table-cell table:style-name="ce28" office:value-type="float" office:value="1287" calcext:value-type="float">
            <text:p>1287</text:p>
          </table:table-cell>
          <table:table-cell table:style-name="ce33" office:value-type="float" office:value="903" calcext:value-type="float">
            <text:p>903</text:p>
          </table:table-cell>
          <table:table-cell table:style-name="ce37" office:value-type="float" office:value="585" calcext:value-type="float">
            <text:p>585</text:p>
          </table:table-cell>
          <table:table-cell table:style-name="ce41" office:value-type="float" office:value="3709" calcext:value-type="float">
            <text:p>3709</text:p>
          </table:table-cell>
          <table:table-cell table:style-name="ce45" office:value-type="float" office:value="3530" calcext:value-type="float">
            <text:p>3530</text:p>
          </table:table-cell>
          <table:table-cell table:style-name="ce53" table:formula="of:=SUM([.D562:.H562])" office:value-type="float" office:value="10014" calcext:value-type="float">
            <text:p>10014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2]=126;70;IF([.T562]=112;70;IF([.T562]=98;70;IF([.T562]=96;60;IF([.T562]=84;60;IF([.T562]=108;60;IF([.T562]=90;50;IF([.T562]=72;40;IF([.T562]=80;40;IF([.T562]=100;50;IF([.T562]=54;30;IF([.T562]=36;20;IF([.T562]=18;10;IF([.T56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d/d3/Munu_Icon.png/revision/latest?cb=20141028110454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nu_-_Izisoob_-_Tak-Tak&quot;;&quot;Munu&quot;)" office:value-type="string" office:string-value="Munu" calcext:value-type="string">
            <text:p>Mun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63]=126;70;IF([.T563]=112;70;IF([.T563]=98;70;IF([.T563]=96;60;IF([.T563]=84;60;IF([.T563]=108;60;IF([.T563]=90;50;IF([.T563]=72;40;IF([.T563]=80;40;IF([.T563]=100;50;IF([.T563]=54;30;IF([.T563]=36;20;IF([.T563]=18;10;IF([.T56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a/Mushezibit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ushezibitu&quot;;&quot;Mushezibitu&quot;)" office:value-type="string" office:string-value="Mushezibitu" calcext:value-type="string">
            <text:p>Mushezibitu</text:p>
          </table:table-cell>
          <table:table-cell table:style-name="ce25"/>
          <table:table-cell table:style-name="ce28" office:value-type="float" office:value="3105" calcext:value-type="float">
            <text:p>3105</text:p>
          </table:table-cell>
          <table:table-cell table:style-name="ce33" office:value-type="float" office:value="3552" calcext:value-type="float">
            <text:p>3552</text:p>
          </table:table-cell>
          <table:table-cell table:style-name="ce37" office:value-type="float" office:value="1905" calcext:value-type="float">
            <text:p>1905</text:p>
          </table:table-cell>
          <table:table-cell table:style-name="ce41" office:value-type="float" office:value="448" calcext:value-type="float">
            <text:p>448</text:p>
          </table:table-cell>
          <table:table-cell table:style-name="ce45" office:value-type="float" office:value="595" calcext:value-type="float">
            <text:p>595</text:p>
          </table:table-cell>
          <table:table-cell table:style-name="ce53" table:formula="of:=SUM([.D564:.H564])" office:value-type="float" office:value="9605" calcext:value-type="float">
            <text:p>9605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4]=126;70;IF([.T564]=112;70;IF([.T564]=98;70;IF([.T564]=96;60;IF([.T564]=84;60;IF([.T564]=108;60;IF([.T564]=90;50;IF([.T564]=72;40;IF([.T564]=80;40;IF([.T564]=100;50;IF([.T564]=54;30;IF([.T564]=36;20;IF([.T564]=18;10;IF([.T56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513121444/defenderoftexel/images/thumb/e/e4/Nabu-Belshum_Icon.png/50px-Nabu-Belshu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bu-Belshum&quot;; &quot;Nabu-Belshum&quot;)" office:value-type="string" office:string-value="Nabu-Belshum" calcext:value-type="string">
            <text:p>Nabu-Belshum</text:p>
          </table:table-cell>
          <table:table-cell table:style-name="ce25"/>
          <table:table-cell table:style-name="ce28" office:value-type="float" office:value="4950" calcext:value-type="float">
            <text:p>4950</text:p>
          </table:table-cell>
          <table:table-cell table:style-name="ce33" office:value-type="float" office:value="11518" calcext:value-type="float">
            <text:p>11518</text:p>
          </table:table-cell>
          <table:table-cell table:style-name="ce37" office:value-type="float" office:value="2519" calcext:value-type="float">
            <text:p>2519</text:p>
          </table:table-cell>
          <table:table-cell table:style-name="ce41" office:value-type="float" office:value="10940" calcext:value-type="float">
            <text:p>10940</text:p>
          </table:table-cell>
          <table:table-cell table:style-name="ce45" office:value-type="float" office:value="3344" calcext:value-type="float">
            <text:p>3344</text:p>
          </table:table-cell>
          <table:table-cell table:style-name="ce53" table:formula="of:=SUM([.D565:.H565])" office:value-type="float" office:value="33271" calcext:value-type="float">
            <text:p>33271</text:p>
          </table:table-cell>
          <table:table-cell table:style-name="ce60" office:value-type="string" calcext:value-type="string">
            <text:p>Fishfry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565]=126;70;IF([.T565]=112;70;IF([.T565]=98;70;IF([.T565]=96;60;IF([.T565]=84;60;IF([.T565]=108;60;IF([.T565]=90;50;IF([.T565]=72;40;IF([.T565]=80;40;IF([.T565]=100;50;IF([.T565]=54;30;IF([.T565]=36;20;IF([.T565]=18;10;IF([.T56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520210412/defenderoftexel/images/a/a1/Nabu-u-Sabs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bu-Kullani&quot;; &quot;Nabu-u-Sabsi&quot;)" office:value-type="string" office:string-value="Nabu-u-Sabsi" calcext:value-type="string">
            <text:p>Nabu-u-Sabsi</text:p>
          </table:table-cell>
          <table:table-cell table:style-name="ce25"/>
          <table:table-cell table:style-name="ce28" office:value-type="float" office:value="5143" calcext:value-type="float">
            <text:p>5143</text:p>
          </table:table-cell>
          <table:table-cell table:style-name="ce33" office:value-type="float" office:value="3669" calcext:value-type="float">
            <text:p>3669</text:p>
          </table:table-cell>
          <table:table-cell table:style-name="ce37" office:value-type="float" office:value="4266" calcext:value-type="float">
            <text:p>4266</text:p>
          </table:table-cell>
          <table:table-cell table:style-name="ce41" office:value-type="float" office:value="440" calcext:value-type="float">
            <text:p>440</text:p>
          </table:table-cell>
          <table:table-cell table:style-name="ce45" office:value-type="float" office:value="545" calcext:value-type="float">
            <text:p>545</text:p>
          </table:table-cell>
          <table:table-cell table:style-name="ce53" table:formula="of:=SUM([.D566:.H566])" office:value-type="float" office:value="14063" calcext:value-type="float">
            <text:p>14063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6]=126;70;IF([.T566]=112;70;IF([.T566]=98;70;IF([.T566]=96;60;IF([.T566]=84;60;IF([.T566]=108;60;IF([.T566]=90;50;IF([.T566]=72;40;IF([.T566]=80;40;IF([.T566]=100;50;IF([.T566]=54;30;IF([.T566]=36;20;IF([.T566]=18;10;IF([.T56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b/bc/Nanay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Bilit_-_Taauth_-_Nanaya&quot;; &quot;Nanaya&quot;)" office:value-type="string" office:string-value="Nanaya" calcext:value-type="string">
            <text:p>Nanaya</text:p>
          </table:table-cell>
          <table:table-cell table:style-name="ce25"/>
          <table:table-cell table:style-name="ce28" office:value-type="float" office:value="2843" calcext:value-type="float">
            <text:p>2843</text:p>
          </table:table-cell>
          <table:table-cell table:style-name="ce33" office:value-type="float" office:value="8229" calcext:value-type="float">
            <text:p>8229</text:p>
          </table:table-cell>
          <table:table-cell table:style-name="ce37" office:value-type="float" office:value="2541" calcext:value-type="float">
            <text:p>2541</text:p>
          </table:table-cell>
          <table:table-cell table:style-name="ce41" office:value-type="float" office:value="5391" calcext:value-type="float">
            <text:p>5391</text:p>
          </table:table-cell>
          <table:table-cell table:style-name="ce45" office:value-type="float" office:value="3902" calcext:value-type="float">
            <text:p>3902</text:p>
          </table:table-cell>
          <table:table-cell table:style-name="ce53" table:formula="of:=SUM([.D567:.H567])" office:value-type="float" office:value="22906" calcext:value-type="float">
            <text:p>22906</text:p>
          </table:table-cell>
          <table:table-cell table:style-name="ce60" office:value-type="string" calcext:value-type="string">
            <text:p>Broadsid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567]=126;70;IF([.T567]=112;70;IF([.T567]=98;70;IF([.T567]=96;60;IF([.T567]=84;60;IF([.T567]=108;60;IF([.T567]=90;50;IF([.T567]=72;40;IF([.T567]=80;40;IF([.T567]=100;50;IF([.T567]=54;30;IF([.T567]=36;20;IF([.T567]=18;10;IF([.T56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f/f5/Nandino_Icon.png/revision/latest?cb=20150423180952&quot;)" office:value-type="string" office:string-value="" calcext:value-type="error">
            <text:p>#NAME?</text:p>
          </table:table-cell>
          <table:table-cell table:style-name="ce11" table:formula="of:=HYPERLINK(&quot;http://defenderoftexel.wikia.com/wiki/Limmo_-_Nandino_-_Liopold&quot;;&quot;Nandino&quot;)" office:value-type="string" office:string-value="Nandino" calcext:value-type="string">
            <text:p>Nandino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6686" calcext:value-type="float">
            <text:p>6686</text:p>
          </table:table-cell>
          <table:table-cell table:style-name="ce32" office:value-type="float" office:value="7642" calcext:value-type="float">
            <text:p>7642</text:p>
          </table:table-cell>
          <table:table-cell table:style-name="ce36" office:value-type="float" office:value="4103" calcext:value-type="float">
            <text:p>4103</text:p>
          </table:table-cell>
          <table:table-cell table:style-name="ce40" office:value-type="float" office:value="966" calcext:value-type="float">
            <text:p>966</text:p>
          </table:table-cell>
          <table:table-cell table:style-name="ce44" office:value-type="float" office:value="1287" calcext:value-type="float">
            <text:p>1287</text:p>
          </table:table-cell>
          <table:table-cell table:style-name="ce52" table:formula="of:=SUM([.D568:.H568])" office:value-type="float" office:value="20684" calcext:value-type="float">
            <text:p>20684</text:p>
          </table:table-cell>
          <table:table-cell table:style-name="ce59" office:value-type="string" calcext:value-type="string">
            <text:p>Displod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68]=126;70;IF([.T568]=112;70;IF([.T568]=98;70;IF([.T568]=96;60;IF([.T568]=84;60;IF([.T568]=108;60;IF([.T568]=90;50;IF([.T568]=72;40;IF([.T568]=80;40;IF([.T568]=100;50;IF([.T568]=54;30;IF([.T568]=36;20;IF([.T568]=18;10;IF([.T568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3908/defenderoftexel/images/thumb/1/11/Naram-Sin_Icon.png/50px-Naram-S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ram-Sin&quot;; &quot;Naram-Sin&quot;)" office:value-type="string" office:string-value="Naram-Sin" calcext:value-type="string">
            <text:p>Naram-Sin</text:p>
          </table:table-cell>
          <table:table-cell table:style-name="ce25"/>
          <table:table-cell table:style-name="ce28" office:value-type="float" office:value="1582" calcext:value-type="float">
            <text:p>1582</text:p>
          </table:table-cell>
          <table:table-cell table:style-name="ce33" office:value-type="float" office:value="3557" calcext:value-type="float">
            <text:p>3557</text:p>
          </table:table-cell>
          <table:table-cell table:style-name="ce37" office:value-type="float" office:value="814" calcext:value-type="float">
            <text:p>814</text:p>
          </table:table-cell>
          <table:table-cell table:style-name="ce41" office:value-type="float" office:value="3384" calcext:value-type="float">
            <text:p>3384</text:p>
          </table:table-cell>
          <table:table-cell table:style-name="ce45" office:value-type="float" office:value="1073" calcext:value-type="float">
            <text:p>1073</text:p>
          </table:table-cell>
          <table:table-cell table:style-name="ce53" table:formula="of:=SUM([.D569:.H569])" office:value-type="float" office:value="10410" calcext:value-type="float">
            <text:p>10410</text:p>
          </table:table-cell>
          <table:table-cell table:style-name="ce60" office:value-type="string" calcext:value-type="string">
            <text:p>Zhap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69]=126;70;IF([.T569]=112;70;IF([.T569]=98;70;IF([.T569]=96;60;IF([.T569]=84;60;IF([.T569]=108;60;IF([.T569]=90;50;IF([.T569]=72;40;IF([.T569]=80;40;IF([.T569]=100;50;IF([.T569]=54;30;IF([.T569]=36;20;IF([.T569]=18;10;IF([.T56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128161351/defenderoftexel/images/thumb/e/ee/Narokken_Icon.png/50px-Narokke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Narokken&quot;; &quot;Narokken&quot;)" office:value-type="string" office:string-value="Narokken" calcext:value-type="string">
            <text:p>Narokke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16" calcext:value-type="float">
            <text:p>2616</text:p>
          </table:table-cell>
          <table:table-cell table:style-name="ce32" office:value-type="float" office:value="3979" calcext:value-type="float">
            <text:p>3979</text:p>
          </table:table-cell>
          <table:table-cell table:style-name="ce36" office:value-type="float" office:value="1359" calcext:value-type="float">
            <text:p>1359</text:p>
          </table:table-cell>
          <table:table-cell table:style-name="ce40" office:value-type="float" office:value="820" calcext:value-type="float">
            <text:p>820</text:p>
          </table:table-cell>
          <table:table-cell table:style-name="ce44" office:value-type="float" office:value="4129" calcext:value-type="float">
            <text:p>4129</text:p>
          </table:table-cell>
          <table:table-cell table:style-name="ce52" table:formula="of:=SUM([.D570:.H570])" office:value-type="float" office:value="12903" calcext:value-type="float">
            <text:p>12903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70]=126;70;IF([.T570]=112;70;IF([.T570]=98;70;IF([.T570]=96;60;IF([.T570]=84;60;IF([.T570]=108;60;IF([.T570]=90;50;IF([.T570]=72;40;IF([.T570]=80;40;IF([.T570]=100;50;IF([.T570]=54;30;IF([.T570]=36;20;IF([.T570]=18;10;IF([.T57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7/7b/Nasreddin_Icon.png/revision/latest?cb=20141111143930&quot;)" office:value-type="string" office:string-value="" calcext:value-type="error">
            <text:p>#NAME?</text:p>
          </table:table-cell>
          <table:table-cell table:style-name="ce11" table:formula="of:=HYPERLINK(&quot;http://defenderoftexel.wikia.com/wiki/Hoxha_-_Afandi_-_Nasreddin&quot;;&quot;Nasreddin&quot;)" office:value-type="string" office:string-value="Nasreddin" calcext:value-type="string">
            <text:p>Nasreddi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778" calcext:value-type="float">
            <text:p>2778</text:p>
          </table:table-cell>
          <table:table-cell table:style-name="ce32" office:value-type="float" office:value="2697" calcext:value-type="float">
            <text:p>2697</text:p>
          </table:table-cell>
          <table:table-cell table:style-name="ce36" office:value-type="float" office:value="1365" calcext:value-type="float">
            <text:p>1365</text:p>
          </table:table-cell>
          <table:table-cell table:style-name="ce40" office:value-type="float" office:value="2778" calcext:value-type="float">
            <text:p>2778</text:p>
          </table:table-cell>
          <table:table-cell table:style-name="ce44" office:value-type="float" office:value="7453" calcext:value-type="float">
            <text:p>7453</text:p>
          </table:table-cell>
          <table:table-cell table:style-name="ce52" table:formula="of:=SUM([.D571:.H571])" office:value-type="float" office:value="17071" calcext:value-type="float">
            <text:p>17071</text:p>
          </table:table-cell>
          <table:table-cell table:style-name="ce59" office:value-type="string" calcext:value-type="string">
            <text:p>Lark</text:p>
          </table:table-cell>
          <table:table-cell table:style-name="ce59" office:value-type="string" calcext:value-type="string">
            <text:p>Random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71]=126;70;IF([.T571]=112;70;IF([.T571]=98;70;IF([.T571]=96;60;IF([.T571]=84;60;IF([.T571]=108;60;IF([.T571]=90;50;IF([.T571]=72;40;IF([.T571]=80;40;IF([.T571]=100;50;IF([.T571]=54;30;IF([.T571]=36;20;IF([.T571]=18;10;IF([.T571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029125504/defenderoftexel/images/thumb/1/1d/Nasrin_Icon.png/50px-Nasr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srin&quot;;&quot;Nasrin&quot;)" office:value-type="string" office:string-value="Nasrin" calcext:value-type="string">
            <text:p>Nasrin</text:p>
          </table:table-cell>
          <table:table-cell table:style-name="ce25"/>
          <table:table-cell table:style-name="ce28" office:value-type="float" office:value="3237" calcext:value-type="float">
            <text:p>3237</text:p>
          </table:table-cell>
          <table:table-cell table:style-name="ce33" office:value-type="float" office:value="4079" calcext:value-type="float">
            <text:p>4079</text:p>
          </table:table-cell>
          <table:table-cell table:style-name="ce37" office:value-type="float" office:value="1070" calcext:value-type="float">
            <text:p>1070</text:p>
          </table:table-cell>
          <table:table-cell table:style-name="ce41" office:value-type="float" office:value="3720" calcext:value-type="float">
            <text:p>3720</text:p>
          </table:table-cell>
          <table:table-cell table:style-name="ce45" office:value-type="float" office:value="711" calcext:value-type="float">
            <text:p>711</text:p>
          </table:table-cell>
          <table:table-cell table:style-name="ce53" table:formula="of:=SUM([.D572:.H572])" office:value-type="float" office:value="12817" calcext:value-type="float">
            <text:p>12817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72]=126;70;IF([.T572]=112;70;IF([.T572]=98;70;IF([.T572]=96;60;IF([.T572]=84;60;IF([.T572]=108;60;IF([.T572]=90;50;IF([.T572]=72;40;IF([.T572]=80;40;IF([.T572]=100;50;IF([.T572]=54;30;IF([.T572]=36;20;IF([.T572]=18;10;IF([.T57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1/1e/Nazarre_Icon.png/revision/latest?cb=20140930165927&quot;)" office:value-type="string" office:string-value="" calcext:value-type="error">
            <text:p>#NAME?</text:p>
          </table:table-cell>
          <table:table-cell table:style-name="ce11" table:formula="of:=HYPERLINK(&quot;http://defenderoftexel.wikia.com/wiki/Nazarre_-_Tangrihan_-_Asphandiat&quot;;&quot;Nazarre&quot;)" office:value-type="string" office:string-value="Nazarre" calcext:value-type="string">
            <text:p>Nazarr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73]=126;70;IF([.T573]=112;70;IF([.T573]=98;70;IF([.T573]=96;60;IF([.T573]=84;60;IF([.T573]=108;60;IF([.T573]=90;50;IF([.T573]=72;40;IF([.T573]=80;40;IF([.T573]=100;50;IF([.T573]=54;30;IF([.T573]=36;20;IF([.T573]=18;10;IF([.T573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0/02/Nebuchadnezz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ebuchadnezzar&quot;; &quot;Nebuchadnezzar&quot;)" office:value-type="string" office:string-value="Nebuchadnezzar" calcext:value-type="string">
            <text:p>Nebuchadnezzar</text:p>
          </table:table-cell>
          <table:table-cell table:style-name="ce25"/>
          <table:table-cell table:style-name="ce28" office:value-type="float" office:value="7642" calcext:value-type="float">
            <text:p>7642</text:p>
          </table:table-cell>
          <table:table-cell table:style-name="ce33" office:value-type="float" office:value="8749" calcext:value-type="float">
            <text:p>8749</text:p>
          </table:table-cell>
          <table:table-cell table:style-name="ce37" office:value-type="float" office:value="4663" calcext:value-type="float">
            <text:p>4663</text:p>
          </table:table-cell>
          <table:table-cell table:style-name="ce41" office:value-type="float" office:value="1110" calcext:value-type="float">
            <text:p>1110</text:p>
          </table:table-cell>
          <table:table-cell table:style-name="ce45" office:value-type="float" office:value="1475" calcext:value-type="float">
            <text:p>1475</text:p>
          </table:table-cell>
          <table:table-cell table:style-name="ce53" table:formula="of:=SUM([.D574:.H574])" office:value-type="float" office:value="23639" calcext:value-type="float">
            <text:p>23639</text:p>
          </table:table-cell>
          <table:table-cell table:style-name="ce60" office:value-type="string" calcext:value-type="string">
            <text:p>Ambu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574]=126;70;IF([.T574]=112;70;IF([.T574]=98;70;IF([.T574]=96;60;IF([.T574]=84;60;IF([.T574]=108;60;IF([.T574]=90;50;IF([.T574]=72;40;IF([.T574]=80;40;IF([.T574]=100;50;IF([.T574]=54;30;IF([.T574]=36;20;IF([.T574]=18;10;IF([.T57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218102538/defenderoftexel/images/thumb/8/81/Nemenepsa_Icon.png/50px-Nemeneps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emenepsa&quot;;&quot;Nemenepsa&quot;)" office:value-type="string" office:string-value="Nemenepsa" calcext:value-type="string">
            <text:p>Nemenepsa</text:p>
          </table:table-cell>
          <table:table-cell table:style-name="ce25"/>
          <table:table-cell table:style-name="ce28" office:value-type="float" office:value="3543" calcext:value-type="float">
            <text:p>3543</text:p>
          </table:table-cell>
          <table:table-cell table:style-name="ce33" office:value-type="float" office:value="4006" calcext:value-type="float">
            <text:p>4006</text:p>
          </table:table-cell>
          <table:table-cell table:style-name="ce37" office:value-type="float" office:value="7262" calcext:value-type="float">
            <text:p>7262</text:p>
          </table:table-cell>
          <table:table-cell table:style-name="ce41" office:value-type="float" office:value="364" calcext:value-type="float">
            <text:p>364</text:p>
          </table:table-cell>
          <table:table-cell table:style-name="ce45" office:value-type="float" office:value="309" calcext:value-type="float">
            <text:p>309</text:p>
          </table:table-cell>
          <table:table-cell table:style-name="ce53" table:formula="of:=SUM([.D575:.H575])" office:value-type="float" office:value="15484" calcext:value-type="float">
            <text:p>15484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75]=126;70;IF([.T575]=112;70;IF([.T575]=98;70;IF([.T575]=96;60;IF([.T575]=84;60;IF([.T575]=108;60;IF([.T575]=90;50;IF([.T575]=72;40;IF([.T575]=80;40;IF([.T575]=100;50;IF([.T575]=54;30;IF([.T575]=36;20;IF([.T575]=18;10;IF([.T57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30162342/defenderoftexel/images/6/67/Nergal-Sar-Ussu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ergal-Sar-Ussur&quot;; &quot;Nergal-Sar-Ussur&quot;)" office:value-type="string" office:string-value="Nergal-Sar-Ussur" calcext:value-type="string">
            <text:p>Nergal-Sar-Ussur</text:p>
          </table:table-cell>
          <table:table-cell table:style-name="ce25"/>
          <table:table-cell table:style-name="ce28" office:value-type="float" office:value="2084" calcext:value-type="float">
            <text:p>2084</text:p>
          </table:table-cell>
          <table:table-cell table:style-name="ce33" office:value-type="float" office:value="4851" calcext:value-type="float">
            <text:p>4851</text:p>
          </table:table-cell>
          <table:table-cell table:style-name="ce37" office:value-type="float" office:value="1058" calcext:value-type="float">
            <text:p>1058</text:p>
          </table:table-cell>
          <table:table-cell table:style-name="ce41" office:value-type="float" office:value="4605" calcext:value-type="float">
            <text:p>4605</text:p>
          </table:table-cell>
          <table:table-cell table:style-name="ce45" office:value-type="float" office:value="1404" calcext:value-type="float">
            <text:p>1404</text:p>
          </table:table-cell>
          <table:table-cell table:style-name="ce53" table:formula="of:=SUM([.D576:.H576])" office:value-type="float" office:value="14002" calcext:value-type="float">
            <text:p>14002</text:p>
          </table:table-cell>
          <table:table-cell table:style-name="ce60" office:value-type="string" calcext:value-type="string">
            <text:p>Unhinge</text:p>
          </table:table-cell>
          <table:table-cell table:style-name="ce60" office:value-type="string" calcext:value-type="string">
            <text:p>Self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76]=126;70;IF([.T576]=112;70;IF([.T576]=98;70;IF([.T576]=96;60;IF([.T576]=84;60;IF([.T576]=108;60;IF([.T576]=90;50;IF([.T576]=72;40;IF([.T576]=80;40;IF([.T576]=100;50;IF([.T576]=54;30;IF([.T576]=36;20;IF([.T576]=18;10;IF([.T57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1.wikia.nocookie.net/__cb20130428041329/defenderoftexel/images/e/ea/Neversaw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Neversaw&quot;; &quot;Neversaw&quot;)" office:value-type="string" office:string-value="Neversaw" calcext:value-type="string">
            <text:p>Neversaw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334" calcext:value-type="float">
            <text:p>3334</text:p>
          </table:table-cell>
          <table:table-cell table:style-name="ce32" office:value-type="float" office:value="2817" calcext:value-type="float">
            <text:p>2817</text:p>
          </table:table-cell>
          <table:table-cell table:style-name="ce36" office:value-type="float" office:value="1444" calcext:value-type="float">
            <text:p>1444</text:p>
          </table:table-cell>
          <table:table-cell table:style-name="ce40" office:value-type="float" office:value="283" calcext:value-type="float">
            <text:p>283</text:p>
          </table:table-cell>
          <table:table-cell table:style-name="ce44" office:value-type="float" office:value="1081" calcext:value-type="float">
            <text:p>1081</text:p>
          </table:table-cell>
          <table:table-cell table:style-name="ce52" table:formula="of:=SUM([.D577:.H577])" office:value-type="float" office:value="8959" calcext:value-type="float">
            <text:p>8959</text:p>
          </table:table-cell>
          <table:table-cell table:style-name="ce59" office:value-type="string" calcext:value-type="string">
            <text:p>Smas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77]=126;70;IF([.T577]=112;70;IF([.T577]=98;70;IF([.T577]=96;60;IF([.T577]=84;60;IF([.T577]=108;60;IF([.T577]=90;50;IF([.T577]=72;40;IF([.T577]=80;40;IF([.T577]=100;50;IF([.T577]=54;30;IF([.T577]=36;20;IF([.T577]=18;10;IF([.T57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911134629/defenderoftexel/images/thumb/d/db/Ngeshtin-Ana_Icon.png/50px-Ngeshtin-A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nshe_-_Namrat_-_Ngeshtin-Ana&quot;; &quot;Ngeshtin-Ana&quot;)" office:value-type="string" office:string-value="Ngeshtin-Ana" calcext:value-type="string">
            <text:p>Ngeshtin-Ana</text:p>
          </table:table-cell>
          <table:table-cell table:style-name="ce25"/>
          <table:table-cell table:style-name="ce28" office:value-type="float" office:value="4226" calcext:value-type="float">
            <text:p>4226</text:p>
          </table:table-cell>
          <table:table-cell table:style-name="ce33" office:value-type="float" office:value="3571" calcext:value-type="float">
            <text:p>3571</text:p>
          </table:table-cell>
          <table:table-cell table:style-name="ce37" office:value-type="float" office:value="1831" calcext:value-type="float">
            <text:p>1831</text:p>
          </table:table-cell>
          <table:table-cell table:style-name="ce41" office:value-type="float" office:value="360" calcext:value-type="float">
            <text:p>360</text:p>
          </table:table-cell>
          <table:table-cell table:style-name="ce45" office:value-type="float" office:value="1371" calcext:value-type="float">
            <text:p>1371</text:p>
          </table:table-cell>
          <table:table-cell table:style-name="ce53" table:formula="of:=SUM([.D578:.H578])" office:value-type="float" office:value="11359" calcext:value-type="float">
            <text:p>11359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78]=126;70;IF([.T578]=112;70;IF([.T578]=98;70;IF([.T578]=96;60;IF([.T578]=84;60;IF([.T578]=108;60;IF([.T578]=90;50;IF([.T578]=72;40;IF([.T578]=80;40;IF([.T578]=100;50;IF([.T578]=54;30;IF([.T578]=36;20;IF([.T578]=18;10;IF([.T57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52649/defenderoftexel/images/3/36/Nigsumm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igsummu&quot;; &quot;Nigsummu&quot;)" office:value-type="string" office:string-value="Nigsummu" calcext:value-type="string">
            <text:p>Nigsummu</text:p>
          </table:table-cell>
          <table:table-cell table:style-name="ce25"/>
          <table:table-cell table:style-name="ce28" office:value-type="float" office:value="1083" calcext:value-type="float">
            <text:p>1083</text:p>
          </table:table-cell>
          <table:table-cell table:style-name="ce33" office:value-type="float" office:value="1162" calcext:value-type="float">
            <text:p>1162</text:p>
          </table:table-cell>
          <table:table-cell table:style-name="ce37" office:value-type="float" office:value="549" calcext:value-type="float">
            <text:p>549</text:p>
          </table:table-cell>
          <table:table-cell table:style-name="ce41" office:value-type="float" office:value="935" calcext:value-type="float">
            <text:p>935</text:p>
          </table:table-cell>
          <table:table-cell table:style-name="ce45" office:value-type="float" office:value="859" calcext:value-type="float">
            <text:p>859</text:p>
          </table:table-cell>
          <table:table-cell table:style-name="ce53" table:formula="of:=SUM([.D579:.H579])" office:value-type="float" office:value="4588" calcext:value-type="float">
            <text:p>4588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79]=126;70;IF([.T579]=112;70;IF([.T579]=98;70;IF([.T579]=96;60;IF([.T579]=84;60;IF([.T579]=108;60;IF([.T579]=90;50;IF([.T579]=72;40;IF([.T579]=80;40;IF([.T579]=100;50;IF([.T579]=54;30;IF([.T579]=36;20;IF([.T579]=18;10;IF([.T57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911133860/defenderoftexel/images/thumb/2/22/Nilassine_Icon.png/50px-Nilassin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Ifrazil_-_Shugana_-_Nilassine&quot;; &quot;Nilassine&quot;)" office:value-type="string" office:string-value="Nilassine" calcext:value-type="string">
            <text:p>Nilassi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575" calcext:value-type="float">
            <text:p>4575</text:p>
          </table:table-cell>
          <table:table-cell table:style-name="ce32" office:value-type="float" office:value="5232" calcext:value-type="float">
            <text:p>5232</text:p>
          </table:table-cell>
          <table:table-cell table:style-name="ce36" office:value-type="float" office:value="2806" calcext:value-type="float">
            <text:p>2806</text:p>
          </table:table-cell>
          <table:table-cell table:style-name="ce40" office:value-type="float" office:value="660" calcext:value-type="float">
            <text:p>660</text:p>
          </table:table-cell>
          <table:table-cell table:style-name="ce44" office:value-type="float" office:value="887" calcext:value-type="float">
            <text:p>887</text:p>
          </table:table-cell>
          <table:table-cell table:style-name="ce52" table:formula="of:=SUM([.D580:.H580])" office:value-type="float" office:value="14160" calcext:value-type="float">
            <text:p>14160</text:p>
          </table:table-cell>
          <table:table-cell table:style-name="ce59" office:value-type="string" calcext:value-type="string">
            <text:p>Dren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80]=126;70;IF([.T580]=112;70;IF([.T580]=98;70;IF([.T580]=96;60;IF([.T580]=84;60;IF([.T580]=108;60;IF([.T580]=90;50;IF([.T580]=72;40;IF([.T580]=80;40;IF([.T580]=100;50;IF([.T580]=54;30;IF([.T580]=36;20;IF([.T580]=18;10;IF([.T58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513121801/defenderoftexel/images/thumb/c/c8/Niloufar_Icon.png/50px-Nilouf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iloufar&quot;; &quot;Niloufar&quot;)" office:value-type="string" office:string-value="Niloufar" calcext:value-type="string">
            <text:p>Niloufar</text:p>
          </table:table-cell>
          <table:table-cell table:style-name="ce25"/>
          <table:table-cell table:style-name="ce28" office:value-type="float" office:value="3863" calcext:value-type="float">
            <text:p>3863</text:p>
          </table:table-cell>
          <table:table-cell table:style-name="ce33" office:value-type="float" office:value="503" calcext:value-type="float">
            <text:p>503</text:p>
          </table:table-cell>
          <table:table-cell table:style-name="ce37" office:value-type="float" office:value="1371" calcext:value-type="float">
            <text:p>1371</text:p>
          </table:table-cell>
          <table:table-cell table:style-name="ce41" office:value-type="float" office:value="7856" calcext:value-type="float">
            <text:p>7856</text:p>
          </table:table-cell>
          <table:table-cell table:style-name="ce45" office:value-type="float" office:value="2618" calcext:value-type="float">
            <text:p>2618</text:p>
          </table:table-cell>
          <table:table-cell table:style-name="ce53" table:formula="of:=SUM([.D581:.H581])" office:value-type="float" office:value="16211" calcext:value-type="float">
            <text:p>16211</text:p>
          </table:table-cell>
          <table:table-cell table:style-name="ce60" office:value-type="string" calcext:value-type="string">
            <text:p>Hurlybur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81]=126;70;IF([.T581]=112;70;IF([.T581]=98;70;IF([.T581]=96;60;IF([.T581]=84;60;IF([.T581]=108;60;IF([.T581]=90;50;IF([.T581]=72;40;IF([.T581]=80;40;IF([.T581]=100;50;IF([.T581]=54;30;IF([.T581]=36;20;IF([.T581]=18;10;IF([.T58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610143647/defenderoftexel/images/thumb/b/ba/Nimshah_Icon.png/50px-Nimshah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Nimshah&quot;; &quot;Nimshah&quot;)" office:value-type="string" office:string-value="Nimshah" calcext:value-type="string">
            <text:p>Nimshah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257" calcext:value-type="float">
            <text:p>4257</text:p>
          </table:table-cell>
          <table:table-cell table:style-name="ce32" office:value-type="float" office:value="5971" calcext:value-type="float">
            <text:p>5971</text:p>
          </table:table-cell>
          <table:table-cell table:style-name="ce36" office:value-type="float" office:value="1302" calcext:value-type="float">
            <text:p>1302</text:p>
          </table:table-cell>
          <table:table-cell table:style-name="ce40" office:value-type="float" office:value="3817" calcext:value-type="float">
            <text:p>3817</text:p>
          </table:table-cell>
          <table:table-cell table:style-name="ce44" office:value-type="float" office:value="1728" calcext:value-type="float">
            <text:p>1728</text:p>
          </table:table-cell>
          <table:table-cell table:style-name="ce52" table:formula="of:=SUM([.D582:.H582])" office:value-type="float" office:value="17075" calcext:value-type="float">
            <text:p>17075</text:p>
          </table:table-cell>
          <table:table-cell table:style-name="ce59" office:value-type="string" calcext:value-type="string">
            <text:p>Phosphor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82]=126;70;IF([.T582]=112;70;IF([.T582]=98;70;IF([.T582]=96;60;IF([.T582]=84;60;IF([.T582]=108;60;IF([.T582]=90;50;IF([.T582]=72;40;IF([.T582]=80;40;IF([.T582]=100;50;IF([.T582]=54;30;IF([.T582]=36;20;IF([.T582]=18;10;IF([.T58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701154423/defenderoftexel/images/3/37/Nin-Akha-Gudd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insunu_-_Nin-Gelal_-_Nin-Akha-Guddu&quot;; &quot;Nin-Akha-Guddu&quot;)" office:value-type="string" office:string-value="Nin-Akha-Guddu" calcext:value-type="string">
            <text:p>Nin-Akha-Guddu</text:p>
          </table:table-cell>
          <table:table-cell table:style-name="ce25"/>
          <table:table-cell table:style-name="ce28" office:value-type="float" office:value="4540" calcext:value-type="float">
            <text:p>4540</text:p>
          </table:table-cell>
          <table:table-cell table:style-name="ce33" office:value-type="float" office:value="4947" calcext:value-type="float">
            <text:p>4947</text:p>
          </table:table-cell>
          <table:table-cell table:style-name="ce37" office:value-type="float" office:value="3755" calcext:value-type="float">
            <text:p>3755</text:p>
          </table:table-cell>
          <table:table-cell table:style-name="ce41" office:value-type="float" office:value="792" calcext:value-type="float">
            <text:p>792</text:p>
          </table:table-cell>
          <table:table-cell table:style-name="ce45" office:value-type="float" office:value="518" calcext:value-type="float">
            <text:p>518</text:p>
          </table:table-cell>
          <table:table-cell table:style-name="ce53" table:formula="of:=SUM([.D583:.H583])" office:value-type="float" office:value="14552" calcext:value-type="float">
            <text:p>14552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83]=126;70;IF([.T583]=112;70;IF([.T583]=98;70;IF([.T583]=96;60;IF([.T583]=84;60;IF([.T583]=108;60;IF([.T583]=90;50;IF([.T583]=72;40;IF([.T583]=80;40;IF([.T583]=100;50;IF([.T583]=54;30;IF([.T583]=36;20;IF([.T583]=18;10;IF([.T58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1015174135/defenderoftexel/images/0/07/Ninkarra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inkarrak&quot;; &quot;Ninkarrak&quot;)" office:value-type="string" office:string-value="Ninkarrak" calcext:value-type="string">
            <text:p>Ninkarrak</text:p>
          </table:table-cell>
          <table:table-cell table:style-name="ce25"/>
          <table:table-cell table:style-name="ce28" office:value-type="float" office:value="2398" calcext:value-type="float">
            <text:p>2398</text:p>
          </table:table-cell>
          <table:table-cell table:style-name="ce33" office:value-type="float" office:value="3361" calcext:value-type="float">
            <text:p>3361</text:p>
          </table:table-cell>
          <table:table-cell table:style-name="ce37" office:value-type="float" office:value="732" calcext:value-type="float">
            <text:p>732</text:p>
          </table:table-cell>
          <table:table-cell table:style-name="ce41" office:value-type="float" office:value="2151" calcext:value-type="float">
            <text:p>2151</text:p>
          </table:table-cell>
          <table:table-cell table:style-name="ce45" office:value-type="float" office:value="971" calcext:value-type="float">
            <text:p>971</text:p>
          </table:table-cell>
          <table:table-cell table:style-name="ce53" table:formula="of:=SUM([.D584:.H584])" office:value-type="float" office:value="9613" calcext:value-type="float">
            <text:p>9613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84]=126;70;IF([.T584]=112;70;IF([.T584]=98;70;IF([.T584]=96;60;IF([.T584]=84;60;IF([.T584]=108;60;IF([.T584]=90;50;IF([.T584]=72;40;IF([.T584]=80;40;IF([.T584]=100;50;IF([.T584]=54;30;IF([.T584]=36;20;IF([.T584]=18;10;IF([.T58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0/02/Nittiatte_Icon.png/revision/latest?cb=20150506134625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wha_-_Nittiatte_-_Voider&quot;;&quot;Nittiatte&quot;)" office:value-type="string" office:string-value="Nittiatte" calcext:value-type="string">
            <text:p>Nittiatte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585:.H585])" office:value-type="float" office:value="5" calcext:value-type="float">
            <text:p>5</text:p>
          </table:table-cell>
          <table:table-cell table:style-name="ce59" office:value-type="string" calcext:value-type="string">
            <text:p>Elecbomb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85]=126;70;IF([.T585]=112;70;IF([.T585]=98;70;IF([.T585]=96;60;IF([.T585]=84;60;IF([.T585]=108;60;IF([.T585]=90;50;IF([.T585]=72;40;IF([.T585]=80;40;IF([.T585]=100;50;IF([.T585]=54;30;IF([.T585]=36;20;IF([.T585]=18;10;IF([.T585]=60;30))))))))))))))" office:value-type="float" office:value="50" calcext:value-type="float">
            <text:p>50</text:p>
          </table:table-cell>
          <table:table-cell table:style-name="ce67" office:value-type="float" office:value="90" calcext:value-type="float">
            <text:p>9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defenderoftexel/images/8/81/Noosewan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Dustmote&quot;; &quot;Noosewane&quot;)" office:value-type="string" office:string-value="Noosewane" calcext:value-type="string">
            <text:p>Noosewan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82" calcext:value-type="float">
            <text:p>1882</text:p>
          </table:table-cell>
          <table:table-cell table:style-name="ce32" office:value-type="float" office:value="1434" calcext:value-type="float">
            <text:p>1434</text:p>
          </table:table-cell>
          <table:table-cell table:style-name="ce36" office:value-type="float" office:value="977" calcext:value-type="float">
            <text:p>977</text:p>
          </table:table-cell>
          <table:table-cell table:style-name="ce40" office:value-type="float" office:value="1390" calcext:value-type="float">
            <text:p>1390</text:p>
          </table:table-cell>
          <table:table-cell table:style-name="ce44" office:value-type="float" office:value="3511" calcext:value-type="float">
            <text:p>3511</text:p>
          </table:table-cell>
          <table:table-cell table:style-name="ce52" table:formula="of:=SUM([.D586:.H586])" office:value-type="float" office:value="9194" calcext:value-type="float">
            <text:p>9194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86]=126;70;IF([.T586]=112;70;IF([.T586]=98;70;IF([.T586]=96;60;IF([.T586]=84;60;IF([.T586]=108;60;IF([.T586]=90;50;IF([.T586]=72;40;IF([.T586]=80;40;IF([.T586]=100;50;IF([.T586]=54;30;IF([.T586]=36;20;IF([.T586]=18;10;IF([.T58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752/defenderoftexel/images/thumb/f/f2/Numesie_Icon.png/40px-Numesi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umesie&quot;; &quot;Numesie&quot;)" office:value-type="string" office:string-value="Numesie" calcext:value-type="string">
            <text:p>Numesie</text:p>
          </table:table-cell>
          <table:table-cell table:style-name="ce25"/>
          <table:table-cell table:style-name="ce28" office:value-type="float" office:value="2808" calcext:value-type="float">
            <text:p>2808</text:p>
          </table:table-cell>
          <table:table-cell table:style-name="ce33" office:value-type="float" office:value="4268" calcext:value-type="float">
            <text:p>4268</text:p>
          </table:table-cell>
          <table:table-cell table:style-name="ce37" office:value-type="float" office:value="1458" calcext:value-type="float">
            <text:p>1458</text:p>
          </table:table-cell>
          <table:table-cell table:style-name="ce41" office:value-type="float" office:value="877" calcext:value-type="float">
            <text:p>877</text:p>
          </table:table-cell>
          <table:table-cell table:style-name="ce45" office:value-type="float" office:value="4427" calcext:value-type="float">
            <text:p>4427</text:p>
          </table:table-cell>
          <table:table-cell table:style-name="ce53" table:formula="of:=SUM([.D587:.H587])" office:value-type="float" office:value="13838" calcext:value-type="float">
            <text:p>13838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87]=126;70;IF([.T587]=112;70;IF([.T587]=98;70;IF([.T587]=96;60;IF([.T587]=84;60;IF([.T587]=108;60;IF([.T587]=90;50;IF([.T587]=72;40;IF([.T587]=80;40;IF([.T587]=100;50;IF([.T587]=54;30;IF([.T587]=36;20;IF([.T587]=18;10;IF([.T58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601195936/defenderoftexel/images/thumb/f/f9/Odin_Stormgod_Icon.png/50px-Odin_Stormgo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din_Groundstrider_-_Odin_-_Odin_Stormgod&quot;; &quot;Odin Stormgod&quot;)" office:value-type="string" office:string-value="Odin Stormgod" calcext:value-type="string">
            <text:p>Odin Stormgod</text:p>
          </table:table-cell>
          <table:table-cell table:style-name="ce25"/>
          <table:table-cell table:style-name="ce28" office:value-type="float" office:value="3918" calcext:value-type="float">
            <text:p>3918</text:p>
          </table:table-cell>
          <table:table-cell table:style-name="ce33" office:value-type="float" office:value="5494" calcext:value-type="float">
            <text:p>5494</text:p>
          </table:table-cell>
          <table:table-cell table:style-name="ce37" office:value-type="float" office:value="1199" calcext:value-type="float">
            <text:p>1199</text:p>
          </table:table-cell>
          <table:table-cell table:style-name="ce41" office:value-type="float" office:value="3514" calcext:value-type="float">
            <text:p>3514</text:p>
          </table:table-cell>
          <table:table-cell table:style-name="ce45" office:value-type="float" office:value="1588" calcext:value-type="float">
            <text:p>1588</text:p>
          </table:table-cell>
          <table:table-cell table:style-name="ce53" table:formula="of:=SUM([.D588:.H588])" office:value-type="float" office:value="15713" calcext:value-type="float">
            <text:p>15713</text:p>
          </table:table-cell>
          <table:table-cell table:style-name="ce60" office:value-type="string" calcext:value-type="string">
            <text:p>Flash of Rag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88]=126;70;IF([.T588]=112;70;IF([.T588]=98;70;IF([.T588]=96;60;IF([.T588]=84;60;IF([.T588]=108;60;IF([.T588]=90;50;IF([.T588]=72;40;IF([.T588]=80;40;IF([.T588]=100;50;IF([.T588]=54;30;IF([.T588]=36;20;IF([.T588]=18;10;IF([.T58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19154944/defenderoftexel/images/thumb/e/e6/Odric_Oldsoul_Icon.png/50px-Odric_Oldsou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olber_-_Knut_-_Odric_Oldsoul&quot;;&quot;Odric Oldsoul&quot;)" office:value-type="string" office:string-value="Odric Oldsoul" calcext:value-type="string">
            <text:p>Odric Oldsoul</text:p>
          </table:table-cell>
          <table:table-cell table:style-name="ce25"/>
          <table:table-cell table:style-name="ce28" office:value-type="float" office:value="7828" calcext:value-type="float">
            <text:p>7828</text:p>
          </table:table-cell>
          <table:table-cell table:style-name="ce33" office:value-type="float" office:value="8959" calcext:value-type="float">
            <text:p>8959</text:p>
          </table:table-cell>
          <table:table-cell table:style-name="ce37" office:value-type="float" office:value="4775" calcext:value-type="float">
            <text:p>4775</text:p>
          </table:table-cell>
          <table:table-cell table:style-name="ce41" office:value-type="float" office:value="1136" calcext:value-type="float">
            <text:p>1136</text:p>
          </table:table-cell>
          <table:table-cell table:style-name="ce45" office:value-type="float" office:value="1509" calcext:value-type="float">
            <text:p>1509</text:p>
          </table:table-cell>
          <table:table-cell table:style-name="ce53" table:formula="of:=SUM([.D589:.H589])" office:value-type="float" office:value="24207" calcext:value-type="float">
            <text:p>24207</text:p>
          </table:table-cell>
          <table:table-cell table:style-name="ce60" office:value-type="string" calcext:value-type="string">
            <text:p>Brainfreez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589]=126;70;IF([.T589]=112;70;IF([.T589]=98;70;IF([.T589]=96;60;IF([.T589]=84;60;IF([.T589]=108;60;IF([.T589]=90;50;IF([.T589]=72;40;IF([.T589]=80;40;IF([.T589]=100;50;IF([.T589]=54;30;IF([.T589]=36;20;IF([.T589]=18;10;IF([.T58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029142033/defenderoftexel/images/thumb/b/b4/Odumeh_Icon.png/50px-Odume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tyemo_-_Neemye_-_Odumeh&quot;;&quot;Odumeh&quot;)" office:value-type="string" office:string-value="Odumeh" calcext:value-type="string">
            <text:p>Odumeh</text:p>
          </table:table-cell>
          <table:table-cell table:style-name="ce25"/>
          <table:table-cell table:style-name="ce28" office:value-type="float" office:value="3169" calcext:value-type="float">
            <text:p>3169</text:p>
          </table:table-cell>
          <table:table-cell table:style-name="ce33" office:value-type="float" office:value="5726" calcext:value-type="float">
            <text:p>5726</text:p>
          </table:table-cell>
          <table:table-cell table:style-name="ce37" office:value-type="float" office:value="1915" calcext:value-type="float">
            <text:p>1915</text:p>
          </table:table-cell>
          <table:table-cell table:style-name="ce41" office:value-type="float" office:value="2166" calcext:value-type="float">
            <text:p>2166</text:p>
          </table:table-cell>
          <table:table-cell table:style-name="ce45" office:value-type="float" office:value="759" calcext:value-type="float">
            <text:p>759</text:p>
          </table:table-cell>
          <table:table-cell table:style-name="ce53" table:formula="of:=SUM([.D590:.H590])" office:value-type="float" office:value="13735" calcext:value-type="float">
            <text:p>13735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0]=126;70;IF([.T590]=112;70;IF([.T590]=98;70;IF([.T590]=96;60;IF([.T590]=84;60;IF([.T590]=108;60;IF([.T590]=90;50;IF([.T590]=72;40;IF([.T590]=80;40;IF([.T590]=100;50;IF([.T590]=54;30;IF([.T590]=36;20;IF([.T590]=18;10;IF([.T59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24931/defenderoftexel/images/thumb/b/b6/Ogiva_Icon.png/40px-Ogiv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giva&quot;; &quot;Ogiva&quot;)" office:value-type="string" office:string-value="Ogiva" calcext:value-type="string">
            <text:p>Ogiva</text:p>
          </table:table-cell>
          <table:table-cell table:style-name="ce25"/>
          <table:table-cell table:style-name="ce28" office:value-type="float" office:value="1257" calcext:value-type="float">
            <text:p>1257</text:p>
          </table:table-cell>
          <table:table-cell table:style-name="ce33" office:value-type="float" office:value="883" calcext:value-type="float">
            <text:p>883</text:p>
          </table:table-cell>
          <table:table-cell table:style-name="ce37" office:value-type="float" office:value="568" calcext:value-type="float">
            <text:p>568</text:p>
          </table:table-cell>
          <table:table-cell table:style-name="ce41" office:value-type="float" office:value="3614" calcext:value-type="float">
            <text:p>3614</text:p>
          </table:table-cell>
          <table:table-cell table:style-name="ce45" office:value-type="float" office:value="3443" calcext:value-type="float">
            <text:p>3443</text:p>
          </table:table-cell>
          <table:table-cell table:style-name="ce53" table:formula="of:=SUM([.D591:.H591])" office:value-type="float" office:value="9765" calcext:value-type="float">
            <text:p>9765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1]=126;70;IF([.T591]=112;70;IF([.T591]=98;70;IF([.T591]=96;60;IF([.T591]=84;60;IF([.T591]=108;60;IF([.T591]=90;50;IF([.T591]=72;40;IF([.T591]=80;40;IF([.T591]=100;50;IF([.T591]=54;30;IF([.T591]=36;20;IF([.T591]=18;10;IF([.T59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721124934/defenderoftexel/images/thumb/3/32/Oneiros_Icon.png/50px-Oneiro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neiros&quot;; &quot;Oneiros&quot;)" office:value-type="string" office:string-value="Oneiros" calcext:value-type="string">
            <text:p>Oneiro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number-columns-repeated="4"/>
          <table:table-cell table:style-name="ce50"/>
          <table:table-cell table:style-name="ce55"/>
          <table:table-cell table:style-name="ce61" office:value-type="string" calcext:value-type="string">
            <text:p>Gael</text:p>
          </table:table-cell>
          <table:table-cell table:style-name="ce61" office:value-type="string" calcext:value-type="string">
            <text:p>All</text:p>
          </table:table-cell>
          <table:table-cell table:style-name="ce61" office:value-type="string" calcext:value-type="string">
            <text:p>Novice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Warlock</text:p>
          </table:table-cell>
          <table:table-cell table:style-name="ce69" office:value-type="string" calcext:value-type="string">
            <text:p>Air</text:p>
          </table:table-cell>
          <table:table-cell table:style-name="ce69" office:value-type="string" calcext:value-type="string">
            <text:p>Theri</text:p>
          </table:table-cell>
          <table:table-cell table:style-name="ce72" office:value-type="string" calcext:value-type="string">
            <text:p>E</text:p>
          </table:table-cell>
          <table:table-cell table:style-name="ce66" office:value-type="float" office:value="5" calcext:value-type="float">
            <text:p>5</text:p>
          </table:table-cell>
          <table:table-cell table:style-name="ce67" table:formula="of:=IF([.T592]=126;70;IF([.T592]=112;70;IF([.T592]=98;70;IF([.T592]=96;60;IF([.T592]=84;60;IF([.T592]=108;60;IF([.T592]=90;50;IF([.T592]=72;40;IF([.T592]=80;40;IF([.T592]=100;50;IF([.T592]=54;30;IF([.T592]=36;20;IF([.T592]=18;10;IF([.T592]=60;30))))))))))))))" office:value-type="float" office:value="40" calcext:value-type="float">
            <text:p>40</text:p>
          </table:table-cell>
          <table:table-cell table:style-name="ce69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0/07/Oniky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Onikys&quot;; &quot;Onikys&quot;)" office:value-type="string" office:string-value="Onikys" calcext:value-type="string">
            <text:p>Oniky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285" calcext:value-type="float">
            <text:p>3285</text:p>
          </table:table-cell>
          <table:table-cell table:style-name="ce32" office:value-type="float" office:value="3715" calcext:value-type="float">
            <text:p>3715</text:p>
          </table:table-cell>
          <table:table-cell table:style-name="ce36" office:value-type="float" office:value="6733" calcext:value-type="float">
            <text:p>6733</text:p>
          </table:table-cell>
          <table:table-cell table:style-name="ce40" office:value-type="float" office:value="339" calcext:value-type="float">
            <text:p>339</text:p>
          </table:table-cell>
          <table:table-cell table:style-name="ce44" office:value-type="float" office:value="287" calcext:value-type="float">
            <text:p>287</text:p>
          </table:table-cell>
          <table:table-cell table:style-name="ce52" table:formula="of:=SUM([.D593:.H593])" office:value-type="float" office:value="14359" calcext:value-type="float">
            <text:p>14359</text:p>
          </table:table-cell>
          <table:table-cell table:style-name="ce59" office:value-type="string" calcext:value-type="string">
            <text:p>Inspirit</text:p>
          </table:table-cell>
          <table:table-cell table:style-name="ce59" office:value-type="string" calcext:value-type="string">
            <text:p>Self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593]=126;70;IF([.T593]=112;70;IF([.T593]=98;70;IF([.T593]=96;60;IF([.T593]=84;60;IF([.T593]=108;60;IF([.T593]=90;50;IF([.T593]=72;40;IF([.T593]=80;40;IF([.T593]=100;50;IF([.T593]=54;30;IF([.T593]=36;20;IF([.T593]=18;10;IF([.T59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24141521/defenderoftexel/images/thumb/2/20/Onolff_Icon.png/50px-Onolff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nolff&quot;; &quot;Onolff&quot;)" office:value-type="string" office:string-value="Onolff" calcext:value-type="string">
            <text:p>Onolff</text:p>
          </table:table-cell>
          <table:table-cell table:style-name="ce25"/>
          <table:table-cell table:style-name="ce28" office:value-type="float" office:value="3911" calcext:value-type="float">
            <text:p>3911</text:p>
          </table:table-cell>
          <table:table-cell table:style-name="ce33" office:value-type="float" office:value="7064" calcext:value-type="float">
            <text:p>7064</text:p>
          </table:table-cell>
          <table:table-cell table:style-name="ce37" office:value-type="float" office:value="2364" calcext:value-type="float">
            <text:p>2364</text:p>
          </table:table-cell>
          <table:table-cell table:style-name="ce41" office:value-type="float" office:value="2672" calcext:value-type="float">
            <text:p>2672</text:p>
          </table:table-cell>
          <table:table-cell table:style-name="ce45" office:value-type="float" office:value="936" calcext:value-type="float">
            <text:p>936</text:p>
          </table:table-cell>
          <table:table-cell table:style-name="ce53" table:formula="of:=SUM([.D594:.H594])" office:value-type="float" office:value="16947" calcext:value-type="float">
            <text:p>16947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4]=126;70;IF([.T594]=112;70;IF([.T594]=98;70;IF([.T594]=96;60;IF([.T594]=84;60;IF([.T594]=108;60;IF([.T594]=90;50;IF([.T594]=72;40;IF([.T594]=80;40;IF([.T594]=100;50;IF([.T594]=54;30;IF([.T594]=36;20;IF([.T594]=18;10;IF([.T59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03161705/defenderoftexel/images/thumb/d/d4/Orchamus_Icon.png/50px-Orcham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rchamus&quot;; &quot;Orchamus&quot;)" office:value-type="string" office:string-value="Orchamus" calcext:value-type="string">
            <text:p>Orchamus</text:p>
          </table:table-cell>
          <table:table-cell table:style-name="ce25"/>
          <table:table-cell table:style-name="ce28" office:value-type="float" office:value="7983" calcext:value-type="float">
            <text:p>7983</text:p>
          </table:table-cell>
          <table:table-cell table:style-name="ce33" office:value-type="float" office:value="1058" calcext:value-type="float">
            <text:p>1058</text:p>
          </table:table-cell>
          <table:table-cell table:style-name="ce37" office:value-type="float" office:value="2849" calcext:value-type="float">
            <text:p>2849</text:p>
          </table:table-cell>
          <table:table-cell table:style-name="ce41" office:value-type="float" office:value="16390" calcext:value-type="float">
            <text:p>16390</text:p>
          </table:table-cell>
          <table:table-cell table:style-name="ce45" office:value-type="float" office:value="5416" calcext:value-type="float">
            <text:p>5416</text:p>
          </table:table-cell>
          <table:table-cell table:style-name="ce53" table:formula="of:=SUM([.D595:.H595])" office:value-type="float" office:value="33696" calcext:value-type="float">
            <text:p>33696</text:p>
          </table:table-cell>
          <table:table-cell table:style-name="ce60" office:value-type="string" calcext:value-type="string">
            <text:p>Splic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595]=126;70;IF([.T595]=112;70;IF([.T595]=98;70;IF([.T595]=96;60;IF([.T595]=84;60;IF([.T595]=108;60;IF([.T595]=90;50;IF([.T595]=72;40;IF([.T595]=80;40;IF([.T595]=100;50;IF([.T595]=54;30;IF([.T595]=36;20;IF([.T595]=18;10;IF([.T59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2953/defenderoftexel/images/d/d0/Ormaz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rmazd&quot;; &quot;Ormazd&quot;)" office:value-type="string" office:string-value="Ormazd" calcext:value-type="string">
            <text:p>Ormazd</text:p>
          </table:table-cell>
          <table:table-cell table:style-name="ce25"/>
          <table:table-cell table:style-name="ce28" office:value-type="float" office:value="2204" calcext:value-type="float">
            <text:p>2204</text:p>
          </table:table-cell>
          <table:table-cell table:style-name="ce33" office:value-type="float" office:value="1843" calcext:value-type="float">
            <text:p>1843</text:p>
          </table:table-cell>
          <table:table-cell table:style-name="ce37" office:value-type="float" office:value="911" calcext:value-type="float">
            <text:p>911</text:p>
          </table:table-cell>
          <table:table-cell table:style-name="ce41" office:value-type="float" office:value="171" calcext:value-type="float">
            <text:p>171</text:p>
          </table:table-cell>
          <table:table-cell table:style-name="ce45" office:value-type="float" office:value="673" calcext:value-type="float">
            <text:p>673</text:p>
          </table:table-cell>
          <table:table-cell table:style-name="ce53" table:formula="of:=SUM([.D596:.H596])" office:value-type="float" office:value="5802" calcext:value-type="float">
            <text:p>5802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6]=126;70;IF([.T596]=112;70;IF([.T596]=98;70;IF([.T596]=96;60;IF([.T596]=84;60;IF([.T596]=108;60;IF([.T596]=90;50;IF([.T596]=72;40;IF([.T596]=80;40;IF([.T596]=100;50;IF([.T596]=54;30;IF([.T596]=36;20;IF([.T596]=18;10;IF([.T59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a/Osmode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smodeus&quot;; &quot;Osmodeus&quot;)" office:value-type="string" office:string-value="Osmodeus" calcext:value-type="string">
            <text:p>Osmodeus</text:p>
          </table:table-cell>
          <table:table-cell table:style-name="ce25"/>
          <table:table-cell table:style-name="ce28" office:value-type="float" office:value="4035" calcext:value-type="float">
            <text:p>4035</text:p>
          </table:table-cell>
          <table:table-cell table:style-name="ce33" office:value-type="float" office:value="5084" calcext:value-type="float">
            <text:p>508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1" office:value-type="float" office:value="4640" calcext:value-type="float">
            <text:p>4640</text:p>
          </table:table-cell>
          <table:table-cell table:style-name="ce45" office:value-type="float" office:value="887" calcext:value-type="float">
            <text:p>887</text:p>
          </table:table-cell>
          <table:table-cell table:style-name="ce53" table:formula="of:=SUM([.D597:.H597])" office:value-type="float" office:value="15981" calcext:value-type="float">
            <text:p>15981</text:p>
          </table:table-cell>
          <table:table-cell table:style-name="ce60" office:value-type="string" calcext:value-type="string">
            <text:p>Killjoy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7]=126;70;IF([.T597]=112;70;IF([.T597]=98;70;IF([.T597]=96;60;IF([.T597]=84;60;IF([.T597]=108;60;IF([.T597]=90;50;IF([.T597]=72;40;IF([.T597]=80;40;IF([.T597]=100;50;IF([.T597]=54;30;IF([.T597]=36;20;IF([.T597]=18;10;IF([.T59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513123108/defenderoftexel/images/thumb/5/58/Ottokras_Icon.png/50px-Ottokra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ttokras&quot;; &quot;Ottokras&quot;)" office:value-type="string" office:string-value="Ottokras" calcext:value-type="string">
            <text:p>Ottokras</text:p>
          </table:table-cell>
          <table:table-cell table:style-name="ce25"/>
          <table:table-cell table:style-name="ce28" office:value-type="float" office:value="2948" calcext:value-type="float">
            <text:p>2948</text:p>
          </table:table-cell>
          <table:table-cell table:style-name="ce33" office:value-type="float" office:value="4485" calcext:value-type="float">
            <text:p>4485</text:p>
          </table:table-cell>
          <table:table-cell table:style-name="ce37" office:value-type="float" office:value="1533" calcext:value-type="float">
            <text:p>1533</text:p>
          </table:table-cell>
          <table:table-cell table:style-name="ce41" office:value-type="float" office:value="924" calcext:value-type="float">
            <text:p>924</text:p>
          </table:table-cell>
          <table:table-cell table:style-name="ce45" office:value-type="float" office:value="4650" calcext:value-type="float">
            <text:p>4650</text:p>
          </table:table-cell>
          <table:table-cell table:style-name="ce53" table:formula="of:=SUM([.D598:.H598])" office:value-type="float" office:value="14540" calcext:value-type="float">
            <text:p>1454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8]=126;70;IF([.T598]=112;70;IF([.T598]=98;70;IF([.T598]=96;60;IF([.T598]=84;60;IF([.T598]=108;60;IF([.T598]=90;50;IF([.T598]=72;40;IF([.T598]=80;40;IF([.T598]=100;50;IF([.T598]=54;30;IF([.T598]=36;20;IF([.T598]=18;10;IF([.T59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415144020/defenderoftexel/images/thumb/5/5e/Ovo_Icon.png/50px-Ov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vo&quot;; &quot;Ovo&quot;)" office:value-type="string" office:string-value="Ovo" calcext:value-type="string">
            <text:p>Ovo</text:p>
          </table:table-cell>
          <table:table-cell table:style-name="ce25"/>
          <table:table-cell table:style-name="ce28" office:value-type="float" office:value="3396" calcext:value-type="float">
            <text:p>3396</text:p>
          </table:table-cell>
          <table:table-cell table:style-name="ce33" office:value-type="float" office:value="5541" calcext:value-type="float">
            <text:p>5541</text:p>
          </table:table-cell>
          <table:table-cell table:style-name="ce37" office:value-type="float" office:value="2823" calcext:value-type="float">
            <text:p>2823</text:p>
          </table:table-cell>
          <table:table-cell table:style-name="ce41" office:value-type="float" office:value="4432" calcext:value-type="float">
            <text:p>4432</text:p>
          </table:table-cell>
          <table:table-cell table:style-name="ce45" office:value-type="float" office:value="542" calcext:value-type="float">
            <text:p>542</text:p>
          </table:table-cell>
          <table:table-cell table:style-name="ce53" table:formula="of:=SUM([.D599:.H599])" office:value-type="float" office:value="16734" calcext:value-type="float">
            <text:p>16734</text:p>
          </table:table-cell>
          <table:table-cell table:style-name="ce60" office:value-type="string" calcext:value-type="string">
            <text:p>Dye</text:p>
          </table:table-cell>
          <table:table-cell table:style-name="ce60" office:value-type="string" calcext:value-type="string">
            <text:p>Self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599]=126;70;IF([.T599]=112;70;IF([.T599]=98;70;IF([.T599]=96;60;IF([.T599]=84;60;IF([.T599]=108;60;IF([.T599]=90;50;IF([.T599]=72;40;IF([.T599]=80;40;IF([.T599]=100;50;IF([.T599]=54;30;IF([.T599]=36;20;IF([.T599]=18;10;IF([.T59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6" table:formula="of:=image(&quot;http://img4.wikia.nocookie.net/__cb20140429124517/defenderoftexel/images/thumb/8/88/Oyeb_Icon.png/50px-Oyeb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Oyeb&quot;; &quot;Oyeb&quot;)" office:value-type="string" office:string-value="Oyeb" calcext:value-type="string">
            <text:p>Oyeb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289" calcext:value-type="float">
            <text:p>3289</text:p>
          </table:table-cell>
          <table:table-cell table:style-name="ce32" office:value-type="float" office:value="4146" calcext:value-type="float">
            <text:p>4146</text:p>
          </table:table-cell>
          <table:table-cell table:style-name="ce36" office:value-type="float" office:value="1088" calcext:value-type="float">
            <text:p>1088</text:p>
          </table:table-cell>
          <table:table-cell table:style-name="ce40" office:value-type="float" office:value="3782" calcext:value-type="float">
            <text:p>3782</text:p>
          </table:table-cell>
          <table:table-cell table:style-name="ce44" office:value-type="float" office:value="722" calcext:value-type="float">
            <text:p>722</text:p>
          </table:table-cell>
          <table:table-cell table:style-name="ce52" table:formula="of:=SUM([.D600:.H600])" office:value-type="float" office:value="13027" calcext:value-type="float">
            <text:p>13027</text:p>
          </table:table-cell>
          <table:table-cell table:style-name="ce59" office:value-type="string" calcext:value-type="string">
            <text:p>Daze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00]=126;70;IF([.T600]=112;70;IF([.T600]=98;70;IF([.T600]=96;60;IF([.T600]=84;60;IF([.T600]=108;60;IF([.T600]=90;50;IF([.T600]=72;40;IF([.T600]=80;40;IF([.T600]=100;50;IF([.T600]=54;30;IF([.T600]=36;20;IF([.T600]=18;10;IF([.T60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d/d0/Pak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ku&quot;; &quot;Paku&quot;)" office:value-type="string" office:string-value="Paku" calcext:value-type="string">
            <text:p>Paku</text:p>
          </table:table-cell>
          <table:table-cell table:style-name="ce25"/>
          <table:table-cell table:style-name="ce28" office:value-type="float" office:value="5105" calcext:value-type="float">
            <text:p>5105</text:p>
          </table:table-cell>
          <table:table-cell table:style-name="ce33" office:value-type="float" office:value="3644" calcext:value-type="float">
            <text:p>3644</text:p>
          </table:table-cell>
          <table:table-cell table:style-name="ce37" office:value-type="float" office:value="4236" calcext:value-type="float">
            <text:p>4236</text:p>
          </table:table-cell>
          <table:table-cell table:style-name="ce41" office:value-type="float" office:value="437" calcext:value-type="float">
            <text:p>437</text:p>
          </table:table-cell>
          <table:table-cell table:style-name="ce45" office:value-type="float" office:value="542" calcext:value-type="float">
            <text:p>542</text:p>
          </table:table-cell>
          <table:table-cell table:style-name="ce53" table:formula="of:=SUM([.D601:.H601])" office:value-type="float" office:value="13964" calcext:value-type="float">
            <text:p>13964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1]=126;70;IF([.T601]=112;70;IF([.T601]=98;70;IF([.T601]=96;60;IF([.T601]=84;60;IF([.T601]=108;60;IF([.T601]=90;50;IF([.T601]=72;40;IF([.T601]=80;40;IF([.T601]=100;50;IF([.T601]=54;30;IF([.T601]=36;20;IF([.T601]=18;10;IF([.T60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610142658/defenderoftexel/images/thumb/7/72/Palivore_Icon.png/50px-Palivor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livore&quot;; &quot;Palivore&quot;)" office:value-type="string" office:string-value="Palivore" calcext:value-type="string">
            <text:p>Palivore</text:p>
          </table:table-cell>
          <table:table-cell table:style-name="ce25"/>
          <table:table-cell table:style-name="ce28" office:value-type="float" office:value="10962" calcext:value-type="float">
            <text:p>10962</text:p>
          </table:table-cell>
          <table:table-cell table:style-name="ce33" office:value-type="float" office:value="12541" calcext:value-type="float">
            <text:p>12541</text:p>
          </table:table-cell>
          <table:table-cell table:style-name="ce37" office:value-type="float" office:value="6696" calcext:value-type="float">
            <text:p>6696</text:p>
          </table:table-cell>
          <table:table-cell table:style-name="ce41" office:value-type="float" office:value="1595" calcext:value-type="float">
            <text:p>159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3" table:formula="of:=SUM([.D602:.H602])" office:value-type="float" office:value="33914" calcext:value-type="float">
            <text:p>33914</text:p>
          </table:table-cell>
          <table:table-cell table:style-name="ce60" office:value-type="string" calcext:value-type="string">
            <text:p>Purg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2]=126;70;IF([.T602]=112;70;IF([.T602]=98;70;IF([.T602]=96;60;IF([.T602]=84;60;IF([.T602]=108;60;IF([.T602]=90;50;IF([.T602]=72;40;IF([.T602]=80;40;IF([.T602]=100;50;IF([.T602]=54;30;IF([.T602]=36;20;IF([.T602]=18;10;IF([.T60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022131935/defenderoftexel/images/thumb/4/44/Pallormort_Wormfeed_Icon.png/50px-Pallormort_Wormfee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llormort_Wormfeed&quot;; &quot;Pallormort Wormfeed&quot;)" office:value-type="string" office:string-value="Pallormort Wormfeed" calcext:value-type="string">
            <text:p>Pallormort Wormfeed</text:p>
          </table:table-cell>
          <table:table-cell table:style-name="ce25"/>
          <table:table-cell table:style-name="ce28" office:value-type="float" office:value="5334" calcext:value-type="float">
            <text:p>5334</text:p>
          </table:table-cell>
          <table:table-cell table:style-name="ce33" office:value-type="float" office:value="6097" calcext:value-type="float">
            <text:p>6097</text:p>
          </table:table-cell>
          <table:table-cell table:style-name="ce37" office:value-type="float" office:value="3270" calcext:value-type="float">
            <text:p>3270</text:p>
          </table:table-cell>
          <table:table-cell table:style-name="ce41" office:value-type="float" office:value="770" calcext:value-type="float">
            <text:p>770</text:p>
          </table:table-cell>
          <table:table-cell table:style-name="ce45" office:value-type="float" office:value="1023" calcext:value-type="float">
            <text:p>1023</text:p>
          </table:table-cell>
          <table:table-cell table:style-name="ce53" table:formula="of:=SUM([.D603:.H603])" office:value-type="float" office:value="16494" calcext:value-type="float">
            <text:p>16494</text:p>
          </table:table-cell>
          <table:table-cell table:style-name="ce60" office:value-type="string" calcext:value-type="string">
            <text:p>Sicken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3]=126;70;IF([.T603]=112;70;IF([.T603]=98;70;IF([.T603]=96;60;IF([.T603]=84;60;IF([.T603]=108;60;IF([.T603]=90;50;IF([.T603]=72;40;IF([.T603]=80;40;IF([.T603]=100;50;IF([.T603]=54;30;IF([.T603]=36;20;IF([.T603]=18;10;IF([.T60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a/ae/Palmithe_Icon.png/revision/latest?cb=20150414155420&quot;)" office:value-type="string" office:string-value="" calcext:value-type="error">
            <text:p>#NAME?</text:p>
          </table:table-cell>
          <table:table-cell table:style-name="ce11" table:formula="of:=HYPERLINK(&quot;http://defenderoftexel.wikia.com/wiki/Thanusa_-_Palmithe_-_Elinei&quot;;&quot;Palmithe&quot;)" office:value-type="string" office:string-value="Palmithe" calcext:value-type="string">
            <text:p>Palmith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949" calcext:value-type="float">
            <text:p>949</text:p>
          </table:table-cell>
          <table:table-cell table:style-name="ce32" office:value-type="float" office:value="545" calcext:value-type="float">
            <text:p>545</text:p>
          </table:table-cell>
          <table:table-cell table:style-name="ce36" office:value-type="float" office:value="639" calcext:value-type="float">
            <text:p>639</text:p>
          </table:table-cell>
          <table:table-cell table:style-name="ce40" office:value-type="float" office:value="2693" calcext:value-type="float">
            <text:p>2693</text:p>
          </table:table-cell>
          <table:table-cell table:style-name="ce44" office:value-type="float" office:value="3424" calcext:value-type="float">
            <text:p>3424</text:p>
          </table:table-cell>
          <table:table-cell table:style-name="ce52" table:formula="of:=SUM([.D604:.H604])" office:value-type="float" office:value="8250" calcext:value-type="float">
            <text:p>8250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04]=126;70;IF([.T604]=112;70;IF([.T604]=98;70;IF([.T604]=96;60;IF([.T604]=84;60;IF([.T604]=108;60;IF([.T604]=90;50;IF([.T604]=72;40;IF([.T604]=80;40;IF([.T604]=100;50;IF([.T604]=54;30;IF([.T604]=36;20;IF([.T604]=18;10;IF([.T60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708124917/defenderoftexel/images/thumb/9/93/Palna_the_Vanguard_Icon.png/50px-Palna_the_Vanguar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lna_the_Vanguard&quot;; &quot;Palna the Vanguard&quot;)" office:value-type="string" office:string-value="Palna the Vanguard" calcext:value-type="string">
            <text:p>Palna the Vanguard</text:p>
          </table:table-cell>
          <table:table-cell table:style-name="ce25"/>
          <table:table-cell table:style-name="ce28" office:value-type="float" office:value="4820" calcext:value-type="float">
            <text:p>4820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 office:value-type="float" office:value="3905" calcext:value-type="float">
            <text:p>3905</text:p>
          </table:table-cell>
          <table:table-cell table:style-name="ce41" office:value-type="float" office:value="549" calcext:value-type="float">
            <text:p>549</text:p>
          </table:table-cell>
          <table:table-cell table:style-name="ce45" office:value-type="float" office:value="662" calcext:value-type="float">
            <text:p>662</text:p>
          </table:table-cell>
          <table:table-cell table:style-name="ce53" table:formula="of:=SUM([.D605:.H605])" office:value-type="float" office:value="15544" calcext:value-type="float">
            <text:p>15544</text:p>
          </table:table-cell>
          <table:table-cell table:style-name="ce60" office:value-type="string" calcext:value-type="string">
            <text:p>Berserk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5]=126;70;IF([.T605]=112;70;IF([.T605]=98;70;IF([.T605]=96;60;IF([.T605]=84;60;IF([.T605]=108;60;IF([.T605]=90;50;IF([.T605]=72;40;IF([.T605]=80;40;IF([.T605]=100;50;IF([.T605]=54;30;IF([.T605]=36;20;IF([.T605]=18;10;IF([.T60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e/e9/Parvaiz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rvaiz&quot;; &quot;Parvaiz&quot;)" office:value-type="string" office:string-value="Parvaiz" calcext:value-type="string">
            <text:p>Parvaiz</text:p>
          </table:table-cell>
          <table:table-cell table:style-name="ce25"/>
          <table:table-cell table:style-name="ce28" office:value-type="float" office:value="4989" calcext:value-type="float">
            <text:p>4989</text:p>
          </table:table-cell>
          <table:table-cell table:style-name="ce33" office:value-type="float" office:value="4219" calcext:value-type="float">
            <text:p>4219</text:p>
          </table:table-cell>
          <table:table-cell table:style-name="ce37" office:value-type="float" office:value="2163" calcext:value-type="float">
            <text:p>2163</text:p>
          </table:table-cell>
          <table:table-cell table:style-name="ce41" office:value-type="float" office:value="426" calcext:value-type="float">
            <text:p>426</text:p>
          </table:table-cell>
          <table:table-cell table:style-name="ce45" office:value-type="float" office:value="1619" calcext:value-type="float">
            <text:p>1619</text:p>
          </table:table-cell>
          <table:table-cell table:style-name="ce53" table:formula="of:=SUM([.D606:.H606])" office:value-type="float" office:value="13416" calcext:value-type="float">
            <text:p>13416</text:p>
          </table:table-cell>
          <table:table-cell table:style-name="ce60" office:value-type="string" calcext:value-type="string">
            <text:p>Squal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6]=126;70;IF([.T606]=112;70;IF([.T606]=98;70;IF([.T606]=96;60;IF([.T606]=84;60;IF([.T606]=108;60;IF([.T606]=90;50;IF([.T606]=72;40;IF([.T606]=80;40;IF([.T606]=100;50;IF([.T606]=54;30;IF([.T606]=36;20;IF([.T606]=18;10;IF([.T60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9/9d/Paya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er_-_Gabr_-_Payam&quot;; &quot;Payam&quot;)" office:value-type="string" office:string-value="Payam" calcext:value-type="string">
            <text:p>Payam</text:p>
          </table:table-cell>
          <table:table-cell table:style-name="ce25"/>
          <table:table-cell table:style-name="ce28" office:value-type="float" office:value="3449" calcext:value-type="float">
            <text:p>3449</text:p>
          </table:table-cell>
          <table:table-cell table:style-name="ce33" office:value-type="float" office:value="3916" calcext:value-type="float">
            <text:p>3916</text:p>
          </table:table-cell>
          <table:table-cell table:style-name="ce37" office:value-type="float" office:value="2157" calcext:value-type="float">
            <text:p>2157</text:p>
          </table:table-cell>
          <table:table-cell table:style-name="ce41" office:value-type="float" office:value="526" calcext:value-type="float">
            <text:p>526</text:p>
          </table:table-cell>
          <table:table-cell table:style-name="ce45" office:value-type="float" office:value="695" calcext:value-type="float">
            <text:p>695</text:p>
          </table:table-cell>
          <table:table-cell table:style-name="ce53" table:formula="of:=SUM([.D607:.H607])" office:value-type="float" office:value="10743" calcext:value-type="float">
            <text:p>10743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07]=126;70;IF([.T607]=112;70;IF([.T607]=98;70;IF([.T607]=96;60;IF([.T607]=84;60;IF([.T607]=108;60;IF([.T607]=90;50;IF([.T607]=72;40;IF([.T607]=80;40;IF([.T607]=100;50;IF([.T607]=54;30;IF([.T607]=36;20;IF([.T607]=18;10;IF([.T60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7/73/Pazuz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zuzu&quot;; &quot;Pazuzu&quot;)" office:value-type="string" office:string-value="Pazuzu" calcext:value-type="string">
            <text:p>Pazuzu</text:p>
          </table:table-cell>
          <table:table-cell table:style-name="ce25"/>
          <table:table-cell table:style-name="ce28" office:value-type="float" office:value="7562" calcext:value-type="float">
            <text:p>7562</text:p>
          </table:table-cell>
          <table:table-cell table:style-name="ce33" office:value-type="float" office:value="8247" calcext:value-type="float">
            <text:p>8247</text:p>
          </table:table-cell>
          <table:table-cell table:style-name="ce37" office:value-type="float" office:value="6245" calcext:value-type="float">
            <text:p>6245</text:p>
          </table:table-cell>
          <table:table-cell table:style-name="ce41" office:value-type="float" office:value="1323" calcext:value-type="float">
            <text:p>1323</text:p>
          </table:table-cell>
          <table:table-cell table:style-name="ce45" office:value-type="float" office:value="864" calcext:value-type="float">
            <text:p>864</text:p>
          </table:table-cell>
          <table:table-cell table:style-name="ce53" table:formula="of:=SUM([.D608:.H608])" office:value-type="float" office:value="24241" calcext:value-type="float">
            <text:p>24241</text:p>
          </table:table-cell>
          <table:table-cell table:style-name="ce60" office:value-type="string" calcext:value-type="string">
            <text:p>Moonris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608]=126;70;IF([.T608]=112;70;IF([.T608]=98;70;IF([.T608]=96;60;IF([.T608]=84;60;IF([.T608]=108;60;IF([.T608]=90;50;IF([.T608]=72;40;IF([.T608]=80;40;IF([.T608]=100;50;IF([.T608]=54;30;IF([.T608]=36;20;IF([.T608]=18;10;IF([.T60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218103241/defenderoftexel/images/thumb/7/7b/Perendon_the_Pure_Icon.png/50px-Perendon_the_Pur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Perendon the Pure&quot;; &quot;Perendon the Pure&quot;)" office:value-type="string" office:string-value="Perendon the Pure" calcext:value-type="string">
            <text:p>Perendon the Pur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492" calcext:value-type="float">
            <text:p>2492</text:p>
          </table:table-cell>
          <table:table-cell table:style-name="ce32" office:value-type="float" office:value="5801" calcext:value-type="float">
            <text:p>5801</text:p>
          </table:table-cell>
          <table:table-cell table:style-name="ce36" office:value-type="float" office:value="1266" calcext:value-type="float">
            <text:p>1266</text:p>
          </table:table-cell>
          <table:table-cell table:style-name="ce40" office:value-type="float" office:value="5505" calcext:value-type="float">
            <text:p>5505</text:p>
          </table:table-cell>
          <table:table-cell table:style-name="ce44" office:value-type="float" office:value="1677" calcext:value-type="float">
            <text:p>1677</text:p>
          </table:table-cell>
          <table:table-cell table:style-name="ce52" table:formula="of:=SUM([.D609:.H609])" office:value-type="float" office:value="16741" calcext:value-type="float">
            <text:p>16741</text:p>
          </table:table-cell>
          <table:table-cell table:style-name="ce59" office:value-type="string" calcext:value-type="string">
            <text:p>Kinesis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09]=126;70;IF([.T609]=112;70;IF([.T609]=98;70;IF([.T609]=96;60;IF([.T609]=84;60;IF([.T609]=108;60;IF([.T609]=90;50;IF([.T609]=72;40;IF([.T609]=80;40;IF([.T609]=100;50;IF([.T609]=54;30;IF([.T609]=36;20;IF([.T609]=18;10;IF([.T60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a/Petopor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otiso_-_Decebalus_-_Petoporus&quot;; &quot;Petoporus&quot;)" office:value-type="string" office:string-value="Petoporus" calcext:value-type="string">
            <text:p>Petoporus</text:p>
          </table:table-cell>
          <table:table-cell table:style-name="ce25"/>
          <table:table-cell table:style-name="ce28" office:value-type="float" office:value="5102" calcext:value-type="float">
            <text:p>5102</text:p>
          </table:table-cell>
          <table:table-cell table:style-name="ce33" office:value-type="float" office:value="4312" calcext:value-type="float">
            <text:p>4312</text:p>
          </table:table-cell>
          <table:table-cell table:style-name="ce37" office:value-type="float" office:value="2212" calcext:value-type="float">
            <text:p>2212</text:p>
          </table:table-cell>
          <table:table-cell table:style-name="ce41" office:value-type="float" office:value="437" calcext:value-type="float">
            <text:p>437</text:p>
          </table:table-cell>
          <table:table-cell table:style-name="ce45" office:value-type="float" office:value="1655" calcext:value-type="float">
            <text:p>1655</text:p>
          </table:table-cell>
          <table:table-cell table:style-name="ce53" table:formula="of:=SUM([.D610:.H610])" office:value-type="float" office:value="13718" calcext:value-type="float">
            <text:p>13718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10]=126;70;IF([.T610]=112;70;IF([.T610]=98;70;IF([.T610]=96;60;IF([.T610]=84;60;IF([.T610]=108;60;IF([.T610]=90;50;IF([.T610]=72;40;IF([.T610]=80;40;IF([.T610]=100;50;IF([.T610]=54;30;IF([.T610]=36;20;IF([.T610]=18;10;IF([.T61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3.wikia.nocookie.net/__cb20131105151357/defenderoftexel/images/thumb/c/cd/Philzerin_Icon.png/50px-Philzerin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Acuernius_-_Lairnell_-_Philzerin&quot;;&quot;Philzerin&quot;)" office:value-type="string" office:string-value="Philzerin" calcext:value-type="string">
            <text:p>Philzerin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9050" calcext:value-type="float">
            <text:p>9050</text:p>
          </table:table-cell>
          <table:table-cell table:style-name="ce32" office:value-type="float" office:value="7634" calcext:value-type="float">
            <text:p>7634</text:p>
          </table:table-cell>
          <table:table-cell table:style-name="ce36" office:value-type="float" office:value="3906" calcext:value-type="float">
            <text:p>3906</text:p>
          </table:table-cell>
          <table:table-cell table:style-name="ce40" office:value-type="float" office:value="782" calcext:value-type="float">
            <text:p>782</text:p>
          </table:table-cell>
          <table:table-cell table:style-name="ce44" office:value-type="float" office:value="2927" calcext:value-type="float">
            <text:p>2927</text:p>
          </table:table-cell>
          <table:table-cell table:style-name="ce52" table:formula="of:=SUM([.D611:.H611])" office:value-type="float" office:value="24299" calcext:value-type="float">
            <text:p>24299</text:p>
          </table:table-cell>
          <table:table-cell table:style-name="ce59" office:value-type="string" calcext:value-type="string">
            <text:p>Swarm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2" calcext:value-type="float">
            <text:p>2</text:p>
          </table:table-cell>
          <table:table-cell table:style-name="ce67" table:formula="of:=IF([.T611]=126;70;IF([.T611]=112;70;IF([.T611]=98;70;IF([.T611]=96;60;IF([.T611]=84;60;IF([.T611]=108;60;IF([.T611]=90;50;IF([.T611]=72;40;IF([.T611]=80;40;IF([.T611]=100;50;IF([.T611]=54;30;IF([.T611]=36;20;IF([.T611]=18;10;IF([.T611]=60;30))))))))))))))" office:value-type="float" office:value="60" calcext:value-type="float">
            <text:p>60</text:p>
          </table:table-cell>
          <table:table-cell table:style-name="ce67" office:value-type="float" office:value="84" calcext:value-type="float">
            <text:p>8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112131715/defenderoftexel/images/thumb/6/60/Pieporus_Icon.png/50px-Piepor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apyx_-_Zinnas_-_Pieporus&quot;;&quot;Pieporus&quot;)" office:value-type="string" office:string-value="Pieporus" calcext:value-type="string">
            <text:p>Pieporus</text:p>
          </table:table-cell>
          <table:table-cell table:style-name="ce25"/>
          <table:table-cell table:style-name="ce28" office:value-type="float" office:value="2792" calcext:value-type="float">
            <text:p>2792</text:p>
          </table:table-cell>
          <table:table-cell table:style-name="ce33" office:value-type="float" office:value="4249" calcext:value-type="float">
            <text:p>4249</text:p>
          </table:table-cell>
          <table:table-cell table:style-name="ce37" office:value-type="float" office:value="1452" calcext:value-type="float">
            <text:p>1452</text:p>
          </table:table-cell>
          <table:table-cell table:style-name="ce41" office:value-type="float" office:value="875" calcext:value-type="float">
            <text:p>875</text:p>
          </table:table-cell>
          <table:table-cell table:style-name="ce45" office:value-type="float" office:value="4407" calcext:value-type="float">
            <text:p>4407</text:p>
          </table:table-cell>
          <table:table-cell table:style-name="ce53" table:formula="of:=SUM([.D612:.H612])" office:value-type="float" office:value="13775" calcext:value-type="float">
            <text:p>13775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12]=126;70;IF([.T612]=112;70;IF([.T612]=98;70;IF([.T612]=96;60;IF([.T612]=84;60;IF([.T612]=108;60;IF([.T612]=90;50;IF([.T612]=72;40;IF([.T612]=80;40;IF([.T612]=100;50;IF([.T612]=54;30;IF([.T612]=36;20;IF([.T612]=18;10;IF([.T61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4258/defenderoftexel/images/5/57/Pinar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inaria&quot;; &quot;Pinaria&quot;)" office:value-type="string" office:string-value="Pinaria" calcext:value-type="string">
            <text:p>Pinaria</text:p>
          </table:table-cell>
          <table:table-cell table:style-name="ce25"/>
          <table:table-cell table:style-name="ce28" office:value-type="float" office:value="913" calcext:value-type="float">
            <text:p>913</text:p>
          </table:table-cell>
          <table:table-cell table:style-name="ce33" office:value-type="float" office:value="686" calcext:value-type="float">
            <text:p>686</text:p>
          </table:table-cell>
          <table:table-cell table:style-name="ce37" office:value-type="float" office:value="459" calcext:value-type="float">
            <text:p>459</text:p>
          </table:table-cell>
          <table:table-cell table:style-name="ce41" office:value-type="float" office:value="664" calcext:value-type="float">
            <text:p>664</text:p>
          </table:table-cell>
          <table:table-cell table:style-name="ce45" office:value-type="float" office:value="1767" calcext:value-type="float">
            <text:p>1767</text:p>
          </table:table-cell>
          <table:table-cell table:style-name="ce53" table:formula="of:=SUM([.D613:.H613])" office:value-type="float" office:value="4489" calcext:value-type="float">
            <text:p>4489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13]=126;70;IF([.T613]=112;70;IF([.T613]=98;70;IF([.T613]=96;60;IF([.T613]=84;60;IF([.T613]=108;60;IF([.T613]=90;50;IF([.T613]=72;40;IF([.T613]=80;40;IF([.T613]=100;50;IF([.T613]=54;30;IF([.T613]=36;20;IF([.T613]=18;10;IF([.T61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029142159/defenderoftexel/images/thumb/d/d8/Pinpanella_Icon.png/50px-Pinpanel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eudila_-_Diellena_-_Pinpanella&quot;;&quot;Pinpanella&quot;)" office:value-type="string" office:string-value="Pinpanella" calcext:value-type="string">
            <text:p>Pinpanella</text:p>
          </table:table-cell>
          <table:table-cell table:style-name="ce25"/>
          <table:table-cell table:style-name="ce28" office:value-type="float" office:value="649" calcext:value-type="float">
            <text:p>649</text:p>
          </table:table-cell>
          <table:table-cell table:style-name="ce33" office:value-type="float" office:value="1141" calcext:value-type="float">
            <text:p>1141</text:p>
          </table:table-cell>
          <table:table-cell table:style-name="ce37" office:value-type="float" office:value="598" calcext:value-type="float">
            <text:p>598</text:p>
          </table:table-cell>
          <table:table-cell table:style-name="ce41" office:value-type="float" office:value="7060" calcext:value-type="float">
            <text:p>7060</text:p>
          </table:table-cell>
          <table:table-cell table:style-name="ce45" office:value-type="float" office:value="5224" calcext:value-type="float">
            <text:p>5224</text:p>
          </table:table-cell>
          <table:table-cell table:style-name="ce53" table:formula="of:=SUM([.D614:.H614])" office:value-type="float" office:value="14672" calcext:value-type="float">
            <text:p>14672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14]=126;70;IF([.T614]=112;70;IF([.T614]=98;70;IF([.T614]=96;60;IF([.T614]=84;60;IF([.T614]=108;60;IF([.T614]=90;50;IF([.T614]=72;40;IF([.T614]=80;40;IF([.T614]=100;50;IF([.T614]=54;30;IF([.T614]=36;20;IF([.T614]=18;10;IF([.T61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1/14/Plec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lecu&quot;;&quot;Plecu&quot;)" office:value-type="string" office:string-value="Plecu" calcext:value-type="string">
            <text:p>Plecu</text:p>
          </table:table-cell>
          <table:table-cell table:style-name="ce25"/>
          <table:table-cell table:style-name="ce28" office:value-type="float" office:value="4504" calcext:value-type="float">
            <text:p>4504</text:p>
          </table:table-cell>
          <table:table-cell table:style-name="ce33" office:value-type="float" office:value="5153" calcext:value-type="float">
            <text:p>5153</text:p>
          </table:table-cell>
          <table:table-cell table:style-name="ce37" office:value-type="float" office:value="2761" calcext:value-type="float">
            <text:p>2761</text:p>
          </table:table-cell>
          <table:table-cell table:style-name="ce41" office:value-type="float" office:value="649" calcext:value-type="float">
            <text:p>649</text:p>
          </table:table-cell>
          <table:table-cell table:style-name="ce45" office:value-type="float" office:value="863" calcext:value-type="float">
            <text:p>863</text:p>
          </table:table-cell>
          <table:table-cell table:style-name="ce53" table:formula="of:=SUM([.D615:.H615])" office:value-type="float" office:value="13930" calcext:value-type="float">
            <text:p>13930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15]=126;70;IF([.T615]=112;70;IF([.T615]=98;70;IF([.T615]=96;60;IF([.T615]=84;60;IF([.T615]=108;60;IF([.T615]=90;50;IF([.T615]=72;40;IF([.T615]=80;40;IF([.T615]=100;50;IF([.T615]=54;30;IF([.T615]=36;20;IF([.T615]=18;10;IF([.T61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c/ca/Plumandias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Plumandias&quot;; &quot;Plumandias&quot;)" office:value-type="string" office:string-value="Plumandias" calcext:value-type="string">
            <text:p>Plumandia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556" calcext:value-type="float">
            <text:p>3556</text:p>
          </table:table-cell>
          <table:table-cell table:style-name="ce32" office:value-type="float" office:value="2537" calcext:value-type="float">
            <text:p>2537</text:p>
          </table:table-cell>
          <table:table-cell table:style-name="ce36" office:value-type="float" office:value="2950" calcext:value-type="float">
            <text:p>2950</text:p>
          </table:table-cell>
          <table:table-cell table:style-name="ce40" office:value-type="float" office:value="303" calcext:value-type="float">
            <text:p>303</text:p>
          </table:table-cell>
          <table:table-cell table:style-name="ce44" office:value-type="float" office:value="377" calcext:value-type="float">
            <text:p>377</text:p>
          </table:table-cell>
          <table:table-cell table:style-name="ce52" table:formula="of:=SUM([.D616:.H616])" office:value-type="float" office:value="9723" calcext:value-type="float">
            <text:p>9723</text:p>
          </table:table-cell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16]=126;70;IF([.T616]=112;70;IF([.T616]=98;70;IF([.T616]=96;60;IF([.T616]=84;60;IF([.T616]=108;60;IF([.T616]=90;50;IF([.T616]=72;40;IF([.T616]=80;40;IF([.T616]=100;50;IF([.T616]=54;30;IF([.T616]=36;20;IF([.T616]=18;10;IF([.T616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3.wikia.nocookie.net/__cb20130924180715/defenderoftexel/images/thumb/8/86/Poddleflack_Icon.png/50px-Poddleflack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Sentrollion_-_Clearcott_-_Poddleflack&quot;; &quot;Poddleflack&quot;)" office:value-type="string" office:string-value="Poddleflack" calcext:value-type="string">
            <text:p>Poddleflac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800" calcext:value-type="float">
            <text:p>1800</text:p>
          </table:table-cell>
          <table:table-cell table:style-name="ce32" office:value-type="float" office:value="1265" calcext:value-type="float">
            <text:p>1265</text:p>
          </table:table-cell>
          <table:table-cell table:style-name="ce36" office:value-type="float" office:value="817" calcext:value-type="float">
            <text:p>817</text:p>
          </table:table-cell>
          <table:table-cell table:style-name="ce40" office:value-type="float" office:value="5177" calcext:value-type="float">
            <text:p>5177</text:p>
          </table:table-cell>
          <table:table-cell table:style-name="ce44" office:value-type="float" office:value="4933" calcext:value-type="float">
            <text:p>4933</text:p>
          </table:table-cell>
          <table:table-cell table:style-name="ce52" table:formula="of:=SUM([.D617:.H617])" office:value-type="float" office:value="13992" calcext:value-type="float">
            <text:p>13992</text:p>
          </table:table-cell>
          <table:table-cell table:style-name="ce59" office:value-type="string" calcext:value-type="string">
            <text:p>Flodd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17]=126;70;IF([.T617]=112;70;IF([.T617]=98;70;IF([.T617]=96;60;IF([.T617]=84;60;IF([.T617]=108;60;IF([.T617]=90;50;IF([.T617]=72;40;IF([.T617]=80;40;IF([.T617]=100;50;IF([.T617]=54;30;IF([.T617]=36;20;IF([.T617]=18;10;IF([.T617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1/1c/Polyhymn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Undina_-_Isis_-_Polyhymnia&quot;; &quot;Polyhymnia&quot;)" office:value-type="string" office:string-value="Polyhymnia" calcext:value-type="string">
            <text:p>Polyhymni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972" calcext:value-type="float">
            <text:p>2972</text:p>
          </table:table-cell>
          <table:table-cell table:style-name="ce32" office:value-type="float" office:value="2090" calcext:value-type="float">
            <text:p>2090</text:p>
          </table:table-cell>
          <table:table-cell table:style-name="ce36" office:value-type="float" office:value="1352" calcext:value-type="float">
            <text:p>1352</text:p>
          </table:table-cell>
          <table:table-cell table:style-name="ce40" office:value-type="float" office:value="8572" calcext:value-type="float">
            <text:p>8572</text:p>
          </table:table-cell>
          <table:table-cell table:style-name="ce44" office:value-type="float" office:value="8159" calcext:value-type="float">
            <text:p>8159</text:p>
          </table:table-cell>
          <table:table-cell table:style-name="ce52" table:formula="of:=SUM([.D618:.H618])" office:value-type="float" office:value="23145" calcext:value-type="float">
            <text:p>23145</text:p>
          </table:table-cell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2" calcext:value-type="float">
            <text:p>2</text:p>
          </table:table-cell>
          <table:table-cell table:style-name="ce67" table:formula="of:=IF([.T618]=126;70;IF([.T618]=112;70;IF([.T618]=98;70;IF([.T618]=96;60;IF([.T618]=84;60;IF([.T618]=108;60;IF([.T618]=90;50;IF([.T618]=72;40;IF([.T618]=80;40;IF([.T618]=100;50;IF([.T618]=54;30;IF([.T618]=36;20;IF([.T618]=18;10;IF([.T618]=60;30))))))))))))))" office:value-type="float" office:value="70" calcext:value-type="float">
            <text:p>70</text:p>
          </table:table-cell>
          <table:table-cell table:style-name="ce67" office:value-type="float" office:value="98" calcext:value-type="float">
            <text:p>98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624131801/defenderoftexel/images/thumb/b/b5/Polypodia_Icon.png/50px-Polypod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Polypodia&quot;; &quot;Polypodia&quot;)" office:value-type="string" office:string-value="Polypodia" calcext:value-type="string">
            <text:p>Polypodi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88" calcext:value-type="float">
            <text:p>2688</text:p>
          </table:table-cell>
          <table:table-cell table:style-name="ce32" office:value-type="float" office:value="4388" calcext:value-type="float">
            <text:p>4388</text:p>
          </table:table-cell>
          <table:table-cell table:style-name="ce36" office:value-type="float" office:value="2234" calcext:value-type="float">
            <text:p>2234</text:p>
          </table:table-cell>
          <table:table-cell table:style-name="ce40" office:value-type="float" office:value="3511" calcext:value-type="float">
            <text:p>3511</text:p>
          </table:table-cell>
          <table:table-cell table:style-name="ce44" office:value-type="float" office:value="428" calcext:value-type="float">
            <text:p>428</text:p>
          </table:table-cell>
          <table:table-cell table:style-name="ce52" table:formula="of:=SUM([.D619:.H619])" office:value-type="float" office:value="13249" calcext:value-type="float">
            <text:p>13249</text:p>
          </table:table-cell>
          <table:table-cell table:style-name="ce59" office:value-type="string" calcext:value-type="string">
            <text:p>Drow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19]=126;70;IF([.T619]=112;70;IF([.T619]=98;70;IF([.T619]=96;60;IF([.T619]=84;60;IF([.T619]=108;60;IF([.T619]=90;50;IF([.T619]=72;40;IF([.T619]=80;40;IF([.T619]=100;50;IF([.T619]=54;30;IF([.T619]=36;20;IF([.T619]=18;10;IF([.T619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022161028/defenderoftexel/images/thumb/a/aa/Poppechik_Icon.png/50px-Poppechi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ariolette_-_Wayanga_-_Poppechik&quot;;&quot;Poppechik&quot;)" office:value-type="string" office:string-value="Poppechik" calcext:value-type="string">
            <text:p>Poppechik</text:p>
          </table:table-cell>
          <table:table-cell table:style-name="ce25"/>
          <table:table-cell table:style-name="ce28" office:value-type="float" office:value="3273" calcext:value-type="float">
            <text:p>3273</text:p>
          </table:table-cell>
          <table:table-cell table:style-name="ce33" office:value-type="float" office:value="4976" calcext:value-type="float">
            <text:p>4976</text:p>
          </table:table-cell>
          <table:table-cell table:style-name="ce37" office:value-type="float" office:value="1700" calcext:value-type="float">
            <text:p>1700</text:p>
          </table:table-cell>
          <table:table-cell table:style-name="ce41" office:value-type="float" office:value="1025" calcext:value-type="float">
            <text:p>1025</text:p>
          </table:table-cell>
          <table:table-cell table:style-name="ce45" office:value-type="float" office:value="5161" calcext:value-type="float">
            <text:p>5161</text:p>
          </table:table-cell>
          <table:table-cell table:style-name="ce53" table:formula="of:=SUM([.D620:.H620])" office:value-type="float" office:value="16135" calcext:value-type="float">
            <text:p>16135</text:p>
          </table:table-cell>
          <table:table-cell table:style-name="ce60" office:value-type="string" calcext:value-type="string">
            <text:p>Bo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20]=126;70;IF([.T620]=112;70;IF([.T620]=98;70;IF([.T620]=96;60;IF([.T620]=84;60;IF([.T620]=108;60;IF([.T620]=90;50;IF([.T620]=72;40;IF([.T620]=80;40;IF([.T620]=100;50;IF([.T620]=54;30;IF([.T620]=36;20;IF([.T620]=18;10;IF([.T62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509164012/defenderoftexel/images/thumb/8/8f/Pubba_Icon.png/50px-Pubb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ubba&quot;; &quot;Pubba&quot;)" office:value-type="string" office:string-value="Pubba" calcext:value-type="string">
            <text:p>Pubba</text:p>
          </table:table-cell>
          <table:table-cell table:style-name="ce25"/>
          <table:table-cell table:style-name="ce28" office:value-type="float" office:value="4613" calcext:value-type="float">
            <text:p>4613</text:p>
          </table:table-cell>
          <table:table-cell table:style-name="ce33" office:value-type="float" office:value="2061" calcext:value-type="float">
            <text:p>2061</text:p>
          </table:table-cell>
          <table:table-cell table:style-name="ce37" office:value-type="float" office:value="2250" calcext:value-type="float">
            <text:p>2250</text:p>
          </table:table-cell>
          <table:table-cell table:style-name="ce41" office:value-type="float" office:value="371" calcext:value-type="float">
            <text:p>371</text:p>
          </table:table-cell>
          <table:table-cell table:style-name="ce45" office:value-type="float" office:value="406" calcext:value-type="float">
            <text:p>406</text:p>
          </table:table-cell>
          <table:table-cell table:style-name="ce53" table:formula="of:=SUM([.D621:.H621])" office:value-type="float" office:value="9701" calcext:value-type="float">
            <text:p>9701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21]=126;70;IF([.T621]=112;70;IF([.T621]=98;70;IF([.T621]=96;60;IF([.T621]=84;60;IF([.T621]=108;60;IF([.T621]=90;50;IF([.T621]=72;40;IF([.T621]=80;40;IF([.T621]=100;50;IF([.T621]=54;30;IF([.T621]=36;20;IF([.T621]=18;10;IF([.T62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a/a7/Qal_Icon.png/revision/latest?cb=20150502071557&quot;)" office:value-type="string" office:string-value="" calcext:value-type="error">
            <text:p>#NAME?</text:p>
          </table:table-cell>
          <table:table-cell table:style-name="ce11" table:formula="of:=HYPERLINK(&quot;http://defenderoftexel.wikia.com/wiki/Qal_-_Girrabun_-_Kudurru&quot;;&quot;Qal&quot;)" office:value-type="string" office:string-value="Qal" calcext:value-type="string">
            <text:p>Qa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622:.H622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22]=126;70;IF([.T622]=112;70;IF([.T622]=98;70;IF([.T622]=96;60;IF([.T622]=84;60;IF([.T622]=108;60;IF([.T622]=90;50;IF([.T622]=72;40;IF([.T622]=80;40;IF([.T622]=100;50;IF([.T622]=54;30;IF([.T622]=36;20;IF([.T622]=18;10;IF([.T622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1.wikia.nocookie.net/__cb20140422134922/defenderoftexel/images/thumb/a/a7/Queen_Brumellia_Icon.png/50px-Queen_Brumelli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een_Brumellia&quot;; &quot;Queen Brumellia&quot;)" office:value-type="string" office:string-value="Queen Brumellia" calcext:value-type="string">
            <text:p>Queen Brumelli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897" calcext:value-type="float">
            <text:p>4897</text:p>
          </table:table-cell>
          <table:table-cell table:style-name="ce32" office:value-type="float" office:value="11394" calcext:value-type="float">
            <text:p>11394</text:p>
          </table:table-cell>
          <table:table-cell table:style-name="ce36" office:value-type="float" office:value="2491" calcext:value-type="float">
            <text:p>2491</text:p>
          </table:table-cell>
          <table:table-cell table:style-name="ce40" office:value-type="float" office:value="10824" calcext:value-type="float">
            <text:p>10824</text:p>
          </table:table-cell>
          <table:table-cell table:style-name="ce44" office:value-type="float" office:value="3307" calcext:value-type="float">
            <text:p>3307</text:p>
          </table:table-cell>
          <table:table-cell table:style-name="ce52" table:formula="of:=SUM([.D623:.H623])" office:value-type="float" office:value="32913" calcext:value-type="float">
            <text:p>32913</text:p>
          </table:table-cell>
          <table:table-cell table:style-name="ce59" office:value-type="string" calcext:value-type="string">
            <text:p>Triffic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Earth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3" calcext:value-type="float">
            <text:p>3</text:p>
          </table:table-cell>
          <table:table-cell table:style-name="ce67" table:formula="of:=IF([.T623]=126;70;IF([.T623]=112;70;IF([.T623]=98;70;IF([.T623]=96;60;IF([.T623]=84;60;IF([.T623]=108;60;IF([.T623]=90;50;IF([.T623]=72;40;IF([.T623]=80;40;IF([.T623]=100;50;IF([.T623]=54;30;IF([.T623]=36;20;IF([.T623]=18;10;IF([.T623]=60;30))))))))))))))" office:value-type="float" office:value="70" calcext:value-type="float">
            <text:p>70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429124233/defenderoftexel/images/thumb/9/99/Quetzalcoatl_Icon.png/50px-Quetzalcoat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Quetzalcoatl&quot;; &quot;Quetzalcoatl&quot;)" office:value-type="string" office:string-value="Quetzalcoatl" calcext:value-type="string">
            <text:p>Quetzalcoatl</text:p>
          </table:table-cell>
          <table:table-cell table:style-name="ce25"/>
          <table:table-cell table:style-name="ce28" office:value-type="float" office:value="2811" calcext:value-type="float">
            <text:p>2811</text:p>
          </table:table-cell>
          <table:table-cell table:style-name="ce33" office:value-type="float" office:value="4275" calcext:value-type="float">
            <text:p>4275</text:p>
          </table:table-cell>
          <table:table-cell table:style-name="ce37" office:value-type="float" office:value="1461" calcext:value-type="float">
            <text:p>1461</text:p>
          </table:table-cell>
          <table:table-cell table:style-name="ce41" office:value-type="float" office:value="881" calcext:value-type="float">
            <text:p>881</text:p>
          </table:table-cell>
          <table:table-cell table:style-name="ce45" office:value-type="float" office:value="4433" calcext:value-type="float">
            <text:p>4433</text:p>
          </table:table-cell>
          <table:table-cell table:style-name="ce53" table:formula="of:=SUM([.D624:.H624])" office:value-type="float" office:value="13861" calcext:value-type="float">
            <text:p>13861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24]=126;70;IF([.T624]=112;70;IF([.T624]=98;70;IF([.T624]=96;60;IF([.T624]=84;60;IF([.T624]=108;60;IF([.T624]=90;50;IF([.T624]=72;40;IF([.T624]=80;40;IF([.T624]=100;50;IF([.T624]=54;30;IF([.T624]=36;20;IF([.T624]=18;10;IF([.T62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d/d5/Quwha_Icon.png/revision/latest?cb=20150506134638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wha_-_Nittiatte_-_Voider&quot;;&quot;Quwha&quot;)" office:value-type="string" office:string-value="Quwha" calcext:value-type="string">
            <text:p>Quwha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Shock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25]=126;70;IF([.T625]=112;70;IF([.T625]=98;70;IF([.T625]=96;60;IF([.T625]=84;60;IF([.T625]=108;60;IF([.T625]=90;50;IF([.T625]=72;40;IF([.T625]=80;40;IF([.T625]=100;50;IF([.T625]=54;30;IF([.T625]=36;20;IF([.T625]=18;10;IF([.T625]=60;30))))))))))))))" office:value-type="float" office:value="40" calcext:value-type="float">
            <text:p>40</text:p>
          </table:table-cell>
          <table:table-cell table:style-name="ce67" office:value-type="float" office:value="72" calcext:value-type="float">
            <text:p>72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05150439/defenderoftexel/images/thumb/c/cf/Qwagutter_Icon.png/50px-Qwagutt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Qwagutter&quot;;&quot;Qwagutter&quot;)" office:value-type="string" office:string-value="Qwagutter" calcext:value-type="string">
            <text:p>Qwagutter</text:p>
          </table:table-cell>
          <table:table-cell table:style-name="ce25"/>
          <table:table-cell table:style-name="ce28" office:value-type="float" office:value="2862" calcext:value-type="float">
            <text:p>2862</text:p>
          </table:table-cell>
          <table:table-cell table:style-name="ce33" office:value-type="float" office:value="4355" calcext:value-type="float">
            <text:p>4355</text:p>
          </table:table-cell>
          <table:table-cell table:style-name="ce37" office:value-type="float" office:value="1488" calcext:value-type="float">
            <text:p>1488</text:p>
          </table:table-cell>
          <table:table-cell table:style-name="ce41" office:value-type="float" office:value="895" calcext:value-type="float">
            <text:p>895</text:p>
          </table:table-cell>
          <table:table-cell table:style-name="ce45" office:value-type="float" office:value="4517" calcext:value-type="float">
            <text:p>4517</text:p>
          </table:table-cell>
          <table:table-cell table:style-name="ce53" table:formula="of:=SUM([.D626:.H626])" office:value-type="float" office:value="14117" calcext:value-type="float">
            <text:p>14117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26]=126;70;IF([.T626]=112;70;IF([.T626]=98;70;IF([.T626]=96;60;IF([.T626]=84;60;IF([.T626]=108;60;IF([.T626]=90;50;IF([.T626]=72;40;IF([.T626]=80;40;IF([.T626]=100;50;IF([.T626]=54;30;IF([.T626]=36;20;IF([.T626]=18;10;IF([.T62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ages2.wikia.nocookie.net/__cb20130428042457/defenderoftexel/images/thumb/e/e5/Reckonsow_Icon.png/50px-Reckonsow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ckonsow&quot;; &quot;Reckonsow&quot;)" office:value-type="string" office:string-value="Reckonsow" calcext:value-type="string">
            <text:p>Reckonsow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296" calcext:value-type="float">
            <text:p>1296</text:p>
          </table:table-cell>
          <table:table-cell table:style-name="ce32" office:value-type="float" office:value="1386" calcext:value-type="float">
            <text:p>1386</text:p>
          </table:table-cell>
          <table:table-cell table:style-name="ce36" office:value-type="float" office:value="667" calcext:value-type="float">
            <text:p>667</text:p>
          </table:table-cell>
          <table:table-cell table:style-name="ce40" office:value-type="float" office:value="1123" calcext:value-type="float">
            <text:p>1123</text:p>
          </table:table-cell>
          <table:table-cell table:style-name="ce44" office:value-type="float" office:value="1036" calcext:value-type="float">
            <text:p>1036</text:p>
          </table:table-cell>
          <table:table-cell table:style-name="ce52" table:formula="of:=SUM([.D627:.H627])" office:value-type="float" office:value="5508" calcext:value-type="float">
            <text:p>5508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Scout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27]=126;70;IF([.T627]=112;70;IF([.T627]=98;70;IF([.T627]=96;60;IF([.T627]=84;60;IF([.T627]=108;60;IF([.T627]=90;50;IF([.T627]=72;40;IF([.T627]=80;40;IF([.T627]=100;50;IF([.T627]=54;30;IF([.T627]=36;20;IF([.T627]=18;10;IF([.T627]=60;30))))))))))))))" office:value-type="float" office:value="30" calcext:value-type="float">
            <text:p>30</text:p>
          </table:table-cell>
          <table:table-cell table:style-name="ce67" office:value-type="float" office:value="60" calcext:value-type="float">
            <text:p>6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static2.wikia.nocookie.net/__cb20131225104415/defenderoftexel/images/thumb/d/dc/Redkohl_Icon.png/50px-Redkohl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dkohl&quot;; &quot;Redkhol&quot;)" office:value-type="string" office:string-value="Redkhol" calcext:value-type="string">
            <text:p>Redkhol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858" calcext:value-type="float">
            <text:p>4858</text:p>
          </table:table-cell>
          <table:table-cell table:style-name="ce32" office:value-type="float" office:value="4109" calcext:value-type="float">
            <text:p>4109</text:p>
          </table:table-cell>
          <table:table-cell table:style-name="ce36" office:value-type="float" office:value="2107" calcext:value-type="float">
            <text:p>2107</text:p>
          </table:table-cell>
          <table:table-cell table:style-name="ce40" office:value-type="float" office:value="414" calcext:value-type="float">
            <text:p>414</text:p>
          </table:table-cell>
          <table:table-cell table:style-name="ce44" office:value-type="float" office:value="1577" calcext:value-type="float">
            <text:p>1577</text:p>
          </table:table-cell>
          <table:table-cell table:style-name="ce52" table:formula="of:=SUM([.D628:.H628])" office:value-type="float" office:value="13065" calcext:value-type="float">
            <text:p>13065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28]=126;70;IF([.T628]=112;70;IF([.T628]=98;70;IF([.T628]=96;60;IF([.T628]=84;60;IF([.T628]=108;60;IF([.T628]=90;50;IF([.T628]=72;40;IF([.T628]=80;40;IF([.T628]=100;50;IF([.T628]=54;30;IF([.T628]=36;20;IF([.T628]=18;10;IF([.T628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422132904/defenderoftexel/images/thumb/8/83/Rega_Snapdragon_Icon.png/50px-Rega_Snapdrago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ega_Snapdragon&quot;; &quot;Rega Snapdragon&quot;)" office:value-type="string" office:string-value="Rega Snapdragon" calcext:value-type="string">
            <text:p>Rega Snapdragon</text:p>
          </table:table-cell>
          <table:table-cell table:style-name="ce25"/>
          <table:table-cell table:style-name="ce28" office:value-type="float" office:value="2932" calcext:value-type="float">
            <text:p>2932</text:p>
          </table:table-cell>
          <table:table-cell table:style-name="ce33" office:value-type="float" office:value="2235" calcext:value-type="float">
            <text:p>2235</text:p>
          </table:table-cell>
          <table:table-cell table:style-name="ce37" office:value-type="float" office:value="1524" calcext:value-type="float">
            <text:p>1524</text:p>
          </table:table-cell>
          <table:table-cell table:style-name="ce41" office:value-type="float" office:value="2167" calcext:value-type="float">
            <text:p>2167</text:p>
          </table:table-cell>
          <table:table-cell table:style-name="ce45" office:value-type="float" office:value="5468" calcext:value-type="float">
            <text:p>5468</text:p>
          </table:table-cell>
          <table:table-cell table:style-name="ce53" table:formula="of:=SUM([.D629:.H629])" office:value-type="float" office:value="14326" calcext:value-type="float">
            <text:p>14326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29]=126;70;IF([.T629]=112;70;IF([.T629]=98;70;IF([.T629]=96;60;IF([.T629]=84;60;IF([.T629]=108;60;IF([.T629]=90;50;IF([.T629]=72;40;IF([.T629]=80;40;IF([.T629]=100;50;IF([.T629]=54;30;IF([.T629]=36;20;IF([.T629]=18;10;IF([.T62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210181750/defenderoftexel/images/thumb/e/e1/Regolith_Stonehewn_Icon.png/50px-Regolith_Stonehew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egolith_Stonehewn&quot;;&quot;Regolith Stonehewn&quot;)" office:value-type="string" office:string-value="Regolith Stonehewn" calcext:value-type="string">
            <text:p>Regolith Stonehewn</text:p>
          </table:table-cell>
          <table:table-cell table:style-name="ce25"/>
          <table:table-cell table:style-name="ce28" office:value-type="float" office:value="2441" calcext:value-type="float">
            <text:p>2441</text:p>
          </table:table-cell>
          <table:table-cell table:style-name="ce33" office:value-type="float" office:value="5677" calcext:value-type="float">
            <text:p>5677</text:p>
          </table:table-cell>
          <table:table-cell table:style-name="ce37" office:value-type="float" office:value="1240" calcext:value-type="float">
            <text:p>1240</text:p>
          </table:table-cell>
          <table:table-cell table:style-name="ce41" office:value-type="float" office:value="5390" calcext:value-type="float">
            <text:p>5390</text:p>
          </table:table-cell>
          <table:table-cell table:style-name="ce45" office:value-type="float" office:value="1642" calcext:value-type="float">
            <text:p>1642</text:p>
          </table:table-cell>
          <table:table-cell table:style-name="ce53" table:formula="of:=SUM([.D630:.H630])" office:value-type="float" office:value="16390" calcext:value-type="float">
            <text:p>16390</text:p>
          </table:table-cell>
          <table:table-cell table:style-name="ce60" office:value-type="string" calcext:value-type="string">
            <text:p>R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0]=126;70;IF([.T630]=112;70;IF([.T630]=98;70;IF([.T630]=96;60;IF([.T630]=84;60;IF([.T630]=108;60;IF([.T630]=90;50;IF([.T630]=72;40;IF([.T630]=80;40;IF([.T630]=100;50;IF([.T630]=54;30;IF([.T630]=36;20;IF([.T630]=18;10;IF([.T63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01124642/defenderoftexel/images/thumb/3/38/Reineke_Icon.png/50px-Reinek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eineke&quot;;&quot;Reineke&quot;)" office:value-type="string" office:string-value="Reineke" calcext:value-type="string">
            <text:p>Reineke</text:p>
          </table:table-cell>
          <table:table-cell table:style-name="ce25"/>
          <table:table-cell table:style-name="ce28" office:value-type="float" office:value="3152" calcext:value-type="float">
            <text:p>3152</text:p>
          </table:table-cell>
          <table:table-cell table:style-name="ce33" office:value-type="float" office:value="4794" calcext:value-type="float">
            <text:p>4794</text:p>
          </table:table-cell>
          <table:table-cell table:style-name="ce37" office:value-type="float" office:value="1637" calcext:value-type="float">
            <text:p>1637</text:p>
          </table:table-cell>
          <table:table-cell table:style-name="ce41" office:value-type="float" office:value="988" calcext:value-type="float">
            <text:p>988</text:p>
          </table:table-cell>
          <table:table-cell table:style-name="ce45" office:value-type="float" office:value="4970" calcext:value-type="float">
            <text:p>4970</text:p>
          </table:table-cell>
          <table:table-cell table:style-name="ce53" table:formula="of:=SUM([.D631:.H631])" office:value-type="float" office:value="15541" calcext:value-type="float">
            <text:p>15541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1]=126;70;IF([.T631]=112;70;IF([.T631]=98;70;IF([.T631]=96;60;IF([.T631]=84;60;IF([.T631]=108;60;IF([.T631]=90;50;IF([.T631]=72;40;IF([.T631]=80;40;IF([.T631]=100;50;IF([.T631]=54;30;IF([.T631]=36;20;IF([.T631]=18;10;IF([.T63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static2.wikia.nocookie.net/__cb20131022141452/defenderoftexel/images/thumb/1/14/Remissandra_Icon.png/50px-Remissandra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emissandra&quot;;&quot;Remissandra&quot;)" office:value-type="string" office:string-value="Remissandra" calcext:value-type="string">
            <text:p>Remissandr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764" calcext:value-type="float">
            <text:p>1764</text:p>
          </table:table-cell>
          <table:table-cell table:style-name="ce32" office:value-type="float" office:value="1239" calcext:value-type="float">
            <text:p>1239</text:p>
          </table:table-cell>
          <table:table-cell table:style-name="ce36" office:value-type="float" office:value="800" calcext:value-type="float">
            <text:p>800</text:p>
          </table:table-cell>
          <table:table-cell table:style-name="ce40" office:value-type="float" office:value="5078" calcext:value-type="float">
            <text:p>5078</text:p>
          </table:table-cell>
          <table:table-cell table:style-name="ce44" office:value-type="float" office:value="4834" calcext:value-type="float">
            <text:p>4834</text:p>
          </table:table-cell>
          <table:table-cell table:style-name="ce52" table:formula="of:=SUM([.D632:.H632])" office:value-type="float" office:value="13715" calcext:value-type="float">
            <text:p>13715</text:p>
          </table:table-cell>
          <table:table-cell table:style-name="ce59" office:value-type="string" calcext:value-type="string">
            <text:p>Siphon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32]=126;70;IF([.T632]=112;70;IF([.T632]=98;70;IF([.T632]=96;60;IF([.T632]=84;60;IF([.T632]=108;60;IF([.T632]=90;50;IF([.T632]=72;40;IF([.T632]=80;40;IF([.T632]=100;50;IF([.T632]=54;30;IF([.T632]=36;20;IF([.T632]=18;10;IF([.T632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images.wikia.com/defenderoftexel/images/e/e0/Rhosemadder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Fyrearm_-_Pummeloy_-_Rhosemadder&quot;; &quot;Rhosemadder&quot;)" office:value-type="string" office:string-value="Rhosemadder" calcext:value-type="string">
            <text:p>Rhosemadder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631" calcext:value-type="float">
            <text:p>2631</text:p>
          </table:table-cell>
          <table:table-cell table:style-name="ce32" office:value-type="float" office:value="3690" calcext:value-type="float">
            <text:p>3690</text:p>
          </table:table-cell>
          <table:table-cell table:style-name="ce36" office:value-type="float" office:value="803" calcext:value-type="float">
            <text:p>803</text:p>
          </table:table-cell>
          <table:table-cell table:style-name="ce40" office:value-type="float" office:value="2358" calcext:value-type="float">
            <text:p>2358</text:p>
          </table:table-cell>
          <table:table-cell table:style-name="ce44" office:value-type="float" office:value="1066" calcext:value-type="float">
            <text:p>1066</text:p>
          </table:table-cell>
          <table:table-cell table:style-name="ce52" table:formula="of:=SUM([.D633:.H633])" office:value-type="float" office:value="10548" calcext:value-type="float">
            <text:p>10548</text:p>
          </table:table-cell>
          <table:table-cell table:style-name="ce59" office:value-type="string" calcext:value-type="string">
            <text:p>Scorch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33]=126;70;IF([.T633]=112;70;IF([.T633]=98;70;IF([.T633]=96;60;IF([.T633]=84;60;IF([.T633]=108;60;IF([.T633]=90;50;IF([.T633]=72;40;IF([.T633]=80;40;IF([.T633]=100;50;IF([.T633]=54;30;IF([.T633]=36;20;IF([.T633]=18;10;IF([.T633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img2.wikia.nocookie.net/__cb20140603162539/defenderoftexel/images/thumb/9/90/Rishalee_Icon.png/50px-Rishalee_Icon.png&quot;)" office:value-type="string" office:string-value="" calcext:value-type="error">
            <text:p>#NAME?</text:p>
          </table:table-cell>
          <table:table-cell table:style-name="ce11" table:formula="of:=HYPERLINK(&quot;http://defenderoftexel.wikia.com/wiki/Rishalee&quot;; &quot;Rishalee&quot;)" office:value-type="string" office:string-value="Rishalee" calcext:value-type="string">
            <text:p>Rishale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908" calcext:value-type="float">
            <text:p>3908</text:p>
          </table:table-cell>
          <table:table-cell table:style-name="ce32" office:value-type="float" office:value="5477" calcext:value-type="float">
            <text:p>5477</text:p>
          </table:table-cell>
          <table:table-cell table:style-name="ce36" office:value-type="float" office:value="1196" calcext:value-type="float">
            <text:p>1196</text:p>
          </table:table-cell>
          <table:table-cell table:style-name="ce40" office:value-type="float" office:value="3505" calcext:value-type="float">
            <text:p>3505</text:p>
          </table:table-cell>
          <table:table-cell table:style-name="ce44" office:value-type="float" office:value="1585" calcext:value-type="float">
            <text:p>1585</text:p>
          </table:table-cell>
          <table:table-cell table:style-name="ce52" table:formula="of:=SUM([.D634:.H634])" office:value-type="float" office:value="15671" calcext:value-type="float">
            <text:p>15671</text:p>
          </table:table-cell>
          <table:table-cell table:style-name="ce59" office:value-type="string" calcext:value-type="string">
            <text:p>Charm Danc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34]=126;70;IF([.T634]=112;70;IF([.T634]=98;70;IF([.T634]=96;60;IF([.T634]=84;60;IF([.T634]=108;60;IF([.T634]=90;50;IF([.T634]=72;40;IF([.T634]=80;40;IF([.T634]=100;50;IF([.T634]=54;30;IF([.T634]=36;20;IF([.T634]=18;10;IF([.T634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40114142555/defenderoftexel/images/thumb/1/19/Rocksee_Icon.png/50px-Rockse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ocksee&quot;; &quot;Rocksee&quot;)" office:value-type="string" office:string-value="Rocksee" calcext:value-type="string">
            <text:p>Rocksee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4162" calcext:value-type="float">
            <text:p>4162</text:p>
          </table:table-cell>
          <table:table-cell table:style-name="ce33" office:value-type="float" office:value="4844" calcext:value-type="float">
            <text:p>4844</text:p>
          </table:table-cell>
          <table:table-cell table:style-name="ce37" office:value-type="float" office:value="3372" calcext:value-type="float">
            <text:p>3372</text:p>
          </table:table-cell>
          <table:table-cell table:style-name="ce41" office:value-type="float" office:value="475" calcext:value-type="float">
            <text:p>475</text:p>
          </table:table-cell>
          <table:table-cell table:style-name="ce45" office:value-type="float" office:value="572" calcext:value-type="float">
            <text:p>572</text:p>
          </table:table-cell>
          <table:table-cell table:style-name="ce53" table:formula="of:=SUM([.D635:.H635])" office:value-type="float" office:value="13425" calcext:value-type="float">
            <text:p>13425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5]=126;70;IF([.T635]=112;70;IF([.T635]=98;70;IF([.T635]=96;60;IF([.T635]=84;60;IF([.T635]=108;60;IF([.T635]=90;50;IF([.T635]=72;40;IF([.T635]=80;40;IF([.T635]=100;50;IF([.T635]=54;30;IF([.T635]=36;20;IF([.T635]=18;10;IF([.T635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40114143730/defenderoftexel/images/thumb/9/96/Rollix_Icon.png/50px-Rollix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ollix&quot;; &quot;Rollix&quot;)" office:value-type="string" office:string-value="Rollix" calcext:value-type="string">
            <text:p>Rollix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2028" calcext:value-type="float">
            <text:p>2028</text:p>
          </table:table-cell>
          <table:table-cell table:style-name="ce33" office:value-type="float" office:value="1423" calcext:value-type="float">
            <text:p>1423</text:p>
          </table:table-cell>
          <table:table-cell table:style-name="ce37" office:value-type="float" office:value="918" calcext:value-type="float">
            <text:p>918</text:p>
          </table:table-cell>
          <table:table-cell table:style-name="ce41" office:value-type="float" office:value="5833" calcext:value-type="float">
            <text:p>5833</text:p>
          </table:table-cell>
          <table:table-cell table:style-name="ce45" office:value-type="float" office:value="5554" calcext:value-type="float">
            <text:p>5554</text:p>
          </table:table-cell>
          <table:table-cell table:style-name="ce53" table:formula="of:=SUM([.D636:.H636])" office:value-type="float" office:value="15756" calcext:value-type="float">
            <text:p>15756</text:p>
          </table:table-cell>
          <table:table-cell table:style-name="ce60" office:value-type="string" calcext:value-type="string">
            <text:p>Pryo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6]=126;70;IF([.T636]=112;70;IF([.T636]=98;70;IF([.T636]=96;60;IF([.T636]=84;60;IF([.T636]=108;60;IF([.T636]=90;50;IF([.T636]=72;40;IF([.T636]=80;40;IF([.T636]=100;50;IF([.T636]=54;30;IF([.T636]=36;20;IF([.T636]=18;10;IF([.T636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29123042/defenderoftexel/images/thumb/1/1b/Rosaura_Icon.png/50px-Rosau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osaura&quot;; &quot;Rosaura&quot;)" office:value-type="string" office:string-value="Rosaura" calcext:value-type="string">
            <text:p>Rosaura</text:p>
          </table:table-cell>
          <table:table-cell table:style-name="ce25"/>
          <table:table-cell table:style-name="ce28" office:value-type="float" office:value="2071" calcext:value-type="float">
            <text:p>2071</text:p>
          </table:table-cell>
          <table:table-cell table:style-name="ce33" office:value-type="float" office:value="1455" calcext:value-type="float">
            <text:p>1455</text:p>
          </table:table-cell>
          <table:table-cell table:style-name="ce37" office:value-type="float" office:value="939" calcext:value-type="float">
            <text:p>939</text:p>
          </table:table-cell>
          <table:table-cell table:style-name="ce41" office:value-type="float" office:value="5953" calcext:value-type="float">
            <text:p>5953</text:p>
          </table:table-cell>
          <table:table-cell table:style-name="ce45" office:value-type="float" office:value="5669" calcext:value-type="float">
            <text:p>5669</text:p>
          </table:table-cell>
          <table:table-cell table:style-name="ce53" table:formula="of:=SUM([.D637:.H637])" office:value-type="float" office:value="16087" calcext:value-type="float">
            <text:p>16087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7]=126;70;IF([.T637]=112;70;IF([.T637]=98;70;IF([.T637]=96;60;IF([.T637]=84;60;IF([.T637]=108;60;IF([.T637]=90;50;IF([.T637]=72;40;IF([.T637]=80;40;IF([.T637]=100;50;IF([.T637]=54;30;IF([.T637]=36;20;IF([.T637]=18;10;IF([.T63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730171344/defenderoftexel/images/f/f2/Roshana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oshanara&quot;; &quot;Roshanara&quot;)" office:value-type="string" office:string-value="Roshanara" calcext:value-type="string">
            <text:p>Roshanara</text:p>
          </table:table-cell>
          <table:table-cell table:style-name="ce25"/>
          <table:table-cell table:style-name="ce28" office:value-type="float" office:value="2387" calcext:value-type="float">
            <text:p>2387</text:p>
          </table:table-cell>
          <table:table-cell table:style-name="ce33" office:value-type="float" office:value="4310" calcext:value-type="float">
            <text:p>4310</text:p>
          </table:table-cell>
          <table:table-cell table:style-name="ce37" office:value-type="float" office:value="1441" calcext:value-type="float">
            <text:p>1441</text:p>
          </table:table-cell>
          <table:table-cell table:style-name="ce41" office:value-type="float" office:value="1632" calcext:value-type="float">
            <text:p>1632</text:p>
          </table:table-cell>
          <table:table-cell table:style-name="ce45" office:value-type="float" office:value="572" calcext:value-type="float">
            <text:p>572</text:p>
          </table:table-cell>
          <table:table-cell table:style-name="ce53" table:formula="of:=SUM([.D638:.H638])" office:value-type="float" office:value="10342" calcext:value-type="float">
            <text:p>10342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8]=126;70;IF([.T638]=112;70;IF([.T638]=98;70;IF([.T638]=96;60;IF([.T638]=84;60;IF([.T638]=108;60;IF([.T638]=90;50;IF([.T638]=72;40;IF([.T638]=80;40;IF([.T638]=100;50;IF([.T638]=54;30;IF([.T638]=36;20;IF([.T638]=18;10;IF([.T63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3/3d/Rozicryst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ozicrysti&quot;; &quot;Rozicrysti&quot;)" office:value-type="string" office:string-value="Rozicrysti" calcext:value-type="string">
            <text:p>Rozicrysti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5314" calcext:value-type="float">
            <text:p>5314</text:p>
          </table:table-cell>
          <table:table-cell table:style-name="ce33" office:value-type="float" office:value="3791" calcext:value-type="float">
            <text:p>3791</text:p>
          </table:table-cell>
          <table:table-cell table:style-name="ce37" office:value-type="float" office:value="4409" calcext:value-type="float">
            <text:p>4409</text:p>
          </table:table-cell>
          <table:table-cell table:style-name="ce41" office:value-type="float" office:value="454" calcext:value-type="float">
            <text:p>454</text:p>
          </table:table-cell>
          <table:table-cell table:style-name="ce45" office:value-type="float" office:value="566" calcext:value-type="float">
            <text:p>566</text:p>
          </table:table-cell>
          <table:table-cell table:style-name="ce53" table:formula="of:=SUM([.D639:.H639])" office:value-type="float" office:value="14534" calcext:value-type="float">
            <text:p>14534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39]=126;70;IF([.T639]=112;70;IF([.T639]=98;70;IF([.T639]=96;60;IF([.T639]=84;60;IF([.T639]=108;60;IF([.T639]=90;50;IF([.T639]=72;40;IF([.T639]=80;40;IF([.T639]=100;50;IF([.T639]=54;30;IF([.T639]=36;20;IF([.T639]=18;10;IF([.T639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29122620/defenderoftexel/images/thumb/7/70/Rudho_Icon.png/50px-Rudh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udho&quot;; &quot;Rudho&quot;)" office:value-type="string" office:string-value="Rudho" calcext:value-type="string">
            <text:p>Rudho</text:p>
          </table:table-cell>
          <table:table-cell table:style-name="ce25"/>
          <table:table-cell table:style-name="ce28" office:value-type="float" office:value="3846" calcext:value-type="float">
            <text:p>3846</text:p>
          </table:table-cell>
          <table:table-cell table:style-name="ce33" office:value-type="float" office:value="5393" calcext:value-type="float">
            <text:p>5393</text:p>
          </table:table-cell>
          <table:table-cell table:style-name="ce37" office:value-type="float" office:value="1175" calcext:value-type="float">
            <text:p>1175</text:p>
          </table:table-cell>
          <table:table-cell table:style-name="ce41" office:value-type="float" office:value="3450" calcext:value-type="float">
            <text:p>3450</text:p>
          </table:table-cell>
          <table:table-cell table:style-name="ce45" office:value-type="float" office:value="1561" calcext:value-type="float">
            <text:p>1561</text:p>
          </table:table-cell>
          <table:table-cell table:style-name="ce53" table:formula="of:=SUM([.D640:.H640])" office:value-type="float" office:value="15425" calcext:value-type="float">
            <text:p>15425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0]=126;70;IF([.T640]=112;70;IF([.T640]=98;70;IF([.T640]=96;60;IF([.T640]=84;60;IF([.T640]=108;60;IF([.T640]=90;50;IF([.T640]=72;40;IF([.T640]=80;40;IF([.T640]=100;50;IF([.T640]=54;30;IF([.T640]=36;20;IF([.T640]=18;10;IF([.T64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1437/defenderoftexel/images/thumb/a/ad/Samsuiluna_Icon.png/50px-Samsuilu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msuiluna&quot;; &quot;Samsuiluna&quot;)" office:value-type="string" office:string-value="Samsuiluna" calcext:value-type="string">
            <text:p>Samsuiluna</text:p>
          </table:table-cell>
          <table:table-cell table:style-name="ce25"/>
          <table:table-cell table:style-name="ce28" office:value-type="float" office:value="948" calcext:value-type="float">
            <text:p>948</text:p>
          </table:table-cell>
          <table:table-cell table:style-name="ce33" office:value-type="float" office:value="713" calcext:value-type="float">
            <text:p>713</text:p>
          </table:table-cell>
          <table:table-cell table:style-name="ce37" office:value-type="float" office:value="478" calcext:value-type="float">
            <text:p>478</text:p>
          </table:table-cell>
          <table:table-cell table:style-name="ce41" office:value-type="float" office:value="691" calcext:value-type="float">
            <text:p>691</text:p>
          </table:table-cell>
          <table:table-cell table:style-name="ce45" office:value-type="float" office:value="1840" calcext:value-type="float">
            <text:p>1840</text:p>
          </table:table-cell>
          <table:table-cell table:style-name="ce53" table:formula="of:=SUM([.D641:.H641])" office:value-type="float" office:value="4670" calcext:value-type="float">
            <text:p>4670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1]=126;70;IF([.T641]=112;70;IF([.T641]=98;70;IF([.T641]=96;60;IF([.T641]=84;60;IF([.T641]=108;60;IF([.T641]=90;50;IF([.T641]=72;40;IF([.T641]=80;40;IF([.T641]=100;50;IF([.T641]=54;30;IF([.T641]=36;20;IF([.T641]=18;10;IF([.T64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715145038/defenderoftexel/images/d/db/Sarap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rapu&quot;; &quot;Sarapu&quot;)" office:value-type="string" office:string-value="Sarapu" calcext:value-type="string">
            <text:p>Sarapu</text:p>
          </table:table-cell>
          <table:table-cell table:style-name="ce25"/>
          <table:table-cell table:style-name="ce28" office:value-type="float" office:value="8287" calcext:value-type="float">
            <text:p>8287</text:p>
          </table:table-cell>
          <table:table-cell table:style-name="ce33" office:value-type="float" office:value="1099" calcext:value-type="float">
            <text:p>1099</text:p>
          </table:table-cell>
          <table:table-cell table:style-name="ce37" office:value-type="float" office:value="2959" calcext:value-type="float">
            <text:p>2959</text:p>
          </table:table-cell>
          <table:table-cell table:style-name="ce41" office:value-type="float" office:value="17016" calcext:value-type="float">
            <text:p>17016</text:p>
          </table:table-cell>
          <table:table-cell table:style-name="ce45" office:value-type="float" office:value="5624" calcext:value-type="float">
            <text:p>5624</text:p>
          </table:table-cell>
          <table:table-cell table:style-name="ce53" table:formula="of:=SUM([.D642:.H642])" office:value-type="float" office:value="34985" calcext:value-type="float">
            <text:p>34985</text:p>
          </table:table-cell>
          <table:table-cell table:style-name="ce60" office:value-type="string" calcext:value-type="string">
            <text:p>Rekindl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642]=126;70;IF([.T642]=112;70;IF([.T642]=98;70;IF([.T642]=96;60;IF([.T642]=84;60;IF([.T642]=108;60;IF([.T642]=90;50;IF([.T642]=72;40;IF([.T642]=80;40;IF([.T642]=100;50;IF([.T642]=54;30;IF([.T642]=36;20;IF([.T642]=18;10;IF([.T64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23556/defenderoftexel/images/thumb/e/ed/Sarosh_Icon.png/40px-Saros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rosh&quot;; &quot;Sarosh&quot;)" office:value-type="string" office:string-value="Sarosh" calcext:value-type="string">
            <text:p>Sarosh</text:p>
          </table:table-cell>
          <table:table-cell table:style-name="ce25"/>
          <table:table-cell table:style-name="ce28" office:value-type="float" office:value="2871" calcext:value-type="float">
            <text:p>2871</text:p>
          </table:table-cell>
          <table:table-cell table:style-name="ce33" office:value-type="float" office:value="3286" calcext:value-type="float">
            <text:p>3286</text:p>
          </table:table-cell>
          <table:table-cell table:style-name="ce37" office:value-type="float" office:value="1759" calcext:value-type="float">
            <text:p>1759</text:p>
          </table:table-cell>
          <table:table-cell table:style-name="ce41" office:value-type="float" office:value="414" calcext:value-type="float">
            <text:p>414</text:p>
          </table:table-cell>
          <table:table-cell table:style-name="ce45" office:value-type="float" office:value="552" calcext:value-type="float">
            <text:p>552</text:p>
          </table:table-cell>
          <table:table-cell table:style-name="ce53" table:formula="of:=SUM([.D643:.H643])" office:value-type="float" office:value="8882" calcext:value-type="float">
            <text:p>8882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3]=126;70;IF([.T643]=112;70;IF([.T643]=98;70;IF([.T643]=96;60;IF([.T643]=84;60;IF([.T643]=108;60;IF([.T643]=90;50;IF([.T643]=72;40;IF([.T643]=80;40;IF([.T643]=100;50;IF([.T643]=54;30;IF([.T643]=36;20;IF([.T643]=18;10;IF([.T64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f/f7/Sarsina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rsinaia&quot;; &quot;Sarsinaia&quot;)" office:value-type="string" office:string-value="Sarsinaia" calcext:value-type="string">
            <text:p>Sarsinaia</text:p>
          </table:table-cell>
          <table:table-cell table:style-name="ce25"/>
          <table:table-cell table:style-name="ce28" office:value-type="float" office:value="3494" calcext:value-type="float">
            <text:p>3494</text:p>
          </table:table-cell>
          <table:table-cell table:style-name="ce33" office:value-type="float" office:value="4899" calcext:value-type="float">
            <text:p>4899</text:p>
          </table:table-cell>
          <table:table-cell table:style-name="ce37" office:value-type="float" office:value="1069" calcext:value-type="float">
            <text:p>1069</text:p>
          </table:table-cell>
          <table:table-cell table:style-name="ce41" office:value-type="float" office:value="3134" calcext:value-type="float">
            <text:p>3134</text:p>
          </table:table-cell>
          <table:table-cell table:style-name="ce45" office:value-type="float" office:value="1418" calcext:value-type="float">
            <text:p>1418</text:p>
          </table:table-cell>
          <table:table-cell table:style-name="ce53" table:formula="of:=SUM([.D644:.H644])" office:value-type="float" office:value="14014" calcext:value-type="float">
            <text:p>14014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4]=126;70;IF([.T644]=112;70;IF([.T644]=98;70;IF([.T644]=96;60;IF([.T644]=84;60;IF([.T644]=108;60;IF([.T644]=90;50;IF([.T644]=72;40;IF([.T644]=80;40;IF([.T644]=100;50;IF([.T644]=54;30;IF([.T644]=36;20;IF([.T644]=18;10;IF([.T64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401124116/defenderoftexel/images/thumb/4/4e/Savignul_Icon.png/50px-Savignu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vignul&quot;; &quot;Savignul&quot;)" office:value-type="string" office:string-value="Savignul" calcext:value-type="string">
            <text:p>Savignul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4957" calcext:value-type="float">
            <text:p>4957</text:p>
          </table:table-cell>
          <table:table-cell table:style-name="ce33" office:value-type="float" office:value="5765" calcext:value-type="float">
            <text:p>5765</text:p>
          </table:table-cell>
          <table:table-cell table:style-name="ce37" office:value-type="float" office:value="4012" calcext:value-type="float">
            <text:p>4012</text:p>
          </table:table-cell>
          <table:table-cell table:style-name="ce41" office:value-type="float" office:value="567" calcext:value-type="float">
            <text:p>567</text:p>
          </table:table-cell>
          <table:table-cell table:style-name="ce45" office:value-type="float" office:value="682" calcext:value-type="float">
            <text:p>682</text:p>
          </table:table-cell>
          <table:table-cell table:style-name="ce53" table:formula="of:=SUM([.D645:.H645])" office:value-type="float" office:value="15983" calcext:value-type="float">
            <text:p>15983</text:p>
          </table:table-cell>
          <table:table-cell table:style-name="ce60" office:value-type="string" calcext:value-type="string">
            <text:p>Repay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5]=126;70;IF([.T645]=112;70;IF([.T645]=98;70;IF([.T645]=96;60;IF([.T645]=84;60;IF([.T645]=108;60;IF([.T645]=90;50;IF([.T645]=72;40;IF([.T645]=80;40;IF([.T645]=100;50;IF([.T645]=54;30;IF([.T645]=36;20;IF([.T645]=18;10;IF([.T645]=60;30))))))))))))))" office:value-type="float" office:value="40" calcext:value-type="float">
            <text:p>40</text:p>
          </table:table-cell>
          <table:table-cell table:style-name="ce68" office:value-type="float" office:value="80" calcext:value-type="float">
            <text:p>8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0428033453/defenderoftexel/images/thumb/7/7d/Seianti_Icon.png/50px-Seiant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eianti&quot;;&quot;Seianti&quot;)" office:value-type="string" office:string-value="Seianti" calcext:value-type="string">
            <text:p>Seianti</text:p>
          </table:table-cell>
          <table:table-cell table:style-name="ce25"/>
          <table:table-cell table:style-name="ce28" office:value-type="float" office:value="2017" calcext:value-type="float">
            <text:p>2017</text:p>
          </table:table-cell>
          <table:table-cell table:style-name="ce33" office:value-type="float" office:value="1551" calcext:value-type="float">
            <text:p>1551</text:p>
          </table:table-cell>
          <table:table-cell table:style-name="ce37" office:value-type="float" office:value="1070" calcext:value-type="float">
            <text:p>1070</text:p>
          </table:table-cell>
          <table:table-cell table:style-name="ce41" office:value-type="float" office:value="1506" calcext:value-type="float">
            <text:p>1506</text:p>
          </table:table-cell>
          <table:table-cell table:style-name="ce45" office:value-type="float" office:value="3667" calcext:value-type="float">
            <text:p>3667</text:p>
          </table:table-cell>
          <table:table-cell table:style-name="ce53" table:formula="of:=SUM([.D646:.H646])" office:value-type="float" office:value="9811" calcext:value-type="float">
            <text:p>9811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6]=126;70;IF([.T646]=112;70;IF([.T646]=98;70;IF([.T646]=96;60;IF([.T646]=84;60;IF([.T646]=108;60;IF([.T646]=90;50;IF([.T646]=72;40;IF([.T646]=80;40;IF([.T646]=100;50;IF([.T646]=54;30;IF([.T646]=36;20;IF([.T646]=18;10;IF([.T64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7/78/Serollind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erollinda&quot;; &quot;Serollinda&quot;)" office:value-type="string" office:string-value="Serollinda" calcext:value-type="string">
            <text:p>Serollinda</text:p>
          </table:table-cell>
          <table:table-cell table:style-name="ce25"/>
          <table:table-cell table:style-name="ce28" office:value-type="float" office:value="2715" calcext:value-type="float">
            <text:p>2715</text:p>
          </table:table-cell>
          <table:table-cell table:style-name="ce33" office:value-type="float" office:value="3817" calcext:value-type="float">
            <text:p>3817</text:p>
          </table:table-cell>
          <table:table-cell table:style-name="ce37" office:value-type="float" office:value="829" calcext:value-type="float">
            <text:p>829</text:p>
          </table:table-cell>
          <table:table-cell table:style-name="ce41" office:value-type="float" office:value="2435" calcext:value-type="float">
            <text:p>2435</text:p>
          </table:table-cell>
          <table:table-cell table:style-name="ce45" office:value-type="float" office:value="1102" calcext:value-type="float">
            <text:p>1102</text:p>
          </table:table-cell>
          <table:table-cell table:style-name="ce53" table:formula="of:=SUM([.D647:.H647])" office:value-type="float" office:value="10898" calcext:value-type="float">
            <text:p>10898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7]=126;70;IF([.T647]=112;70;IF([.T647]=98;70;IF([.T647]=96;60;IF([.T647]=84;60;IF([.T647]=108;60;IF([.T647]=90;50;IF([.T647]=72;40;IF([.T647]=80;40;IF([.T647]=100;50;IF([.T647]=54;30;IF([.T647]=36;20;IF([.T647]=18;10;IF([.T64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b/b6/Sersloug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erslough&quot;; &quot;Serslough&quot;)" office:value-type="string" office:string-value="Serslough" calcext:value-type="string">
            <text:p>Serslough</text:p>
          </table:table-cell>
          <table:table-cell table:style-name="ce25"/>
          <table:table-cell table:style-name="ce28" office:value-type="float" office:value="1810" calcext:value-type="float">
            <text:p>1810</text:p>
          </table:table-cell>
          <table:table-cell table:style-name="ce33" office:value-type="float" office:value="1271" calcext:value-type="float">
            <text:p>1271</text:p>
          </table:table-cell>
          <table:table-cell table:style-name="ce37" office:value-type="float" office:value="820" calcext:value-type="float">
            <text:p>820</text:p>
          </table:table-cell>
          <table:table-cell table:style-name="ce41" office:value-type="float" office:value="5211" calcext:value-type="float">
            <text:p>5211</text:p>
          </table:table-cell>
          <table:table-cell table:style-name="ce45" office:value-type="float" office:value="4963" calcext:value-type="float">
            <text:p>4963</text:p>
          </table:table-cell>
          <table:table-cell table:style-name="ce53" table:formula="of:=SUM([.D648:.H648])" office:value-type="float" office:value="14075" calcext:value-type="float">
            <text:p>14075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8]=126;70;IF([.T648]=112;70;IF([.T648]=98;70;IF([.T648]=96;60;IF([.T648]=84;60;IF([.T648]=108;60;IF([.T648]=90;50;IF([.T648]=72;40;IF([.T648]=80;40;IF([.T648]=100;50;IF([.T648]=54;30;IF([.T648]=36;20;IF([.T648]=18;10;IF([.T64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1001181051/defenderoftexel/images/thumb/f/f7/Sethre_Icon.png/50px-Sethr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ethre&quot;; &quot;Sethre&quot;)" office:value-type="string" office:string-value="Sethre" calcext:value-type="string">
            <text:p>Sethre</text:p>
          </table:table-cell>
          <table:table-cell table:style-name="ce25"/>
          <table:table-cell table:style-name="ce28" office:value-type="float" office:value="2802" calcext:value-type="float">
            <text:p>2802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 office:value-type="float" office:value="1455" calcext:value-type="float">
            <text:p>1455</text:p>
          </table:table-cell>
          <table:table-cell table:style-name="ce41" office:value-type="float" office:value="877" calcext:value-type="float">
            <text:p>877</text:p>
          </table:table-cell>
          <table:table-cell table:style-name="ce45" office:value-type="float" office:value="4420" calcext:value-type="float">
            <text:p>4420</text:p>
          </table:table-cell>
          <table:table-cell table:style-name="ce53" table:formula="of:=SUM([.D649:.H649])" office:value-type="float" office:value="13815" calcext:value-type="float">
            <text:p>13815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49]=126;70;IF([.T649]=112;70;IF([.T649]=98;70;IF([.T649]=96;60;IF([.T649]=84;60;IF([.T649]=108;60;IF([.T649]=90;50;IF([.T649]=72;40;IF([.T649]=80;40;IF([.T649]=100;50;IF([.T649]=54;30;IF([.T649]=36;20;IF([.T649]=18;10;IF([.T64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a/Shagaraktiyas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garaktiyash&quot;;&quot;Shagaraktiyash&quot;)" office:value-type="string" office:string-value="Shagaraktiyash" calcext:value-type="string">
            <text:p>Shagaraktiyash</text:p>
          </table:table-cell>
          <table:table-cell table:style-name="ce25"/>
          <table:table-cell table:style-name="ce28" office:value-type="float" office:value="5078" calcext:value-type="float">
            <text:p>5078</text:p>
          </table:table-cell>
          <table:table-cell table:style-name="ce33" office:value-type="float" office:value="435" calcext:value-type="float">
            <text:p>435</text:p>
          </table:table-cell>
          <table:table-cell table:style-name="ce37" office:value-type="float" office:value="2203" calcext:value-type="float">
            <text:p>2203</text:p>
          </table:table-cell>
          <table:table-cell table:style-name="ce41" office:value-type="float" office:value="4292" calcext:value-type="float">
            <text:p>4292</text:p>
          </table:table-cell>
          <table:table-cell table:style-name="ce45" office:value-type="float" office:value="1646" calcext:value-type="float">
            <text:p>1646</text:p>
          </table:table-cell>
          <table:table-cell table:style-name="ce53" table:formula="of:=SUM([.D650:.H650])" office:value-type="float" office:value="13654" calcext:value-type="float">
            <text:p>13654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0]=126;70;IF([.T650]=112;70;IF([.T650]=98;70;IF([.T650]=96;60;IF([.T650]=84;60;IF([.T650]=108;60;IF([.T650]=90;50;IF([.T650]=72;40;IF([.T650]=80;40;IF([.T650]=100;50;IF([.T650]=54;30;IF([.T650]=36;20;IF([.T650]=18;10;IF([.T65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603161343/defenderoftexel/images/thumb/3/3e/Shahrivar_Icon.png/50px-Shahriv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hrivar&quot;; &quot;Shahrivar&quot;)" office:value-type="string" office:string-value="Shahrivar" calcext:value-type="string">
            <text:p>Shahrivar</text:p>
          </table:table-cell>
          <table:table-cell table:style-name="ce25"/>
          <table:table-cell table:style-name="ce28" office:value-type="float" office:value="6657" calcext:value-type="float">
            <text:p>6657</text:p>
          </table:table-cell>
          <table:table-cell table:style-name="ce33" office:value-type="float" office:value="10896" calcext:value-type="float">
            <text:p>10896</text:p>
          </table:table-cell>
          <table:table-cell table:style-name="ce37" office:value-type="float" office:value="5543" calcext:value-type="float">
            <text:p>5543</text:p>
          </table:table-cell>
          <table:table-cell table:style-name="ce41" office:value-type="float" office:value="8695" calcext:value-type="float">
            <text:p>8695</text:p>
          </table:table-cell>
          <table:table-cell table:style-name="ce45" office:value-type="float" office:value="1083" calcext:value-type="float">
            <text:p>1083</text:p>
          </table:table-cell>
          <table:table-cell table:style-name="ce53" table:formula="of:=SUM([.D651:.H651])" office:value-type="float" office:value="32874" calcext:value-type="float">
            <text:p>32874</text:p>
          </table:table-cell>
          <table:table-cell table:style-name="ce60" office:value-type="string" calcext:value-type="string">
            <text:p>Wrot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651]=126;70;IF([.T651]=112;70;IF([.T651]=98;70;IF([.T651]=96;60;IF([.T651]=84;60;IF([.T651]=108;60;IF([.T651]=90;50;IF([.T651]=72;40;IF([.T651]=80;40;IF([.T651]=100;50;IF([.T651]=54;30;IF([.T651]=36;20;IF([.T651]=18;10;IF([.T65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211132425/defenderoftexel/images/thumb/6/61/Shajahn_Icon.png/50px-Shajah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jahn&quot;;&quot;Shajahn&quot;)" office:value-type="string" office:string-value="Shajahn" calcext:value-type="string">
            <text:p>Shajahn</text:p>
          </table:table-cell>
          <table:table-cell table:style-name="ce25"/>
          <table:table-cell table:style-name="ce28" office:value-type="float" office:value="3834" calcext:value-type="float">
            <text:p>3834</text:p>
          </table:table-cell>
          <table:table-cell table:style-name="ce33" office:value-type="float" office:value="5376" calcext:value-type="float">
            <text:p>5376</text:p>
          </table:table-cell>
          <table:table-cell table:style-name="ce37" office:value-type="float" office:value="1172" calcext:value-type="float">
            <text:p>1172</text:p>
          </table:table-cell>
          <table:table-cell table:style-name="ce41" office:value-type="float" office:value="3438" calcext:value-type="float">
            <text:p>3438</text:p>
          </table:table-cell>
          <table:table-cell table:style-name="ce45" office:value-type="float" office:value="1556" calcext:value-type="float">
            <text:p>1556</text:p>
          </table:table-cell>
          <table:table-cell table:style-name="ce53" table:formula="of:=SUM([.D652:.H652])" office:value-type="float" office:value="15376" calcext:value-type="float">
            <text:p>15376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2]=126;70;IF([.T652]=112;70;IF([.T652]=98;70;IF([.T652]=96;60;IF([.T652]=84;60;IF([.T652]=108;60;IF([.T652]=90;50;IF([.T652]=72;40;IF([.T652]=80;40;IF([.T652]=100;50;IF([.T652]=54;30;IF([.T652]=36;20;IF([.T652]=18;10;IF([.T65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3/35/Shama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mas&quot;; &quot;Shamas&quot;)" office:value-type="string" office:string-value="Shamas" calcext:value-type="string">
            <text:p>Shamas</text:p>
          </table:table-cell>
          <table:table-cell table:style-name="ce25"/>
          <table:table-cell table:style-name="ce28" office:value-type="float" office:value="2003" calcext:value-type="float">
            <text:p>2003</text:p>
          </table:table-cell>
          <table:table-cell table:style-name="ce33" office:value-type="float" office:value="1526" calcext:value-type="float">
            <text:p>1526</text:p>
          </table:table-cell>
          <table:table-cell table:style-name="ce37" office:value-type="float" office:value="1040" calcext:value-type="float">
            <text:p>1040</text:p>
          </table:table-cell>
          <table:table-cell table:style-name="ce41" office:value-type="float" office:value="1479" calcext:value-type="float">
            <text:p>1479</text:p>
          </table:table-cell>
          <table:table-cell table:style-name="ce45" office:value-type="float" office:value="3734" calcext:value-type="float">
            <text:p>3734</text:p>
          </table:table-cell>
          <table:table-cell table:style-name="ce53" table:formula="of:=SUM([.D653:.H653])" office:value-type="float" office:value="9782" calcext:value-type="float">
            <text:p>9782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3]=126;70;IF([.T653]=112;70;IF([.T653]=98;70;IF([.T653]=96;60;IF([.T653]=84;60;IF([.T653]=108;60;IF([.T653]=90;50;IF([.T653]=72;40;IF([.T653]=80;40;IF([.T653]=100;50;IF([.T653]=54;30;IF([.T653]=36;20;IF([.T653]=18;10;IF([.T65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610144112/defenderoftexel/images/thumb/e/e1/Shaqja_Icon.png/50px-Shaqj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qja&quot;; &quot;Shaqja&quot;)" office:value-type="string" office:string-value="Shaqja" calcext:value-type="string">
            <text:p>Shaqja</text:p>
          </table:table-cell>
          <table:table-cell table:style-name="ce25"/>
          <table:table-cell table:style-name="ce28" office:value-type="float" office:value="4230" calcext:value-type="float">
            <text:p>4230</text:p>
          </table:table-cell>
          <table:table-cell table:style-name="ce33" office:value-type="float" office:value="4835" calcext:value-type="float">
            <text:p>4835</text:p>
          </table:table-cell>
          <table:table-cell table:style-name="ce37" office:value-type="float" office:value="2590" calcext:value-type="float">
            <text:p>2590</text:p>
          </table:table-cell>
          <table:table-cell table:style-name="ce41" office:value-type="float" office:value="608" calcext:value-type="float">
            <text:p>608</text:p>
          </table:table-cell>
          <table:table-cell table:style-name="ce45" office:value-type="float" office:value="811" calcext:value-type="float">
            <text:p>811</text:p>
          </table:table-cell>
          <table:table-cell table:style-name="ce53" table:formula="of:=SUM([.D654:.H654])" office:value-type="float" office:value="13074" calcext:value-type="float">
            <text:p>13074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4]=126;70;IF([.T654]=112;70;IF([.T654]=98;70;IF([.T654]=96;60;IF([.T654]=84;60;IF([.T654]=108;60;IF([.T654]=90;50;IF([.T654]=72;40;IF([.T654]=80;40;IF([.T654]=100;50;IF([.T654]=54;30;IF([.T654]=36;20;IF([.T654]=18;10;IF([.T65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318125640/defenderoftexel/images/thumb/5/59/Sharyukin_Icon.png/50px-Sharyuk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aryukin&quot;; &quot;Sharyukin&quot;)" office:value-type="string" office:string-value="Sharyukin" calcext:value-type="string">
            <text:p>Sharyukin</text:p>
          </table:table-cell>
          <table:table-cell table:style-name="ce25"/>
          <table:table-cell table:style-name="ce28" office:value-type="float" office:value="4766" calcext:value-type="float">
            <text:p>4766</text:p>
          </table:table-cell>
          <table:table-cell table:style-name="ce33" office:value-type="float" office:value="5450" calcext:value-type="float">
            <text:p>5450</text:p>
          </table:table-cell>
          <table:table-cell table:style-name="ce37" office:value-type="float" office:value="2922" calcext:value-type="float">
            <text:p>2922</text:p>
          </table:table-cell>
          <table:table-cell table:style-name="ce41" office:value-type="float" office:value="686" calcext:value-type="float">
            <text:p>686</text:p>
          </table:table-cell>
          <table:table-cell table:style-name="ce45" office:value-type="float" office:value="916" calcext:value-type="float">
            <text:p>916</text:p>
          </table:table-cell>
          <table:table-cell table:style-name="ce53" table:formula="of:=SUM([.D655:.H655])" office:value-type="float" office:value="14740" calcext:value-type="float">
            <text:p>14740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5]=126;70;IF([.T655]=112;70;IF([.T655]=98;70;IF([.T655]=96;60;IF([.T655]=84;60;IF([.T655]=108;60;IF([.T655]=90;50;IF([.T655]=72;40;IF([.T655]=80;40;IF([.T655]=100;50;IF([.T655]=54;30;IF([.T655]=36;20;IF([.T655]=18;10;IF([.T65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218102037/defenderoftexel/images/thumb/8/8b/Shereen_Icon.png/50px-Sheree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ereen&quot;; &quot;Shereen&quot;)" office:value-type="string" office:string-value="Shereen" calcext:value-type="string">
            <text:p>Shereen</text:p>
          </table:table-cell>
          <table:table-cell table:style-name="ce25"/>
          <table:table-cell table:style-name="ce28" office:value-type="float" office:value="2906" calcext:value-type="float">
            <text:p>2906</text:p>
          </table:table-cell>
          <table:table-cell table:style-name="ce33" office:value-type="float" office:value="2216" calcext:value-type="float">
            <text:p>2216</text:p>
          </table:table-cell>
          <table:table-cell table:style-name="ce37" office:value-type="float" office:value="1509" calcext:value-type="float">
            <text:p>1509</text:p>
          </table:table-cell>
          <table:table-cell table:style-name="ce41" office:value-type="float" office:value="2149" calcext:value-type="float">
            <text:p>2149</text:p>
          </table:table-cell>
          <table:table-cell table:style-name="ce45" office:value-type="float" office:value="5423" calcext:value-type="float">
            <text:p>5423</text:p>
          </table:table-cell>
          <table:table-cell table:style-name="ce53" table:formula="of:=SUM([.D656:.H656])" office:value-type="float" office:value="14203" calcext:value-type="float">
            <text:p>14203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6]=126;70;IF([.T656]=112;70;IF([.T656]=98;70;IF([.T656]=96;60;IF([.T656]=84;60;IF([.T656]=108;60;IF([.T656]=90;50;IF([.T656]=72;40;IF([.T656]=80;40;IF([.T656]=100;50;IF([.T656]=54;30;IF([.T656]=36;20;IF([.T656]=18;10;IF([.T65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924192807/defenderoftexel/images/thumb/1/12/Shilanuy_Icon.png/50px-Shilanuy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hilanuy&quot;; &quot;Shilanuy&quot;)" office:value-type="string" office:string-value="Shilanuy" calcext:value-type="string">
            <text:p>Shilanuy</text:p>
          </table:table-cell>
          <table:table-cell table:style-name="ce25"/>
          <table:table-cell table:style-name="ce28" office:value-type="float" office:value="5153" calcext:value-type="float">
            <text:p>5153</text:p>
          </table:table-cell>
          <table:table-cell table:style-name="ce33" office:value-type="float" office:value="3676" calcext:value-type="float">
            <text:p>3676</text:p>
          </table:table-cell>
          <table:table-cell table:style-name="ce37" office:value-type="float" office:value="4276" calcext:value-type="float">
            <text:p>4276</text:p>
          </table:table-cell>
          <table:table-cell table:style-name="ce41" office:value-type="float" office:value="440" calcext:value-type="float">
            <text:p>440</text:p>
          </table:table-cell>
          <table:table-cell table:style-name="ce45" office:value-type="float" office:value="549" calcext:value-type="float">
            <text:p>549</text:p>
          </table:table-cell>
          <table:table-cell table:style-name="ce53" table:formula="of:=SUM([.D657:.H657])" office:value-type="float" office:value="14094" calcext:value-type="float">
            <text:p>14094</text:p>
          </table:table-cell>
          <table:table-cell table:style-name="ce60" office:value-type="string" calcext:value-type="string">
            <text:p>Stamped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7]=126;70;IF([.T657]=112;70;IF([.T657]=98;70;IF([.T657]=96;60;IF([.T657]=84;60;IF([.T657]=108;60;IF([.T657]=90;50;IF([.T657]=72;40;IF([.T657]=80;40;IF([.T657]=100;50;IF([.T657]=54;30;IF([.T657]=36;20;IF([.T657]=18;10;IF([.T65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415143224/defenderoftexel/images/thumb/8/89/Silik-Mu-Lu-Dug_Icon.png/50px-Silik-Mu-Lu-Dug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lik-Mu-Lu-Dug&quot;; &quot;Silik-Mu-Lu-Dug&quot;)" office:value-type="string" office:string-value="Silik-Mu-Lu-Dug" calcext:value-type="string">
            <text:p>Silik-Mu-Lu-Dug</text:p>
          </table:table-cell>
          <table:table-cell table:style-name="ce25"/>
          <table:table-cell table:style-name="ce28" office:value-type="float" office:value="3131" calcext:value-type="float">
            <text:p>3131</text:p>
          </table:table-cell>
          <table:table-cell table:style-name="ce33" office:value-type="float" office:value="4760" calcext:value-type="float">
            <text:p>4760</text:p>
          </table:table-cell>
          <table:table-cell table:style-name="ce37" office:value-type="float" office:value="1625" calcext:value-type="float">
            <text:p>1625</text:p>
          </table:table-cell>
          <table:table-cell table:style-name="ce41" office:value-type="float" office:value="979" calcext:value-type="float">
            <text:p>979</text:p>
          </table:table-cell>
          <table:table-cell table:style-name="ce45" office:value-type="float" office:value="4933" calcext:value-type="float">
            <text:p>4933</text:p>
          </table:table-cell>
          <table:table-cell table:style-name="ce53" table:formula="of:=SUM([.D658:.H658])" office:value-type="float" office:value="15428" calcext:value-type="float">
            <text:p>15428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8]=126;70;IF([.T658]=112;70;IF([.T658]=98;70;IF([.T658]=96;60;IF([.T658]=84;60;IF([.T658]=108;60;IF([.T658]=90;50;IF([.T658]=72;40;IF([.T658]=80;40;IF([.T658]=100;50;IF([.T658]=54;30;IF([.T658]=36;20;IF([.T658]=18;10;IF([.T65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4/42/Silverclaw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lverclaw&quot;; &quot;Silverclaw&quot;)" office:value-type="string" office:string-value="Silverclaw" calcext:value-type="string">
            <text:p>Silverclaw</text:p>
          </table:table-cell>
          <table:table-cell table:style-name="ce25"/>
          <table:table-cell table:style-name="ce28" office:value-type="float" office:value="2824" calcext:value-type="float">
            <text:p>2824</text:p>
          </table:table-cell>
          <table:table-cell table:style-name="ce33" office:value-type="float" office:value="3227" calcext:value-type="float">
            <text:p>3227</text:p>
          </table:table-cell>
          <table:table-cell table:style-name="ce37" office:value-type="float" office:value="1730" calcext:value-type="float">
            <text:p>1730</text:p>
          </table:table-cell>
          <table:table-cell table:style-name="ce41" office:value-type="float" office:value="408" calcext:value-type="float">
            <text:p>408</text:p>
          </table:table-cell>
          <table:table-cell table:style-name="ce45" office:value-type="float" office:value="540" calcext:value-type="float">
            <text:p>540</text:p>
          </table:table-cell>
          <table:table-cell table:style-name="ce53" table:formula="of:=SUM([.D659:.H659])" office:value-type="float" office:value="8729" calcext:value-type="float">
            <text:p>8729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59]=126;70;IF([.T659]=112;70;IF([.T659]=98;70;IF([.T659]=96;60;IF([.T659]=84;60;IF([.T659]=108;60;IF([.T659]=90;50;IF([.T659]=72;40;IF([.T659]=80;40;IF([.T659]=100;50;IF([.T659]=54;30;IF([.T659]=36;20;IF([.T659]=18;10;IF([.T65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318130749/defenderoftexel/images/thumb/f/f2/Simanu_Scoresettler_Icon.png/50px-Simanu_Scoresettl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manu_Scoresettler&quot;; &quot;Simanu Scoresettler&quot;)" office:value-type="string" office:string-value="Simanu Scoresettler" calcext:value-type="string">
            <text:p>Simanu Scoresettler</text:p>
          </table:table-cell>
          <table:table-cell table:style-name="ce25"/>
          <table:table-cell table:style-name="ce28" office:value-type="float" office:value="4258" calcext:value-type="float">
            <text:p>4258</text:p>
          </table:table-cell>
          <table:table-cell table:style-name="ce33" office:value-type="float" office:value="5368" calcext:value-type="float">
            <text:p>5368</text:p>
          </table:table-cell>
          <table:table-cell table:style-name="ce37" office:value-type="float" office:value="1409" calcext:value-type="float">
            <text:p>1409</text:p>
          </table:table-cell>
          <table:table-cell table:style-name="ce41" office:value-type="float" office:value="4897" calcext:value-type="float">
            <text:p>4897</text:p>
          </table:table-cell>
          <table:table-cell table:style-name="ce45" office:value-type="float" office:value="939" calcext:value-type="float">
            <text:p>939</text:p>
          </table:table-cell>
          <table:table-cell table:style-name="ce53" table:formula="of:=SUM([.D660:.H660])" office:value-type="float" office:value="16871" calcext:value-type="float">
            <text:p>16871</text:p>
          </table:table-cell>
          <table:table-cell table:style-name="ce60" office:value-type="string" calcext:value-type="string">
            <text:p>Malestrom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0]=126;70;IF([.T660]=112;70;IF([.T660]=98;70;IF([.T660]=96;60;IF([.T660]=84;60;IF([.T660]=108;60;IF([.T660]=90;50;IF([.T660]=72;40;IF([.T660]=80;40;IF([.T660]=100;50;IF([.T660]=54;30;IF([.T660]=36;20;IF([.T660]=18;10;IF([.T66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022142512/defenderoftexel/images/thumb/6/64/Sinecra_Icon.png/50px-Sinec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necra&quot;;&quot;Sinecra&quot;)" office:value-type="string" office:string-value="Sinecra" calcext:value-type="string">
            <text:p>Sinecra</text:p>
          </table:table-cell>
          <table:table-cell table:style-name="ce25"/>
          <table:table-cell table:style-name="ce28" office:value-type="float" office:value="2762" calcext:value-type="float">
            <text:p>2762</text:p>
          </table:table-cell>
          <table:table-cell table:style-name="ce33" office:value-type="float" office:value="1619" calcext:value-type="float">
            <text:p>1619</text:p>
          </table:table-cell>
          <table:table-cell table:style-name="ce37" office:value-type="float" office:value="1896" calcext:value-type="float">
            <text:p>1896</text:p>
          </table:table-cell>
          <table:table-cell table:style-name="ce41" office:value-type="float" office:value="7460" calcext:value-type="float">
            <text:p>7460</text:p>
          </table:table-cell>
          <table:table-cell table:style-name="ce45" office:value-type="float" office:value="9386" calcext:value-type="float">
            <text:p>9386</text:p>
          </table:table-cell>
          <table:table-cell table:style-name="ce53" table:formula="of:=SUM([.D661:.H661])" office:value-type="float" office:value="23123" calcext:value-type="float">
            <text:p>23123</text:p>
          </table:table-cell>
          <table:table-cell table:style-name="ce60" office:value-type="string" calcext:value-type="string">
            <text:p>Matchmaker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661]=126;70;IF([.T661]=112;70;IF([.T661]=98;70;IF([.T661]=96;60;IF([.T661]=84;60;IF([.T661]=108;60;IF([.T661]=90;50;IF([.T661]=72;40;IF([.T661]=80;40;IF([.T661]=100;50;IF([.T661]=54;30;IF([.T661]=36;20;IF([.T661]=18;10;IF([.T66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f/f3/Sira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rara&quot;;&quot;Sirara&quot;)" office:value-type="string" office:string-value="Sirara" calcext:value-type="string">
            <text:p>Sirara</text:p>
          </table:table-cell>
          <table:table-cell table:style-name="ce25"/>
          <table:table-cell table:style-name="ce28" office:value-type="float" office:value="5150" calcext:value-type="float">
            <text:p>5150</text:p>
          </table:table-cell>
          <table:table-cell table:style-name="ce33" office:value-type="float" office:value="4352" calcext:value-type="float">
            <text:p>4352</text:p>
          </table:table-cell>
          <table:table-cell table:style-name="ce37" office:value-type="float" office:value="2233" calcext:value-type="float">
            <text:p>2233</text:p>
          </table:table-cell>
          <table:table-cell table:style-name="ce41" office:value-type="float" office:value="440" calcext:value-type="float">
            <text:p>440</text:p>
          </table:table-cell>
          <table:table-cell table:style-name="ce45" office:value-type="float" office:value="1670" calcext:value-type="float">
            <text:p>1670</text:p>
          </table:table-cell>
          <table:table-cell table:style-name="ce53" table:formula="of:=SUM([.D662:.H662])" office:value-type="float" office:value="13845" calcext:value-type="float">
            <text:p>13845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2]=126;70;IF([.T662]=112;70;IF([.T662]=98;70;IF([.T662]=96;60;IF([.T662]=84;60;IF([.T662]=108;60;IF([.T662]=90;50;IF([.T662]=72;40;IF([.T662]=80;40;IF([.T662]=100;50;IF([.T662]=54;30;IF([.T662]=36;20;IF([.T662]=18;10;IF([.T66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513140901/defenderoftexel/images/thumb/b/bc/Sisuthrus_Icon.png/50px-Sisuthr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isuthrus&quot;; &quot;Sisuthrus&quot;)" office:value-type="string" office:string-value="Sisuthrus" calcext:value-type="string">
            <text:p>Sisuthrus</text:p>
          </table:table-cell>
          <table:table-cell table:style-name="ce25"/>
          <table:table-cell table:style-name="ce28" office:value-type="float" office:value="4217" calcext:value-type="float">
            <text:p>4217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 office:value-type="float" office:value="2584" calcext:value-type="float">
            <text:p>2584</text:p>
          </table:table-cell>
          <table:table-cell table:style-name="ce41" office:value-type="float" office:value="608" calcext:value-type="float">
            <text:p>608</text:p>
          </table:table-cell>
          <table:table-cell table:style-name="ce45" office:value-type="float" office:value="807" calcext:value-type="float">
            <text:p>807</text:p>
          </table:table-cell>
          <table:table-cell table:style-name="ce53" table:formula="of:=SUM([.D663:.H663])" office:value-type="float" office:value="13038" calcext:value-type="float">
            <text:p>13038</text:p>
          </table:table-cell>
          <table:table-cell table:style-name="ce60" office:value-type="string" calcext:value-type="string">
            <text:p>Sizzl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3]=126;70;IF([.T663]=112;70;IF([.T663]=98;70;IF([.T663]=96;60;IF([.T663]=84;60;IF([.T663]=108;60;IF([.T663]=90;50;IF([.T663]=72;40;IF([.T663]=80;40;IF([.T663]=100;50;IF([.T663]=54;30;IF([.T663]=36;20;IF([.T663]=18;10;IF([.T66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b/b1/Sit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Olge&quot;; &quot;Sita&quot;)" office:value-type="string" office:string-value="Sita" calcext:value-type="string">
            <text:p>Sita</text:p>
          </table:table-cell>
          <table:table-cell table:style-name="ce25"/>
          <table:table-cell table:style-name="ce28" office:value-type="float" office:value="1196" calcext:value-type="float">
            <text:p>1196</text:p>
          </table:table-cell>
          <table:table-cell table:style-name="ce33" office:value-type="float" office:value="838" calcext:value-type="float">
            <text:p>838</text:p>
          </table:table-cell>
          <table:table-cell table:style-name="ce37" office:value-type="float" office:value="541" calcext:value-type="float">
            <text:p>541</text:p>
          </table:table-cell>
          <table:table-cell table:style-name="ce41" office:value-type="float" office:value="3443" calcext:value-type="float">
            <text:p>3443</text:p>
          </table:table-cell>
          <table:table-cell table:style-name="ce45" office:value-type="float" office:value="3280" calcext:value-type="float">
            <text:p>3280</text:p>
          </table:table-cell>
          <table:table-cell table:style-name="ce53" table:formula="of:=SUM([.D664:.H664])" office:value-type="float" office:value="9298" calcext:value-type="float">
            <text:p>9298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4]=126;70;IF([.T664]=112;70;IF([.T664]=98;70;IF([.T664]=96;60;IF([.T664]=84;60;IF([.T664]=108;60;IF([.T664]=90;50;IF([.T664]=72;40;IF([.T664]=80;40;IF([.T664]=100;50;IF([.T664]=54;30;IF([.T664]=36;20;IF([.T664]=18;10;IF([.T66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128153737/defenderoftexel/images/thumb/f/f5/Sruk_Icon.png/50px-Sru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ruk&quot;; &quot;Sruk&quot;)" office:value-type="string" office:string-value="Sruk" calcext:value-type="string">
            <text:p>Sruk</text:p>
          </table:table-cell>
          <table:table-cell table:style-name="ce25"/>
          <table:table-cell table:style-name="ce28" office:value-type="float" office:value="2691" calcext:value-type="float">
            <text:p>2691</text:p>
          </table:table-cell>
          <table:table-cell table:style-name="ce33" office:value-type="float" office:value="3967" calcext:value-type="float">
            <text:p>3967</text:p>
          </table:table-cell>
          <table:table-cell table:style-name="ce37" office:value-type="float" office:value="4501" calcext:value-type="float">
            <text:p>4501</text:p>
          </table:table-cell>
          <table:table-cell table:style-name="ce41" office:value-type="float" office:value="1612" calcext:value-type="float">
            <text:p>1612</text:p>
          </table:table-cell>
          <table:table-cell table:style-name="ce45" office:value-type="float" office:value="811" calcext:value-type="float">
            <text:p>811</text:p>
          </table:table-cell>
          <table:table-cell table:style-name="ce53" table:formula="of:=SUM([.D665:.H665])" office:value-type="float" office:value="13582" calcext:value-type="float">
            <text:p>13582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5]=126;70;IF([.T665]=112;70;IF([.T665]=98;70;IF([.T665]=96;60;IF([.T665]=84;60;IF([.T665]=108;60;IF([.T665]=90;50;IF([.T665]=72;40;IF([.T665]=80;40;IF([.T665]=100;50;IF([.T665]=54;30;IF([.T665]=36;20;IF([.T665]=18;10;IF([.T66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9214633/defenderoftexel/images/f/f2/Starfish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tarfisher&quot;; &quot;Starfisher&quot;)" office:value-type="string" office:string-value="Starfisher" calcext:value-type="string">
            <text:p>Starfisher</text:p>
          </table:table-cell>
          <table:table-cell table:style-name="ce25"/>
          <table:table-cell table:style-name="ce28" office:value-type="float" office:value="1123" calcext:value-type="float">
            <text:p>1123</text:p>
          </table:table-cell>
          <table:table-cell table:style-name="ce33" office:value-type="float" office:value="2615" calcext:value-type="float">
            <text:p>2615</text:p>
          </table:table-cell>
          <table:table-cell table:style-name="ce37" office:value-type="float" office:value="571" calcext:value-type="float">
            <text:p>571</text:p>
          </table:table-cell>
          <table:table-cell table:style-name="ce41" office:value-type="float" office:value="2481" calcext:value-type="float">
            <text:p>2481</text:p>
          </table:table-cell>
          <table:table-cell table:style-name="ce45" office:value-type="float" office:value="756" calcext:value-type="float">
            <text:p>756</text:p>
          </table:table-cell>
          <table:table-cell table:style-name="ce53" table:formula="of:=SUM([.D666:.H666])" office:value-type="float" office:value="7546" calcext:value-type="float">
            <text:p>7546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6]=126;70;IF([.T666]=112;70;IF([.T666]=98;70;IF([.T666]=96;60;IF([.T666]=84;60;IF([.T666]=108;60;IF([.T666]=90;50;IF([.T666]=72;40;IF([.T666]=80;40;IF([.T666]=100;50;IF([.T666]=54;30;IF([.T666]=36;20;IF([.T666]=18;10;IF([.T66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3.wikia.nocookie.net/__cb20140128160728/defenderoftexel/images/thumb/c/c5/Sulagrand_Icon.png/50px-Sulagran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ulagrand&quot;; &quot;Sulagrand&quot;)" office:value-type="string" office:string-value="Sulagrand" calcext:value-type="string">
            <text:p>Sulagrand</text:p>
          </table:table-cell>
          <table:table-cell table:style-name="ce25"/>
          <table:table-cell table:style-name="ce28" office:value-type="float" office:value="3225" calcext:value-type="float">
            <text:p>3225</text:p>
          </table:table-cell>
          <table:table-cell table:style-name="ce33" office:value-type="float" office:value="420" calcext:value-type="float">
            <text:p>420</text:p>
          </table:table-cell>
          <table:table-cell table:style-name="ce37" office:value-type="float" office:value="1146" calcext:value-type="float">
            <text:p>1146</text:p>
          </table:table-cell>
          <table:table-cell table:style-name="ce41" office:value-type="float" office:value="6558" calcext:value-type="float">
            <text:p>6558</text:p>
          </table:table-cell>
          <table:table-cell table:style-name="ce45" office:value-type="float" office:value="2187" calcext:value-type="float">
            <text:p>2187</text:p>
          </table:table-cell>
          <table:table-cell table:style-name="ce53" table:formula="of:=SUM([.D667:.H667])" office:value-type="float" office:value="13536" calcext:value-type="float">
            <text:p>13536</text:p>
          </table:table-cell>
          <table:table-cell table:style-name="ce60" office:value-type="string" calcext:value-type="string">
            <text:p>Thwa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7]=126;70;IF([.T667]=112;70;IF([.T667]=98;70;IF([.T667]=96;60;IF([.T667]=84;60;IF([.T667]=108;60;IF([.T667]=90;50;IF([.T667]=72;40;IF([.T667]=80;40;IF([.T667]=100;50;IF([.T667]=54;30;IF([.T667]=36;20;IF([.T667]=18;10;IF([.T66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41328/defenderoftexel/images/thumb/0/08/Sybillume_Icon.png/50px-Sybillum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ybillume&quot;; &quot;Sybillume&quot;)" office:value-type="string" office:string-value="Sybillume" calcext:value-type="string">
            <text:p>Sybillume</text:p>
          </table:table-cell>
          <table:table-cell table:style-name="ce25"/>
          <table:table-cell table:style-name="ce28" office:value-type="float" office:value="1425" calcext:value-type="float">
            <text:p>1425</text:p>
          </table:table-cell>
          <table:table-cell table:style-name="ce33" office:value-type="float" office:value="1524" calcext:value-type="float">
            <text:p>1524</text:p>
          </table:table-cell>
          <table:table-cell table:style-name="ce37" office:value-type="float" office:value="721" calcext:value-type="float">
            <text:p>721</text:p>
          </table:table-cell>
          <table:table-cell table:style-name="ce41" office:value-type="float" office:value="1226" calcext:value-type="float">
            <text:p>1226</text:p>
          </table:table-cell>
          <table:table-cell table:style-name="ce45" office:value-type="float" office:value="1130" calcext:value-type="float">
            <text:p>1130</text:p>
          </table:table-cell>
          <table:table-cell table:style-name="ce53" table:formula="of:=SUM([.D668:.H668])" office:value-type="float" office:value="6026" calcext:value-type="float">
            <text:p>6026</text:p>
          </table:table-cell>
          <table:table-cell table:style-name="ce60" office:value-type="string" calcext:value-type="string">
            <text:p>Inspiri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68]=126;70;IF([.T668]=112;70;IF([.T668]=98;70;IF([.T668]=96;60;IF([.T668]=84;60;IF([.T668]=108;60;IF([.T668]=90;50;IF([.T668]=72;40;IF([.T668]=80;40;IF([.T668]=100;50;IF([.T668]=54;30;IF([.T668]=36;20;IF([.T668]=18;10;IF([.T66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7/70/Syzette_Icon.png/revision/latest?cb=20150502071859&quot;)" office:value-type="string" office:string-value="" calcext:value-type="error">
            <text:p>#NAME?</text:p>
          </table:table-cell>
          <table:table-cell table:style-name="ce11" table:formula="of:=HYPERLINK(&quot;http://defenderoftexel.wikia.com/wiki/Syzette_-_Lauthra_-_Coenobetha&quot;;&quot;Syzette&quot;)" office:value-type="string" office:string-value="Syzette" calcext:value-type="string">
            <text:p>Syzett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669:.H669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Water</text:p>
          </table:table-cell>
          <table:table-cell table:style-name="ce67" office:value-type="string" calcext:value-type="string">
            <text:p>hem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69]=126;70;IF([.T669]=112;70;IF([.T669]=98;70;IF([.T669]=96;60;IF([.T669]=84;60;IF([.T669]=108;60;IF([.T669]=90;50;IF([.T669]=72;40;IF([.T669]=80;40;IF([.T669]=100;50;IF([.T669]=54;30;IF([.T669]=36;20;IF([.T669]=18;10;IF([.T669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9/9a/Tak-Tak_Icon.png/revision/latest?cb=20141028110520&quot;)" office:value-type="string" office:string-value="" calcext:value-type="error">
            <text:p>#NAME?</text:p>
          </table:table-cell>
          <table:table-cell table:style-name="ce11" table:formula="of:=HYPERLINK(&quot;http://defenderoftexel.wikia.com/wiki/Munu_-_Izisoob_-_Tak-Tak&quot;;&quot;Tak-Tak&quot;)" office:value-type="string" office:string-value="Tak-Tak" calcext:value-type="string">
            <text:p>Tak-Tak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2367" calcext:value-type="float">
            <text:p>2367</text:p>
          </table:table-cell>
          <table:table-cell table:style-name="ce32" office:value-type="float" office:value="5504" calcext:value-type="float">
            <text:p>5504</text:p>
          </table:table-cell>
          <table:table-cell table:style-name="ce36" office:value-type="float" office:value="1201" calcext:value-type="float">
            <text:p>1201</text:p>
          </table:table-cell>
          <table:table-cell table:style-name="ce40" office:value-type="float" office:value="5223" calcext:value-type="float">
            <text:p>5223</text:p>
          </table:table-cell>
          <table:table-cell table:style-name="ce44" office:value-type="float" office:value="1591" calcext:value-type="float">
            <text:p>1591</text:p>
          </table:table-cell>
          <table:table-cell table:style-name="ce52" table:formula="of:=SUM([.D670:.H670])" office:value-type="float" office:value="15886" calcext:value-type="float">
            <text:p>15886</text:p>
          </table:table-cell>
          <table:table-cell table:style-name="ce59" office:value-type="string" calcext:value-type="string">
            <text:p>Hotrock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70]=126;70;IF([.T670]=112;70;IF([.T670]=98;70;IF([.T670]=96;60;IF([.T670]=84;60;IF([.T670]=108;60;IF([.T670]=90;50;IF([.T670]=72;40;IF([.T670]=80;40;IF([.T670]=100;50;IF([.T670]=54;30;IF([.T670]=36;20;IF([.T670]=18;10;IF([.T670]=60;30))))))))))))))" office:value-type="float" office:value="40" calcext:value-type="float">
            <text:p>4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701124519/defenderoftexel/images/thumb/7/7e/Tamric_Icon.png/50px-Tamric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amric&quot;; &quot;Tamric&quot;)" office:value-type="string" office:string-value="Tamric" calcext:value-type="string">
            <text:p>Tamric</text:p>
          </table:table-cell>
          <table:table-cell table:style-name="ce25"/>
          <table:table-cell table:style-name="ce28" office:value-type="float" office:value="6746" calcext:value-type="float">
            <text:p>6746</text:p>
          </table:table-cell>
          <table:table-cell table:style-name="ce33" office:value-type="float" office:value="5148" calcext:value-type="float">
            <text:p>5148</text:p>
          </table:table-cell>
          <table:table-cell table:style-name="ce37" office:value-type="float" office:value="3516" calcext:value-type="float">
            <text:p>3516</text:p>
          </table:table-cell>
          <table:table-cell table:style-name="ce41" office:value-type="float" office:value="4996" calcext:value-type="float">
            <text:p>4996</text:p>
          </table:table-cell>
          <table:table-cell table:style-name="ce45" office:value-type="float" office:value="12635" calcext:value-type="float">
            <text:p>12635</text:p>
          </table:table-cell>
          <table:table-cell table:style-name="ce53" table:formula="of:=SUM([.D671:.H671])" office:value-type="float" office:value="33041" calcext:value-type="float">
            <text:p>33041</text:p>
          </table:table-cell>
          <table:table-cell table:style-name="ce60" office:value-type="string" calcext:value-type="string">
            <text:p>Phrequ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671]=126;70;IF([.T671]=112;70;IF([.T671]=98;70;IF([.T671]=96;60;IF([.T671]=84;60;IF([.T671]=108;60;IF([.T671]=90;50;IF([.T671]=72;40;IF([.T671]=80;40;IF([.T671]=100;50;IF([.T671]=54;30;IF([.T671]=36;20;IF([.T671]=18;10;IF([.T67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911133427/defenderoftexel/images/thumb/7/71/Tanaquil_Icon.png/50px-Tanaqui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rnthi_-_Nesithva_-_Tanaquil&quot;; &quot;Tanaquil&quot;)" office:value-type="string" office:string-value="Tanaquil" calcext:value-type="string">
            <text:p>Tanaquil</text:p>
          </table:table-cell>
          <table:table-cell table:style-name="ce25"/>
          <table:table-cell table:style-name="ce28" office:value-type="float" office:value="3282" calcext:value-type="float">
            <text:p>3282</text:p>
          </table:table-cell>
          <table:table-cell table:style-name="ce33" office:value-type="float" office:value="4139" calcext:value-type="float">
            <text:p>4139</text:p>
          </table:table-cell>
          <table:table-cell table:style-name="ce37" office:value-type="float" office:value="1088" calcext:value-type="float">
            <text:p>1088</text:p>
          </table:table-cell>
          <table:table-cell table:style-name="ce41" office:value-type="float" office:value="3775" calcext:value-type="float">
            <text:p>3775</text:p>
          </table:table-cell>
          <table:table-cell table:style-name="ce45" office:value-type="float" office:value="722" calcext:value-type="float">
            <text:p>722</text:p>
          </table:table-cell>
          <table:table-cell table:style-name="ce53" table:formula="of:=SUM([.D672:.H672])" office:value-type="float" office:value="13006" calcext:value-type="float">
            <text:p>13006</text:p>
          </table:table-cell>
          <table:table-cell table:style-name="ce60" office:value-type="string" calcext:value-type="string">
            <text:p>Squi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2]=126;70;IF([.T672]=112;70;IF([.T672]=98;70;IF([.T672]=96;60;IF([.T672]=84;60;IF([.T672]=108;60;IF([.T672]=90;50;IF([.T672]=72;40;IF([.T672]=80;40;IF([.T672]=100;50;IF([.T672]=54;30;IF([.T672]=36;20;IF([.T672]=18;10;IF([.T67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5/58/Tancreva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cemelt_-_Tuyaborn_-_Tancrevas&quot;; &quot;Tancrevas&quot;)" office:value-type="string" office:string-value="Tancrevas" calcext:value-type="string">
            <text:p>Tancrevas</text:p>
          </table:table-cell>
          <table:table-cell table:style-name="ce25"/>
          <table:table-cell table:style-name="ce28" office:value-type="float" office:value="4999" calcext:value-type="float">
            <text:p>4999</text:p>
          </table:table-cell>
          <table:table-cell table:style-name="ce33" office:value-type="float" office:value="4226" calcext:value-type="float">
            <text:p>4226</text:p>
          </table:table-cell>
          <table:table-cell table:style-name="ce37" office:value-type="float" office:value="2168" calcext:value-type="float">
            <text:p>2168</text:p>
          </table:table-cell>
          <table:table-cell table:style-name="ce41" office:value-type="float" office:value="428" calcext:value-type="float">
            <text:p>428</text:p>
          </table:table-cell>
          <table:table-cell table:style-name="ce45" office:value-type="float" office:value="1622" calcext:value-type="float">
            <text:p>1622</text:p>
          </table:table-cell>
          <table:table-cell table:style-name="ce53" table:formula="of:=SUM([.D673:.H673])" office:value-type="float" office:value="13443" calcext:value-type="float">
            <text:p>13443</text:p>
          </table:table-cell>
          <table:table-cell table:style-name="ce60" office:value-type="string" calcext:value-type="string">
            <text:p>Dren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3]=126;70;IF([.T673]=112;70;IF([.T673]=98;70;IF([.T673]=96;60;IF([.T673]=84;60;IF([.T673]=108;60;IF([.T673]=90;50;IF([.T673]=72;40;IF([.T673]=80;40;IF([.T673]=100;50;IF([.T673]=54;30;IF([.T673]=36;20;IF([.T673]=18;10;IF([.T67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9/9b/Tangrihan_Icon.png/revision/latest?cb=20140930165926&quot;)" office:value-type="string" office:string-value="" calcext:value-type="error">
            <text:p>#NAME?</text:p>
          </table:table-cell>
          <table:table-cell table:style-name="ce11" table:formula="of:=HYPERLINK(&quot;http://defenderoftexel.wikia.com/wiki/Nazarre_-_Tangrihan_-_Asphandiat&quot;;&quot;Tangrihan&quot;)" office:value-type="string" office:string-value="Tangrihan" calcext:value-type="string">
            <text:p>Tangrihan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Ambiguate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R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74]=126;70;IF([.T674]=112;70;IF([.T674]=98;70;IF([.T674]=96;60;IF([.T674]=84;60;IF([.T674]=108;60;IF([.T674]=90;50;IF([.T674]=72;40;IF([.T674]=80;40;IF([.T674]=100;50;IF([.T674]=54;30;IF([.T674]=36;20;IF([.T674]=18;10;IF([.T674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24247/defenderoftexel/images/9/97/Tarb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arbus&quot;; &quot;Tarbus&quot;)" office:value-type="string" office:string-value="Tarbus" calcext:value-type="string">
            <text:p>Tarbus</text:p>
          </table:table-cell>
          <table:table-cell table:style-name="ce25"/>
          <table:table-cell table:style-name="ce28" office:value-type="float" office:value="1685" calcext:value-type="float">
            <text:p>1685</text:p>
          </table:table-cell>
          <table:table-cell table:style-name="ce33" office:value-type="float" office:value="1405" calcext:value-type="float">
            <text:p>1405</text:p>
          </table:table-cell>
          <table:table-cell table:style-name="ce37" office:value-type="float" office:value="697" calcext:value-type="float">
            <text:p>697</text:p>
          </table:table-cell>
          <table:table-cell table:style-name="ce41" office:value-type="float" office:value="131" calcext:value-type="float">
            <text:p>131</text:p>
          </table:table-cell>
          <table:table-cell table:style-name="ce45" office:value-type="float" office:value="514" calcext:value-type="float">
            <text:p>514</text:p>
          </table:table-cell>
          <table:table-cell table:style-name="ce53" table:formula="of:=SUM([.D675:.H675])" office:value-type="float" office:value="4432" calcext:value-type="float">
            <text:p>4432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5]=126;70;IF([.T675]=112;70;IF([.T675]=98;70;IF([.T675]=96;60;IF([.T675]=84;60;IF([.T675]=108;60;IF([.T675]=90;50;IF([.T675]=72;40;IF([.T675]=80;40;IF([.T675]=100;50;IF([.T675]=54;30;IF([.T675]=36;20;IF([.T675]=18;10;IF([.T67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12130847/defenderoftexel/images/thumb/7/77/Tarchumenaia_Icon.png/50px-Tarchumena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Ceine_-_Hercna_-_Tarchumenaia&quot;;&quot;Tarchumenaia&quot;)" office:value-type="string" office:string-value="Tarchumenaia" calcext:value-type="string">
            <text:p>Tarchumenaia</text:p>
          </table:table-cell>
          <table:table-cell table:style-name="ce25"/>
          <table:table-cell table:style-name="ce28" office:value-type="float" office:value="5273" calcext:value-type="float">
            <text:p>5273</text:p>
          </table:table-cell>
          <table:table-cell table:style-name="ce33" office:value-type="float" office:value="4457" calcext:value-type="float">
            <text:p>4457</text:p>
          </table:table-cell>
          <table:table-cell table:style-name="ce37" office:value-type="float" office:value="2286" calcext:value-type="float">
            <text:p>2286</text:p>
          </table:table-cell>
          <table:table-cell table:style-name="ce41" office:value-type="float" office:value="452" calcext:value-type="float">
            <text:p>452</text:p>
          </table:table-cell>
          <table:table-cell table:style-name="ce45" office:value-type="float" office:value="1709" calcext:value-type="float">
            <text:p>1709</text:p>
          </table:table-cell>
          <table:table-cell table:style-name="ce53" table:formula="of:=SUM([.D676:.H676])" office:value-type="float" office:value="14177" calcext:value-type="float">
            <text:p>14177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6]=126;70;IF([.T676]=112;70;IF([.T676]=98;70;IF([.T676]=96;60;IF([.T676]=84;60;IF([.T676]=108;60;IF([.T676]=90;50;IF([.T676]=72;40;IF([.T676]=80;40;IF([.T676]=100;50;IF([.T676]=54;30;IF([.T676]=36;20;IF([.T676]=18;10;IF([.T67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defenderoftexel/images/thumb/4/44/Tarquin_Icon.png/50px-Tarqu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arquin&quot;; &quot;Tarquin&quot;)" office:value-type="string" office:string-value="Tarquin" calcext:value-type="string">
            <text:p>Tarquin</text:p>
          </table:table-cell>
          <table:table-cell table:style-name="ce25"/>
          <table:table-cell table:style-name="ce28" office:value-type="float" office:value="2723" calcext:value-type="float">
            <text:p>2723</text:p>
          </table:table-cell>
          <table:table-cell table:style-name="ce33" office:value-type="float" office:value="4139" calcext:value-type="float">
            <text:p>4139</text:p>
          </table:table-cell>
          <table:table-cell table:style-name="ce37" office:value-type="float" office:value="1413" calcext:value-type="float">
            <text:p>1413</text:p>
          </table:table-cell>
          <table:table-cell table:style-name="ce41" office:value-type="float" office:value="851" calcext:value-type="float">
            <text:p>851</text:p>
          </table:table-cell>
          <table:table-cell table:style-name="ce45" office:value-type="float" office:value="4292" calcext:value-type="float">
            <text:p>4292</text:p>
          </table:table-cell>
          <table:table-cell table:style-name="ce53" table:formula="of:=SUM([.D677:.H677])" office:value-type="float" office:value="13418" calcext:value-type="float">
            <text:p>13418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7]=126;70;IF([.T677]=112;70;IF([.T677]=98;70;IF([.T677]=96;60;IF([.T677]=84;60;IF([.T677]=108;60;IF([.T677]=90;50;IF([.T677]=72;40;IF([.T677]=80;40;IF([.T677]=100;50;IF([.T677]=54;30;IF([.T677]=36;20;IF([.T677]=18;10;IF([.T67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325125543/defenderoftexel/images/thumb/e/e3/Taurus_Icon.png/50px-Taur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aurus&quot;; &quot;Taurus&quot;)" office:value-type="string" office:string-value="Taurus" calcext:value-type="string">
            <text:p>Taurus</text:p>
          </table:table-cell>
          <table:table-cell table:style-name="ce25"/>
          <table:table-cell table:style-name="ce28" office:value-type="float" office:value="5018" calcext:value-type="float">
            <text:p>5018</text:p>
          </table:table-cell>
          <table:table-cell table:style-name="ce33" office:value-type="float" office:value="5738" calcext:value-type="float">
            <text:p>5738</text:p>
          </table:table-cell>
          <table:table-cell table:style-name="ce37" office:value-type="float" office:value="3077" calcext:value-type="float">
            <text:p>3077</text:p>
          </table:table-cell>
          <table:table-cell table:style-name="ce41" office:value-type="float" office:value="724" calcext:value-type="float">
            <text:p>724</text:p>
          </table:table-cell>
          <table:table-cell table:style-name="ce45" office:value-type="float" office:value="962" calcext:value-type="float">
            <text:p>962</text:p>
          </table:table-cell>
          <table:table-cell table:style-name="ce53" table:formula="of:=SUM([.D678:.H678])" office:value-type="float" office:value="15519" calcext:value-type="float">
            <text:p>15519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8]=126;70;IF([.T678]=112;70;IF([.T678]=98;70;IF([.T678]=96;60;IF([.T678]=84;60;IF([.T678]=108;60;IF([.T678]=90;50;IF([.T678]=72;40;IF([.T678]=80;40;IF([.T678]=100;50;IF([.T678]=54;30;IF([.T678]=36;20;IF([.T678]=18;10;IF([.T67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121163612/defenderoftexel/images/thumb/0/0d/Tengra_Icon.png/50px-Teng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engra&quot;; &quot;Tengra&quot;)" office:value-type="string" office:string-value="Tengra" calcext:value-type="string">
            <text:p>Tengra</text:p>
          </table:table-cell>
          <table:table-cell table:style-name="ce25"/>
          <table:table-cell table:style-name="ce28" office:value-type="float" office:value="4840" calcext:value-type="float">
            <text:p>4840</text:p>
          </table:table-cell>
          <table:table-cell table:style-name="ce33" office:value-type="float" office:value="5629" calcext:value-type="float">
            <text:p>5629</text:p>
          </table:table-cell>
          <table:table-cell table:style-name="ce37" office:value-type="float" office:value="3918" calcext:value-type="float">
            <text:p>3918</text:p>
          </table:table-cell>
          <table:table-cell table:style-name="ce41" office:value-type="float" office:value="552" calcext:value-type="float">
            <text:p>552</text:p>
          </table:table-cell>
          <table:table-cell table:style-name="ce45" office:value-type="float" office:value="664" calcext:value-type="float">
            <text:p>664</text:p>
          </table:table-cell>
          <table:table-cell table:style-name="ce53" table:formula="of:=SUM([.D679:.H679])" office:value-type="float" office:value="15603" calcext:value-type="float">
            <text:p>15603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79]=126;70;IF([.T679]=112;70;IF([.T679]=98;70;IF([.T679]=96;60;IF([.T679]=84;60;IF([.T679]=108;60;IF([.T679]=90;50;IF([.T679]=72;40;IF([.T679]=80;40;IF([.T679]=100;50;IF([.T679]=54;30;IF([.T679]=36;20;IF([.T679]=18;10;IF([.T67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2.wikia.nocookie.net/defenderoftexel/images/e/e5/Teres_Icon.png/revision/latest?cb=20150502073013&quot;)" office:value-type="string" office:string-value="" calcext:value-type="error">
            <text:p>#NAME?</text:p>
          </table:table-cell>
          <table:table-cell table:style-name="ce11" table:formula="of:=HYPERLINK(&quot;http://defenderoftexel.wikia.com/wiki/Teres_-_Ammadoc_-_Zalmodegicus&quot;;&quot;Teres&quot;)" office:value-type="string" office:string-value="Teres" calcext:value-type="string">
            <text:p>Tere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680:.H680])" office:value-type="float" office:value="5" calcext:value-type="float">
            <text:p>5</text:p>
          </table:table-cell>
          <table:table-cell table:style-name="ce59" office:value-type="string" calcext:value-type="string">
            <text:p>Sting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80]=126;70;IF([.T680]=112;70;IF([.T680]=98;70;IF([.T680]=96;60;IF([.T680]=84;60;IF([.T680]=108;60;IF([.T680]=90;50;IF([.T680]=72;40;IF([.T680]=80;40;IF([.T680]=100;50;IF([.T680]=54;30;IF([.T680]=36;20;IF([.T680]=18;10;IF([.T680]=60;30))))))))))))))" office:value-type="float" office:value="30" calcext:value-type="float">
            <text:p>30</text:p>
          </table:table-cell>
          <table:table-cell table:style-name="ce67" office:value-type="float" office:value="54" calcext:value-type="float">
            <text:p>54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225105632/defenderoftexel/images/thumb/6/6b/Teucer_Icon.png/50px-Teuc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eucer&quot;; &quot;Teucer&quot;)" office:value-type="string" office:string-value="Teucer" calcext:value-type="string">
            <text:p>Teucer</text:p>
          </table:table-cell>
          <table:table-cell table:style-name="ce25"/>
          <table:table-cell table:style-name="ce28" office:value-type="float" office:value="3766" calcext:value-type="float">
            <text:p>3766</text:p>
          </table:table-cell>
          <table:table-cell table:style-name="ce33" office:value-type="float" office:value="4258" calcext:value-type="float">
            <text:p>4258</text:p>
          </table:table-cell>
          <table:table-cell table:style-name="ce37" office:value-type="float" office:value="7720" calcext:value-type="float">
            <text:p>7720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office:value-type="float" office:value="329" calcext:value-type="float">
            <text:p>329</text:p>
          </table:table-cell>
          <table:table-cell table:style-name="ce53" table:formula="of:=SUM([.D681:.H681])" office:value-type="float" office:value="16459" calcext:value-type="float">
            <text:p>16459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1]=126;70;IF([.T681]=112;70;IF([.T681]=98;70;IF([.T681]=96;60;IF([.T681]=84;60;IF([.T681]=108;60;IF([.T681]=90;50;IF([.T681]=72;40;IF([.T681]=80;40;IF([.T681]=100;50;IF([.T681]=54;30;IF([.T681]=36;20;IF([.T681]=18;10;IF([.T68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1/17/Thanusa_Icon.png/revision/latest?cb=20150414153936&quot;)" office:value-type="string" office:string-value="" calcext:value-type="error">
            <text:p>#NAME?</text:p>
          </table:table-cell>
          <table:table-cell table:style-name="ce11" table:formula="of:=HYPERLINK(&quot;http://defenderoftexel.wikia.com/wiki/Thanusa_-_Palmithe_-_Elinei&quot;;&quot;Thanusa&quot;)" office:value-type="string" office:string-value="Thanusa" calcext:value-type="string">
            <text:p>Thanusa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Gael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Novi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Guru</text:p>
          </table:table-cell>
          <table:table-cell table:style-name="ce67" office:value-type="string" calcext:value-type="string">
            <text:p>Air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682]=126;70;IF([.T682]=112;70;IF([.T682]=98;70;IF([.T682]=96;60;IF([.T682]=84;60;IF([.T682]=108;60;IF([.T682]=90;50;IF([.T682]=72;40;IF([.T682]=80;40;IF([.T682]=100;50;IF([.T682]=54;30;IF([.T682]=36;20;IF([.T682]=18;10;IF([.T682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5/55/Thefari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hefarie&quot;; &quot;Thefarie&quot;)" office:value-type="string" office:string-value="Thefarie" calcext:value-type="string">
            <text:p>Thefarie</text:p>
          </table:table-cell>
          <table:table-cell table:style-name="ce25"/>
          <table:table-cell table:style-name="ce28" office:value-type="float" office:value="3428" calcext:value-type="float">
            <text:p>3428</text:p>
          </table:table-cell>
          <table:table-cell table:style-name="ce33" office:value-type="float" office:value="3919" calcext:value-type="float">
            <text:p>3919</text:p>
          </table:table-cell>
          <table:table-cell table:style-name="ce37" office:value-type="float" office:value="2100" calcext:value-type="float">
            <text:p>2100</text:p>
          </table:table-cell>
          <table:table-cell table:style-name="ce41" office:value-type="float" office:value="494" calcext:value-type="float">
            <text:p>494</text:p>
          </table:table-cell>
          <table:table-cell table:style-name="ce45" office:value-type="float" office:value="656" calcext:value-type="float">
            <text:p>656</text:p>
          </table:table-cell>
          <table:table-cell table:style-name="ce53" table:formula="of:=SUM([.D683:.H683])" office:value-type="float" office:value="10597" calcext:value-type="float">
            <text:p>10597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3]=126;70;IF([.T683]=112;70;IF([.T683]=98;70;IF([.T683]=96;60;IF([.T683]=84;60;IF([.T683]=108;60;IF([.T683]=90;50;IF([.T683]=72;40;IF([.T683]=80;40;IF([.T683]=100;50;IF([.T683]=54;30;IF([.T683]=36;20;IF([.T683]=18;10;IF([.T68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2529/defenderoftexel/images/thumb/0/0a/Theodi_Icon.png/40px-Theod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heodi&quot;; &quot;Theodi&quot;)" office:value-type="string" office:string-value="Theodi" calcext:value-type="string">
            <text:p>Theodi</text:p>
          </table:table-cell>
          <table:table-cell table:style-name="ce25"/>
          <table:table-cell table:style-name="ce28" office:value-type="float" office:value="1667" calcext:value-type="float">
            <text:p>1667</text:p>
          </table:table-cell>
          <table:table-cell table:style-name="ce33" office:value-type="float" office:value="1170" calcext:value-type="float">
            <text:p>1170</text:p>
          </table:table-cell>
          <table:table-cell table:style-name="ce37" office:value-type="float" office:value="756" calcext:value-type="float">
            <text:p>756</text:p>
          </table:table-cell>
          <table:table-cell table:style-name="ce41" office:value-type="float" office:value="4794" calcext:value-type="float">
            <text:p>4794</text:p>
          </table:table-cell>
          <table:table-cell table:style-name="ce45" office:value-type="float" office:value="4563" calcext:value-type="float">
            <text:p>4563</text:p>
          </table:table-cell>
          <table:table-cell table:style-name="ce53" table:formula="of:=SUM([.D684:.H684])" office:value-type="float" office:value="12950" calcext:value-type="float">
            <text:p>12950</text:p>
          </table:table-cell>
          <table:table-cell table:style-name="ce60" office:value-type="string" calcext:value-type="string">
            <text:p>Zhap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4]=126;70;IF([.T684]=112;70;IF([.T684]=98;70;IF([.T684]=96;60;IF([.T684]=84;60;IF([.T684]=108;60;IF([.T684]=90;50;IF([.T684]=72;40;IF([.T684]=80;40;IF([.T684]=100;50;IF([.T684]=54;30;IF([.T684]=36;20;IF([.T684]=18;10;IF([.T68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752/defenderoftexel/images/thumb/6/69/Thesanthei_Icon.png/40px-Thesanthe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hesanthei&quot;; &quot;Thesanthei&quot;)" office:value-type="string" office:string-value="Thesanthei" calcext:value-type="string">
            <text:p>Thesanthei</text:p>
          </table:table-cell>
          <table:table-cell table:style-name="ce25"/>
          <table:table-cell table:style-name="ce28" office:value-type="float" office:value="3235" calcext:value-type="float">
            <text:p>3235</text:p>
          </table:table-cell>
          <table:table-cell table:style-name="ce33" office:value-type="float" office:value="4537" calcext:value-type="float">
            <text:p>4537</text:p>
          </table:table-cell>
          <table:table-cell table:style-name="ce37" office:value-type="float" office:value="990" calcext:value-type="float">
            <text:p>990</text:p>
          </table:table-cell>
          <table:table-cell table:style-name="ce41" office:value-type="float" office:value="2901" calcext:value-type="float">
            <text:p>2901</text:p>
          </table:table-cell>
          <table:table-cell table:style-name="ce45" office:value-type="float" office:value="1314" calcext:value-type="float">
            <text:p>1314</text:p>
          </table:table-cell>
          <table:table-cell table:style-name="ce53" table:formula="of:=SUM([.D685:.H685])" office:value-type="float" office:value="12977" calcext:value-type="float">
            <text:p>12977</text:p>
          </table:table-cell>
          <table:table-cell table:style-name="ce60" office:value-type="string" calcext:value-type="string">
            <text:p>Enfla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5]=126;70;IF([.T685]=112;70;IF([.T685]=98;70;IF([.T685]=96;60;IF([.T685]=84;60;IF([.T685]=108;60;IF([.T685]=90;50;IF([.T685]=72;40;IF([.T685]=80;40;IF([.T685]=100;50;IF([.T685]=54;30;IF([.T685]=36;20;IF([.T685]=18;10;IF([.T68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55236/defenderoftexel/images/thumb/c/c2/Thocero_Icon.png/50px-Thocer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hocero&quot;; &quot;Thocero&quot;)" office:value-type="string" office:string-value="Thocero" calcext:value-type="string">
            <text:p>Thocero</text:p>
          </table:table-cell>
          <table:table-cell table:style-name="ce25"/>
          <table:table-cell table:style-name="ce28" office:value-type="float" office:value="2366" calcext:value-type="float">
            <text:p>2366</text:p>
          </table:table-cell>
          <table:table-cell table:style-name="ce33" office:value-type="float" office:value="3269" calcext:value-type="float">
            <text:p>3269</text:p>
          </table:table-cell>
          <table:table-cell table:style-name="ce37" office:value-type="float" office:value="749" calcext:value-type="float">
            <text:p>749</text:p>
          </table:table-cell>
          <table:table-cell table:style-name="ce41" office:value-type="float" office:value="2128" calcext:value-type="float">
            <text:p>2128</text:p>
          </table:table-cell>
          <table:table-cell table:style-name="ce45" office:value-type="float" office:value="985" calcext:value-type="float">
            <text:p>985</text:p>
          </table:table-cell>
          <table:table-cell table:style-name="ce53" table:formula="of:=SUM([.D686:.H686])" office:value-type="float" office:value="9497" calcext:value-type="float">
            <text:p>9497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6]=126;70;IF([.T686]=112;70;IF([.T686]=98;70;IF([.T686]=96;60;IF([.T686]=84;60;IF([.T686]=108;60;IF([.T686]=90;50;IF([.T686]=72;40;IF([.T686]=80;40;IF([.T686]=100;50;IF([.T686]=54;30;IF([.T686]=36;20;IF([.T686]=18;10;IF([.T68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708122400/defenderoftexel/images/thumb/5/5d/Thor%2C_Thunder-god_Icon.png/50px-Thor%2C_Thunder-go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hor,_Thunder-god&quot;; &quot;Thor, Thunder-God&quot;)" office:value-type="string" office:string-value="Thor, Thunder-God" calcext:value-type="string">
            <text:p>Thor, Thunder-God</text:p>
          </table:table-cell>
          <table:table-cell table:style-name="ce25"/>
          <table:table-cell table:style-name="ce28" office:value-type="float" office:value="7143" calcext:value-type="float">
            <text:p>7143</text:p>
          </table:table-cell>
          <table:table-cell table:style-name="ce33" office:value-type="float" office:value="11697" calcext:value-type="float">
            <text:p>11697</text:p>
          </table:table-cell>
          <table:table-cell table:style-name="ce37" office:value-type="float" office:value="5950" calcext:value-type="float">
            <text:p>5950</text:p>
          </table:table-cell>
          <table:table-cell table:style-name="ce41" office:value-type="float" office:value="9334" calcext:value-type="float">
            <text:p>9334</text:p>
          </table:table-cell>
          <table:table-cell table:style-name="ce45" office:value-type="float" office:value="1163" calcext:value-type="float">
            <text:p>1163</text:p>
          </table:table-cell>
          <table:table-cell table:style-name="ce53" table:formula="of:=SUM([.D687:.H687])" office:value-type="float" office:value="35287" calcext:value-type="float">
            <text:p>35287</text:p>
          </table:table-cell>
          <table:table-cell table:style-name="ce60" office:value-type="string" calcext:value-type="string">
            <text:p>Warhammer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687]=126;70;IF([.T687]=112;70;IF([.T687]=98;70;IF([.T687]=96;60;IF([.T687]=84;60;IF([.T687]=108;60;IF([.T687]=90;50;IF([.T687]=72;40;IF([.T687]=80;40;IF([.T687]=100;50;IF([.T687]=54;30;IF([.T687]=36;20;IF([.T687]=18;10;IF([.T68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53905/defenderoftexel/images/8/82/Tiama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amat&quot;; &quot;Tiamat&quot;)" office:value-type="string" office:string-value="Tiamat" calcext:value-type="string">
            <text:p>Tiamat</text:p>
          </table:table-cell>
          <table:table-cell table:style-name="ce25"/>
          <table:table-cell table:style-name="ce28" office:value-type="float" office:value="1658" calcext:value-type="float">
            <text:p>1658</text:p>
          </table:table-cell>
          <table:table-cell table:style-name="ce33" office:value-type="float" office:value="3855" calcext:value-type="float">
            <text:p>3855</text:p>
          </table:table-cell>
          <table:table-cell table:style-name="ce37" office:value-type="float" office:value="840" calcext:value-type="float">
            <text:p>840</text:p>
          </table:table-cell>
          <table:table-cell table:style-name="ce41" office:value-type="float" office:value="3659" calcext:value-type="float">
            <text:p>3659</text:p>
          </table:table-cell>
          <table:table-cell table:style-name="ce45" office:value-type="float" office:value="1114" calcext:value-type="float">
            <text:p>1114</text:p>
          </table:table-cell>
          <table:table-cell table:style-name="ce53" table:formula="of:=SUM([.D688:.H688])" office:value-type="float" office:value="11126" calcext:value-type="float">
            <text:p>11126</text:p>
          </table:table-cell>
          <table:table-cell table:style-name="ce60" office:value-type="string" calcext:value-type="string">
            <text:p>Gael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8]=126;70;IF([.T688]=112;70;IF([.T688]=98;70;IF([.T688]=96;60;IF([.T688]=84;60;IF([.T688]=108;60;IF([.T688]=90;50;IF([.T688]=72;40;IF([.T688]=80;40;IF([.T688]=100;50;IF([.T688]=54;30;IF([.T688]=36;20;IF([.T688]=18;10;IF([.T68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813121940/defenderoftexel/images/2/21/Tiercelm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ercelm&quot;; &quot;Tiercelm&quot;)" office:value-type="string" office:string-value="Tiercelm" calcext:value-type="string">
            <text:p>Tiercelm</text:p>
          </table:table-cell>
          <table:table-cell table:style-name="ce25"/>
          <table:table-cell table:style-name="ce28" office:value-type="float" office:value="2962" calcext:value-type="float">
            <text:p>2962</text:p>
          </table:table-cell>
          <table:table-cell table:style-name="ce33" office:value-type="float" office:value="3388" calcext:value-type="float">
            <text:p>3388</text:p>
          </table:table-cell>
          <table:table-cell table:style-name="ce37" office:value-type="float" office:value="1816" calcext:value-type="float">
            <text:p>1816</text:p>
          </table:table-cell>
          <table:table-cell table:style-name="ce41" office:value-type="float" office:value="427" calcext:value-type="float">
            <text:p>427</text:p>
          </table:table-cell>
          <table:table-cell table:style-name="ce45" office:value-type="float" office:value="567" calcext:value-type="float">
            <text:p>567</text:p>
          </table:table-cell>
          <table:table-cell table:style-name="ce53" table:formula="of:=SUM([.D689:.H689])" office:value-type="float" office:value="9160" calcext:value-type="float">
            <text:p>9160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89]=126;70;IF([.T689]=112;70;IF([.T689]=98;70;IF([.T689]=96;60;IF([.T689]=84;60;IF([.T689]=108;60;IF([.T689]=90;50;IF([.T689]=72;40;IF([.T689]=80;40;IF([.T689]=100;50;IF([.T689]=54;30;IF([.T689]=36;20;IF([.T689]=18;10;IF([.T68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defenderoftexel/images/thumb/c/ca/Tiphilia_Icon.png/50px-Tiphil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philia&quot;; &quot;Tiphilia&quot;)" office:value-type="string" office:string-value="Tiphilia" calcext:value-type="string">
            <text:p>Tiphilia</text:p>
          </table:table-cell>
          <table:table-cell table:style-name="ce25"/>
          <table:table-cell table:style-name="ce28" office:value-type="float" office:value="2028" calcext:value-type="float">
            <text:p>2028</text:p>
          </table:table-cell>
          <table:table-cell table:style-name="ce33" office:value-type="float" office:value="1425" calcext:value-type="float">
            <text:p>1425</text:p>
          </table:table-cell>
          <table:table-cell table:style-name="ce37" office:value-type="float" office:value="918" calcext:value-type="float">
            <text:p>918</text:p>
          </table:table-cell>
          <table:table-cell table:style-name="ce41" office:value-type="float" office:value="5837" calcext:value-type="float">
            <text:p>5837</text:p>
          </table:table-cell>
          <table:table-cell table:style-name="ce45" office:value-type="float" office:value="5557" calcext:value-type="float">
            <text:p>5557</text:p>
          </table:table-cell>
          <table:table-cell table:style-name="ce53" table:formula="of:=SUM([.D690:.H690])" office:value-type="float" office:value="15765" calcext:value-type="float">
            <text:p>15765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0]=126;70;IF([.T690]=112;70;IF([.T690]=98;70;IF([.T690]=96;60;IF([.T690]=84;60;IF([.T690]=108;60;IF([.T690]=90;50;IF([.T690]=72;40;IF([.T690]=80;40;IF([.T690]=100;50;IF([.T690]=54;30;IF([.T690]=36;20;IF([.T690]=18;10;IF([.T69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716153660/defenderoftexel/images/thumb/2/24/Tishpak_Icon.png/50px-Tishpa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Nana_-_Tabni-Ishtar_-_Tishpak&quot;; &quot;Tishpak&quot;)" office:value-type="string" office:string-value="Tishpak" calcext:value-type="string">
            <text:p>Tishpak</text:p>
          </table:table-cell>
          <table:table-cell table:style-name="ce25"/>
          <table:table-cell table:style-name="ce28" office:value-type="float" office:value="5786" calcext:value-type="float">
            <text:p>5786</text:p>
          </table:table-cell>
          <table:table-cell table:style-name="ce33" office:value-type="float" office:value="4130" calcext:value-type="float">
            <text:p>4130</text:p>
          </table:table-cell>
          <table:table-cell table:style-name="ce37" office:value-type="float" office:value="4801" calcext:value-type="float">
            <text:p>4801</text:p>
          </table:table-cell>
          <table:table-cell table:style-name="ce41" office:value-type="float" office:value="494" calcext:value-type="float">
            <text:p>494</text:p>
          </table:table-cell>
          <table:table-cell table:style-name="ce45" office:value-type="float" office:value="614" calcext:value-type="float">
            <text:p>614</text:p>
          </table:table-cell>
          <table:table-cell table:style-name="ce53" table:formula="of:=SUM([.D691:.H691])" office:value-type="float" office:value="15825" calcext:value-type="float">
            <text:p>15825</text:p>
          </table:table-cell>
          <table:table-cell table:style-name="ce60" office:value-type="string" calcext:value-type="string">
            <text:p>Vent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1]=126;70;IF([.T691]=112;70;IF([.T691]=98;70;IF([.T691]=96;60;IF([.T691]=84;60;IF([.T691]=108;60;IF([.T691]=90;50;IF([.T691]=72;40;IF([.T691]=80;40;IF([.T691]=100;50;IF([.T691]=54;30;IF([.T691]=36;20;IF([.T691]=18;10;IF([.T69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72103/defenderoftexel/images/3/32/Tiskh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iskhu&quot;;&quot;Tiskhu&quot;)" office:value-type="string" office:string-value="Tiskhu" calcext:value-type="string">
            <text:p>Tiskhu</text:p>
          </table:table-cell>
          <table:table-cell table:style-name="ce25"/>
          <table:table-cell table:style-name="ce28" office:value-type="float" office:value="2010" calcext:value-type="float">
            <text:p>2010</text:p>
          </table:table-cell>
          <table:table-cell table:style-name="ce33" office:value-type="float" office:value="2821" calcext:value-type="float">
            <text:p>2821</text:p>
          </table:table-cell>
          <table:table-cell table:style-name="ce37" office:value-type="float" office:value="615" calcext:value-type="float">
            <text:p>615</text:p>
          </table:table-cell>
          <table:table-cell table:style-name="ce41" office:value-type="float" office:value="1803" calcext:value-type="float">
            <text:p>1803</text:p>
          </table:table-cell>
          <table:table-cell table:style-name="ce45" office:value-type="float" office:value="816" calcext:value-type="float">
            <text:p>816</text:p>
          </table:table-cell>
          <table:table-cell table:style-name="ce53" table:formula="of:=SUM([.D692:.H692])" office:value-type="float" office:value="8065" calcext:value-type="float">
            <text:p>8065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2]=126;70;IF([.T692]=112;70;IF([.T692]=98;70;IF([.T692]=96;60;IF([.T692]=84;60;IF([.T692]=108;60;IF([.T692]=90;50;IF([.T692]=72;40;IF([.T692]=80;40;IF([.T692]=100;50;IF([.T692]=54;30;IF([.T692]=36;20;IF([.T692]=18;10;IF([.T69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26130247/defenderoftexel/images/thumb/0/0c/Toran%27dokht_Icon.png/50px-Toran%27dokh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ntigra_-_Champawa_-_Toran%27dokht&quot;;&quot;Toran'dokht&quot;)" office:value-type="string" office:string-value="Toran'dokht" calcext:value-type="string">
            <text:p>Toran'dokht</text:p>
          </table:table-cell>
          <table:table-cell table:style-name="ce25"/>
          <table:table-cell table:style-name="ce28" office:value-type="float" office:value="4300" calcext:value-type="float">
            <text:p>4300</text:p>
          </table:table-cell>
          <table:table-cell table:style-name="ce33" office:value-type="float" office:value="4917" calcext:value-type="float">
            <text:p>4917</text:p>
          </table:table-cell>
          <table:table-cell table:style-name="ce37" office:value-type="float" office:value="2635" calcext:value-type="float">
            <text:p>2635</text:p>
          </table:table-cell>
          <table:table-cell table:style-name="ce41" office:value-type="float" office:value="621" calcext:value-type="float">
            <text:p>621</text:p>
          </table:table-cell>
          <table:table-cell table:style-name="ce45" office:value-type="float" office:value="825" calcext:value-type="float">
            <text:p>825</text:p>
          </table:table-cell>
          <table:table-cell table:style-name="ce53" table:formula="of:=SUM([.D693:.H693])" office:value-type="float" office:value="13298" calcext:value-type="float">
            <text:p>13298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3]=126;70;IF([.T693]=112;70;IF([.T693]=98;70;IF([.T693]=96;60;IF([.T693]=84;60;IF([.T693]=108;60;IF([.T693]=90;50;IF([.T693]=72;40;IF([.T693]=80;40;IF([.T693]=100;50;IF([.T693]=54;30;IF([.T693]=36;20;IF([.T693]=18;10;IF([.T69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624163629/defenderoftexel/images/8/8d/Torquistado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orquistador&quot;; &quot;Torquistador&quot;)" office:value-type="string" office:string-value="Torquistador" calcext:value-type="string">
            <text:p>Torquistador</text:p>
          </table:table-cell>
          <table:table-cell table:style-name="ce25"/>
          <table:table-cell table:style-name="ce28" office:value-type="float" office:value="3807" calcext:value-type="float">
            <text:p>3807</text:p>
          </table:table-cell>
          <table:table-cell table:style-name="ce33" office:value-type="float" office:value="5342" calcext:value-type="float">
            <text:p>5342</text:p>
          </table:table-cell>
          <table:table-cell table:style-name="ce37" office:value-type="float" office:value="1166" calcext:value-type="float">
            <text:p>1166</text:p>
          </table:table-cell>
          <table:table-cell table:style-name="ce41" office:value-type="float" office:value="3415" calcext:value-type="float">
            <text:p>3415</text:p>
          </table:table-cell>
          <table:table-cell table:style-name="ce45" office:value-type="float" office:value="1547" calcext:value-type="float">
            <text:p>1547</text:p>
          </table:table-cell>
          <table:table-cell table:style-name="ce53" table:formula="of:=SUM([.D694:.H694])" office:value-type="float" office:value="15277" calcext:value-type="float">
            <text:p>15277</text:p>
          </table:table-cell>
          <table:table-cell table:style-name="ce60" office:value-type="string" calcext:value-type="string">
            <text:p>Nit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4]=126;70;IF([.T694]=112;70;IF([.T694]=98;70;IF([.T694]=96;60;IF([.T694]=84;60;IF([.T694]=108;60;IF([.T694]=90;50;IF([.T694]=72;40;IF([.T694]=80;40;IF([.T694]=100;50;IF([.T694]=54;30;IF([.T694]=36;20;IF([.T694]=18;10;IF([.T69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304145105/defenderoftexel/images/thumb/a/ae/Tremarine_Icon.png/50px-Tremarin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remarine&quot;; &quot;Tremarine&quot;)" office:value-type="string" office:string-value="Tremarine" calcext:value-type="string">
            <text:p>Tremarine</text:p>
          </table:table-cell>
          <table:table-cell table:style-name="ce25"/>
          <table:table-cell table:style-name="ce28" office:value-type="float" office:value="2625" calcext:value-type="float">
            <text:p>2625</text:p>
          </table:table-cell>
          <table:table-cell table:style-name="ce33" office:value-type="float" office:value="2000" calcext:value-type="float">
            <text:p>2000</text:p>
          </table:table-cell>
          <table:table-cell table:style-name="ce37" office:value-type="float" office:value="1363" calcext:value-type="float">
            <text:p>1363</text:p>
          </table:table-cell>
          <table:table-cell table:style-name="ce41" office:value-type="float" office:value="1939" calcext:value-type="float">
            <text:p>1939</text:p>
          </table:table-cell>
          <table:table-cell table:style-name="ce45" office:value-type="float" office:value="4896" calcext:value-type="float">
            <text:p>4896</text:p>
          </table:table-cell>
          <table:table-cell table:style-name="ce53" table:formula="of:=SUM([.D695:.H695])" office:value-type="float" office:value="12823" calcext:value-type="float">
            <text:p>12823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5]=126;70;IF([.T695]=112;70;IF([.T695]=98;70;IF([.T695]=96;60;IF([.T695]=84;60;IF([.T695]=108;60;IF([.T695]=90;50;IF([.T695]=72;40;IF([.T695]=80;40;IF([.T695]=100;50;IF([.T695]=54;30;IF([.T695]=36;20;IF([.T695]=18;10;IF([.T69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40114141641/defenderoftexel/images/thumb/3/34/Trubhel_Icon.png/50px-Trubhel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rubhel&quot;; &quot;Trubhel&quot;)" office:value-type="string" office:string-value="Trubhel" calcext:value-type="string">
            <text:p>Trubhel</text:p>
          </table:table-cell>
          <table:table-cell table:style-name="ce25"/>
          <table:table-cell table:style-name="ce28" office:value-type="float" office:value="5854" calcext:value-type="float">
            <text:p>5854</text:p>
          </table:table-cell>
          <table:table-cell table:style-name="ce33" office:value-type="float" office:value="4176" calcext:value-type="float">
            <text:p>4176</text:p>
          </table:table-cell>
          <table:table-cell table:style-name="ce37" office:value-type="float" office:value="4855" calcext:value-type="float">
            <text:p>4855</text:p>
          </table:table-cell>
          <table:table-cell table:style-name="ce41" office:value-type="float" office:value="499" calcext:value-type="float">
            <text:p>499</text:p>
          </table:table-cell>
          <table:table-cell table:style-name="ce45" office:value-type="float" office:value="622" calcext:value-type="float">
            <text:p>622</text:p>
          </table:table-cell>
          <table:table-cell table:style-name="ce53" table:formula="of:=SUM([.D696:.H696])" office:value-type="float" office:value="16006" calcext:value-type="float">
            <text:p>16006</text:p>
          </table:table-cell>
          <table:table-cell table:style-name="ce60" office:value-type="string" calcext:value-type="string">
            <text:p>Repay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6]=126;70;IF([.T696]=112;70;IF([.T696]=98;70;IF([.T696]=96;60;IF([.T696]=84;60;IF([.T696]=108;60;IF([.T696]=90;50;IF([.T696]=72;40;IF([.T696]=80;40;IF([.T696]=100;50;IF([.T696]=54;30;IF([.T696]=36;20;IF([.T696]=18;10;IF([.T69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4248/defenderoftexel/images/6/61/Tsir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siru&quot;; &quot;Tsiru&quot;)" office:value-type="string" office:string-value="Tsiru" calcext:value-type="string">
            <text:p>Tsiru</text:p>
          </table:table-cell>
          <table:table-cell table:style-name="ce25"/>
          <table:table-cell table:style-name="ce28" office:value-type="float" office:value="1828" calcext:value-type="float">
            <text:p>1828</text:p>
          </table:table-cell>
          <table:table-cell table:style-name="ce33" office:value-type="float" office:value="1531" calcext:value-type="float">
            <text:p>1531</text:p>
          </table:table-cell>
          <table:table-cell table:style-name="ce37" office:value-type="float" office:value="758" calcext:value-type="float">
            <text:p>758</text:p>
          </table:table-cell>
          <table:table-cell table:style-name="ce41" office:value-type="float" office:value="140" calcext:value-type="float">
            <text:p>140</text:p>
          </table:table-cell>
          <table:table-cell table:style-name="ce45" office:value-type="float" office:value="557" calcext:value-type="float">
            <text:p>557</text:p>
          </table:table-cell>
          <table:table-cell table:style-name="ce53" table:formula="of:=SUM([.D697:.H697])" office:value-type="float" office:value="4814" calcext:value-type="float">
            <text:p>4814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7]=126;70;IF([.T697]=112;70;IF([.T697]=98;70;IF([.T697]=96;60;IF([.T697]=84;60;IF([.T697]=108;60;IF([.T697]=90;50;IF([.T697]=72;40;IF([.T697]=80;40;IF([.T697]=100;50;IF([.T697]=54;30;IF([.T697]=36;20;IF([.T697]=18;10;IF([.T69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26231721/defenderoftexel/images/5/53/Ttrentho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trenthon&quot;; &quot;Ttrenthon&quot;)" office:value-type="string" office:string-value="Ttrenthon" calcext:value-type="string">
            <text:p>Ttrenthon</text:p>
          </table:table-cell>
          <table:table-cell table:style-name="ce25"/>
          <table:table-cell table:style-name="ce28" office:value-type="float" office:value="5629" calcext:value-type="float">
            <text:p>5629</text:p>
          </table:table-cell>
          <table:table-cell table:style-name="ce33" office:value-type="float" office:value="6435" calcext:value-type="float">
            <text:p>6435</text:p>
          </table:table-cell>
          <table:table-cell table:style-name="ce37" office:value-type="float" office:value="3450" calcext:value-type="float">
            <text:p>3450</text:p>
          </table:table-cell>
          <table:table-cell table:style-name="ce41" office:value-type="float" office:value="813" calcext:value-type="float">
            <text:p>813</text:p>
          </table:table-cell>
          <table:table-cell table:style-name="ce45" office:value-type="float" office:value="1081" calcext:value-type="float">
            <text:p>1081</text:p>
          </table:table-cell>
          <table:table-cell table:style-name="ce53" table:formula="of:=SUM([.D698:.H698])" office:value-type="float" office:value="17408" calcext:value-type="float">
            <text:p>17408</text:p>
          </table:table-cell>
          <table:table-cell table:style-name="ce60" office:value-type="string" calcext:value-type="string">
            <text:p>Blowhar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30" office:value-type="string" calcext:value-type="string">
            <text:p>Their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8]=126;70;IF([.T698]=112;70;IF([.T698]=98;70;IF([.T698]=96;60;IF([.T698]=84;60;IF([.T698]=108;60;IF([.T698]=90;50;IF([.T698]=72;40;IF([.T698]=80;40;IF([.T698]=100;50;IF([.T698]=54;30;IF([.T698]=36;20;IF([.T698]=18;10;IF([.T69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217151822/defenderoftexel/images/thumb/f/f0/Tungus_Icon.png/50px-Tungu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Taranda_-_Cariban_-_Tungus&quot;;&quot;Tungus&quot;)" office:value-type="string" office:string-value="Tungus" calcext:value-type="string">
            <text:p>Tungus</text:p>
          </table:table-cell>
          <table:table-cell table:style-name="ce25"/>
          <table:table-cell table:style-name="ce28" office:value-type="float" office:value="5042" calcext:value-type="float">
            <text:p>5042</text:p>
          </table:table-cell>
          <table:table-cell table:style-name="ce33" office:value-type="float" office:value="5765" calcext:value-type="float">
            <text:p>5765</text:p>
          </table:table-cell>
          <table:table-cell table:style-name="ce37" office:value-type="float" office:value="3090" calcext:value-type="float">
            <text:p>3090</text:p>
          </table:table-cell>
          <table:table-cell table:style-name="ce41" office:value-type="float" office:value="727" calcext:value-type="float">
            <text:p>727</text:p>
          </table:table-cell>
          <table:table-cell table:style-name="ce45" office:value-type="float" office:value="968" calcext:value-type="float">
            <text:p>968</text:p>
          </table:table-cell>
          <table:table-cell table:style-name="ce53" table:formula="of:=SUM([.D699:.H699])" office:value-type="float" office:value="15592" calcext:value-type="float">
            <text:p>15592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699]=126;70;IF([.T699]=112;70;IF([.T699]=98;70;IF([.T699]=96;60;IF([.T699]=84;60;IF([.T699]=108;60;IF([.T699]=90;50;IF([.T699]=72;40;IF([.T699]=80;40;IF([.T699]=100;50;IF([.T699]=54;30;IF([.T699]=36;20;IF([.T699]=18;10;IF([.T69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4/43/Tuntle_Icon.png/revision/latest?cb=20150423181245&quot;)" office:value-type="string" office:string-value="" calcext:value-type="error">
            <text:p>#NAME?</text:p>
          </table:table-cell>
          <table:table-cell table:style-name="ce11" table:formula="of:=HYPERLINK(&quot;http://defenderoftexel.wikia.com/wiki/Tuntle_-_Evtucle_-_Meleacr&quot;;&quot;Tuntle&quot;)" office:value-type="string" office:string-value="Tuntle" calcext:value-type="string">
            <text:p>Tuntle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6" table:number-columns-repeated="4"/>
          <table:table-cell table:style-name="ce67" office:value-type="string" calcext:value-type="string">
            <text:p>Warlock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00]=126;70;IF([.T700]=112;70;IF([.T700]=98;70;IF([.T700]=96;60;IF([.T700]=84;60;IF([.T700]=108;60;IF([.T700]=90;50;IF([.T700]=72;40;IF([.T700]=80;40;IF([.T700]=100;50;IF([.T700]=54;30;IF([.T700]=36;20;IF([.T700]=18;10;IF([.T700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51438/defenderoftexel/images/f/f2/Ubaln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balnu&quot;; &quot;Ubalnu&quot;)" office:value-type="string" office:string-value="Ubalnu" calcext:value-type="string">
            <text:p>Ubalnu</text:p>
          </table:table-cell>
          <table:table-cell table:style-name="ce25"/>
          <table:table-cell table:style-name="ce28" office:value-type="float" office:value="1083" calcext:value-type="float">
            <text:p>1083</text:p>
          </table:table-cell>
          <table:table-cell table:style-name="ce33" office:value-type="float" office:value="1159" calcext:value-type="float">
            <text:p>1159</text:p>
          </table:table-cell>
          <table:table-cell table:style-name="ce37" office:value-type="float" office:value="546" calcext:value-type="float">
            <text:p>546</text:p>
          </table:table-cell>
          <table:table-cell table:style-name="ce41" office:value-type="float" office:value="931" calcext:value-type="float">
            <text:p>931</text:p>
          </table:table-cell>
          <table:table-cell table:style-name="ce45" office:value-type="float" office:value="859" calcext:value-type="float">
            <text:p>859</text:p>
          </table:table-cell>
          <table:table-cell table:style-name="ce53" table:formula="of:=SUM([.D701:.H701])" office:value-type="float" office:value="4578" calcext:value-type="float">
            <text:p>4578</text:p>
          </table:table-cell>
          <table:table-cell table:style-name="ce60" office:value-type="string" calcext:value-type="string">
            <text:p>Quicken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01]=126;70;IF([.T701]=112;70;IF([.T701]=98;70;IF([.T701]=96;60;IF([.T701]=84;60;IF([.T701]=108;60;IF([.T701]=90;50;IF([.T701]=72;40;IF([.T701]=80;40;IF([.T701]=100;50;IF([.T701]=54;30;IF([.T701]=36;20;IF([.T701]=18;10;IF([.T70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defenderoftexel/images/thumb/f/f9/Ubaratutu_Icon.png/50px-Ubaratut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baratutu&quot;; &quot;Ubaratutu&quot;)" office:value-type="string" office:string-value="Ubaratutu" calcext:value-type="string">
            <text:p>Ubaratutu</text:p>
          </table:table-cell>
          <table:table-cell table:style-name="ce25"/>
          <table:table-cell table:style-name="ce28" office:value-type="float" office:value="3879" calcext:value-type="float">
            <text:p>3879</text:p>
          </table:table-cell>
          <table:table-cell table:style-name="ce33" office:value-type="float" office:value="4890" calcext:value-type="float">
            <text:p>4890</text:p>
          </table:table-cell>
          <table:table-cell table:style-name="ce37" office:value-type="float" office:value="1282" calcext:value-type="float">
            <text:p>1282</text:p>
          </table:table-cell>
          <table:table-cell table:style-name="ce41" office:value-type="float" office:value="4462" calcext:value-type="float">
            <text:p>4462</text:p>
          </table:table-cell>
          <table:table-cell table:style-name="ce45" office:value-type="float" office:value="852" calcext:value-type="float">
            <text:p>852</text:p>
          </table:table-cell>
          <table:table-cell table:style-name="ce53" table:formula="of:=SUM([.D702:.H702])" office:value-type="float" office:value="15365" calcext:value-type="float">
            <text:p>15365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Retaliat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02]=126;70;IF([.T702]=112;70;IF([.T702]=98;70;IF([.T702]=96;60;IF([.T702]=84;60;IF([.T702]=108;60;IF([.T702]=90;50;IF([.T702]=72;40;IF([.T702]=80;40;IF([.T702]=100;50;IF([.T702]=54;30;IF([.T702]=36;20;IF([.T702]=18;10;IF([.T70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723181804/defenderoftexel/images/4/4f/Ud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Igmar_-_Wana_-_Udo&quot;; &quot;Udo&quot;)" office:value-type="string" office:string-value="Udo" calcext:value-type="string">
            <text:p>Udo</text:p>
          </table:table-cell>
          <table:table-cell table:style-name="ce25"/>
          <table:table-cell table:style-name="ce28" office:value-type="float" office:value="4559" calcext:value-type="float">
            <text:p>4559</text:p>
          </table:table-cell>
          <table:table-cell table:style-name="ce33" office:value-type="float" office:value="6956" calcext:value-type="float">
            <text:p>6956</text:p>
          </table:table-cell>
          <table:table-cell table:style-name="ce37" office:value-type="float" office:value="2374" calcext:value-type="float">
            <text:p>2374</text:p>
          </table:table-cell>
          <table:table-cell table:style-name="ce41" office:value-type="float" office:value="1441" calcext:value-type="float">
            <text:p>1441</text:p>
          </table:table-cell>
          <table:table-cell table:style-name="ce45" office:value-type="float" office:value="7217" calcext:value-type="float">
            <text:p>7217</text:p>
          </table:table-cell>
          <table:table-cell table:style-name="ce53" table:formula="of:=SUM([.D703:.H703])" office:value-type="float" office:value="22547" calcext:value-type="float">
            <text:p>22547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03]=126;70;IF([.T703]=112;70;IF([.T703]=98;70;IF([.T703]=96;60;IF([.T703]=84;60;IF([.T703]=108;60;IF([.T703]=90;50;IF([.T703]=72;40;IF([.T703]=80;40;IF([.T703]=100;50;IF([.T703]=54;30;IF([.T703]=36;20;IF([.T703]=18;10;IF([.T70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c/c5/Ukan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kani&quot;;&quot;Ukani&quot;)" office:value-type="string" office:string-value="Ukani" calcext:value-type="string">
            <text:p>Ukani</text:p>
          </table:table-cell>
          <table:table-cell table:style-name="ce25"/>
          <table:table-cell table:style-name="ce28" office:value-type="float" office:value="3200" calcext:value-type="float">
            <text:p>3200</text:p>
          </table:table-cell>
          <table:table-cell table:style-name="ce33" office:value-type="float" office:value="3415" calcext:value-type="float">
            <text:p>3415</text:p>
          </table:table-cell>
          <table:table-cell table:style-name="ce37" office:value-type="float" office:value="1663" calcext:value-type="float">
            <text:p>1663</text:p>
          </table:table-cell>
          <table:table-cell table:style-name="ce41" office:value-type="float" office:value="2776" calcext:value-type="float">
            <text:p>2776</text:p>
          </table:table-cell>
          <table:table-cell table:style-name="ce45" office:value-type="float" office:value="2570" calcext:value-type="float">
            <text:p>2570</text:p>
          </table:table-cell>
          <table:table-cell table:style-name="ce53" table:formula="of:=SUM([.D704:.H704])" office:value-type="float" office:value="13624" calcext:value-type="float">
            <text:p>13624</text:p>
          </table:table-cell>
          <table:table-cell table:style-name="ce60" office:value-type="string" calcext:value-type="string">
            <text:p>Dispiri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Scout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04]=126;70;IF([.T704]=112;70;IF([.T704]=98;70;IF([.T704]=96;60;IF([.T704]=84;60;IF([.T704]=108;60;IF([.T704]=90;50;IF([.T704]=72;40;IF([.T704]=80;40;IF([.T704]=100;50;IF([.T704]=54;30;IF([.T704]=36;20;IF([.T704]=18;10;IF([.T70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12135920/defenderoftexel/images/thumb/9/9d/Sippar_Icon.png/50px-Sipp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Larsa_-_Sippar_-_Umma&quot;;&quot;Umma&quot;)" office:value-type="string" office:string-value="Umma" calcext:value-type="string">
            <text:p>Umma</text:p>
          </table:table-cell>
          <table:table-cell table:style-name="ce25"/>
          <table:table-cell table:style-name="ce28" office:value-type="float" office:value="8794" calcext:value-type="float">
            <text:p>8794</text:p>
          </table:table-cell>
          <table:table-cell table:style-name="ce33" office:value-type="float" office:value="6250" calcext:value-type="float">
            <text:p>6250</text:p>
          </table:table-cell>
          <table:table-cell table:style-name="ce37" office:value-type="float" office:value="7282" calcext:value-type="float">
            <text:p>7282</text:p>
          </table:table-cell>
          <table:table-cell table:style-name="ce41" office:value-type="float" office:value="760" calcext:value-type="float">
            <text:p>760</text:p>
          </table:table-cell>
          <table:table-cell table:style-name="ce45" office:value-type="float" office:value="936" calcext:value-type="float">
            <text:p>936</text:p>
          </table:table-cell>
          <table:table-cell table:style-name="ce53" table:formula="of:=SUM([.D705:.H705])" office:value-type="float" office:value="24022" calcext:value-type="float">
            <text:p>24022</text:p>
          </table:table-cell>
          <table:table-cell table:style-name="ce60" office:value-type="string" calcext:value-type="string">
            <text:p>Limeligh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05]=126;70;IF([.T705]=112;70;IF([.T705]=98;70;IF([.T705]=96;60;IF([.T705]=84;60;IF([.T705]=108;60;IF([.T705]=90;50;IF([.T705]=72;40;IF([.T705]=80;40;IF([.T705]=100;50;IF([.T705]=54;30;IF([.T705]=36;20;IF([.T705]=18;10;IF([.T70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a/ac/Urhamm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rhammu&quot;; &quot;Urhammu&quot;)" office:value-type="string" office:string-value="Urhammu" calcext:value-type="string">
            <text:p>Urhammu</text:p>
          </table:table-cell>
          <table:table-cell table:style-name="ce25"/>
          <table:table-cell table:style-name="ce28" office:value-type="float" office:value="5750" calcext:value-type="float">
            <text:p>5750</text:p>
          </table:table-cell>
          <table:table-cell table:style-name="ce33" office:value-type="float" office:value="8083" calcext:value-type="float">
            <text:p>8083</text:p>
          </table:table-cell>
          <table:table-cell table:style-name="ce37" office:value-type="float" office:value="1763" calcext:value-type="float">
            <text:p>1763</text:p>
          </table:table-cell>
          <table:table-cell table:style-name="ce41" office:value-type="float" office:value="5148" calcext:value-type="float">
            <text:p>5148</text:p>
          </table:table-cell>
          <table:table-cell table:style-name="ce45" office:value-type="float" office:value="2339" calcext:value-type="float">
            <text:p>2339</text:p>
          </table:table-cell>
          <table:table-cell table:style-name="ce53" table:formula="of:=SUM([.D706:.H706])" office:value-type="float" office:value="23083" calcext:value-type="float">
            <text:p>23083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5" calcext:value-type="float">
            <text:p>5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06]=126;70;IF([.T706]=112;70;IF([.T706]=98;70;IF([.T706]=96;60;IF([.T706]=84;60;IF([.T706]=108;60;IF([.T706]=90;50;IF([.T706]=72;40;IF([.T706]=80;40;IF([.T706]=100;50;IF([.T706]=54;30;IF([.T706]=36;20;IF([.T706]=18;10;IF([.T70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3.wikia.nocookie.net/__cb20131105150108/defenderoftexel/images/thumb/7/78/Uruk_Icon.png/50px-Uruk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ruk&quot;;&quot;Uruk&quot;)" office:value-type="string" office:string-value="Uruk" calcext:value-type="string">
            <text:p>Uruk</text:p>
          </table:table-cell>
          <table:table-cell table:style-name="ce25"/>
          <table:table-cell table:style-name="ce28" office:value-type="float" office:value="4728" calcext:value-type="float">
            <text:p>4728</text:p>
          </table:table-cell>
          <table:table-cell table:style-name="ce33" office:value-type="float" office:value="7750" calcext:value-type="float">
            <text:p>7750</text:p>
          </table:table-cell>
          <table:table-cell table:style-name="ce37" office:value-type="float" office:value="3938" calcext:value-type="float">
            <text:p>3938</text:p>
          </table:table-cell>
          <table:table-cell table:style-name="ce41" office:value-type="float" office:value="6181" calcext:value-type="float">
            <text:p>6181</text:p>
          </table:table-cell>
          <table:table-cell table:style-name="ce45" office:value-type="float" office:value="767" calcext:value-type="float">
            <text:p>767</text:p>
          </table:table-cell>
          <table:table-cell table:style-name="ce53" table:formula="of:=SUM([.D707:.H707])" office:value-type="float" office:value="23364" calcext:value-type="float">
            <text:p>23364</text:p>
          </table:table-cell>
          <table:table-cell table:style-name="ce60" office:value-type="string" calcext:value-type="string">
            <text:p>Goad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07]=126;70;IF([.T707]=112;70;IF([.T707]=98;70;IF([.T707]=96;60;IF([.T707]=84;60;IF([.T707]=108;60;IF([.T707]=90;50;IF([.T707]=72;40;IF([.T707]=80;40;IF([.T707]=100;50;IF([.T707]=54;30;IF([.T707]=36;20;IF([.T707]=18;10;IF([.T70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624133000/defenderoftexel/images/thumb/7/79/Usazila_Icon.png/50px-Usazi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sazila&quot;; &quot;Usazila&quot;)" office:value-type="string" office:string-value="Usazila" calcext:value-type="string">
            <text:p>Usazila</text:p>
          </table:table-cell>
          <table:table-cell table:style-name="ce25"/>
          <table:table-cell table:style-name="ce28" office:value-type="float" office:value="2780" calcext:value-type="float">
            <text:p>2780</text:p>
          </table:table-cell>
          <table:table-cell table:style-name="ce33" office:value-type="float" office:value="2117" calcext:value-type="float">
            <text:p>2117</text:p>
          </table:table-cell>
          <table:table-cell table:style-name="ce37" office:value-type="float" office:value="1443" calcext:value-type="float">
            <text:p>1443</text:p>
          </table:table-cell>
          <table:table-cell table:style-name="ce41" office:value-type="float" office:value="2054" calcext:value-type="float">
            <text:p>2054</text:p>
          </table:table-cell>
          <table:table-cell table:style-name="ce45" office:value-type="float" office:value="5187" calcext:value-type="float">
            <text:p>5187</text:p>
          </table:table-cell>
          <table:table-cell table:style-name="ce53" table:formula="of:=SUM([.D708:.H708])" office:value-type="float" office:value="13581" calcext:value-type="float">
            <text:p>13581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08]=126;70;IF([.T708]=112;70;IF([.T708]=98;70;IF([.T708]=96;60;IF([.T708]=84;60;IF([.T708]=108;60;IF([.T708]=90;50;IF([.T708]=72;40;IF([.T708]=80;40;IF([.T708]=100;50;IF([.T708]=54;30;IF([.T708]=36;20;IF([.T708]=18;10;IF([.T70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304150326/defenderoftexel/images/thumb/9/9e/Ustpoluy_Icon.png/50px-Ustpoluy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stpoluy&quot;;&quot;Ustpoluy&quot;)" office:value-type="string" office:string-value="Ustpoluy" calcext:value-type="string">
            <text:p>Ustpoluy</text:p>
          </table:table-cell>
          <table:table-cell table:style-name="ce25"/>
          <table:table-cell table:style-name="ce28" office:value-type="float" office:value="7787" calcext:value-type="float">
            <text:p>7787</text:p>
          </table:table-cell>
          <table:table-cell table:style-name="ce33" office:value-type="float" office:value="3479" calcext:value-type="float">
            <text:p>3479</text:p>
          </table:table-cell>
          <table:table-cell table:style-name="ce37" office:value-type="float" office:value="3798" calcext:value-type="float">
            <text:p>3798</text:p>
          </table:table-cell>
          <table:table-cell table:style-name="ce41" office:value-type="float" office:value="628" calcext:value-type="float">
            <text:p>628</text:p>
          </table:table-cell>
          <table:table-cell table:style-name="ce45" office:value-type="float" office:value="688" calcext:value-type="float">
            <text:p>688</text:p>
          </table:table-cell>
          <table:table-cell table:style-name="ce53" table:formula="of:=SUM([.D709:.H709])" office:value-type="float" office:value="16380" calcext:value-type="float">
            <text:p>16380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09]=126;70;IF([.T709]=112;70;IF([.T709]=98;70;IF([.T709]=96;60;IF([.T709]=84;60;IF([.T709]=108;60;IF([.T709]=90;50;IF([.T709]=72;40;IF([.T709]=80;40;IF([.T709]=100;50;IF([.T709]=54;30;IF([.T709]=36;20;IF([.T709]=18;10;IF([.T70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7/78/Utult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Utultar&quot;; &quot;Utultar&quot;)" office:value-type="string" office:string-value="Utultar" calcext:value-type="string">
            <text:p>Utultar</text:p>
          </table:table-cell>
          <table:table-cell table:style-name="ce25"/>
          <table:table-cell table:style-name="ce28" office:value-type="float" office:value="2559" calcext:value-type="float">
            <text:p>2559</text:p>
          </table:table-cell>
          <table:table-cell table:style-name="ce33" office:value-type="float" office:value="2897" calcext:value-type="float">
            <text:p>2897</text:p>
          </table:table-cell>
          <table:table-cell table:style-name="ce37" office:value-type="float" office:value="5249" calcext:value-type="float">
            <text:p>5249</text:p>
          </table:table-cell>
          <table:table-cell table:style-name="ce41" office:value-type="float" office:value="262" calcext:value-type="float">
            <text:p>262</text:p>
          </table:table-cell>
          <table:table-cell table:style-name="ce45" office:value-type="float" office:value="224" calcext:value-type="float">
            <text:p>224</text:p>
          </table:table-cell>
          <table:table-cell table:style-name="ce53" table:formula="of:=SUM([.D710:.H710])" office:value-type="float" office:value="11191" calcext:value-type="float">
            <text:p>11191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0]=126;70;IF([.T710]=112;70;IF([.T710]=98;70;IF([.T710]=96;60;IF([.T710]=84;60;IF([.T710]=108;60;IF([.T710]=90;50;IF([.T710]=72;40;IF([.T710]=80;40;IF([.T710]=100;50;IF([.T710]=54;30;IF([.T710]=36;20;IF([.T710]=18;10;IF([.T71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43234/defenderoftexel/images/thumb/5/5d/Valiander_Icon.png/50px-Valiand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aliander&quot;; &quot;Valiander&quot;)" office:value-type="string" office:string-value="Valiander" calcext:value-type="string">
            <text:p>Valiander</text:p>
          </table:table-cell>
          <table:table-cell table:style-name="ce25"/>
          <table:table-cell table:style-name="ce28" office:value-type="float" office:value="4388" calcext:value-type="float">
            <text:p>4388</text:p>
          </table:table-cell>
          <table:table-cell table:style-name="ce33" office:value-type="float" office:value="5016" calcext:value-type="float">
            <text:p>5016</text:p>
          </table:table-cell>
          <table:table-cell table:style-name="ce37" office:value-type="float" office:value="2688" calcext:value-type="float">
            <text:p>2688</text:p>
          </table:table-cell>
          <table:table-cell table:style-name="ce41" office:value-type="float" office:value="632" calcext:value-type="float">
            <text:p>632</text:p>
          </table:table-cell>
          <table:table-cell table:style-name="ce45" office:value-type="float" office:value="842" calcext:value-type="float">
            <text:p>842</text:p>
          </table:table-cell>
          <table:table-cell table:style-name="ce53" table:formula="of:=SUM([.D711:.H711])" office:value-type="float" office:value="13566" calcext:value-type="float">
            <text:p>13566</text:p>
          </table:table-cell>
          <table:table-cell table:style-name="ce60" office:value-type="string" calcext:value-type="string">
            <text:p>Dispiri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1]=126;70;IF([.T711]=112;70;IF([.T711]=98;70;IF([.T711]=96;60;IF([.T711]=84;60;IF([.T711]=108;60;IF([.T711]=90;50;IF([.T711]=72;40;IF([.T711]=80;40;IF([.T711]=100;50;IF([.T711]=54;30;IF([.T711]=36;20;IF([.T711]=18;10;IF([.T71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7143307/defenderoftexel/images/thumb/8/8f/Vashti_Endbringer_Icon.png/50px-Vashti_Endbringe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zar_-_Gulistan_-_Vashti_Endbringer&quot;;&quot;Vashti Endbringer&quot;)" office:value-type="string" office:string-value="Vashti Endbringer" calcext:value-type="string">
            <text:p>Vashti Endbringer</text:p>
          </table:table-cell>
          <table:table-cell table:style-name="ce25"/>
          <table:table-cell table:style-name="ce28" office:value-type="float" office:value="10897" calcext:value-type="float">
            <text:p>10897</text:p>
          </table:table-cell>
          <table:table-cell table:style-name="ce33" office:value-type="float" office:value="9195" calcext:value-type="float">
            <text:p>9195</text:p>
          </table:table-cell>
          <table:table-cell table:style-name="ce37" office:value-type="float" office:value="4712" calcext:value-type="float">
            <text:p>4712</text:p>
          </table:table-cell>
          <table:table-cell table:style-name="ce41" office:value-type="float" office:value="946" calcext:value-type="float">
            <text:p>946</text:p>
          </table:table-cell>
          <table:table-cell table:style-name="ce45" office:value-type="float" office:value="3534" calcext:value-type="float">
            <text:p>3534</text:p>
          </table:table-cell>
          <table:table-cell table:style-name="ce53" table:formula="of:=SUM([.D712:.H712])" office:value-type="float" office:value="29284" calcext:value-type="float">
            <text:p>29284</text:p>
          </table:table-cell>
          <table:table-cell table:style-name="ce60" office:value-type="string" calcext:value-type="string">
            <text:p>Cahoots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712]=126;70;IF([.T712]=112;70;IF([.T712]=98;70;IF([.T712]=96;60;IF([.T712]=84;60;IF([.T712]=108;60;IF([.T712]=90;50;IF([.T712]=72;40;IF([.T712]=80;40;IF([.T712]=100;50;IF([.T712]=54;30;IF([.T712]=36;20;IF([.T712]=18;10;IF([.T71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34060/defenderoftexel/images/thumb/0/03/Velthur_Icon.png/50px-Velthu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elthur&quot;; &quot;Velthur&quot;)" office:value-type="string" office:string-value="Velthur" calcext:value-type="string">
            <text:p>Velthur</text:p>
          </table:table-cell>
          <table:table-cell table:style-name="ce25"/>
          <table:table-cell table:style-name="ce28" office:value-type="float" office:value="4368" calcext:value-type="float">
            <text:p>4368</text:p>
          </table:table-cell>
          <table:table-cell table:style-name="ce33" office:value-type="float" office:value="4992" calcext:value-type="float">
            <text:p>4992</text:p>
          </table:table-cell>
          <table:table-cell table:style-name="ce37" office:value-type="float" office:value="2676" calcext:value-type="float">
            <text:p>2676</text:p>
          </table:table-cell>
          <table:table-cell table:style-name="ce41" office:value-type="float" office:value="629" calcext:value-type="float">
            <text:p>629</text:p>
          </table:table-cell>
          <table:table-cell table:style-name="ce45" office:value-type="float" office:value="837" calcext:value-type="float">
            <text:p>837</text:p>
          </table:table-cell>
          <table:table-cell table:style-name="ce53" table:formula="of:=SUM([.D713:.H713])" office:value-type="float" office:value="13502" calcext:value-type="float">
            <text:p>13502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3]=126;70;IF([.T713]=112;70;IF([.T713]=98;70;IF([.T713]=96;60;IF([.T713]=84;60;IF([.T713]=108;60;IF([.T713]=90;50;IF([.T713]=72;40;IF([.T713]=80;40;IF([.T713]=100;50;IF([.T713]=54;30;IF([.T713]=36;20;IF([.T713]=18;10;IF([.T71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40114141237/defenderoftexel/images/thumb/4/4d/Velthuria_Icon.png/50px-Velthuri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elthuria&quot;; &quot;Velthuria&quot;)" office:value-type="string" office:string-value="Velthuria" calcext:value-type="string">
            <text:p>Velthuria</text:p>
          </table:table-cell>
          <table:table-cell table:style-name="ce25"/>
          <table:table-cell table:style-name="ce28" office:value-type="float" office:value="2802" calcext:value-type="float">
            <text:p>2802</text:p>
          </table:table-cell>
          <table:table-cell table:style-name="ce33" office:value-type="float" office:value="2136" calcext:value-type="float">
            <text:p>2136</text:p>
          </table:table-cell>
          <table:table-cell table:style-name="ce37" office:value-type="float" office:value="1455" calcext:value-type="float">
            <text:p>1455</text:p>
          </table:table-cell>
          <table:table-cell table:style-name="ce41" office:value-type="float" office:value="2068" calcext:value-type="float">
            <text:p>2068</text:p>
          </table:table-cell>
          <table:table-cell table:style-name="ce45" office:value-type="float" office:value="5225" calcext:value-type="float">
            <text:p>5225</text:p>
          </table:table-cell>
          <table:table-cell table:style-name="ce53" table:formula="of:=SUM([.D714:.H714])" office:value-type="float" office:value="13686" calcext:value-type="float">
            <text:p>13686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4]=126;70;IF([.T714]=112;70;IF([.T714]=98;70;IF([.T714]=96;60;IF([.T714]=84;60;IF([.T714]=108;60;IF([.T714]=90;50;IF([.T714]=72;40;IF([.T714]=80;40;IF([.T714]=100;50;IF([.T714]=54;30;IF([.T714]=36;20;IF([.T714]=18;10;IF([.T71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1.wikia.nocookie.net/__cb20130428043234/defenderoftexel/images/thumb/6/65/Verdalance_Icon.png/50px-Verdalanc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erdalance&quot;; &quot;Verdalance&quot;)" office:value-type="string" office:string-value="Verdalance" calcext:value-type="string">
            <text:p>Verdalance</text:p>
          </table:table-cell>
          <table:table-cell table:style-name="ce25"/>
          <table:table-cell table:style-name="ce28" office:value-type="float" office:value="3178" calcext:value-type="float">
            <text:p>3178</text:p>
          </table:table-cell>
          <table:table-cell table:style-name="ce33" office:value-type="float" office:value="3611" calcext:value-type="float">
            <text:p>3611</text:p>
          </table:table-cell>
          <table:table-cell table:style-name="ce37" office:value-type="float" office:value="1988" calcext:value-type="float">
            <text:p>1988</text:p>
          </table:table-cell>
          <table:table-cell table:style-name="ce41" office:value-type="float" office:value="481" calcext:value-type="float">
            <text:p>481</text:p>
          </table:table-cell>
          <table:table-cell table:style-name="ce45" office:value-type="float" office:value="640" calcext:value-type="float">
            <text:p>640</text:p>
          </table:table-cell>
          <table:table-cell table:style-name="ce53" table:formula="of:=SUM([.D715:.H715])" office:value-type="float" office:value="9898" calcext:value-type="float">
            <text:p>9898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5]=126;70;IF([.T715]=112;70;IF([.T715]=98;70;IF([.T715]=96;60;IF([.T715]=84;60;IF([.T715]=108;60;IF([.T715]=90;50;IF([.T715]=72;40;IF([.T715]=80;40;IF([.T715]=100;50;IF([.T715]=54;30;IF([.T715]=36;20;IF([.T715]=18;10;IF([.T71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0428044117/defenderoftexel/images/thumb/6/62/Vermilitas_Icon.png/50px-Vermilita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ermilitas&quot;; &quot;Vermilitas&quot;)" office:value-type="string" office:string-value="Vermilitas" calcext:value-type="string">
            <text:p>Vermilitas</text:p>
          </table:table-cell>
          <table:table-cell table:style-name="ce25"/>
          <table:table-cell table:style-name="ce28" office:value-type="float" office:value="3364" calcext:value-type="float">
            <text:p>3364</text:p>
          </table:table-cell>
          <table:table-cell table:style-name="ce33" office:value-type="float" office:value="3819" calcext:value-type="float">
            <text:p>3819</text:p>
          </table:table-cell>
          <table:table-cell table:style-name="ce37" office:value-type="float" office:value="2104" calcext:value-type="float">
            <text:p>2104</text:p>
          </table:table-cell>
          <table:table-cell table:style-name="ce41" office:value-type="float" office:value="513" calcext:value-type="float">
            <text:p>513</text:p>
          </table:table-cell>
          <table:table-cell table:style-name="ce45" office:value-type="float" office:value="677" calcext:value-type="float">
            <text:p>677</text:p>
          </table:table-cell>
          <table:table-cell table:style-name="ce53" table:formula="of:=SUM([.D716:.H716])" office:value-type="float" office:value="10477" calcext:value-type="float">
            <text:p>10477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6]=126;70;IF([.T716]=112;70;IF([.T716]=98;70;IF([.T716]=96;60;IF([.T716]=84;60;IF([.T716]=108;60;IF([.T716]=90;50;IF([.T716]=72;40;IF([.T716]=80;40;IF([.T716]=100;50;IF([.T716]=54;30;IF([.T716]=36;20;IF([.T716]=18;10;IF([.T71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d/d2/Vivin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lfia_-_Nerinai_-_Vivinna&quot;; &quot;Vivinna&quot;)" office:value-type="string" office:string-value="Vivinna" calcext:value-type="string">
            <text:p>Vivinna</text:p>
          </table:table-cell>
          <table:table-cell table:style-name="ce25"/>
          <table:table-cell table:style-name="ce28" office:value-type="float" office:value="2856" calcext:value-type="float">
            <text:p>2856</text:p>
          </table:table-cell>
          <table:table-cell table:style-name="ce33" office:value-type="float" office:value="4341" calcext:value-type="float">
            <text:p>4341</text:p>
          </table:table-cell>
          <table:table-cell table:style-name="ce37" office:value-type="float" office:value="1482" calcext:value-type="float">
            <text:p>1482</text:p>
          </table:table-cell>
          <table:table-cell table:style-name="ce41" office:value-type="float" office:value="892" calcext:value-type="float">
            <text:p>892</text:p>
          </table:table-cell>
          <table:table-cell table:style-name="ce45" office:value-type="float" office:value="4503" calcext:value-type="float">
            <text:p>4503</text:p>
          </table:table-cell>
          <table:table-cell table:style-name="ce53" table:formula="of:=SUM([.D717:.H717])" office:value-type="float" office:value="14074" calcext:value-type="float">
            <text:p>14074</text:p>
          </table:table-cell>
          <table:table-cell table:style-name="ce60" office:value-type="string" calcext:value-type="string">
            <text:p>Preemp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7]=126;70;IF([.T717]=112;70;IF([.T717]=98;70;IF([.T717]=96;60;IF([.T717]=84;60;IF([.T717]=108;60;IF([.T717]=90;50;IF([.T717]=72;40;IF([.T717]=80;40;IF([.T717]=100;50;IF([.T717]=54;30;IF([.T717]=36;20;IF([.T717]=18;10;IF([.T71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1.wikia.nocookie.net/defenderoftexel/images/4/4e/Voider_Icon.png/revision/latest?cb=20150506134959&quot;)" office:value-type="string" office:string-value="" calcext:value-type="error">
            <text:p>#NAME?</text:p>
          </table:table-cell>
          <table:table-cell table:style-name="ce11" table:formula="of:=HYPERLINK(&quot;http://defenderoftexel.wikia.com/wiki/Quwha_-_Nittiatte_-_Voider&quot;;&quot;Voider&quot;)" office:value-type="string" office:string-value="Voider" calcext:value-type="string">
            <text:p>Voider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9928" calcext:value-type="float">
            <text:p>9928</text:p>
          </table:table-cell>
          <table:table-cell table:style-name="ce32" office:value-type="float" office:value="18009" calcext:value-type="float">
            <text:p>18009</text:p>
          </table:table-cell>
          <table:table-cell table:style-name="ce36" office:value-type="float" office:value="6007" calcext:value-type="float">
            <text:p>6007</text:p>
          </table:table-cell>
          <table:table-cell table:style-name="ce40" office:value-type="float" office:value="6793" calcext:value-type="float">
            <text:p>6793</text:p>
          </table:table-cell>
          <table:table-cell table:style-name="ce44" office:value-type="float" office:value="2398" calcext:value-type="float">
            <text:p>2398</text:p>
          </table:table-cell>
          <table:table-cell table:style-name="ce52" table:formula="of:=SUM([.D718:.H718])" office:value-type="float" office:value="43135" calcext:value-type="float">
            <text:p>43135</text:p>
          </table:table-cell>
          <table:table-cell table:style-name="ce59" office:value-type="string" calcext:value-type="string">
            <text:p>Elecbomb 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Elite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Champ</text:p>
          </table:table-cell>
          <table:table-cell table:style-name="ce67" office:value-type="string" calcext:value-type="string">
            <text:p>Lightning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67" table:formula="of:=IF([.T718]=126;70;IF([.T718]=112;70;IF([.T718]=98;70;IF([.T718]=96;60;IF([.T718]=84;60;IF([.T718]=108;60;IF([.T718]=90;50;IF([.T718]=72;40;IF([.T718]=80;40;IF([.T718]=100;50;IF([.T718]=54;30;IF([.T718]=36;20;IF([.T718]=18;10;IF([.T718]=60;30))))))))))))))" office:value-type="float" office:value="70" calcext:value-type="float">
            <text:p>70</text:p>
          </table:table-cell>
          <table:table-cell table:style-name="ce67" office:value-type="float" office:value="126" calcext:value-type="float">
            <text:p>12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a/Volaikh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unnelas&quot;; &quot;Volaikha&quot;)" office:value-type="string" office:string-value="Volaikha" calcext:value-type="string">
            <text:p>Volaikha</text:p>
          </table:table-cell>
          <table:table-cell table:style-name="ce25"/>
          <table:table-cell table:style-name="ce28" office:value-type="float" office:value="2078" calcext:value-type="float">
            <text:p>2078</text:p>
          </table:table-cell>
          <table:table-cell table:style-name="ce33" office:value-type="float" office:value="4831" calcext:value-type="float">
            <text:p>4831</text:p>
          </table:table-cell>
          <table:table-cell table:style-name="ce37" office:value-type="float" office:value="1055" calcext:value-type="float">
            <text:p>1055</text:p>
          </table:table-cell>
          <table:table-cell table:style-name="ce41" office:value-type="float" office:value="4589" calcext:value-type="float">
            <text:p>4589</text:p>
          </table:table-cell>
          <table:table-cell table:style-name="ce45" office:value-type="float" office:value="1397" calcext:value-type="float">
            <text:p>1397</text:p>
          </table:table-cell>
          <table:table-cell table:style-name="ce53" table:formula="of:=SUM([.D719:.H719])" office:value-type="float" office:value="13950" calcext:value-type="float">
            <text:p>13950</text:p>
          </table:table-cell>
          <table:table-cell table:style-name="ce60" office:value-type="string" calcext:value-type="string">
            <text:p>Thwa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19]=126;70;IF([.T719]=112;70;IF([.T719]=98;70;IF([.T719]=96;60;IF([.T719]=84;60;IF([.T719]=108;60;IF([.T719]=90;50;IF([.T719]=72;40;IF([.T719]=80;40;IF([.T719]=100;50;IF([.T719]=54;30;IF([.T719]=36;20;IF([.T719]=18;10;IF([.T71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34059/defenderoftexel/images/thumb/b/b0/Vulca_Icon.png/50px-Vulc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Vulca&quot;; &quot;Vulca&quot;)" office:value-type="string" office:string-value="Vulca" calcext:value-type="string">
            <text:p>Vulca</text:p>
          </table:table-cell>
          <table:table-cell table:style-name="ce25"/>
          <table:table-cell table:style-name="ce28" office:value-type="float" office:value="1983" calcext:value-type="float">
            <text:p>1983</text:p>
          </table:table-cell>
          <table:table-cell table:style-name="ce33" office:value-type="float" office:value="4615" calcext:value-type="float">
            <text:p>4615</text:p>
          </table:table-cell>
          <table:table-cell table:style-name="ce37" office:value-type="float" office:value="1005" calcext:value-type="float">
            <text:p>1005</text:p>
          </table:table-cell>
          <table:table-cell table:style-name="ce41" office:value-type="float" office:value="4381" calcext:value-type="float">
            <text:p>4381</text:p>
          </table:table-cell>
          <table:table-cell table:style-name="ce45" office:value-type="float" office:value="1335" calcext:value-type="float">
            <text:p>1335</text:p>
          </table:table-cell>
          <table:table-cell table:style-name="ce53" table:formula="of:=SUM([.D720:.H720])" office:value-type="float" office:value="13319" calcext:value-type="float">
            <text:p>13319</text:p>
          </table:table-cell>
          <table:table-cell table:style-name="ce60" office:value-type="string" calcext:value-type="string">
            <text:p>Divvy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0]=126;70;IF([.T720]=112;70;IF([.T720]=98;70;IF([.T720]=96;60;IF([.T720]=84;60;IF([.T720]=108;60;IF([.T720]=90;50;IF([.T720]=72;40;IF([.T720]=80;40;IF([.T720]=100;50;IF([.T720]=54;30;IF([.T720]=36;20;IF([.T720]=18;10;IF([.T72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4.wikia.nocookie.net/defenderoftexel/images/1/1c/Wardu_Icon.png/revision/latest?cb=20141014145319&quot;)" office:value-type="string" office:string-value="" calcext:value-type="error">
            <text:p>#NAME?</text:p>
          </table:table-cell>
          <table:table-cell table:style-name="ce11" table:formula="of:=HYPERLINK(&quot;http://defenderoftexel.wikia.com/wiki/Wardu_-_Magaru_-_Apputtu&quot;;&quot;Wardu&quot;)" office:value-type="string" office:string-value="Wardu" calcext:value-type="string">
            <text:p>Wardu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52" table:formula="of:=SUM([.D721:.H721])" office:value-type="float" office:value="5" calcext:value-type="float">
            <text:p>5</text:p>
          </table:table-cell>
          <table:table-cell table:style-name="ce6" table:number-columns-repeated="4"/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Theri</text:p>
          </table:table-cell>
          <table:table-cell table:style-name="ce70" office:value-type="string" calcext:value-type="string">
            <text:p>U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21]=126;70;IF([.T721]=112;70;IF([.T721]=98;70;IF([.T721]=96;60;IF([.T721]=84;60;IF([.T721]=108;60;IF([.T721]=90;50;IF([.T721]=72;40;IF([.T721]=80;40;IF([.T721]=100;50;IF([.T721]=54;30;IF([.T721]=36;20;IF([.T721]=18;10;IF([.T721]=60;30))))))))))))))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7150441/defenderoftexel/images/thumb/9/94/Weejabee_Icon.png/50px-Weejabe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Rimerobin_-_Pucklenuck_-_Weejabee&quot;;&quot;Weejabee&quot;)" office:value-type="string" office:string-value="Weejabee" calcext:value-type="string">
            <text:p>Weejabee</text:p>
          </table:table-cell>
          <table:table-cell table:style-name="ce25"/>
          <table:table-cell table:style-name="ce28" office:value-type="float" office:value="7477" calcext:value-type="float">
            <text:p>7477</text:p>
          </table:table-cell>
          <table:table-cell table:style-name="ce33" office:value-type="float" office:value="10500" calcext:value-type="float">
            <text:p>10500</text:p>
          </table:table-cell>
          <table:table-cell table:style-name="ce37" office:value-type="float" office:value="2296" calcext:value-type="float">
            <text:p>2296</text:p>
          </table:table-cell>
          <table:table-cell table:style-name="ce41" office:value-type="float" office:value="6697" calcext:value-type="float">
            <text:p>6697</text:p>
          </table:table-cell>
          <table:table-cell table:style-name="ce45" office:value-type="float" office:value="3048" calcext:value-type="float">
            <text:p>3048</text:p>
          </table:table-cell>
          <table:table-cell table:style-name="ce53" table:formula="of:=SUM([.D722:.H722])" office:value-type="float" office:value="30018" calcext:value-type="float">
            <text:p>30018</text:p>
          </table:table-cell>
          <table:table-cell table:style-name="ce60" office:value-type="string" calcext:value-type="string">
            <text:p>Coldsnap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722]=126;70;IF([.T722]=112;70;IF([.T722]=98;70;IF([.T722]=96;60;IF([.T722]=84;60;IF([.T722]=108;60;IF([.T722]=90;50;IF([.T722]=72;40;IF([.T722]=80;40;IF([.T722]=100;50;IF([.T722]=54;30;IF([.T722]=36;20;IF([.T722]=18;10;IF([.T72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24259/defenderoftexel/images/7/7f/Wel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ela&quot;; &quot;Wela&quot;)" office:value-type="string" office:string-value="Wela" calcext:value-type="string">
            <text:p>Wela</text:p>
          </table:table-cell>
          <table:table-cell table:style-name="ce25"/>
          <table:table-cell table:style-name="ce28" office:value-type="float" office:value="1096" calcext:value-type="float">
            <text:p>1096</text:p>
          </table:table-cell>
          <table:table-cell table:style-name="ce33" office:value-type="float" office:value="767" calcext:value-type="float">
            <text:p>767</text:p>
          </table:table-cell>
          <table:table-cell table:style-name="ce37" office:value-type="float" office:value="495" calcext:value-type="float">
            <text:p>495</text:p>
          </table:table-cell>
          <table:table-cell table:style-name="ce41" office:value-type="float" office:value="3149" calcext:value-type="float">
            <text:p>3149</text:p>
          </table:table-cell>
          <table:table-cell table:style-name="ce45" office:value-type="float" office:value="3000" calcext:value-type="float">
            <text:p>3000</text:p>
          </table:table-cell>
          <table:table-cell table:style-name="ce53" table:formula="of:=SUM([.D723:.H723])" office:value-type="float" office:value="8507" calcext:value-type="float">
            <text:p>8507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3]=126;70;IF([.T723]=112;70;IF([.T723]=98;70;IF([.T723]=96;60;IF([.T723]=84;60;IF([.T723]=108;60;IF([.T723]=90;50;IF([.T723]=72;40;IF([.T723]=80;40;IF([.T723]=100;50;IF([.T723]=54;30;IF([.T723]=36;20;IF([.T723]=18;10;IF([.T72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428034055/defenderoftexel/images/thumb/c/cb/Wigo_Icon.png/40px-Wigo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igo&quot;; &quot;Wigo&quot;)" office:value-type="string" office:string-value="Wigo" calcext:value-type="string">
            <text:p>Wigo</text:p>
          </table:table-cell>
          <table:table-cell table:style-name="ce25"/>
          <table:table-cell table:style-name="ce28" office:value-type="float" office:value="1734" calcext:value-type="float">
            <text:p>1734</text:p>
          </table:table-cell>
          <table:table-cell table:style-name="ce33" office:value-type="float" office:value="1218" calcext:value-type="float">
            <text:p>1218</text:p>
          </table:table-cell>
          <table:table-cell table:style-name="ce37" office:value-type="float" office:value="785" calcext:value-type="float">
            <text:p>785</text:p>
          </table:table-cell>
          <table:table-cell table:style-name="ce41" office:value-type="float" office:value="4989" calcext:value-type="float">
            <text:p>4989</text:p>
          </table:table-cell>
          <table:table-cell table:style-name="ce45" office:value-type="float" office:value="4749" calcext:value-type="float">
            <text:p>4749</text:p>
          </table:table-cell>
          <table:table-cell table:style-name="ce53" table:formula="of:=SUM([.D724:.H724])" office:value-type="float" office:value="13475" calcext:value-type="float">
            <text:p>13475</text:p>
          </table:table-cell>
          <table:table-cell table:style-name="ce60" office:value-type="string" calcext:value-type="string">
            <text:p>Flodd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4]=126;70;IF([.T724]=112;70;IF([.T724]=98;70;IF([.T724]=96;60;IF([.T724]=84;60;IF([.T724]=108;60;IF([.T724]=90;50;IF([.T724]=72;40;IF([.T724]=80;40;IF([.T724]=100;50;IF([.T724]=54;30;IF([.T724]=36;20;IF([.T724]=18;10;IF([.T72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f/Willibrord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Eoban_-_Robbert_-_Willibrord&quot;; &quot;Willibrord&quot;)" office:value-type="string" office:string-value="Willibrord" calcext:value-type="string">
            <text:p>Willibrord</text:p>
          </table:table-cell>
          <table:table-cell table:style-name="ce25"/>
          <table:table-cell table:style-name="ce28" office:value-type="float" office:value="5643" calcext:value-type="float">
            <text:p>5643</text:p>
          </table:table-cell>
          <table:table-cell table:style-name="ce33" office:value-type="float" office:value="7934" calcext:value-type="float">
            <text:p>7934</text:p>
          </table:table-cell>
          <table:table-cell table:style-name="ce37" office:value-type="float" office:value="1729" calcext:value-type="float">
            <text:p>1729</text:p>
          </table:table-cell>
          <table:table-cell table:style-name="ce41" office:value-type="float" office:value="5054" calcext:value-type="float">
            <text:p>5054</text:p>
          </table:table-cell>
          <table:table-cell table:style-name="ce45" office:value-type="float" office:value="2296" calcext:value-type="float">
            <text:p>2296</text:p>
          </table:table-cell>
          <table:table-cell table:style-name="ce53" table:formula="of:=SUM([.D725:.H725])" office:value-type="float" office:value="22656" calcext:value-type="float">
            <text:p>22656</text:p>
          </table:table-cell>
          <table:table-cell table:style-name="ce60" office:value-type="string" calcext:value-type="string">
            <text:p>Scour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25]=126;70;IF([.T725]=112;70;IF([.T725]=98;70;IF([.T725]=96;60;IF([.T725]=84;60;IF([.T725]=108;60;IF([.T725]=90;50;IF([.T725]=72;40;IF([.T725]=80;40;IF([.T725]=100;50;IF([.T725]=54;30;IF([.T725]=36;20;IF([.T725]=18;10;IF([.T72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2.wikia.nocookie.net/__cb20131119155416/defenderoftexel/images/thumb/4/42/Windelmar_Icon.png/50px-Windelmar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Ato_-_Udno_-_Windelmar&quot;;&quot;Windelmar&quot;)" office:value-type="string" office:string-value="Windelmar" calcext:value-type="string">
            <text:p>Windelmar</text:p>
          </table:table-cell>
          <table:table-cell table:style-name="ce25"/>
          <table:table-cell table:style-name="ce28" office:value-type="float" office:value="3073" calcext:value-type="float">
            <text:p>3073</text:p>
          </table:table-cell>
          <table:table-cell table:style-name="ce33" office:value-type="float" office:value="2161" calcext:value-type="float">
            <text:p>2161</text:p>
          </table:table-cell>
          <table:table-cell table:style-name="ce37" office:value-type="float" office:value="1397" calcext:value-type="float">
            <text:p>1397</text:p>
          </table:table-cell>
          <table:table-cell table:style-name="ce41" office:value-type="float" office:value="8860" calcext:value-type="float">
            <text:p>8860</text:p>
          </table:table-cell>
          <table:table-cell table:style-name="ce45" office:value-type="float" office:value="8431" calcext:value-type="float">
            <text:p>8431</text:p>
          </table:table-cell>
          <table:table-cell table:style-name="ce53" table:formula="of:=SUM([.D726:.H726])" office:value-type="float" office:value="23922" calcext:value-type="float">
            <text:p>23922</text:p>
          </table:table-cell>
          <table:table-cell table:style-name="ce60" office:value-type="string" calcext:value-type="string">
            <text:p>Billow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26]=126;70;IF([.T726]=112;70;IF([.T726]=98;70;IF([.T726]=96;60;IF([.T726]=84;60;IF([.T726]=108;60;IF([.T726]=90;50;IF([.T726]=72;40;IF([.T726]=80;40;IF([.T726]=100;50;IF([.T726]=54;30;IF([.T726]=36;20;IF([.T726]=18;10;IF([.T72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41330/defenderoftexel/images/thumb/2/24/Witchberry_Icon.png/50px-Witchberry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itchberry&quot;; &quot;Witchberry&quot;)" office:value-type="string" office:string-value="Witchberry" calcext:value-type="string">
            <text:p>Witchberry</text:p>
          </table:table-cell>
          <table:table-cell table:style-name="ce25"/>
          <table:table-cell table:style-name="ce28" office:value-type="float" office:value="715" calcext:value-type="float">
            <text:p>715</text:p>
          </table:table-cell>
          <table:table-cell table:style-name="ce33" office:value-type="float" office:value="502" calcext:value-type="float">
            <text:p>502</text:p>
          </table:table-cell>
          <table:table-cell table:style-name="ce37" office:value-type="float" office:value="320" calcext:value-type="float">
            <text:p>320</text:p>
          </table:table-cell>
          <table:table-cell table:style-name="ce41" office:value-type="float" office:value="2106" calcext:value-type="float">
            <text:p>2106</text:p>
          </table:table-cell>
          <table:table-cell table:style-name="ce45" office:value-type="float" office:value="1998" calcext:value-type="float">
            <text:p>1998</text:p>
          </table:table-cell>
          <table:table-cell table:style-name="ce53" table:formula="of:=SUM([.D727:.H727])" office:value-type="float" office:value="5641" calcext:value-type="float">
            <text:p>5641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Novic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R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7]=126;70;IF([.T727]=112;70;IF([.T727]=98;70;IF([.T727]=96;60;IF([.T727]=84;60;IF([.T727]=108;60;IF([.T727]=90;50;IF([.T727]=72;40;IF([.T727]=80;40;IF([.T727]=100;50;IF([.T727]=54;30;IF([.T727]=36;20;IF([.T727]=18;10;IF([.T72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e/ec/Wrangoliath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tarkmole_-_Gripgrok_-_Wrangoliath&quot;; &quot;Wrangoliath&quot;)" office:value-type="string" office:string-value="Wrangoliath" calcext:value-type="string">
            <text:p>Wrangoliath</text:p>
          </table:table-cell>
          <table:table-cell table:style-name="ce25"/>
          <table:table-cell table:style-name="ce28" office:value-type="float" office:value="2032" calcext:value-type="float">
            <text:p>2032</text:p>
          </table:table-cell>
          <table:table-cell table:style-name="ce33" office:value-type="float" office:value="4727" calcext:value-type="float">
            <text:p>4727</text:p>
          </table:table-cell>
          <table:table-cell table:style-name="ce37" office:value-type="float" office:value="1031" calcext:value-type="float">
            <text:p>1031</text:p>
          </table:table-cell>
          <table:table-cell table:style-name="ce41" office:value-type="float" office:value="4488" calcext:value-type="float">
            <text:p>4488</text:p>
          </table:table-cell>
          <table:table-cell table:style-name="ce45" office:value-type="float" office:value="1368" calcext:value-type="float">
            <text:p>1368</text:p>
          </table:table-cell>
          <table:table-cell table:style-name="ce53" table:formula="of:=SUM([.D728:.H728])" office:value-type="float" office:value="13646" calcext:value-type="float">
            <text:p>13646</text:p>
          </table:table-cell>
          <table:table-cell table:style-name="ce60" office:value-type="string" calcext:value-type="string">
            <text:p>Thwart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8]=126;70;IF([.T728]=112;70;IF([.T728]=98;70;IF([.T728]=96;60;IF([.T728]=84;60;IF([.T728]=108;60;IF([.T728]=90;50;IF([.T728]=72;40;IF([.T728]=80;40;IF([.T728]=100;50;IF([.T728]=54;30;IF([.T728]=36;20;IF([.T728]=18;10;IF([.T72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0/0d/Wrekhmir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rekhmira&quot;; &quot;Wrekhmira&quot;)" office:value-type="string" office:string-value="Wrekhmira" calcext:value-type="string">
            <text:p>Wrekhmira</text:p>
          </table:table-cell>
          <table:table-cell table:style-name="ce25"/>
          <table:table-cell table:style-name="ce28" office:value-type="float" office:value="4519" calcext:value-type="float">
            <text:p>4519</text:p>
          </table:table-cell>
          <table:table-cell table:style-name="ce33" office:value-type="float" office:value="5166" calcext:value-type="float">
            <text:p>5166</text:p>
          </table:table-cell>
          <table:table-cell table:style-name="ce37" office:value-type="float" office:value="2770" calcext:value-type="float">
            <text:p>2770</text:p>
          </table:table-cell>
          <table:table-cell table:style-name="ce41" office:value-type="float" office:value="652" calcext:value-type="float">
            <text:p>652</text:p>
          </table:table-cell>
          <table:table-cell table:style-name="ce45" office:value-type="float" office:value="866" calcext:value-type="float">
            <text:p>866</text:p>
          </table:table-cell>
          <table:table-cell table:style-name="ce53" table:formula="of:=SUM([.D729:.H729])" office:value-type="float" office:value="13973" calcext:value-type="float">
            <text:p>13973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29]=126;70;IF([.T729]=112;70;IF([.T729]=98;70;IF([.T729]=96;60;IF([.T729]=84;60;IF([.T729]=108;60;IF([.T729]=90;50;IF([.T729]=72;40;IF([.T729]=80;40;IF([.T729]=100;50;IF([.T729]=54;30;IF([.T729]=36;20;IF([.T729]=18;10;IF([.T72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121165047/defenderoftexel/images/thumb/f/fc/Wurunqi_Warpslung_Icon.png/50px-Wurunqi_Warpslung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Wurunqi_Warpslung&quot;; &quot;Wurunqi Warpslung&quot;)" office:value-type="string" office:string-value="Wurunqi Warpslung" calcext:value-type="string">
            <text:p>Wurunqi Warpslung</text:p>
          </table:table-cell>
          <table:table-cell table:style-name="ce25"/>
          <table:table-cell table:style-name="ce28" office:value-type="float" office:value="4057" calcext:value-type="float">
            <text:p>4057</text:p>
          </table:table-cell>
          <table:table-cell table:style-name="ce33" office:value-type="float" office:value="5690" calcext:value-type="float">
            <text:p>5690</text:p>
          </table:table-cell>
          <table:table-cell table:style-name="ce37" office:value-type="float" office:value="1240" calcext:value-type="float">
            <text:p>1240</text:p>
          </table:table-cell>
          <table:table-cell table:style-name="ce41" office:value-type="float" office:value="3639" calcext:value-type="float">
            <text:p>3639</text:p>
          </table:table-cell>
          <table:table-cell table:style-name="ce45" office:value-type="float" office:value="1648" calcext:value-type="float">
            <text:p>1648</text:p>
          </table:table-cell>
          <table:table-cell table:style-name="ce53" table:formula="of:=SUM([.D730:.H730])" office:value-type="float" office:value="16274" calcext:value-type="float">
            <text:p>16274</text:p>
          </table:table-cell>
          <table:table-cell table:style-name="ce60" office:value-type="string" calcext:value-type="string">
            <text:p>Dreamweav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0]=126;70;IF([.T730]=112;70;IF([.T730]=98;70;IF([.T730]=96;60;IF([.T730]=84;60;IF([.T730]=108;60;IF([.T730]=90;50;IF([.T730]=72;40;IF([.T730]=80;40;IF([.T730]=100;50;IF([.T730]=54;30;IF([.T730]=36;20;IF([.T730]=18;10;IF([.T730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8/8b/Wyldenros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Maidenfern_-_Cherrybaby_-_Wyldenrose&quot;; &quot;Wyldenrose&quot;)" office:value-type="string" office:string-value="Wyldenrose" calcext:value-type="string">
            <text:p>Wyldenrose</text:p>
          </table:table-cell>
          <table:table-cell table:style-name="ce25"/>
          <table:table-cell table:style-name="ce28" office:value-type="float" office:value="1841" calcext:value-type="float">
            <text:p>1841</text:p>
          </table:table-cell>
          <table:table-cell table:style-name="ce33" office:value-type="float" office:value="1292" calcext:value-type="float">
            <text:p>1292</text:p>
          </table:table-cell>
          <table:table-cell table:style-name="ce37" office:value-type="float" office:value="835" calcext:value-type="float">
            <text:p>835</text:p>
          </table:table-cell>
          <table:table-cell table:style-name="ce41" office:value-type="float" office:value="5293" calcext:value-type="float">
            <text:p>5293</text:p>
          </table:table-cell>
          <table:table-cell table:style-name="ce45" office:value-type="float" office:value="5042" calcext:value-type="float">
            <text:p>5042</text:p>
          </table:table-cell>
          <table:table-cell table:style-name="ce53" table:formula="of:=SUM([.D731:.H731])" office:value-type="float" office:value="14303" calcext:value-type="float">
            <text:p>14303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1]=126;70;IF([.T731]=112;70;IF([.T731]=98;70;IF([.T731]=96;60;IF([.T731]=84;60;IF([.T731]=108;60;IF([.T731]=90;50;IF([.T731]=72;40;IF([.T731]=80;40;IF([.T731]=100;50;IF([.T731]=54;30;IF([.T731]=36;20;IF([.T731]=18;10;IF([.T73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911135916/defenderoftexel/images/thumb/6/65/Xiandiana_Icon.png/50px-Xiandian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Dollcinea_-_Octavilani_-_Xiandiana&quot;; &quot;Xiandiana&quot;)" office:value-type="string" office:string-value="Xiandiana" calcext:value-type="string">
            <text:p>Xiandiana</text:p>
          </table:table-cell>
          <table:table-cell table:style-name="ce25"/>
          <table:table-cell table:style-name="ce28" office:value-type="float" office:value="1470" calcext:value-type="float">
            <text:p>1470</text:p>
          </table:table-cell>
          <table:table-cell table:style-name="ce33" office:value-type="float" office:value="1031" calcext:value-type="float">
            <text:p>1031</text:p>
          </table:table-cell>
          <table:table-cell table:style-name="ce37" office:value-type="float" office:value="666" calcext:value-type="float">
            <text:p>666</text:p>
          </table:table-cell>
          <table:table-cell table:style-name="ce41" office:value-type="float" office:value="4226" calcext:value-type="float">
            <text:p>4226</text:p>
          </table:table-cell>
          <table:table-cell table:style-name="ce45" office:value-type="float" office:value="4023" calcext:value-type="float">
            <text:p>4023</text:p>
          </table:table-cell>
          <table:table-cell table:style-name="ce53" table:formula="of:=SUM([.D732:.H732])" office:value-type="float" office:value="11416" calcext:value-type="float">
            <text:p>11416</text:p>
          </table:table-cell>
          <table:table-cell table:style-name="ce60" office:value-type="string" calcext:value-type="string">
            <text:p>Myr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2]=126;70;IF([.T732]=112;70;IF([.T732]=98;70;IF([.T732]=96;60;IF([.T732]=84;60;IF([.T732]=108;60;IF([.T732]=90;50;IF([.T732]=72;40;IF([.T732]=80;40;IF([.T732]=100;50;IF([.T732]=54;30;IF([.T732]=36;20;IF([.T732]=18;10;IF([.T73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a/ae/Xsayars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Kianoush_-_Shahrokh_-_Xsayarsa&quot;; &quot;Xsayarsa&quot;)" office:value-type="string" office:string-value="Xsayarsa" calcext:value-type="string">
            <text:p>Xsayarsa</text:p>
          </table:table-cell>
          <table:table-cell table:style-name="ce25"/>
          <table:table-cell table:style-name="ce28" office:value-type="float" office:value="3317" calcext:value-type="float">
            <text:p>3317</text:p>
          </table:table-cell>
          <table:table-cell table:style-name="ce33" office:value-type="float" office:value="3791" calcext:value-type="float">
            <text:p>3791</text:p>
          </table:table-cell>
          <table:table-cell table:style-name="ce37" office:value-type="float" office:value="2034" calcext:value-type="float">
            <text:p>2034</text:p>
          </table:table-cell>
          <table:table-cell table:style-name="ce41" office:value-type="float" office:value="479" calcext:value-type="float">
            <text:p>479</text:p>
          </table:table-cell>
          <table:table-cell table:style-name="ce45" office:value-type="float" office:value="636" calcext:value-type="float">
            <text:p>636</text:p>
          </table:table-cell>
          <table:table-cell table:style-name="ce53" table:formula="of:=SUM([.D733:.H733])" office:value-type="float" office:value="10257" calcext:value-type="float">
            <text:p>10257</text:p>
          </table:table-cell>
          <table:table-cell table:style-name="ce60" office:value-type="string" calcext:value-type="string">
            <text:p>Smas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3]=126;70;IF([.T733]=112;70;IF([.T733]=98;70;IF([.T733]=96;60;IF([.T733]=84;60;IF([.T733]=108;60;IF([.T733]=90;50;IF([.T733]=72;40;IF([.T733]=80;40;IF([.T733]=100;50;IF([.T733]=54;30;IF([.T733]=36;20;IF([.T733]=18;10;IF([.T73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429123802/defenderoftexel/images/thumb/d/d7/Yaguaris_Icon.png/50px-Yaguari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Yaguaris&quot;; &quot;Yaguaris&quot;)" office:value-type="string" office:string-value="Yaguaris" calcext:value-type="string">
            <text:p>Yaguaris</text:p>
          </table:table-cell>
          <table:table-cell table:style-name="ce25"/>
          <table:table-cell table:style-name="ce28" office:value-type="float" office:value="5139" calcext:value-type="float">
            <text:p>5139</text:p>
          </table:table-cell>
          <table:table-cell table:style-name="ce33" office:value-type="float" office:value="5878" calcext:value-type="float">
            <text:p>5878</text:p>
          </table:table-cell>
          <table:table-cell table:style-name="ce37" office:value-type="float" office:value="3150" calcext:value-type="float">
            <text:p>3150</text:p>
          </table:table-cell>
          <table:table-cell table:style-name="ce41" office:value-type="float" office:value="741" calcext:value-type="float">
            <text:p>741</text:p>
          </table:table-cell>
          <table:table-cell table:style-name="ce45" office:value-type="float" office:value="985" calcext:value-type="float">
            <text:p>985</text:p>
          </table:table-cell>
          <table:table-cell table:style-name="ce53" table:formula="of:=SUM([.D734:.H734])" office:value-type="float" office:value="15893" calcext:value-type="float">
            <text:p>15893</text:p>
          </table:table-cell>
          <table:table-cell table:style-name="ce60" office:value-type="string" calcext:value-type="string">
            <text:p>Gu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4]=126;70;IF([.T734]=112;70;IF([.T734]=98;70;IF([.T734]=96;60;IF([.T734]=84;60;IF([.T734]=108;60;IF([.T734]=90;50;IF([.T734]=72;40;IF([.T734]=80;40;IF([.T734]=100;50;IF([.T734]=54;30;IF([.T734]=36;20;IF([.T734]=18;10;IF([.T73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112133531/defenderoftexel/images/thumb/e/e1/Yasamin_Icon.png/50px-Yasam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Pari_-_Narda_-_Yasamin&quot;;&quot;Yasamin&quot;)" office:value-type="string" office:string-value="Yasamin" calcext:value-type="string">
            <text:p>Yasamin</text:p>
          </table:table-cell>
          <table:table-cell table:style-name="ce25"/>
          <table:table-cell table:style-name="ce28" office:value-type="float" office:value="1425" calcext:value-type="float">
            <text:p>1425</text:p>
          </table:table-cell>
          <table:table-cell table:style-name="ce33" office:value-type="float" office:value="1009" calcext:value-type="float">
            <text:p>1009</text:p>
          </table:table-cell>
          <table:table-cell table:style-name="ce37" office:value-type="float" office:value="657" calcext:value-type="float">
            <text:p>657</text:p>
          </table:table-cell>
          <table:table-cell table:style-name="ce41" office:value-type="float" office:value="3947" calcext:value-type="float">
            <text:p>3947</text:p>
          </table:table-cell>
          <table:table-cell table:style-name="ce45" office:value-type="float" office:value="3766" calcext:value-type="float">
            <text:p>3766</text:p>
          </table:table-cell>
          <table:table-cell table:style-name="ce53" table:formula="of:=SUM([.D735:.H735])" office:value-type="float" office:value="10804" calcext:value-type="float">
            <text:p>10804</text:p>
          </table:table-cell>
          <table:table-cell table:style-name="ce60" office:value-type="string" calcext:value-type="string">
            <text:p>Pyro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5]=126;70;IF([.T735]=112;70;IF([.T735]=98;70;IF([.T735]=96;60;IF([.T735]=84;60;IF([.T735]=108;60;IF([.T735]=90;50;IF([.T735]=72;40;IF([.T735]=80;40;IF([.T735]=100;50;IF([.T735]=54;30;IF([.T735]=36;20;IF([.T735]=18;10;IF([.T73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40506123504/defenderoftexel/images/thumb/7/71/Yotan_Icon.png/50px-Yota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Yotan&quot;; &quot;Yotan&quot;)" office:value-type="string" office:string-value="Yotan" calcext:value-type="string">
            <text:p>Yotan</text:p>
          </table:table-cell>
          <table:table-cell table:style-name="ce25"/>
          <table:table-cell table:style-name="ce28" office:value-type="float" office:value="2606" calcext:value-type="float">
            <text:p>2606</text:p>
          </table:table-cell>
          <table:table-cell table:style-name="ce33" office:value-type="float" office:value="1985" calcext:value-type="float">
            <text:p>1985</text:p>
          </table:table-cell>
          <table:table-cell table:style-name="ce37" office:value-type="float" office:value="1354" calcext:value-type="float">
            <text:p>1354</text:p>
          </table:table-cell>
          <table:table-cell table:style-name="ce41" office:value-type="float" office:value="1925" calcext:value-type="float">
            <text:p>1925</text:p>
          </table:table-cell>
          <table:table-cell table:style-name="ce45" office:value-type="float" office:value="4858" calcext:value-type="float">
            <text:p>4858</text:p>
          </table:table-cell>
          <table:table-cell table:style-name="ce53" table:formula="of:=SUM([.D736:.H736])" office:value-type="float" office:value="12728" calcext:value-type="float">
            <text:p>12728</text:p>
          </table:table-cell>
          <table:table-cell table:style-name="ce60" office:value-type="string" calcext:value-type="string">
            <text:p>Sting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Ai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6]=126;70;IF([.T736]=112;70;IF([.T736]=98;70;IF([.T736]=96;60;IF([.T736]=84;60;IF([.T736]=108;60;IF([.T736]=90;50;IF([.T736]=72;40;IF([.T736]=80;40;IF([.T736]=100;50;IF([.T736]=54;30;IF([.T736]=36;20;IF([.T736]=18;10;IF([.T73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4.wikia.nocookie.net/__cb20131218131020/defenderoftexel/images/thumb/f/f2/Yuloboros_Icon.png/50px-Yuloboro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Jingaloo_-_Thuringon_-_Yuloboros&quot;;&quot;Yuloboros&quot;)" office:value-type="string" office:string-value="Yuloboros" calcext:value-type="string">
            <text:p>Yuloboros</text:p>
          </table:table-cell>
          <table:table-cell table:style-name="ce25"/>
          <table:table-cell table:style-name="ce28" office:value-type="float" office:value="3115" calcext:value-type="float">
            <text:p>3115</text:p>
          </table:table-cell>
          <table:table-cell table:style-name="ce33" office:value-type="float" office:value="4740" calcext:value-type="float">
            <text:p>4740</text:p>
          </table:table-cell>
          <table:table-cell table:style-name="ce37" office:value-type="float" office:value="1619" calcext:value-type="float">
            <text:p>1619</text:p>
          </table:table-cell>
          <table:table-cell table:style-name="ce41" office:value-type="float" office:value="977" calcext:value-type="float">
            <text:p>977</text:p>
          </table:table-cell>
          <table:table-cell table:style-name="ce45" office:value-type="float" office:value="4913" calcext:value-type="float">
            <text:p>4913</text:p>
          </table:table-cell>
          <table:table-cell table:style-name="ce53" table:formula="of:=SUM([.D737:.H737])" office:value-type="float" office:value="15364" calcext:value-type="float">
            <text:p>15364</text:p>
          </table:table-cell>
          <table:table-cell table:style-name="ce60" office:value-type="string" calcext:value-type="string">
            <text:p>Snowdo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Rogue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7]=126;70;IF([.T737]=112;70;IF([.T737]=98;70;IF([.T737]=96;60;IF([.T737]=84;60;IF([.T737]=108;60;IF([.T737]=90;50;IF([.T737]=72;40;IF([.T737]=80;40;IF([.T737]=100;50;IF([.T737]=54;30;IF([.T737]=36;20;IF([.T737]=18;10;IF([.T73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3.wikia.nocookie.net/__cb20130924194214/defenderoftexel/images/thumb/b/b0/Zabu_Icon.png/50px-Zab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Sar_-_Telal_-_Zabu&quot;; &quot;Zabu&quot;)" office:value-type="string" office:string-value="Zabu" calcext:value-type="string">
            <text:p>Zabu</text:p>
          </table:table-cell>
          <table:table-cell table:style-name="ce25"/>
          <table:table-cell table:style-name="ce28" office:value-type="float" office:value="3340" calcext:value-type="float">
            <text:p>3340</text:p>
          </table:table-cell>
          <table:table-cell table:style-name="ce33" office:value-type="float" office:value="3777" calcext:value-type="float">
            <text:p>3777</text:p>
          </table:table-cell>
          <table:table-cell table:style-name="ce37" office:value-type="float" office:value="6844" calcext:value-type="float">
            <text:p>6844</text:p>
          </table:table-cell>
          <table:table-cell table:style-name="ce41" office:value-type="float" office:value="344" calcext:value-type="float">
            <text:p>344</text:p>
          </table:table-cell>
          <table:table-cell table:style-name="ce45" office:value-type="float" office:value="292" calcext:value-type="float">
            <text:p>292</text:p>
          </table:table-cell>
          <table:table-cell table:style-name="ce53" table:formula="of:=SUM([.D738:.H738])" office:value-type="float" office:value="14597" calcext:value-type="float">
            <text:p>14597</text:p>
          </table:table-cell>
          <table:table-cell table:style-name="ce60" office:value-type="string" calcext:value-type="string">
            <text:p>Grim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Earth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8]=126;70;IF([.T738]=112;70;IF([.T738]=98;70;IF([.T738]=96;60;IF([.T738]=84;60;IF([.T738]=108;60;IF([.T738]=90;50;IF([.T738]=72;40;IF([.T738]=80;40;IF([.T738]=100;50;IF([.T738]=54;30;IF([.T738]=36;20;IF([.T738]=18;10;IF([.T73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static1.wikia.nocookie.net/__cb20131022121945/defenderoftexel/images/thumb/e/e2/Zaidu_Icon.png/50px-Zaid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Hahanu_-_Isimud_-_Zaidu&quot;;&quot;Zaidu&quot;)" office:value-type="string" office:string-value="Zaidu" calcext:value-type="string">
            <text:p>Zaidu</text:p>
          </table:table-cell>
          <table:table-cell table:style-name="ce25"/>
          <table:table-cell table:style-name="ce28" office:value-type="float" office:value="3304" calcext:value-type="float">
            <text:p>3304</text:p>
          </table:table-cell>
          <table:table-cell table:style-name="ce33" office:value-type="float" office:value="3734" calcext:value-type="float">
            <text:p>3734</text:p>
          </table:table-cell>
          <table:table-cell table:style-name="ce37" office:value-type="float" office:value="6769" calcext:value-type="float">
            <text:p>6769</text:p>
          </table:table-cell>
          <table:table-cell table:style-name="ce41" office:value-type="float" office:value="339" calcext:value-type="float">
            <text:p>339</text:p>
          </table:table-cell>
          <table:table-cell table:style-name="ce45" office:value-type="float" office:value="290" calcext:value-type="float">
            <text:p>290</text:p>
          </table:table-cell>
          <table:table-cell table:style-name="ce53" table:formula="of:=SUM([.D739:.H739])" office:value-type="float" office:value="14436" calcext:value-type="float">
            <text:p>14436</text:p>
          </table:table-cell>
          <table:table-cell table:style-name="ce60" office:value-type="string" calcext:value-type="string">
            <text:p>Immolate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39]=126;70;IF([.T739]=112;70;IF([.T739]=98;70;IF([.T739]=96;60;IF([.T739]=84;60;IF([.T739]=108;60;IF([.T739]=90;50;IF([.T739]=72;40;IF([.T739]=80;40;IF([.T739]=100;50;IF([.T739]=54;30;IF([.T739]=36;20;IF([.T739]=18;10;IF([.T73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6" table:formula="of:=image(&quot;http://vignette3.wikia.nocookie.net/defenderoftexel/images/3/36/Zalmodegicus_Icon.png/revision/latest?cb=20150502073039&quot;)" office:value-type="string" office:string-value="" calcext:value-type="error">
            <text:p>#NAME?</text:p>
          </table:table-cell>
          <table:table-cell table:style-name="ce11" table:formula="of:=HYPERLINK(&quot;http://defenderoftexel.wikia.com/wiki/Teres_-_Ammadoc_-_Zalmodegicus&quot;;&quot;Zalmodegicus&quot;)" office:value-type="string" office:string-value="Zalmodegicus" calcext:value-type="string">
            <text:p>Zalmodegicus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873" calcext:value-type="float">
            <text:p>3873</text:p>
          </table:table-cell>
          <table:table-cell table:style-name="ce32" office:value-type="float" office:value="5893" calcext:value-type="float">
            <text:p>5893</text:p>
          </table:table-cell>
          <table:table-cell table:style-name="ce36" office:value-type="float" office:value="2014" calcext:value-type="float">
            <text:p>2014</text:p>
          </table:table-cell>
          <table:table-cell table:style-name="ce40" office:value-type="float" office:value="1212" calcext:value-type="float">
            <text:p>1212</text:p>
          </table:table-cell>
          <table:table-cell table:style-name="ce44" office:value-type="float" office:value="6109" calcext:value-type="float">
            <text:p>6109</text:p>
          </table:table-cell>
          <table:table-cell table:style-name="ce52" table:formula="of:=SUM([.D740:.H740])" office:value-type="float" office:value="19101" calcext:value-type="float">
            <text:p>19101</text:p>
          </table:table-cell>
          <table:table-cell table:style-name="ce59" office:value-type="string" calcext:value-type="string">
            <text:p>Preempt</text:p>
          </table:table-cell>
          <table:table-cell table:style-name="ce59" office:value-type="string" calcext:value-type="string">
            <text:p>All</text:p>
          </table:table-cell>
          <table:table-cell table:style-name="ce59" office:value-type="string" calcext:value-type="string">
            <text:p>Adep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Rogue</text:p>
          </table:table-cell>
          <table:table-cell table:style-name="ce67" office:value-type="string" calcext:value-type="string">
            <text:p>Fire</text:p>
          </table:table-cell>
          <table:table-cell table:style-name="ce67" office:value-type="string" calcext:value-type="string">
            <text:p>Xana</text:p>
          </table:table-cell>
          <table:table-cell table:style-name="ce70" office:value-type="string" calcext:value-type="string">
            <text:p>E</text:p>
          </table:table-cell>
          <table:table-cell table:style-name="ce63" office:value-type="float" office:value="5" calcext:value-type="float">
            <text:p>5</text:p>
          </table:table-cell>
          <table:table-cell table:style-name="ce67" table:formula="of:=IF([.T740]=126;70;IF([.T740]=112;70;IF([.T740]=98;70;IF([.T740]=96;60;IF([.T740]=84;60;IF([.T740]=108;60;IF([.T740]=90;50;IF([.T740]=72;40;IF([.T740]=80;40;IF([.T740]=100;50;IF([.T740]=54;30;IF([.T740]=36;20;IF([.T740]=18;10;IF([.T740]=60;30))))))))))))))" office:value-type="float" office:value="50" calcext:value-type="float">
            <text:p>50</text:p>
          </table:table-cell>
          <table:table-cell table:style-name="ce67" office:value-type="float" office:value="100" calcext:value-type="float">
            <text:p>10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428023559/defenderoftexel/images/thumb/8/8b/Zalmoxis_Icon.png/40px-Zalmoxi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almoxis&quot;; &quot;Zalmoxis&quot;)" office:value-type="string" office:string-value="Zalmoxis" calcext:value-type="string">
            <text:p>Zalmoxis</text:p>
          </table:table-cell>
          <table:table-cell table:style-name="ce25"/>
          <table:table-cell table:style-name="ce28" office:value-type="float" office:value="5027" calcext:value-type="float">
            <text:p>5027</text:p>
          </table:table-cell>
          <table:table-cell table:style-name="ce33" office:value-type="float" office:value="4249" calcext:value-type="float">
            <text:p>4249</text:p>
          </table:table-cell>
          <table:table-cell table:style-name="ce37" office:value-type="float" office:value="2181" calcext:value-type="float">
            <text:p>2181</text:p>
          </table:table-cell>
          <table:table-cell table:style-name="ce41" office:value-type="float" office:value="428" calcext:value-type="float">
            <text:p>428</text:p>
          </table:table-cell>
          <table:table-cell table:style-name="ce45" office:value-type="float" office:value="1631" calcext:value-type="float">
            <text:p>1631</text:p>
          </table:table-cell>
          <table:table-cell table:style-name="ce53" table:formula="of:=SUM([.D741:.H741])" office:value-type="float" office:value="13516" calcext:value-type="float">
            <text:p>13516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41]=126;70;IF([.T741]=112;70;IF([.T741]=98;70;IF([.T741]=96;60;IF([.T741]=84;60;IF([.T741]=108;60;IF([.T741]=90;50;IF([.T741]=72;40;IF([.T741]=80;40;IF([.T741]=100;50;IF([.T741]=54;30;IF([.T741]=36;20;IF([.T741]=18;10;IF([.T741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 table:formula="of:=image(&quot;http://images2.wikia.nocookie.net/__cb20130924182212/defenderoftexel/images/thumb/0/06/Zartosht_Icon.png/50px-Zartosht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artosht&quot;; &quot;Zartosht&quot;)" office:value-type="string" office:string-value="Zartosht" calcext:value-type="string">
            <text:p>Zartosht</text:p>
          </table:table-cell>
          <table:table-cell table:style-name="ce25"/>
          <table:table-cell table:style-name="ce28" office:value-type="float" office:value="8848" calcext:value-type="float">
            <text:p>8848</text:p>
          </table:table-cell>
          <table:table-cell table:style-name="ce33" office:value-type="float" office:value="7463" calcext:value-type="float">
            <text:p>7463</text:p>
          </table:table-cell>
          <table:table-cell table:style-name="ce37" office:value-type="float" office:value="3819" calcext:value-type="float">
            <text:p>3819</text:p>
          </table:table-cell>
          <table:table-cell table:style-name="ce41" office:value-type="float" office:value="766" calcext:value-type="float">
            <text:p>766</text:p>
          </table:table-cell>
          <table:table-cell table:style-name="ce45" office:value-type="float" office:value="2861" calcext:value-type="float">
            <text:p>2861</text:p>
          </table:table-cell>
          <table:table-cell table:style-name="ce53" table:formula="of:=SUM([.D742:.H742])" office:value-type="float" office:value="23757" calcext:value-type="float">
            <text:p>23757</text:p>
          </table:table-cell>
          <table:table-cell table:style-name="ce60" office:value-type="string" calcext:value-type="string">
            <text:p>Lase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42]=126;70;IF([.T742]=112;70;IF([.T742]=98;70;IF([.T742]=96;60;IF([.T742]=84;60;IF([.T742]=108;60;IF([.T742]=90;50;IF([.T742]=72;40;IF([.T742]=80;40;IF([.T742]=100;50;IF([.T742]=54;30;IF([.T742]=36;20;IF([.T742]=18;10;IF([.T742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2/26/Zertnai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ertnai&quot;; &quot;Zertnai&quot;)" office:value-type="string" office:string-value="Zertnai" calcext:value-type="string">
            <text:p>Zertnai</text:p>
          </table:table-cell>
          <table:table-cell table:style-name="ce25"/>
          <table:table-cell table:style-name="ce28" office:value-type="float" office:value="8694" calcext:value-type="float">
            <text:p>8694</text:p>
          </table:table-cell>
          <table:table-cell table:style-name="ce33" office:value-type="float" office:value="6177" calcext:value-type="float">
            <text:p>6177</text:p>
          </table:table-cell>
          <table:table-cell table:style-name="ce37" office:value-type="float" office:value="7198" calcext:value-type="float">
            <text:p>7198</text:p>
          </table:table-cell>
          <table:table-cell table:style-name="ce41" office:value-type="float" office:value="752" calcext:value-type="float">
            <text:p>752</text:p>
          </table:table-cell>
          <table:table-cell table:style-name="ce45" office:value-type="float" office:value="924" calcext:value-type="float">
            <text:p>924</text:p>
          </table:table-cell>
          <table:table-cell table:style-name="ce53" table:formula="of:=SUM([.D743:.H743])" office:value-type="float" office:value="23745" calcext:value-type="float">
            <text:p>23745</text:p>
          </table:table-cell>
          <table:table-cell table:style-name="ce60" office:value-type="string" calcext:value-type="string">
            <text:p>Shock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43]=126;70;IF([.T743]=112;70;IF([.T743]=98;70;IF([.T743]=96;60;IF([.T743]=84;60;IF([.T743]=108;60;IF([.T743]=90;50;IF([.T743]=72;40;IF([.T743]=80;40;IF([.T743]=100;50;IF([.T743]=54;30;IF([.T743]=36;20;IF([.T743]=18;10;IF([.T743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325120637/defenderoftexel/images/thumb/3/3b/Zeus_Olympios_Icon.png/50px-Zeus_Olympio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eus_Olympios&quot;; &quot;Zeus Olympios&quot;)" office:value-type="string" office:string-value="Zeus Olympios" calcext:value-type="string">
            <text:p>Zeus Olympios</text:p>
          </table:table-cell>
          <table:table-cell table:style-name="ce25"/>
          <table:table-cell table:style-name="ce28" office:value-type="float" office:value="8285" calcext:value-type="float">
            <text:p>8285</text:p>
          </table:table-cell>
          <table:table-cell table:style-name="ce33" office:value-type="float" office:value="10449" calcext:value-type="float">
            <text:p>10449</text:p>
          </table:table-cell>
          <table:table-cell table:style-name="ce37" office:value-type="float" office:value="2758" calcext:value-type="float">
            <text:p>2758</text:p>
          </table:table-cell>
          <table:table-cell table:style-name="ce41" office:value-type="float" office:value="9518" calcext:value-type="float">
            <text:p>9518</text:p>
          </table:table-cell>
          <table:table-cell table:style-name="ce45" office:value-type="float" office:value="1833" calcext:value-type="float">
            <text:p>1833</text:p>
          </table:table-cell>
          <table:table-cell table:style-name="ce53" table:formula="of:=SUM([.D744:.H744])" office:value-type="float" office:value="32843" calcext:value-type="float">
            <text:p>32843</text:p>
          </table:table-cell>
          <table:table-cell table:style-name="ce60" office:value-type="string" calcext:value-type="string">
            <text:p>Enthrall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Lightning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744]=126;70;IF([.T744]=112;70;IF([.T744]=98;70;IF([.T744]=96;60;IF([.T744]=84;60;IF([.T744]=108;60;IF([.T744]=90;50;IF([.T744]=72;40;IF([.T744]=80;40;IF([.T744]=100;50;IF([.T744]=54;30;IF([.T744]=36;20;IF([.T744]=18;10;IF([.T744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.wikia.com/defenderoftexel/images/e/e1/Zhubin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hubin&quot;; &quot;Zhubin&quot;)" office:value-type="string" office:string-value="Zhubin" calcext:value-type="string">
            <text:p>Zhubin</text:p>
          </table:table-cell>
          <table:table-cell table:style-name="ce25"/>
          <table:table-cell table:style-name="ce28" office:value-type="float" office:value="3181" calcext:value-type="float">
            <text:p>3181</text:p>
          </table:table-cell>
          <table:table-cell table:style-name="ce33" office:value-type="float" office:value="4463" calcext:value-type="float">
            <text:p>4463</text:p>
          </table:table-cell>
          <table:table-cell table:style-name="ce37" office:value-type="float" office:value="972" calcext:value-type="float">
            <text:p>972</text:p>
          </table:table-cell>
          <table:table-cell table:style-name="ce41" office:value-type="float" office:value="2854" calcext:value-type="float">
            <text:p>2854</text:p>
          </table:table-cell>
          <table:table-cell table:style-name="ce45" office:value-type="float" office:value="1290" calcext:value-type="float">
            <text:p>1290</text:p>
          </table:table-cell>
          <table:table-cell table:style-name="ce53" table:formula="of:=SUM([.D745:.H745])" office:value-type="float" office:value="12760" calcext:value-type="float">
            <text:p>12760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45]=126;70;IF([.T745]=112;70;IF([.T745]=98;70;IF([.T745]=96;60;IF([.T745]=84;60;IF([.T745]=108;60;IF([.T745]=90;50;IF([.T745]=72;40;IF([.T745]=80;40;IF([.T745]=100;50;IF([.T745]=54;30;IF([.T745]=36;20;IF([.T745]=18;10;IF([.T745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ages4.wikia.nocookie.net/__cb20131011233960/defenderoftexel/images/thumb/f/fa/Zicu_Icon.png/50px-Zicu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icu&quot;; &quot;Zicu&quot;)" office:value-type="string" office:string-value="Zicu" calcext:value-type="string">
            <text:p>Zicu</text:p>
          </table:table-cell>
          <table:table-cell table:style-name="ce25"/>
          <table:table-cell table:style-name="ce28" office:value-type="float" office:value="5859" calcext:value-type="float">
            <text:p>5859</text:p>
          </table:table-cell>
          <table:table-cell table:style-name="ce33" office:value-type="float" office:value="7391" calcext:value-type="float">
            <text:p>7391</text:p>
          </table:table-cell>
          <table:table-cell table:style-name="ce37" office:value-type="float" office:value="1946" calcext:value-type="float">
            <text:p>1946</text:p>
          </table:table-cell>
          <table:table-cell table:style-name="ce41" office:value-type="float" office:value="6732" calcext:value-type="float">
            <text:p>6732</text:p>
          </table:table-cell>
          <table:table-cell table:style-name="ce45" office:value-type="float" office:value="1292" calcext:value-type="float">
            <text:p>1292</text:p>
          </table:table-cell>
          <table:table-cell table:style-name="ce53" table:formula="of:=SUM([.D746:.H746])" office:value-type="float" office:value="23220" calcext:value-type="float">
            <text:p>23220</text:p>
          </table:table-cell>
          <table:table-cell table:style-name="ce60" office:value-type="string" calcext:value-type="string">
            <text:p>Frost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Adept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Warlock</text:p>
          </table:table-cell>
          <table:table-cell table:style-name="ce68" office:value-type="string" calcext:value-type="string">
            <text:p>Water</text:p>
          </table:table-cell>
          <table:table-cell table:style-name="ce68" office:value-type="string" calcext:value-type="string">
            <text:p>Theri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IF([.T746]=126;70;IF([.T746]=112;70;IF([.T746]=98;70;IF([.T746]=96;60;IF([.T746]=84;60;IF([.T746]=108;60;IF([.T746]=90;50;IF([.T746]=72;40;IF([.T746]=80;40;IF([.T746]=100;50;IF([.T746]=54;30;IF([.T746]=36;20;IF([.T746]=18;10;IF([.T746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1.wikia.nocookie.net/__cb20140128162102/defenderoftexel/images/thumb/7/72/Zimarie_Icon.png/50px-Zimarie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imarie&quot;; &quot;Zimarie&quot;)" office:value-type="string" office:string-value="Zimarie" calcext:value-type="string">
            <text:p>Zimarie</text:p>
          </table:table-cell>
          <table:table-cell table:style-name="ce25"/>
          <table:table-cell table:style-name="ce28" office:value-type="float" office:value="3814" calcext:value-type="float">
            <text:p>3814</text:p>
          </table:table-cell>
          <table:table-cell table:style-name="ce33" office:value-type="float" office:value="497" calcext:value-type="float">
            <text:p>497</text:p>
          </table:table-cell>
          <table:table-cell table:style-name="ce37" office:value-type="float" office:value="1357" calcext:value-type="float">
            <text:p>1357</text:p>
          </table:table-cell>
          <table:table-cell table:style-name="ce41" office:value-type="float" office:value="7759" calcext:value-type="float">
            <text:p>7759</text:p>
          </table:table-cell>
          <table:table-cell table:style-name="ce45" office:value-type="float" office:value="2584" calcext:value-type="float">
            <text:p>2584</text:p>
          </table:table-cell>
          <table:table-cell table:style-name="ce53" table:formula="of:=SUM([.D747:.H747])" office:value-type="float" office:value="16011" calcext:value-type="float">
            <text:p>16011</text:p>
          </table:table-cell>
          <table:table-cell table:style-name="ce60" office:value-type="string" calcext:value-type="string">
            <text:p>Glister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Hemi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47]=126;70;IF([.T747]=112;70;IF([.T747]=98;70;IF([.T747]=96;60;IF([.T747]=84;60;IF([.T747]=108;60;IF([.T747]=90;50;IF([.T747]=72;40;IF([.T747]=80;40;IF([.T747]=100;50;IF([.T747]=54;30;IF([.T747]=36;20;IF([.T747]=18;10;IF([.T747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2.wikia.nocookie.net/__cb20140211134229/defenderoftexel/images/thumb/c/c5/Zuleika_Icon.png/50px-Zuleika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uleika&quot;; &quot;Zuleika&quot;)" office:value-type="string" office:string-value="Zuleika" calcext:value-type="string">
            <text:p>Zuleika</text:p>
          </table:table-cell>
          <table:table-cell table:style-name="ce25"/>
          <table:table-cell table:style-name="ce28" office:value-type="float" office:value="7002" calcext:value-type="float">
            <text:p>7002</text:p>
          </table:table-cell>
          <table:table-cell table:style-name="ce33" office:value-type="float" office:value="928" calcext:value-type="float">
            <text:p>928</text:p>
          </table:table-cell>
          <table:table-cell table:style-name="ce37" office:value-type="float" office:value="2500" calcext:value-type="float">
            <text:p>2500</text:p>
          </table:table-cell>
          <table:table-cell table:style-name="ce41" office:value-type="float" office:value="14374" calcext:value-type="float">
            <text:p>14374</text:p>
          </table:table-cell>
          <table:table-cell table:style-name="ce45" office:value-type="float" office:value="4751" calcext:value-type="float">
            <text:p>4751</text:p>
          </table:table-cell>
          <table:table-cell table:style-name="ce53" table:formula="of:=SUM([.D748:.H748])" office:value-type="float" office:value="29555" calcext:value-type="float">
            <text:p>29555</text:p>
          </table:table-cell>
          <table:table-cell table:style-name="ce60" office:value-type="string" calcext:value-type="string">
            <text:p>Betwitch</text:p>
          </table:table-cell>
          <table:table-cell table:style-name="ce60" office:value-type="string" calcext:value-type="string">
            <text:p>All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Guru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L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IF([.T748]=126;70;IF([.T748]=112;70;IF([.T748]=98;70;IF([.T748]=96;60;IF([.T748]=84;60;IF([.T748]=108;60;IF([.T748]=90;50;IF([.T748]=72;40;IF([.T748]=80;40;IF([.T748]=100;50;IF([.T748]=54;30;IF([.T748]=36;20;IF([.T748]=18;10;IF([.T748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1" table:formula="of:=image(&quot;http://img4.wikia.nocookie.net/__cb20130428033449/defenderoftexel/images/thumb/6/62/Zyraxes_Icon.png/50px-Zyraxes_Icon.png&quot;)" office:value-type="string" office:string-value="" calcext:value-type="error">
            <text:p>#NAME?</text:p>
          </table:table-cell>
          <table:table-cell table:style-name="ce12" table:formula="of:=HYPERLINK(&quot;http://defenderoftexel.wikia.com/wiki/Zyraxes&quot;; &quot;Zyraxes&quot;)" office:value-type="string" office:string-value="Zyraxes" calcext:value-type="string">
            <text:p>Zyraxes</text:p>
          </table:table-cell>
          <table:table-cell table:style-name="ce25"/>
          <table:table-cell table:style-name="ce28" office:value-type="float" office:value="3779" calcext:value-type="float">
            <text:p>3779</text:p>
          </table:table-cell>
          <table:table-cell table:style-name="ce33" office:value-type="float" office:value="3218" calcext:value-type="float">
            <text:p>3218</text:p>
          </table:table-cell>
          <table:table-cell table:style-name="ce37" office:value-type="float" office:value="1695" calcext:value-type="float">
            <text:p>1695</text:p>
          </table:table-cell>
          <table:table-cell table:style-name="ce41" office:value-type="float" office:value="342" calcext:value-type="float">
            <text:p>342</text:p>
          </table:table-cell>
          <table:table-cell table:style-name="ce45" office:value-type="float" office:value="1275" calcext:value-type="float">
            <text:p>1275</text:p>
          </table:table-cell>
          <table:table-cell table:style-name="ce53" table:formula="of:=SUM([.D749:.H749])" office:value-type="float" office:value="10309" calcext:value-type="float">
            <text:p>10309</text:p>
          </table:table-cell>
          <table:table-cell table:style-name="ce60" office:value-type="string" calcext:value-type="string">
            <text:p>Scorch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Elite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string" calcext:value-type="string">
            <text:p>Champ</text:p>
          </table:table-cell>
          <table:table-cell table:style-name="ce68" office:value-type="string" calcext:value-type="string">
            <text:p>Fire</text:p>
          </table:table-cell>
          <table:table-cell table:style-name="ce68" office:value-type="string" calcext:value-type="string">
            <text:p>Xana</text:p>
          </table:table-cell>
          <table:table-cell table:style-name="ce71" office:value-type="string" calcext:value-type="string">
            <text:p>E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formula="of:=IF([.T749]=126;70;IF([.T749]=112;70;IF([.T749]=98;70;IF([.T749]=96;60;IF([.T749]=84;60;IF([.T749]=108;60;IF([.T749]=90;50;IF([.T749]=72;40;IF([.T749]=80;40;IF([.T749]=100;50;IF([.T749]=54;30;IF([.T749]=36;20;IF([.T749]=18;10;IF([.T749]=60;30))))))))))))))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12" table:formula="of:=HYPERLINK(&quot;http://defenderoftexel.wikia.com/wiki/Fuulido&quot;;&quot;Fuulido&quot;)" office:value-type="string" office:string-value="Fuulido" calcext:value-type="string">
            <text:p>Fuulido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>
          <table:table-cell table:style-name="ce1"/>
          <table:table-cell table:style-name="ce12" table:formula="of:=HYPERLINK(&quot;http://defenderoftexel.wikia.com/wiki/Mayimba&quot;;&quot;Mayimba&quot;)" office:value-type="string" office:string-value="Mayimba" calcext:value-type="string">
            <text:p>Mayimba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>
          <table:table-cell table:style-name="ce1"/>
          <table:table-cell table:style-name="ce12" table:formula="of:=HYPERLINK(&quot;http://defenderoftexel.wikia.com/wiki/Theek-Iliko&quot;;&quot;Theek-Iliko&quot;)" office:value-type="string" office:string-value="Theek-Iliko" calcext:value-type="string">
            <text:p>Theek-Iliko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>
          <table:table-cell table:style-name="ce1"/>
          <table:table-cell table:style-name="ce12" table:formula="of:=HYPERLINK(&quot;http://defenderoftexel.wikia.com/wiki/Ah_Mun_-_Zac_Uac_Nal_-_Uac_Chuaac_Nal&quot;;&quot;Ah Mun&quot;)" office:value-type="string" office:string-value="Ah Mun" calcext:value-type="string">
            <text:p>Ah Mun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>
          <table:table-cell table:style-name="ce1"/>
          <table:table-cell table:style-name="ce12" table:formula="of:=HYPERLINK(&quot;http://defenderoftexel.wikia.com/wiki/Ah_Mun_-_Zac_Uac_Nal_-_Uac_Chuaac_Nal&quot;;&quot;Zac Ual Nal&quot;)" office:value-type="string" office:string-value="Zac Ual Nal" calcext:value-type="string">
            <text:p>Zac Ual Nal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>
          <table:table-cell table:style-name="ce1"/>
          <table:table-cell table:style-name="ce12" table:formula="of:=HYPERLINK(&quot;http://defenderoftexel.wikia.com/wiki/Ah_Mun_-_Zac_Uac_Nal_-_Uac_Chuaac_Nal&quot;;&quot;Uac Chuaac Nal&quot;)" office:value-type="string" office:string-value="Uac Chuaac Nal" calcext:value-type="string">
            <text:p>Uac Chuaac Nal</text:p>
          </table:table-cell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2" table:number-rows-repeated="551">
          <table:table-cell table:style-name="ce1" table:number-columns-repeated="2"/>
          <table:table-cell table:style-name="ce25"/>
          <table:table-cell table:style-name="ce30" table:number-columns-repeated="17"/>
          <table:table-cell table:number-columns-repeated="1004"/>
        </table:table-row>
        <table:table-row table:style-name="ro3" table:number-rows-repeated="10472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75" meta:object-count="0"/>
    <meta:generator>LibreOfficeDev/6.0.5.2$Linux_X86_64 LibreOffice_project/</meta:generator>
  </office:meta>
</office:document-meta>
</file>